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Таблица1" style:family="table">
      <style:table-properties style:width="17cm" table:align="margins"/>
    </style:style>
    <style:style style:name="Таблица1.A" style:family="table-column">
      <style:table-column-properties style:column-width="4.494cm" style:rel-column-width="17326*"/>
    </style:style>
    <style:style style:name="Таблица1.B" style:family="table-column">
      <style:table-column-properties style:column-width="3.997cm" style:rel-column-width="15410*"/>
    </style:style>
    <style:style style:name="Таблица1.C" style:family="table-column">
      <style:table-column-properties style:column-width="4.247cm" style:rel-column-width="16375*"/>
    </style:style>
    <style:style style:name="Таблица1.D" style:family="table-column">
      <style:table-column-properties style:column-width="4.26cm" style:rel-column-width="16424*"/>
    </style:style>
    <style:style style:name="Таблица1.1" style:family="table-row">
      <style:table-row-properties style:min-row-height="0.609cm"/>
    </style:style>
    <style:style style:name="Таблица1.A1" style:family="table-cell">
      <style:table-cell-properties style:vertical-align="middle" fo:padding="0cm" fo:border="none" style:writing-mode="page"/>
    </style:style>
    <style:style style:name="Таблица1.2" style:family="table-row">
      <style:table-row-properties style:min-row-height="0.688cm"/>
    </style:style>
    <style:style style:name="Размер" style:family="table">
      <style:table-properties style:width="17cm" table:align="margins"/>
    </style:style>
    <style:style style:name="Размер.A" style:family="table-column">
      <style:table-column-properties style:column-width="4.494cm" style:rel-column-width="17326*"/>
    </style:style>
    <style:style style:name="Размер.B" style:family="table-column">
      <style:table-column-properties style:column-width="3.997cm" style:rel-column-width="15410*"/>
    </style:style>
    <style:style style:name="Размер.C" style:family="table-column">
      <style:table-column-properties style:column-width="4.247cm" style:rel-column-width="16375*"/>
    </style:style>
    <style:style style:name="Размер.D" style:family="table-column">
      <style:table-column-properties style:column-width="4.26cm" style:rel-column-width="16424*"/>
    </style:style>
    <style:style style:name="Размер.1" style:family="table-row">
      <style:table-row-properties style:min-row-height="0.794cm"/>
    </style:style>
    <style:style style:name="Размер.A1" style:family="table-cell">
      <style:table-cell-properties style:vertical-align="middle" fo:padding="0cm" fo:border="none" style:writing-mode="page"/>
    </style:style>
    <style:style style:name="Размер.2" style:family="table-row">
      <style:table-row-properties style:min-row-height="0.609cm"/>
    </style:style>
    <style:style style:name="Таблица3" style:family="table">
      <style:table-properties style:width="17cm" table:align="margins"/>
    </style:style>
    <style:style style:name="Таблица3.A" style:family="table-column">
      <style:table-column-properties style:column-width="4.494cm" style:rel-column-width="17326*"/>
    </style:style>
    <style:style style:name="Таблица3.B" style:family="table-column">
      <style:table-column-properties style:column-width="3.997cm" style:rel-column-width="15410*"/>
    </style:style>
    <style:style style:name="Таблица3.C" style:family="table-column">
      <style:table-column-properties style:column-width="4.247cm" style:rel-column-width="16375*"/>
    </style:style>
    <style:style style:name="Таблица3.D" style:family="table-column">
      <style:table-column-properties style:column-width="4.26cm" style:rel-column-width="16424*"/>
    </style:style>
    <style:style style:name="Таблица3.1" style:family="table-row">
      <style:table-row-properties style:min-row-height="0.688cm"/>
    </style:style>
    <style:style style:name="Таблица3.A1" style:family="table-cell">
      <style:table-cell-properties style:vertical-align="middle" fo:padding="0cm" fo:border="none" style:writing-mode="page"/>
    </style:style>
    <style:style style:name="Таблица3.2" style:family="table-row">
      <style:table-row-properties style:min-row-height="0.609cm"/>
    </style:style>
    <style:style style:name="Таблица3.3" style:family="table-row">
      <style:table-row-properties style:min-row-height="0.714cm"/>
    </style:style>
    <style:style style:name="Таблица4" style:family="table">
      <style:table-properties style:width="17cm" table:align="margins"/>
    </style:style>
    <style:style style:name="Таблица4.A" style:family="table-column">
      <style:table-column-properties style:column-width="8.5cm" style:rel-column-width="32767*"/>
    </style:style>
    <style:style style:name="Таблица4.B" style:family="table-column">
      <style:table-column-properties style:column-width="8.5cm" style:rel-column-width="32768*"/>
    </style:style>
    <style:style style:name="Таблица4.1" style:family="table-row">
      <style:table-row-properties style:min-row-height="10.213cm"/>
    </style:style>
    <style:style style:name="Таблица4.A1" style:family="table-cell">
      <style:table-cell-properties style:writing-mode="page"/>
    </style:style>
    <style:style style:name="Таблица5" style:family="table">
      <style:table-properties style:width="17cm" fo:break-before="page" table:align="margins"/>
    </style:style>
    <style:style style:name="Таблица5.A" style:family="table-column">
      <style:table-column-properties style:column-width="8.5cm" style:rel-column-width="32767*"/>
    </style:style>
    <style:style style:name="Таблица5.B" style:family="table-column">
      <style:table-column-properties style:column-width="8.5cm" style:rel-column-width="32768*"/>
    </style:style>
    <style:style style:name="Таблица5.1" style:family="table-row">
      <style:table-row-properties style:min-row-height="10.213cm"/>
    </style:style>
    <style:style style:name="Таблица5.A1" style:family="table-cell">
      <style:table-cell-properties style:writing-mode="page"/>
    </style:style>
    <style:style style:name="Таблица6" style:family="table">
      <style:table-properties style:width="15.699cm" fo:break-before="page" table:align="left"/>
    </style:style>
    <style:style style:name="Таблица6.A" style:family="table-column">
      <style:table-column-properties style:column-width="8.5cm"/>
    </style:style>
    <style:style style:name="Таблица6.B" style:family="table-column">
      <style:table-column-properties style:column-width="7.198cm"/>
    </style:style>
    <style:style style:name="Таблица6.1" style:family="table-row">
      <style:table-row-properties style:min-row-height="9.79cm"/>
    </style:style>
    <style:style style:name="Таблица6.A1" style:family="table-cell">
      <style:table-cell-properties style:writing-mode="page"/>
    </style:style>
    <style:style style:name="Таблица7" style:family="table">
      <style:table-properties style:width="17.903cm" fo:margin-left="0cm" fo:break-before="page" table:align="left"/>
    </style:style>
    <style:style style:name="Таблица7.A" style:family="table-column">
      <style:table-column-properties style:column-width="8.5cm"/>
    </style:style>
    <style:style style:name="Таблица7.B" style:family="table-column">
      <style:table-column-properties style:column-width="9.403cm"/>
    </style:style>
    <style:style style:name="Таблица7.1" style:family="table-row">
      <style:table-row-properties style:min-row-height="9.79cm"/>
    </style:style>
    <style:style style:name="Таблица7.A1" style:family="table-cell">
      <style:table-cell-properties style:writing-mode="page"/>
    </style:style>
    <style:style style:name="Таблица9" style:family="table">
      <style:table-properties style:width="17cm" table:align="margins"/>
    </style:style>
    <style:style style:name="Таблица9.A" style:family="table-column">
      <style:table-column-properties style:column-width="8.5cm" style:rel-column-width="32767*"/>
    </style:style>
    <style:style style:name="Таблица9.B" style:family="table-column">
      <style:table-column-properties style:column-width="8.5cm" style:rel-column-width="32768*"/>
    </style:style>
    <style:style style:name="Таблица9.A1" style:family="table-cell">
      <style:table-cell-properties style:writing-mode="page"/>
    </style:style>
    <style:style style:name="Таблица8" style:family="table">
      <style:table-properties style:width="17.903cm" fo:margin-left="0cm" fo:break-before="page" table:align="left"/>
    </style:style>
    <style:style style:name="Таблица8.A" style:family="table-column">
      <style:table-column-properties style:column-width="8.5cm"/>
    </style:style>
    <style:style style:name="Таблица8.B" style:family="table-column">
      <style:table-column-properties style:column-width="9.403cm"/>
    </style:style>
    <style:style style:name="Таблица8.1" style:family="table-row">
      <style:table-row-properties style:min-row-height="9.79cm"/>
    </style:style>
    <style:style style:name="Таблица8.A1" style:family="table-cell">
      <style:table-cell-properties style:writing-mode="page"/>
    </style:style>
    <style:style style:name="Таблица11" style:family="table">
      <style:table-properties style:width="17.697cm" fo:margin-left="0cm" table:align="left"/>
    </style:style>
    <style:style style:name="Таблица11.A" style:family="table-column">
      <style:table-column-properties style:column-width="8.5cm"/>
    </style:style>
    <style:style style:name="Таблица11.B" style:family="table-column">
      <style:table-column-properties style:column-width="9.197cm"/>
    </style:style>
    <style:style style:name="Таблица11.A1" style:family="table-cell">
      <style:table-cell-properties style:writing-mode="page"/>
    </style:style>
    <style:style style:name="Таблица10" style:family="table">
      <style:table-properties style:width="17cm" fo:break-before="page" table:align="margins"/>
    </style:style>
    <style:style style:name="Таблица10.A" style:family="table-column">
      <style:table-column-properties style:column-width="8.5cm" style:rel-column-width="32767*"/>
    </style:style>
    <style:style style:name="Таблица10.B" style:family="table-column">
      <style:table-column-properties style:column-width="8.5cm" style:rel-column-width="32768*"/>
    </style:style>
    <style:style style:name="Таблица10.1" style:family="table-row">
      <style:table-row-properties style:min-row-height="6.997cm"/>
    </style:style>
    <style:style style:name="Таблица10.A1" style:family="table-cell">
      <style:table-cell-properties style:writing-mode="page"/>
    </style:style>
    <style:style style:name="Таблица12" style:family="table">
      <style:table-properties style:width="17cm" table:align="margins"/>
    </style:style>
    <style:style style:name="Таблица12.A" style:family="table-column">
      <style:table-column-properties style:column-width="8.5cm" style:rel-column-width="32767*"/>
    </style:style>
    <style:style style:name="Таблица12.B" style:family="table-column">
      <style:table-column-properties style:column-width="8.5cm" style:rel-column-width="32768*"/>
    </style:style>
    <style:style style:name="Таблица12.1" style:family="table-row">
      <style:table-row-properties style:min-row-height="0.411cm"/>
    </style:style>
    <style:style style:name="Таблица12.A1" style:family="table-cell">
      <style:table-cell-properties style:writing-mode="page"/>
    </style:style>
    <style:style style:name="Таблица26" style:family="table">
      <style:table-properties style:width="17cm" fo:break-before="page" table:align="margins"/>
    </style:style>
    <style:style style:name="Таблица26.A" style:family="table-column">
      <style:table-column-properties style:column-width="8.5cm" style:rel-column-width="32767*"/>
    </style:style>
    <style:style style:name="Таблица26.B" style:family="table-column">
      <style:table-column-properties style:column-width="8.5cm" style:rel-column-width="32768*"/>
    </style:style>
    <style:style style:name="Таблица26.A1" style:family="table-cell">
      <style:table-cell-properties style:writing-mode="page"/>
    </style:style>
    <style:style style:name="Таблица27" style:family="table">
      <style:table-properties style:width="17cm" table:align="margins"/>
    </style:style>
    <style:style style:name="Таблица27.A" style:family="table-column">
      <style:table-column-properties style:column-width="8.5cm" style:rel-column-width="32767*"/>
    </style:style>
    <style:style style:name="Таблица27.B" style:family="table-column">
      <style:table-column-properties style:column-width="8.5cm" style:rel-column-width="32768*"/>
    </style:style>
    <style:style style:name="Таблица27.A1" style:family="table-cell">
      <style:table-cell-properties style:writing-mode="page"/>
    </style:style>
    <style:style style:name="Таблица14" style:family="table">
      <style:table-properties style:width="17cm" fo:break-before="page" table:align="margins"/>
    </style:style>
    <style:style style:name="Таблица14.A" style:family="table-column">
      <style:table-column-properties style:column-width="8.5cm" style:rel-column-width="32767*"/>
    </style:style>
    <style:style style:name="Таблица14.B" style:family="table-column">
      <style:table-column-properties style:column-width="8.5cm" style:rel-column-width="32768*"/>
    </style:style>
    <style:style style:name="Таблица14.A1" style:family="table-cell">
      <style:table-cell-properties style:writing-mode="page"/>
    </style:style>
    <style:style style:name="Таблица15" style:family="table">
      <style:table-properties style:width="17cm" fo:break-before="page" table:align="margins"/>
    </style:style>
    <style:style style:name="Таблица15.A" style:family="table-column">
      <style:table-column-properties style:column-width="8.5cm" style:rel-column-width="32767*"/>
    </style:style>
    <style:style style:name="Таблица15.B" style:family="table-column">
      <style:table-column-properties style:column-width="8.5cm" style:rel-column-width="32768*"/>
    </style:style>
    <style:style style:name="Таблица15.1" style:family="table-row">
      <style:table-row-properties style:min-row-height="13.788cm"/>
    </style:style>
    <style:style style:name="Таблица15.A1" style:family="table-cell">
      <style:table-cell-properties style:writing-mode="page"/>
    </style:style>
    <style:style style:name="Таблица13" style:family="table">
      <style:table-properties style:width="17cm" fo:break-before="page" table:align="margins"/>
    </style:style>
    <style:style style:name="Таблица13.A" style:family="table-column">
      <style:table-column-properties style:column-width="8.5cm" style:rel-column-width="32767*"/>
    </style:style>
    <style:style style:name="Таблица13.B" style:family="table-column">
      <style:table-column-properties style:column-width="8.5cm" style:rel-column-width="32768*"/>
    </style:style>
    <style:style style:name="Таблица13.A1" style:family="table-cell">
      <style:table-cell-properties style:writing-mode="page"/>
    </style:style>
    <style:style style:name="Таблица16" style:family="table">
      <style:table-properties style:width="17cm" table:align="margins"/>
    </style:style>
    <style:style style:name="Таблица16.A" style:family="table-column">
      <style:table-column-properties style:column-width="8.5cm" style:rel-column-width="32767*"/>
    </style:style>
    <style:style style:name="Таблица16.B" style:family="table-column">
      <style:table-column-properties style:column-width="8.5cm" style:rel-column-width="32768*"/>
    </style:style>
    <style:style style:name="Таблица16.1" style:family="table-row">
      <style:table-row-properties style:min-row-height="0.411cm"/>
    </style:style>
    <style:style style:name="Таблица16.A1" style:family="table-cell">
      <style:table-cell-properties style:writing-mode="page"/>
    </style:style>
    <style:style style:name="Таблица17" style:family="table">
      <style:table-properties style:width="17cm" fo:break-before="page" table:align="margins"/>
    </style:style>
    <style:style style:name="Таблица17.A" style:family="table-column">
      <style:table-column-properties style:column-width="8.5cm" style:rel-column-width="32767*"/>
    </style:style>
    <style:style style:name="Таблица17.B" style:family="table-column">
      <style:table-column-properties style:column-width="8.5cm" style:rel-column-width="32768*"/>
    </style:style>
    <style:style style:name="Таблица17.A1" style:family="table-cell">
      <style:table-cell-properties style:writing-mode="page"/>
    </style:style>
    <style:style style:name="Таблица18" style:family="table">
      <style:table-properties style:width="17cm" fo:break-before="page" table:align="margins"/>
    </style:style>
    <style:style style:name="Таблица18.A" style:family="table-column">
      <style:table-column-properties style:column-width="8.5cm" style:rel-column-width="32767*"/>
    </style:style>
    <style:style style:name="Таблица18.B" style:family="table-column">
      <style:table-column-properties style:column-width="8.5cm" style:rel-column-width="32768*"/>
    </style:style>
    <style:style style:name="Таблица18.1" style:family="table-row">
      <style:table-row-properties style:min-row-height="0.411cm"/>
    </style:style>
    <style:style style:name="Таблица18.A1" style:family="table-cell">
      <style:table-cell-properties style:writing-mode="page"/>
    </style:style>
    <style:style style:name="Таблица19" style:family="table">
      <style:table-properties style:width="17cm" table:align="margins"/>
    </style:style>
    <style:style style:name="Таблица19.A" style:family="table-column">
      <style:table-column-properties style:column-width="8.5cm" style:rel-column-width="32767*"/>
    </style:style>
    <style:style style:name="Таблица19.B" style:family="table-column">
      <style:table-column-properties style:column-width="8.5cm" style:rel-column-width="32768*"/>
    </style:style>
    <style:style style:name="Таблица19.A1" style:family="table-cell">
      <style:table-cell-properties style:writing-mode="page"/>
    </style:style>
    <style:style style:name="Таблица20" style:family="table">
      <style:table-properties style:width="17cm" fo:break-before="page" table:align="margins"/>
    </style:style>
    <style:style style:name="Таблица20.A" style:family="table-column">
      <style:table-column-properties style:column-width="8.5cm" style:rel-column-width="32767*"/>
    </style:style>
    <style:style style:name="Таблица20.B" style:family="table-column">
      <style:table-column-properties style:column-width="8.5cm" style:rel-column-width="32768*"/>
    </style:style>
    <style:style style:name="Таблица20.A1" style:family="table-cell">
      <style:table-cell-properties style:writing-mode="page"/>
    </style:style>
    <style:style style:name="Таблица21" style:family="table">
      <style:table-properties style:width="17cm" table:align="margins"/>
    </style:style>
    <style:style style:name="Таблица21.A" style:family="table-column">
      <style:table-column-properties style:column-width="8.5cm" style:rel-column-width="32767*"/>
    </style:style>
    <style:style style:name="Таблица21.B" style:family="table-column">
      <style:table-column-properties style:column-width="8.5cm" style:rel-column-width="32768*"/>
    </style:style>
    <style:style style:name="Таблица21.1" style:family="table-row">
      <style:table-row-properties style:min-row-height="0.411cm"/>
    </style:style>
    <style:style style:name="Таблица21.A1" style:family="table-cell">
      <style:table-cell-properties style:writing-mode="page"/>
    </style:style>
    <style:style style:name="Таблица22" style:family="table">
      <style:table-properties style:width="17cm" fo:break-before="page" table:align="margins"/>
    </style:style>
    <style:style style:name="Таблица22.A" style:family="table-column">
      <style:table-column-properties style:column-width="8.5cm" style:rel-column-width="32767*"/>
    </style:style>
    <style:style style:name="Таблица22.B" style:family="table-column">
      <style:table-column-properties style:column-width="8.5cm" style:rel-column-width="32768*"/>
    </style:style>
    <style:style style:name="Таблица22.A1" style:family="table-cell">
      <style:table-cell-properties style:writing-mode="page"/>
    </style:style>
    <style:style style:name="Таблица23" style:family="table">
      <style:table-properties style:width="17cm" fo:break-before="page" table:align="margins"/>
    </style:style>
    <style:style style:name="Таблица23.A" style:family="table-column">
      <style:table-column-properties style:column-width="8.5cm" style:rel-column-width="32767*"/>
    </style:style>
    <style:style style:name="Таблица23.B" style:family="table-column">
      <style:table-column-properties style:column-width="8.5cm" style:rel-column-width="32768*"/>
    </style:style>
    <style:style style:name="Таблица23.1" style:family="table-row">
      <style:table-row-properties style:min-row-height="0.411cm"/>
    </style:style>
    <style:style style:name="Таблица23.A1" style:family="table-cell">
      <style:table-cell-properties style:writing-mode="page"/>
    </style:style>
    <style:style style:name="Таблица24" style:family="table">
      <style:table-properties style:width="17cm" fo:break-before="page" table:align="margins"/>
    </style:style>
    <style:style style:name="Таблица24.A" style:family="table-column">
      <style:table-column-properties style:column-width="8.5cm" style:rel-column-width="32767*"/>
    </style:style>
    <style:style style:name="Таблица24.B" style:family="table-column">
      <style:table-column-properties style:column-width="8.5cm" style:rel-column-width="32768*"/>
    </style:style>
    <style:style style:name="Таблица24.A1" style:family="table-cell">
      <style:table-cell-properties style:writing-mode="page"/>
    </style:style>
    <style:style style:name="Таблица25" style:family="table">
      <style:table-properties style:width="17cm" table:align="margins"/>
    </style:style>
    <style:style style:name="Таблица25.A" style:family="table-column">
      <style:table-column-properties style:column-width="8.5cm" style:rel-column-width="32767*"/>
    </style:style>
    <style:style style:name="Таблица25.B" style:family="table-column">
      <style:table-column-properties style:column-width="8.5cm" style:rel-column-width="32768*"/>
    </style:style>
    <style:style style:name="Таблица25.A1" style:family="table-cell">
      <style:table-cell-properties style:writing-mode="page"/>
    </style:style>
    <style:style style:name="Таблица28" style:family="table">
      <style:table-properties style:width="17cm" table:align="margins"/>
    </style:style>
    <style:style style:name="Таблица28.A" style:family="table-column">
      <style:table-column-properties style:column-width="8.5cm" style:rel-column-width="32767*"/>
    </style:style>
    <style:style style:name="Таблица28.B" style:family="table-column">
      <style:table-column-properties style:column-width="8.5cm" style:rel-column-width="32768*"/>
    </style:style>
    <style:style style:name="Таблица28.A1" style:family="table-cell">
      <style:table-cell-properties style:writing-mode="page"/>
    </style:style>
    <style:style style:name="Таблица30" style:family="table">
      <style:table-properties style:width="17.101cm" fo:margin-left="0cm" fo:break-before="page" table:align="left"/>
    </style:style>
    <style:style style:name="Таблица30.A" style:family="table-column">
      <style:table-column-properties style:column-width="8.498cm"/>
    </style:style>
    <style:style style:name="Таблица30.B" style:family="table-column">
      <style:table-column-properties style:column-width="8.602cm"/>
    </style:style>
    <style:style style:name="Таблица30.1" style:family="table-row">
      <style:table-row-properties style:min-row-height="10.213cm"/>
    </style:style>
    <style:style style:name="Таблица30.A1" style:family="table-cell">
      <style:table-cell-properties style:writing-mode="page"/>
    </style:style>
    <style:style style:name="Таблица31" style:family="table">
      <style:table-properties style:width="15.699cm" fo:break-before="page" table:align="left"/>
    </style:style>
    <style:style style:name="Таблица31.A" style:family="table-column">
      <style:table-column-properties style:column-width="8.5cm"/>
    </style:style>
    <style:style style:name="Таблица31.B" style:family="table-column">
      <style:table-column-properties style:column-width="7.198cm"/>
    </style:style>
    <style:style style:name="Таблица31.1" style:family="table-row">
      <style:table-row-properties style:min-row-height="9.79cm"/>
    </style:style>
    <style:style style:name="Таблица31.A1" style:family="table-cell">
      <style:table-cell-properties style:writing-mode="page"/>
    </style:style>
    <style:style style:name="Таблица32" style:family="table">
      <style:table-properties style:width="17.903cm" fo:margin-left="0cm" fo:break-before="page" table:align="left"/>
    </style:style>
    <style:style style:name="Таблица32.A" style:family="table-column">
      <style:table-column-properties style:column-width="8.5cm"/>
    </style:style>
    <style:style style:name="Таблица32.B" style:family="table-column">
      <style:table-column-properties style:column-width="9.403cm"/>
    </style:style>
    <style:style style:name="Таблица32.1" style:family="table-row">
      <style:table-row-properties style:min-row-height="9.79cm"/>
    </style:style>
    <style:style style:name="Таблица32.A1" style:family="table-cell">
      <style:table-cell-properties style:writing-mode="page"/>
    </style:style>
    <style:style style:name="Таблица33" style:family="table">
      <style:table-properties style:width="17cm" table:align="margins"/>
    </style:style>
    <style:style style:name="Таблица33.A" style:family="table-column">
      <style:table-column-properties style:column-width="8.5cm" style:rel-column-width="32767*"/>
    </style:style>
    <style:style style:name="Таблица33.B" style:family="table-column">
      <style:table-column-properties style:column-width="8.5cm" style:rel-column-width="32768*"/>
    </style:style>
    <style:style style:name="Таблица33.A1" style:family="table-cell">
      <style:table-cell-properties style:writing-mode="page"/>
    </style:style>
    <style:style style:name="Таблица34" style:family="table">
      <style:table-properties style:width="17.903cm" fo:margin-left="0cm" fo:break-before="page" table:align="left"/>
    </style:style>
    <style:style style:name="Таблица34.A" style:family="table-column">
      <style:table-column-properties style:column-width="8.5cm"/>
    </style:style>
    <style:style style:name="Таблица34.B" style:family="table-column">
      <style:table-column-properties style:column-width="9.403cm"/>
    </style:style>
    <style:style style:name="Таблица34.1" style:family="table-row">
      <style:table-row-properties style:min-row-height="9.79cm"/>
    </style:style>
    <style:style style:name="Таблица34.A1" style:family="table-cell">
      <style:table-cell-properties style:writing-mode="page"/>
    </style:style>
    <style:style style:name="Таблица35" style:family="table">
      <style:table-properties style:width="17.697cm" fo:margin-left="0cm" table:align="left"/>
    </style:style>
    <style:style style:name="Таблица35.A" style:family="table-column">
      <style:table-column-properties style:column-width="8.5cm"/>
    </style:style>
    <style:style style:name="Таблица35.B" style:family="table-column">
      <style:table-column-properties style:column-width="9.197cm"/>
    </style:style>
    <style:style style:name="Таблица35.A1" style:family="table-cell">
      <style:table-cell-properties style:writing-mode="page"/>
    </style:style>
    <style:style style:name="Таблица36" style:family="table">
      <style:table-properties style:width="17cm" fo:break-before="page" table:align="margins"/>
    </style:style>
    <style:style style:name="Таблица36.A" style:family="table-column">
      <style:table-column-properties style:column-width="8.5cm" style:rel-column-width="32767*"/>
    </style:style>
    <style:style style:name="Таблица36.B" style:family="table-column">
      <style:table-column-properties style:column-width="8.5cm" style:rel-column-width="32768*"/>
    </style:style>
    <style:style style:name="Таблица36.1" style:family="table-row">
      <style:table-row-properties style:min-row-height="6.997cm"/>
    </style:style>
    <style:style style:name="Таблица36.A1" style:family="table-cell">
      <style:table-cell-properties style:writing-mode="page"/>
    </style:style>
    <style:style style:name="Таблица37" style:family="table">
      <style:table-properties style:width="17cm" table:align="margins"/>
    </style:style>
    <style:style style:name="Таблица37.A" style:family="table-column">
      <style:table-column-properties style:column-width="8.5cm" style:rel-column-width="32767*"/>
    </style:style>
    <style:style style:name="Таблица37.B" style:family="table-column">
      <style:table-column-properties style:column-width="8.5cm" style:rel-column-width="32768*"/>
    </style:style>
    <style:style style:name="Таблица37.1" style:family="table-row">
      <style:table-row-properties style:min-row-height="0.411cm"/>
    </style:style>
    <style:style style:name="Таблица37.A1" style:family="table-cell">
      <style:table-cell-properties style:writing-mode="page"/>
    </style:style>
    <style:style style:name="Таблица38" style:family="table">
      <style:table-properties style:width="17cm" fo:break-before="page" table:align="margins"/>
    </style:style>
    <style:style style:name="Таблица38.A" style:family="table-column">
      <style:table-column-properties style:column-width="8.5cm" style:rel-column-width="32767*"/>
    </style:style>
    <style:style style:name="Таблица38.B" style:family="table-column">
      <style:table-column-properties style:column-width="8.5cm" style:rel-column-width="32768*"/>
    </style:style>
    <style:style style:name="Таблица38.A1" style:family="table-cell">
      <style:table-cell-properties style:writing-mode="page"/>
    </style:style>
    <style:style style:name="Таблица39" style:family="table">
      <style:table-properties style:width="17cm" table:align="margins"/>
    </style:style>
    <style:style style:name="Таблица39.A" style:family="table-column">
      <style:table-column-properties style:column-width="8.5cm" style:rel-column-width="32767*"/>
    </style:style>
    <style:style style:name="Таблица39.B" style:family="table-column">
      <style:table-column-properties style:column-width="8.5cm" style:rel-column-width="32768*"/>
    </style:style>
    <style:style style:name="Таблица39.A1" style:family="table-cell">
      <style:table-cell-properties style:writing-mode="page"/>
    </style:style>
    <style:style style:name="Таблица40" style:family="table">
      <style:table-properties style:width="17cm" fo:break-before="page" table:align="margins"/>
    </style:style>
    <style:style style:name="Таблица40.A" style:family="table-column">
      <style:table-column-properties style:column-width="8.5cm" style:rel-column-width="32767*"/>
    </style:style>
    <style:style style:name="Таблица40.B" style:family="table-column">
      <style:table-column-properties style:column-width="8.5cm" style:rel-column-width="32768*"/>
    </style:style>
    <style:style style:name="Таблица40.A1" style:family="table-cell">
      <style:table-cell-properties style:writing-mode="page"/>
    </style:style>
    <style:style style:name="Таблица41" style:family="table">
      <style:table-properties style:width="17cm" fo:break-before="page" table:align="margins"/>
    </style:style>
    <style:style style:name="Таблица41.A" style:family="table-column">
      <style:table-column-properties style:column-width="8.5cm" style:rel-column-width="32767*"/>
    </style:style>
    <style:style style:name="Таблица41.B" style:family="table-column">
      <style:table-column-properties style:column-width="8.5cm" style:rel-column-width="32768*"/>
    </style:style>
    <style:style style:name="Таблица41.1" style:family="table-row">
      <style:table-row-properties style:min-row-height="13.788cm"/>
    </style:style>
    <style:style style:name="Таблица41.A1" style:family="table-cell">
      <style:table-cell-properties style:writing-mode="page"/>
    </style:style>
    <style:style style:name="Таблица42" style:family="table">
      <style:table-properties style:width="17cm" fo:break-before="page" table:align="margins"/>
    </style:style>
    <style:style style:name="Таблица42.A" style:family="table-column">
      <style:table-column-properties style:column-width="8.5cm" style:rel-column-width="32767*"/>
    </style:style>
    <style:style style:name="Таблица42.B" style:family="table-column">
      <style:table-column-properties style:column-width="8.5cm" style:rel-column-width="32768*"/>
    </style:style>
    <style:style style:name="Таблица42.A1" style:family="table-cell">
      <style:table-cell-properties style:writing-mode="page"/>
    </style:style>
    <style:style style:name="Таблица43" style:family="table">
      <style:table-properties style:width="17cm" fo:break-before="page" table:align="margins"/>
    </style:style>
    <style:style style:name="Таблица43.A" style:family="table-column">
      <style:table-column-properties style:column-width="8.5cm" style:rel-column-width="32767*"/>
    </style:style>
    <style:style style:name="Таблица43.B" style:family="table-column">
      <style:table-column-properties style:column-width="8.5cm" style:rel-column-width="32768*"/>
    </style:style>
    <style:style style:name="Таблица43.1" style:family="table-row">
      <style:table-row-properties style:min-row-height="0.411cm"/>
    </style:style>
    <style:style style:name="Таблица43.A1" style:family="table-cell">
      <style:table-cell-properties style:writing-mode="page"/>
    </style:style>
    <style:style style:name="Таблица44" style:family="table">
      <style:table-properties style:width="17cm" fo:break-before="page" table:align="margins"/>
    </style:style>
    <style:style style:name="Таблица44.A" style:family="table-column">
      <style:table-column-properties style:column-width="8.5cm" style:rel-column-width="32767*"/>
    </style:style>
    <style:style style:name="Таблица44.B" style:family="table-column">
      <style:table-column-properties style:column-width="8.5cm" style:rel-column-width="32768*"/>
    </style:style>
    <style:style style:name="Таблица44.A1" style:family="table-cell">
      <style:table-cell-properties style:writing-mode="page"/>
    </style:style>
    <style:style style:name="Таблица45" style:family="table">
      <style:table-properties style:width="17cm" fo:break-before="page" table:align="margins"/>
    </style:style>
    <style:style style:name="Таблица45.A" style:family="table-column">
      <style:table-column-properties style:column-width="8.5cm" style:rel-column-width="32767*"/>
    </style:style>
    <style:style style:name="Таблица45.B" style:family="table-column">
      <style:table-column-properties style:column-width="8.5cm" style:rel-column-width="32768*"/>
    </style:style>
    <style:style style:name="Таблица45.1" style:family="table-row">
      <style:table-row-properties style:min-row-height="14.19cm"/>
    </style:style>
    <style:style style:name="Таблица45.A1" style:family="table-cell">
      <style:table-cell-properties style:writing-mode="page"/>
    </style:style>
    <style:style style:name="Таблица46" style:family="table">
      <style:table-properties style:width="17cm" table:align="margins"/>
    </style:style>
    <style:style style:name="Таблица46.A" style:family="table-column">
      <style:table-column-properties style:column-width="8.5cm" style:rel-column-width="32767*"/>
    </style:style>
    <style:style style:name="Таблица46.B" style:family="table-column">
      <style:table-column-properties style:column-width="8.5cm" style:rel-column-width="32768*"/>
    </style:style>
    <style:style style:name="Таблица46.A1" style:family="table-cell">
      <style:table-cell-properties style:writing-mode="page"/>
    </style:style>
    <style:style style:name="Таблица47" style:family="table">
      <style:table-properties style:width="17cm" fo:break-before="page" table:align="margins"/>
    </style:style>
    <style:style style:name="Таблица47.A" style:family="table-column">
      <style:table-column-properties style:column-width="8.5cm" style:rel-column-width="32767*"/>
    </style:style>
    <style:style style:name="Таблица47.B" style:family="table-column">
      <style:table-column-properties style:column-width="8.5cm" style:rel-column-width="32768*"/>
    </style:style>
    <style:style style:name="Таблица47.A1" style:family="table-cell">
      <style:table-cell-properties style:writing-mode="page"/>
    </style:style>
    <style:style style:name="Таблица48" style:family="table">
      <style:table-properties style:width="17cm" table:align="margins"/>
    </style:style>
    <style:style style:name="Таблица48.A" style:family="table-column">
      <style:table-column-properties style:column-width="8.5cm" style:rel-column-width="32767*"/>
    </style:style>
    <style:style style:name="Таблица48.B" style:family="table-column">
      <style:table-column-properties style:column-width="8.5cm" style:rel-column-width="32768*"/>
    </style:style>
    <style:style style:name="Таблица48.1" style:family="table-row">
      <style:table-row-properties style:min-row-height="0.411cm"/>
    </style:style>
    <style:style style:name="Таблица48.A1" style:family="table-cell">
      <style:table-cell-properties style:writing-mode="page"/>
    </style:style>
    <style:style style:name="Таблица49" style:family="table">
      <style:table-properties style:width="17cm" fo:break-before="page" table:align="margins"/>
    </style:style>
    <style:style style:name="Таблица49.A" style:family="table-column">
      <style:table-column-properties style:column-width="8.5cm" style:rel-column-width="32767*"/>
    </style:style>
    <style:style style:name="Таблица49.B" style:family="table-column">
      <style:table-column-properties style:column-width="8.5cm" style:rel-column-width="32768*"/>
    </style:style>
    <style:style style:name="Таблица49.A1" style:family="table-cell">
      <style:table-cell-properties style:writing-mode="page"/>
    </style:style>
    <style:style style:name="Таблица50" style:family="table">
      <style:table-properties style:width="17cm" fo:break-before="page" table:align="margins"/>
    </style:style>
    <style:style style:name="Таблица50.A" style:family="table-column">
      <style:table-column-properties style:column-width="8.5cm" style:rel-column-width="32767*"/>
    </style:style>
    <style:style style:name="Таблица50.B" style:family="table-column">
      <style:table-column-properties style:column-width="8.5cm" style:rel-column-width="32768*"/>
    </style:style>
    <style:style style:name="Таблица50.1" style:family="table-row">
      <style:table-row-properties style:min-row-height="0.411cm"/>
    </style:style>
    <style:style style:name="Таблица50.A1" style:family="table-cell">
      <style:table-cell-properties style:writing-mode="page"/>
    </style:style>
    <style:style style:name="Таблица51" style:family="table">
      <style:table-properties style:width="17cm" fo:break-before="page" table:align="margins"/>
    </style:style>
    <style:style style:name="Таблица51.A" style:family="table-column">
      <style:table-column-properties style:column-width="8.5cm" style:rel-column-width="32767*"/>
    </style:style>
    <style:style style:name="Таблица51.B" style:family="table-column">
      <style:table-column-properties style:column-width="8.5cm" style:rel-column-width="32768*"/>
    </style:style>
    <style:style style:name="Таблица51.A1" style:family="table-cell">
      <style:table-cell-properties style:writing-mode="page"/>
    </style:style>
    <style:style style:name="Таблица52" style:family="table">
      <style:table-properties style:width="17cm" table:align="margins"/>
    </style:style>
    <style:style style:name="Таблица52.A" style:family="table-column">
      <style:table-column-properties style:column-width="8.5cm" style:rel-column-width="32767*"/>
    </style:style>
    <style:style style:name="Таблица52.B" style:family="table-column">
      <style:table-column-properties style:column-width="8.5cm" style:rel-column-width="32768*"/>
    </style:style>
    <style:style style:name="Таблица52.A1" style:family="table-cell">
      <style:table-cell-properties style:writing-mode="page"/>
    </style:style>
    <style:style style:name="Таблица2" style:family="table">
      <style:table-properties style:width="17cm" table:align="margins"/>
    </style:style>
    <style:style style:name="Таблица2.A" style:family="table-column">
      <style:table-column-properties style:column-width="8.5cm" style:rel-column-width="32767*"/>
    </style:style>
    <style:style style:name="Таблица2.B" style:family="table-column">
      <style:table-column-properties style:column-width="8.5cm" style:rel-column-width="32768*"/>
    </style:style>
    <style:style style:name="Таблица2.1" style:family="table-row">
      <style:table-row-properties style:min-row-height="10.213cm"/>
    </style:style>
    <style:style style:name="Таблица2.A1" style:family="table-cell">
      <style:table-cell-properties style:writing-mode="page"/>
    </style:style>
    <style:style style:name="Таблица53" style:family="table">
      <style:table-properties style:width="17cm" fo:break-before="page" table:align="margins"/>
    </style:style>
    <style:style style:name="Таблица53.A" style:family="table-column">
      <style:table-column-properties style:column-width="8.5cm" style:rel-column-width="32767*"/>
    </style:style>
    <style:style style:name="Таблица53.B" style:family="table-column">
      <style:table-column-properties style:column-width="8.5cm" style:rel-column-width="32768*"/>
    </style:style>
    <style:style style:name="Таблица53.1" style:family="table-row">
      <style:table-row-properties style:min-row-height="10.213cm"/>
    </style:style>
    <style:style style:name="Таблица53.A1" style:family="table-cell">
      <style:table-cell-properties style:writing-mode="page"/>
    </style:style>
    <style:style style:name="Таблица54" style:family="table">
      <style:table-properties style:width="15.699cm" fo:break-before="page" table:align="left"/>
    </style:style>
    <style:style style:name="Таблица54.A" style:family="table-column">
      <style:table-column-properties style:column-width="8.5cm"/>
    </style:style>
    <style:style style:name="Таблица54.B" style:family="table-column">
      <style:table-column-properties style:column-width="7.198cm"/>
    </style:style>
    <style:style style:name="Таблица54.1" style:family="table-row">
      <style:table-row-properties style:min-row-height="9.79cm"/>
    </style:style>
    <style:style style:name="Таблица54.A1" style:family="table-cell">
      <style:table-cell-properties style:writing-mode="page"/>
    </style:style>
    <style:style style:name="Таблица55" style:family="table">
      <style:table-properties style:width="17.903cm" fo:margin-left="0cm" fo:break-before="page" table:align="left"/>
    </style:style>
    <style:style style:name="Таблица55.A" style:family="table-column">
      <style:table-column-properties style:column-width="8.5cm"/>
    </style:style>
    <style:style style:name="Таблица55.B" style:family="table-column">
      <style:table-column-properties style:column-width="9.403cm"/>
    </style:style>
    <style:style style:name="Таблица55.1" style:family="table-row">
      <style:table-row-properties style:min-row-height="8.202cm"/>
    </style:style>
    <style:style style:name="Таблица55.A1" style:family="table-cell">
      <style:table-cell-properties style:writing-mode="page"/>
    </style:style>
    <style:style style:name="Таблица56" style:family="table">
      <style:table-properties style:width="17cm" table:align="margins"/>
    </style:style>
    <style:style style:name="Таблица56.A" style:family="table-column">
      <style:table-column-properties style:column-width="8.5cm" style:rel-column-width="32767*"/>
    </style:style>
    <style:style style:name="Таблица56.B" style:family="table-column">
      <style:table-column-properties style:column-width="8.5cm" style:rel-column-width="32768*"/>
    </style:style>
    <style:style style:name="Таблица56.A1" style:family="table-cell">
      <style:table-cell-properties style:writing-mode="page"/>
    </style:style>
    <style:style style:name="Таблица57" style:family="table">
      <style:table-properties style:width="17.903cm" fo:margin-left="0cm" fo:break-before="page" table:align="left"/>
    </style:style>
    <style:style style:name="Таблица57.A" style:family="table-column">
      <style:table-column-properties style:column-width="8.5cm"/>
    </style:style>
    <style:style style:name="Таблица57.B" style:family="table-column">
      <style:table-column-properties style:column-width="9.403cm"/>
    </style:style>
    <style:style style:name="Таблица57.1" style:family="table-row">
      <style:table-row-properties style:min-row-height="9.79cm"/>
    </style:style>
    <style:style style:name="Таблица57.A1" style:family="table-cell">
      <style:table-cell-properties style:writing-mode="page"/>
    </style:style>
    <style:style style:name="Таблица58" style:family="table">
      <style:table-properties style:width="17.697cm" fo:margin-left="0cm" table:align="left"/>
    </style:style>
    <style:style style:name="Таблица58.A" style:family="table-column">
      <style:table-column-properties style:column-width="8.5cm"/>
    </style:style>
    <style:style style:name="Таблица58.B" style:family="table-column">
      <style:table-column-properties style:column-width="9.197cm"/>
    </style:style>
    <style:style style:name="Таблица58.A1" style:family="table-cell">
      <style:table-cell-properties style:writing-mode="page"/>
    </style:style>
    <style:style style:name="Таблица59" style:family="table">
      <style:table-properties style:width="17cm" fo:break-before="page" table:align="margins"/>
    </style:style>
    <style:style style:name="Таблица59.A" style:family="table-column">
      <style:table-column-properties style:column-width="8.5cm" style:rel-column-width="32767*"/>
    </style:style>
    <style:style style:name="Таблица59.B" style:family="table-column">
      <style:table-column-properties style:column-width="8.5cm" style:rel-column-width="32768*"/>
    </style:style>
    <style:style style:name="Таблица59.1" style:family="table-row">
      <style:table-row-properties style:min-row-height="6.997cm"/>
    </style:style>
    <style:style style:name="Таблица59.A1" style:family="table-cell">
      <style:table-cell-properties style:writing-mode="page"/>
    </style:style>
    <style:style style:name="Таблица60" style:family="table">
      <style:table-properties style:width="17cm" table:align="margins"/>
    </style:style>
    <style:style style:name="Таблица60.A" style:family="table-column">
      <style:table-column-properties style:column-width="8.5cm" style:rel-column-width="32767*"/>
    </style:style>
    <style:style style:name="Таблица60.B" style:family="table-column">
      <style:table-column-properties style:column-width="8.5cm" style:rel-column-width="32768*"/>
    </style:style>
    <style:style style:name="Таблица60.1" style:family="table-row">
      <style:table-row-properties style:min-row-height="0.411cm"/>
    </style:style>
    <style:style style:name="Таблица60.A1" style:family="table-cell">
      <style:table-cell-properties style:writing-mode="page"/>
    </style:style>
    <style:style style:name="Таблица61" style:family="table">
      <style:table-properties style:width="17cm" fo:break-before="page" table:align="margins"/>
    </style:style>
    <style:style style:name="Таблица61.A" style:family="table-column">
      <style:table-column-properties style:column-width="8.5cm" style:rel-column-width="32767*"/>
    </style:style>
    <style:style style:name="Таблица61.B" style:family="table-column">
      <style:table-column-properties style:column-width="8.5cm" style:rel-column-width="32768*"/>
    </style:style>
    <style:style style:name="Таблица61.A1" style:family="table-cell">
      <style:table-cell-properties style:writing-mode="page"/>
    </style:style>
    <style:style style:name="Таблица62" style:family="table">
      <style:table-properties style:width="17cm" table:align="margins"/>
    </style:style>
    <style:style style:name="Таблица62.A" style:family="table-column">
      <style:table-column-properties style:column-width="8.5cm" style:rel-column-width="32767*"/>
    </style:style>
    <style:style style:name="Таблица62.B" style:family="table-column">
      <style:table-column-properties style:column-width="8.5cm" style:rel-column-width="32768*"/>
    </style:style>
    <style:style style:name="Таблица62.A1" style:family="table-cell">
      <style:table-cell-properties style:writing-mode="page"/>
    </style:style>
    <style:style style:name="Таблица63" style:family="table">
      <style:table-properties style:width="17cm" fo:break-before="page" table:align="margins"/>
    </style:style>
    <style:style style:name="Таблица63.A" style:family="table-column">
      <style:table-column-properties style:column-width="8.5cm" style:rel-column-width="32767*"/>
    </style:style>
    <style:style style:name="Таблица63.B" style:family="table-column">
      <style:table-column-properties style:column-width="8.5cm" style:rel-column-width="32768*"/>
    </style:style>
    <style:style style:name="Таблица63.A1" style:family="table-cell">
      <style:table-cell-properties style:writing-mode="page"/>
    </style:style>
    <style:style style:name="Таблица64" style:family="table">
      <style:table-properties style:width="17cm" fo:break-before="page" table:align="margins"/>
    </style:style>
    <style:style style:name="Таблица64.A" style:family="table-column">
      <style:table-column-properties style:column-width="8.5cm" style:rel-column-width="32767*"/>
    </style:style>
    <style:style style:name="Таблица64.B" style:family="table-column">
      <style:table-column-properties style:column-width="8.5cm" style:rel-column-width="32768*"/>
    </style:style>
    <style:style style:name="Таблица64.1" style:family="table-row">
      <style:table-row-properties style:min-row-height="8.611cm"/>
    </style:style>
    <style:style style:name="Таблица64.A1" style:family="table-cell">
      <style:table-cell-properties style:writing-mode="page"/>
    </style:style>
    <style:style style:name="Таблица65" style:family="table">
      <style:table-properties style:width="17cm" fo:break-before="page" table:align="margins"/>
    </style:style>
    <style:style style:name="Таблица65.A" style:family="table-column">
      <style:table-column-properties style:column-width="8.5cm" style:rel-column-width="32767*"/>
    </style:style>
    <style:style style:name="Таблица65.B" style:family="table-column">
      <style:table-column-properties style:column-width="8.5cm" style:rel-column-width="32768*"/>
    </style:style>
    <style:style style:name="Таблица65.A1" style:family="table-cell">
      <style:table-cell-properties style:writing-mode="page"/>
    </style:style>
    <style:style style:name="Таблица66" style:family="table">
      <style:table-properties style:width="17cm" table:align="margins"/>
    </style:style>
    <style:style style:name="Таблица66.A" style:family="table-column">
      <style:table-column-properties style:column-width="8.5cm" style:rel-column-width="32767*"/>
    </style:style>
    <style:style style:name="Таблица66.B" style:family="table-column">
      <style:table-column-properties style:column-width="8.5cm" style:rel-column-width="32768*"/>
    </style:style>
    <style:style style:name="Таблица66.1" style:family="table-row">
      <style:table-row-properties style:min-row-height="0.411cm"/>
    </style:style>
    <style:style style:name="Таблица66.A1" style:family="table-cell">
      <style:table-cell-properties style:writing-mode="page"/>
    </style:style>
    <style:style style:name="Таблица67" style:family="table">
      <style:table-properties style:width="17cm" fo:break-before="page" table:align="margins"/>
    </style:style>
    <style:style style:name="Таблица67.A" style:family="table-column">
      <style:table-column-properties style:column-width="8.5cm" style:rel-column-width="32767*"/>
    </style:style>
    <style:style style:name="Таблица67.B" style:family="table-column">
      <style:table-column-properties style:column-width="8.5cm" style:rel-column-width="32768*"/>
    </style:style>
    <style:style style:name="Таблица67.A1" style:family="table-cell">
      <style:table-cell-properties style:writing-mode="page"/>
    </style:style>
    <style:style style:name="Таблица76" style:family="table">
      <style:table-properties style:width="17cm" table:align="margins"/>
    </style:style>
    <style:style style:name="Таблица76.A" style:family="table-column">
      <style:table-column-properties style:column-width="8.5cm" style:rel-column-width="32767*"/>
    </style:style>
    <style:style style:name="Таблица76.B" style:family="table-column">
      <style:table-column-properties style:column-width="8.5cm" style:rel-column-width="32768*"/>
    </style:style>
    <style:style style:name="Таблица76.1" style:family="table-row">
      <style:table-row-properties style:min-row-height="5.796cm"/>
    </style:style>
    <style:style style:name="Таблица76.A1" style:family="table-cell">
      <style:table-cell-properties style:writing-mode="page"/>
    </style:style>
    <style:style style:name="Таблица68" style:family="table">
      <style:table-properties style:width="17cm" fo:break-before="page" table:align="margins"/>
    </style:style>
    <style:style style:name="Таблица68.A" style:family="table-column">
      <style:table-column-properties style:column-width="8.5cm" style:rel-column-width="32767*"/>
    </style:style>
    <style:style style:name="Таблица68.B" style:family="table-column">
      <style:table-column-properties style:column-width="8.5cm" style:rel-column-width="32768*"/>
    </style:style>
    <style:style style:name="Таблица68.1" style:family="table-row">
      <style:table-row-properties style:min-row-height="0.411cm"/>
    </style:style>
    <style:style style:name="Таблица68.A1" style:family="table-cell">
      <style:table-cell-properties style:writing-mode="page"/>
    </style:style>
    <style:style style:name="Таблица69" style:family="table">
      <style:table-properties style:width="17cm" table:align="margins"/>
    </style:style>
    <style:style style:name="Таблица69.A" style:family="table-column">
      <style:table-column-properties style:column-width="8.5cm" style:rel-column-width="32767*"/>
    </style:style>
    <style:style style:name="Таблица69.B" style:family="table-column">
      <style:table-column-properties style:column-width="8.5cm" style:rel-column-width="32768*"/>
    </style:style>
    <style:style style:name="Таблица69.A1" style:family="table-cell">
      <style:table-cell-properties style:writing-mode="page"/>
    </style:style>
    <style:style style:name="Таблица70" style:family="table">
      <style:table-properties style:width="17cm" fo:break-before="page" table:align="margins"/>
    </style:style>
    <style:style style:name="Таблица70.A" style:family="table-column">
      <style:table-column-properties style:column-width="8.5cm" style:rel-column-width="32767*"/>
    </style:style>
    <style:style style:name="Таблица70.B" style:family="table-column">
      <style:table-column-properties style:column-width="8.5cm" style:rel-column-width="32768*"/>
    </style:style>
    <style:style style:name="Таблица70.A1" style:family="table-cell">
      <style:table-cell-properties style:writing-mode="page"/>
    </style:style>
    <style:style style:name="Таблица71" style:family="table">
      <style:table-properties style:width="17cm" table:align="margins"/>
    </style:style>
    <style:style style:name="Таблица71.A" style:family="table-column">
      <style:table-column-properties style:column-width="8.5cm" style:rel-column-width="32767*"/>
    </style:style>
    <style:style style:name="Таблица71.B" style:family="table-column">
      <style:table-column-properties style:column-width="8.5cm" style:rel-column-width="32768*"/>
    </style:style>
    <style:style style:name="Таблица71.1" style:family="table-row">
      <style:table-row-properties style:min-row-height="0.411cm"/>
    </style:style>
    <style:style style:name="Таблица71.A1" style:family="table-cell">
      <style:table-cell-properties style:writing-mode="page"/>
    </style:style>
    <style:style style:name="Таблица72" style:family="table">
      <style:table-properties style:width="17cm" fo:break-before="page" table:align="margins"/>
    </style:style>
    <style:style style:name="Таблица72.A" style:family="table-column">
      <style:table-column-properties style:column-width="8.5cm" style:rel-column-width="32767*"/>
    </style:style>
    <style:style style:name="Таблица72.B" style:family="table-column">
      <style:table-column-properties style:column-width="8.5cm" style:rel-column-width="32768*"/>
    </style:style>
    <style:style style:name="Таблица72.A1" style:family="table-cell">
      <style:table-cell-properties style:writing-mode="page"/>
    </style:style>
    <style:style style:name="Таблица73" style:family="table">
      <style:table-properties style:width="17cm" fo:break-before="page" table:align="margins"/>
    </style:style>
    <style:style style:name="Таблица73.A" style:family="table-column">
      <style:table-column-properties style:column-width="8.5cm" style:rel-column-width="32767*"/>
    </style:style>
    <style:style style:name="Таблица73.B" style:family="table-column">
      <style:table-column-properties style:column-width="8.5cm" style:rel-column-width="32768*"/>
    </style:style>
    <style:style style:name="Таблица73.1" style:family="table-row">
      <style:table-row-properties style:min-row-height="0.411cm"/>
    </style:style>
    <style:style style:name="Таблица73.A1" style:family="table-cell">
      <style:table-cell-properties style:writing-mode="page"/>
    </style:style>
    <style:style style:name="Таблица74" style:family="table">
      <style:table-properties style:width="17cm" fo:break-before="page" table:align="margins"/>
    </style:style>
    <style:style style:name="Таблица74.A" style:family="table-column">
      <style:table-column-properties style:column-width="8.5cm" style:rel-column-width="32767*"/>
    </style:style>
    <style:style style:name="Таблица74.B" style:family="table-column">
      <style:table-column-properties style:column-width="8.5cm" style:rel-column-width="32768*"/>
    </style:style>
    <style:style style:name="Таблица74.A1" style:family="table-cell">
      <style:table-cell-properties style:writing-mode="page"/>
    </style:style>
    <style:style style:name="Таблица75" style:family="table">
      <style:table-properties style:width="17cm" table:align="margins"/>
    </style:style>
    <style:style style:name="Таблица75.A" style:family="table-column">
      <style:table-column-properties style:column-width="8.5cm" style:rel-column-width="32767*"/>
    </style:style>
    <style:style style:name="Таблица75.B" style:family="table-column">
      <style:table-column-properties style:column-width="8.5cm" style:rel-column-width="32768*"/>
    </style:style>
    <style:style style:name="Таблица75.A1" style:family="table-cell">
      <style:table-cell-properties style:writing-mode="page"/>
    </style:style>
    <style:style style:name="Таблица29" style:family="table">
      <style:table-properties style:width="17.702cm" fo:margin-left="-0.605cm" table:align="left"/>
    </style:style>
    <style:style style:name="Таблица29.A" style:family="table-column">
      <style:table-column-properties style:column-width="4.86cm"/>
    </style:style>
    <style:style style:name="Таблица29.B" style:family="table-column">
      <style:table-column-properties style:column-width="4.233cm"/>
    </style:style>
    <style:style style:name="Таблица29.C" style:family="table-column">
      <style:table-column-properties style:column-width="4.256cm"/>
    </style:style>
    <style:style style:name="Таблица29.D" style:family="table-column">
      <style:table-column-properties style:column-width="4.353cm"/>
    </style:style>
    <style:style style:name="Таблица29.A1" style:family="table-cell">
      <style:table-cell-properties style:vertical-align="middle" fo:padding="0cm" fo:border="none" style:writing-mode="page"/>
    </style:style>
    <style:style style:name="P1" style:family="paragraph" style:parent-style-name="Standard">
      <style:text-properties fo:font-size="14pt" officeooo:rsid="002dbf5b" officeooo:paragraph-rsid="002e175e" style:font-size-asian="14pt" style:font-size-complex="14pt"/>
    </style:style>
    <style:style style:name="P2" style:family="paragraph" style:parent-style-name="Standard">
      <style:text-properties fo:font-size="14pt" officeooo:rsid="002dbf5b" officeooo:paragraph-rsid="00438696" style:font-size-asian="14pt" style:font-size-complex="14pt"/>
    </style:style>
    <style:style style:name="P3" style:family="paragraph" style:parent-style-name="Standard">
      <style:text-properties fo:font-size="14pt" officeooo:rsid="002dbf5b" officeooo:paragraph-rsid="004b0ef6" style:font-size-asian="14pt" style:font-size-complex="14pt"/>
    </style:style>
    <style:style style:name="P4" style:family="paragraph" style:parent-style-name="Standard">
      <style:text-properties fo:font-size="14pt" officeooo:rsid="002d240f" officeooo:paragraph-rsid="002d240f" style:font-size-asian="14pt" style:font-size-complex="14pt"/>
    </style:style>
    <style:style style:name="P5" style:family="paragraph" style:parent-style-name="Standard">
      <style:text-properties fo:font-size="14pt" officeooo:paragraph-rsid="002e175e" style:font-size-asian="14pt" style:font-size-complex="14pt"/>
    </style:style>
    <style:style style:name="P6" style:family="paragraph" style:parent-style-name="Standard">
      <style:text-properties fo:font-size="14pt" style:font-size-asian="14pt" style:font-size-complex="14pt"/>
    </style:style>
    <style:style style:name="P7" style:family="paragraph" style:parent-style-name="Standard">
      <style:text-properties fo:font-size="14pt" officeooo:paragraph-rsid="00438696" style:font-size-asian="14pt" style:font-size-complex="14pt"/>
    </style:style>
    <style:style style:name="P8" style:family="paragraph" style:parent-style-name="Standard">
      <style:text-properties fo:font-size="14pt" officeooo:rsid="00462626" officeooo:paragraph-rsid="00462626" style:font-size-asian="14pt" style:font-size-complex="14pt"/>
    </style:style>
    <style:style style:name="P9" style:family="paragraph" style:parent-style-name="Standard">
      <style:text-properties fo:font-size="14pt" officeooo:paragraph-rsid="004b0ef6" style:font-size-asian="14pt" style:font-size-complex="14pt"/>
    </style:style>
    <style:style style:name="P10" style:family="paragraph" style:parent-style-name="Standard">
      <style:paragraph-properties fo:break-before="page"/>
      <style:text-properties fo:font-size="14pt" officeooo:paragraph-rsid="004b0ef6" style:font-size-asian="14pt" style:font-size-complex="14pt"/>
    </style:style>
    <style:style style:name="P11" style:family="paragraph" style:parent-style-name="Standard">
      <style:text-properties fo:font-size="14pt" officeooo:rsid="004f1265" officeooo:paragraph-rsid="004f1265" style:font-size-asian="14pt" style:font-size-complex="14pt"/>
    </style:style>
    <style:style style:name="P12" style:family="paragraph" style:parent-style-name="Table_20_Contents">
      <style:paragraph-properties fo:text-align="center" style:justify-single-word="false"/>
      <style:text-properties fo:font-size="14pt" officeooo:rsid="004ab73d" officeooo:paragraph-rsid="004ab73d" style:font-size-asian="14pt" style:font-size-complex="14pt"/>
    </style:style>
    <style:style style:name="P13" style:family="paragraph" style:parent-style-name="Table_20_Contents">
      <style:paragraph-properties fo:text-align="center" style:justify-single-word="false"/>
      <style:text-properties fo:font-size="14pt" style:font-size-asian="14pt" style:font-size-complex="14pt"/>
    </style:style>
    <style:style style:name="P14" style:family="paragraph" style:parent-style-name="Table_20_Contents">
      <style:paragraph-properties fo:text-align="center" style:justify-single-word="false"/>
      <style:text-properties fo:font-size="14pt" officeooo:rsid="005409bc" officeooo:paragraph-rsid="005409bc" style:font-size-asian="14pt" style:font-size-complex="14pt"/>
    </style:style>
    <style:style style:name="P15" style:family="paragraph" style:parent-style-name="Standard">
      <style:text-properties fo:font-size="14pt" fo:language="ru" fo:country="RU" officeooo:rsid="00339d5a" officeooo:paragraph-rsid="00339d5a" style:font-size-asian="14pt" style:font-size-complex="14pt"/>
    </style:style>
    <style:style style:name="P16" style:family="paragraph" style:parent-style-name="Standard">
      <style:text-properties fo:font-size="14pt" fo:language="ru" fo:country="RU" officeooo:rsid="00339d5a" officeooo:paragraph-rsid="00438696" style:font-size-asian="14pt" style:font-size-complex="14pt"/>
    </style:style>
    <style:style style:name="P17" style:family="paragraph" style:parent-style-name="Standard">
      <style:text-properties fo:font-size="14pt" fo:language="ru" fo:country="RU" officeooo:rsid="00339d5a" officeooo:paragraph-rsid="004b0ef6" style:font-size-asian="14pt" style:font-size-complex="14pt"/>
    </style:style>
    <style:style style:name="P18" style:family="paragraph" style:parent-style-name="Standard">
      <style:text-properties fo:font-size="14pt" fo:language="ru" fo:country="RU" officeooo:rsid="0033bf58" officeooo:paragraph-rsid="0033bf58" style:font-size-asian="14pt" style:font-size-complex="14pt"/>
    </style:style>
    <style:style style:name="P19" style:family="paragraph" style:parent-style-name="Standard">
      <style:text-properties fo:font-size="14pt" fo:language="ru" fo:country="RU" officeooo:rsid="0033bf58" officeooo:paragraph-rsid="00438696" style:font-size-asian="14pt" style:font-size-complex="14pt"/>
    </style:style>
    <style:style style:name="P20" style:family="paragraph" style:parent-style-name="Standard">
      <style:text-properties fo:font-size="14pt" fo:language="ru" fo:country="RU" officeooo:rsid="0033bf58" officeooo:paragraph-rsid="004b0ef6" style:font-size-asian="14pt" style:font-size-complex="14pt"/>
    </style:style>
    <style:style style:name="P21" style:family="paragraph" style:parent-style-name="Standard">
      <style:text-properties fo:font-size="14pt" fo:language="ru" fo:country="RU" officeooo:rsid="0030d524" officeooo:paragraph-rsid="0030d524" style:font-size-asian="14pt" style:font-size-complex="14pt"/>
    </style:style>
    <style:style style:name="P22" style:family="paragraph" style:parent-style-name="Standard">
      <style:text-properties fo:font-size="14pt" fo:language="ru" fo:country="RU" officeooo:rsid="0030d524" officeooo:paragraph-rsid="00438696" style:font-size-asian="14pt" style:font-size-complex="14pt"/>
    </style:style>
    <style:style style:name="P23" style:family="paragraph" style:parent-style-name="Standard">
      <style:text-properties fo:font-size="14pt" fo:language="ru" fo:country="RU" officeooo:rsid="0030d524" officeooo:paragraph-rsid="004b0ef6" style:font-size-asian="14pt" style:font-size-complex="14pt"/>
    </style:style>
    <style:style style:name="P24" style:family="paragraph" style:parent-style-name="Standard">
      <style:text-properties fo:font-size="14pt" fo:language="ru" fo:country="RU" officeooo:rsid="00407b15" officeooo:paragraph-rsid="00407b15" style:font-size-asian="14pt" style:font-size-complex="14pt"/>
    </style:style>
    <style:style style:name="P25" style:family="paragraph" style:parent-style-name="Standard">
      <style:text-properties fo:font-size="14pt" fo:language="ru" fo:country="RU" officeooo:rsid="00407b15" officeooo:paragraph-rsid="00438696" style:font-size-asian="14pt" style:font-size-complex="14pt"/>
    </style:style>
    <style:style style:name="P26" style:family="paragraph" style:parent-style-name="Standard">
      <style:text-properties fo:font-size="14pt" fo:language="ru" fo:country="RU" officeooo:rsid="00407b15" officeooo:paragraph-rsid="004b0ef6" style:font-size-asian="14pt" style:font-size-complex="14pt"/>
    </style:style>
    <style:style style:name="P27" style:family="paragraph" style:parent-style-name="Standard">
      <style:text-properties fo:font-size="14pt" fo:language="ru" fo:country="RU" officeooo:rsid="0010cc42" officeooo:paragraph-rsid="0010cc42" style:font-size-asian="14pt" style:font-size-complex="14pt"/>
    </style:style>
    <style:style style:name="P28" style:family="paragraph" style:parent-style-name="Standard">
      <style:text-properties fo:font-size="14pt" fo:language="ru" fo:country="RU" officeooo:rsid="00123a8f" officeooo:paragraph-rsid="00226100" style:font-size-asian="14pt" style:font-size-complex="14pt"/>
    </style:style>
    <style:style style:name="P29" style:family="paragraph" style:parent-style-name="Table_20_Contents">
      <style:text-properties fo:font-size="14pt" fo:language="ru" fo:country="RU" officeooo:rsid="00123a8f" officeooo:paragraph-rsid="00226100" style:font-size-asian="14pt" style:font-size-complex="14pt"/>
    </style:style>
    <style:style style:name="P30" style:family="paragraph" style:parent-style-name="Standard">
      <style:text-properties fo:font-size="14pt" fo:language="ru" fo:country="RU" officeooo:rsid="00123a8f" officeooo:paragraph-rsid="00123a8f" style:font-size-asian="14pt" style:font-size-complex="14pt"/>
    </style:style>
    <style:style style:name="P31" style:family="paragraph" style:parent-style-name="Table_20_Contents">
      <style:text-properties fo:font-size="14pt" fo:language="ru" fo:country="RU" officeooo:rsid="00123a8f" officeooo:paragraph-rsid="00123a8f" style:font-size-asian="14pt" style:font-size-complex="14pt"/>
    </style:style>
    <style:style style:name="P32" style:family="paragraph" style:parent-style-name="Standard">
      <style:paragraph-properties fo:break-before="page"/>
      <style:text-properties fo:font-size="14pt" fo:language="ru" fo:country="RU" officeooo:rsid="00123a8f" officeooo:paragraph-rsid="00214e76" style:font-size-asian="14pt" style:font-size-complex="14pt"/>
    </style:style>
    <style:style style:name="P33" style:family="paragraph" style:parent-style-name="Standard">
      <style:text-properties fo:font-size="14pt" fo:language="ru" fo:country="RU" officeooo:rsid="00123a8f" officeooo:paragraph-rsid="00214e76" style:font-size-asian="14pt" style:font-size-complex="14pt"/>
    </style:style>
    <style:style style:name="P34" style:family="paragraph" style:parent-style-name="Standard">
      <style:text-properties fo:font-size="14pt" fo:language="ru" fo:country="RU" officeooo:rsid="00214e76" officeooo:paragraph-rsid="00226100" style:font-size-asian="14pt" style:font-size-complex="14pt"/>
    </style:style>
    <style:style style:name="P35" style:family="paragraph" style:parent-style-name="Table_20_Contents">
      <style:text-properties fo:font-size="14pt" fo:language="ru" fo:country="RU" officeooo:rsid="00214e76" officeooo:paragraph-rsid="00226100" style:font-size-asian="14pt" style:font-size-complex="14pt"/>
    </style:style>
    <style:style style:name="P36" style:family="paragraph" style:parent-style-name="Standard">
      <style:text-properties fo:font-size="14pt" fo:language="ru" fo:country="RU" officeooo:rsid="00214e76" officeooo:paragraph-rsid="00214e76" style:font-size-asian="14pt" style:font-size-complex="14pt"/>
    </style:style>
    <style:style style:name="P37" style:family="paragraph" style:parent-style-name="Table_20_Contents">
      <style:text-properties fo:font-size="14pt" fo:language="ru" fo:country="RU" officeooo:rsid="00214e76" officeooo:paragraph-rsid="00214e76" style:font-size-asian="14pt" style:font-size-complex="14pt"/>
    </style:style>
    <style:style style:name="P38" style:family="paragraph" style:parent-style-name="Standard">
      <style:text-properties fo:font-size="14pt" fo:language="ru" fo:country="RU" officeooo:rsid="00255cb5" officeooo:paragraph-rsid="00255cb5" style:font-size-asian="14pt" style:font-size-complex="14pt"/>
    </style:style>
    <style:style style:name="P39" style:family="paragraph" style:parent-style-name="Standard">
      <style:text-properties fo:font-size="14pt" fo:language="ru" fo:country="RU" officeooo:rsid="00255cb5" officeooo:paragraph-rsid="002c401f" style:font-size-asian="14pt" style:font-size-complex="14pt"/>
    </style:style>
    <style:style style:name="P40" style:family="paragraph" style:parent-style-name="Standard">
      <style:text-properties fo:font-size="14pt" fo:language="ru" fo:country="RU" officeooo:rsid="00155f1d" officeooo:paragraph-rsid="00214e76" style:font-size-asian="14pt" style:font-size-complex="14pt"/>
    </style:style>
    <style:style style:name="P41" style:family="paragraph" style:parent-style-name="Standard">
      <style:text-properties fo:font-size="14pt" fo:language="ru" fo:country="RU" officeooo:paragraph-rsid="00155f1d" style:font-size-asian="14pt" style:font-size-complex="14pt"/>
    </style:style>
    <style:style style:name="P42" style:family="paragraph" style:parent-style-name="Standard">
      <style:text-properties fo:font-size="14pt" fo:language="ru" fo:country="RU" officeooo:rsid="00438696" officeooo:paragraph-rsid="00438696" style:font-size-asian="14pt" style:font-size-complex="14pt"/>
    </style:style>
    <style:style style:name="P43" style:family="paragraph" style:parent-style-name="Table_20_Contents">
      <style:paragraph-properties fo:text-align="center" style:justify-single-word="false"/>
      <style:text-properties fo:font-size="14pt" fo:language="ru" fo:country="RU" officeooo:paragraph-rsid="004ab73d" style:font-size-asian="14pt" style:font-size-complex="14pt"/>
    </style:style>
    <style:style style:name="P44" style:family="paragraph" style:parent-style-name="Table_20_Contents">
      <style:text-properties fo:font-size="14pt" fo:language="ru" fo:country="RU" officeooo:rsid="001bed3a" officeooo:paragraph-rsid="001bed3a" style:font-size-asian="14pt" style:font-size-complex="14pt"/>
    </style:style>
    <style:style style:name="P45" style:family="paragraph" style:parent-style-name="Table_20_Contents">
      <style:paragraph-properties fo:text-align="center" style:justify-single-word="false"/>
      <style:text-properties fo:font-size="14pt" fo:language="ru" fo:country="RU" officeooo:rsid="005409bc" officeooo:paragraph-rsid="005409bc" style:font-size-asian="14pt" style:font-size-complex="14pt"/>
    </style:style>
    <style:style style:name="P46" style:family="paragraph" style:parent-style-name="Standard">
      <style:paragraph-properties fo:break-before="page"/>
      <style:text-properties fo:font-size="14pt" fo:language="ru" fo:country="RU" officeooo:rsid="00155f1d" officeooo:paragraph-rsid="00214e76" fo:background-color="#ffff00" style:font-size-asian="14pt" style:font-size-complex="14pt"/>
    </style:style>
    <style:style style:name="P47" style:family="paragraph" style:parent-style-name="Standard">
      <style:text-properties fo:font-size="14pt" fo:language="ru" fo:country="RU" officeooo:rsid="00155f1d" officeooo:paragraph-rsid="00155f1d" fo:background-color="#ffff00" style:font-size-asian="14pt" style:font-size-complex="14pt"/>
    </style:style>
    <style:style style:name="P48" style:family="paragraph" style:parent-style-name="Table_20_Contents">
      <style:text-properties fo:font-size="14pt" fo:language="ru" fo:country="RU" fo:font-style="normal" officeooo:rsid="00123a8f" officeooo:paragraph-rsid="00226100" style:font-size-asian="14pt" style:font-style-asian="normal" style:font-size-complex="14pt" style:font-style-complex="normal"/>
    </style:style>
    <style:style style:name="P49" style:family="paragraph" style:parent-style-name="Table_20_Contents">
      <style:text-properties fo:font-size="14pt" fo:language="ru" fo:country="RU" fo:font-style="normal" officeooo:rsid="00123a8f" officeooo:paragraph-rsid="00214e76" style:font-size-asian="14pt" style:font-style-asian="normal" style:font-size-complex="14pt" style:font-style-complex="normal"/>
    </style:style>
    <style:style style:name="P50" style:family="paragraph" style:parent-style-name="Table_20_Contents">
      <style:text-properties fo:font-size="14pt" fo:language="ru" fo:country="RU" fo:font-style="normal" officeooo:rsid="00155f1d" officeooo:paragraph-rsid="00226100" style:font-size-asian="14pt" style:font-style-asian="normal" style:font-size-complex="14pt" style:font-style-complex="normal"/>
    </style:style>
    <style:style style:name="P51" style:family="paragraph" style:parent-style-name="Table_20_Contents">
      <style:text-properties fo:font-size="14pt" fo:language="ru" fo:country="RU" fo:font-style="normal" officeooo:rsid="00155f1d" officeooo:paragraph-rsid="00214e76" style:font-size-asian="14pt" style:font-style-asian="normal" style:font-size-complex="14pt" style:font-style-complex="normal"/>
    </style:style>
    <style:style style:name="P52" style:family="paragraph" style:parent-style-name="Table_20_Contents">
      <style:text-properties fo:font-size="14pt" fo:language="ru" fo:country="RU" fo:font-style="normal" officeooo:rsid="00226100" officeooo:paragraph-rsid="00226100" style:font-size-asian="14pt" style:font-style-asian="normal" style:font-size-complex="14pt" style:font-style-complex="normal"/>
    </style:style>
    <style:style style:name="P53" style:family="paragraph" style:parent-style-name="Table_20_Contents">
      <style:text-properties fo:font-size="14pt" fo:language="ru" fo:country="RU" fo:font-style="normal" officeooo:rsid="00214e76" officeooo:paragraph-rsid="00214e76" style:font-size-asian="14pt" style:font-style-asian="normal" style:font-size-complex="14pt" style:font-style-complex="normal"/>
    </style:style>
    <style:style style:name="P54" style:family="paragraph" style:parent-style-name="Table_20_Contents">
      <style:text-properties fo:font-size="14pt" fo:language="zxx" fo:country="none" officeooo:rsid="00356e59" officeooo:paragraph-rsid="00356e59" style:font-size-asian="14pt" style:language-asian="zxx" style:country-asian="none" style:font-size-complex="14pt" style:language-complex="zxx" style:country-complex="none"/>
    </style:style>
    <style:style style:name="P55" style:family="paragraph" style:parent-style-name="Table_20_Contents">
      <style:text-properties fo:font-size="14pt" fo:language="zxx" fo:country="none" officeooo:rsid="00356e59" officeooo:paragraph-rsid="00438696" style:font-size-asian="14pt" style:language-asian="zxx" style:country-asian="none" style:font-size-complex="14pt" style:language-complex="zxx" style:country-complex="none"/>
    </style:style>
    <style:style style:name="P56" style:family="paragraph" style:parent-style-name="Table_20_Contents">
      <style:text-properties fo:font-size="14pt" fo:language="zxx" fo:country="none" officeooo:rsid="00356e59" officeooo:paragraph-rsid="004b0ef6" style:font-size-asian="14pt" style:language-asian="zxx" style:country-asian="none" style:font-size-complex="14pt" style:language-complex="zxx" style:country-complex="none"/>
    </style:style>
    <style:style style:name="P57" style:family="paragraph" style:parent-style-name="Standard">
      <style:text-properties fo:language="ru" fo:country="RU" officeooo:rsid="002f2fe7" officeooo:paragraph-rsid="002f958f"/>
    </style:style>
    <style:style style:name="P58" style:family="paragraph" style:parent-style-name="Standard">
      <style:text-properties fo:language="ru" fo:country="RU" officeooo:rsid="002f2fe7" officeooo:paragraph-rsid="002f2fe7"/>
    </style:style>
    <style:style style:name="P59" style:family="paragraph" style:parent-style-name="Standard">
      <style:text-properties fo:language="ru" fo:country="RU" officeooo:rsid="002f2fe7" officeooo:paragraph-rsid="00438696"/>
    </style:style>
    <style:style style:name="P60" style:family="paragraph" style:parent-style-name="Standard">
      <style:text-properties fo:language="ru" fo:country="RU" officeooo:rsid="002f2fe7" officeooo:paragraph-rsid="004b0ef6"/>
    </style:style>
    <style:style style:name="P61" style:family="paragraph" style:parent-style-name="Standard">
      <style:text-properties fo:language="ru" fo:country="RU" officeooo:rsid="00385f0c" officeooo:paragraph-rsid="00385f0c"/>
    </style:style>
    <style:style style:name="P62" style:family="paragraph" style:parent-style-name="Standard">
      <style:text-properties fo:language="ru" fo:country="RU" officeooo:rsid="00385f0c" officeooo:paragraph-rsid="00438696"/>
    </style:style>
    <style:style style:name="P63" style:family="paragraph" style:parent-style-name="Standard">
      <style:text-properties fo:language="ru" fo:country="RU" officeooo:rsid="00385f0c" officeooo:paragraph-rsid="004b0ef6"/>
    </style:style>
    <style:style style:name="P64" style:family="paragraph" style:parent-style-name="Standard">
      <style:text-properties fo:language="ru" fo:country="RU" officeooo:rsid="003a14e5" officeooo:paragraph-rsid="00385f0c"/>
    </style:style>
    <style:style style:name="P65" style:family="paragraph" style:parent-style-name="Standard">
      <style:text-properties fo:language="ru" fo:country="RU" officeooo:rsid="003a14e5" officeooo:paragraph-rsid="003a14e5"/>
    </style:style>
    <style:style style:name="P66" style:family="paragraph" style:parent-style-name="Standard">
      <style:text-properties fo:language="ru" fo:country="RU" officeooo:rsid="003a14e5" officeooo:paragraph-rsid="00438696"/>
    </style:style>
    <style:style style:name="P67" style:family="paragraph" style:parent-style-name="Standard">
      <style:text-properties fo:language="ru" fo:country="RU" officeooo:rsid="003a14e5" officeooo:paragraph-rsid="004b0ef6"/>
    </style:style>
    <style:style style:name="P68" style:family="paragraph" style:parent-style-name="Standard">
      <style:text-properties fo:language="ru" fo:country="RU" officeooo:rsid="003be776" officeooo:paragraph-rsid="003be776"/>
    </style:style>
    <style:style style:name="P69" style:family="paragraph" style:parent-style-name="Standard">
      <style:text-properties fo:language="ru" fo:country="RU" officeooo:rsid="003be776" officeooo:paragraph-rsid="00438696"/>
    </style:style>
    <style:style style:name="P70" style:family="paragraph" style:parent-style-name="Standard">
      <style:paragraph-properties fo:break-before="page"/>
      <style:text-properties fo:language="ru" fo:country="RU" officeooo:rsid="003be776" officeooo:paragraph-rsid="00438696"/>
    </style:style>
    <style:style style:name="P71" style:family="paragraph" style:parent-style-name="Standard">
      <style:text-properties fo:language="ru" fo:country="RU" officeooo:rsid="003be776" officeooo:paragraph-rsid="004b0ef6"/>
    </style:style>
    <style:style style:name="P72" style:family="paragraph" style:parent-style-name="Standard">
      <style:text-properties fo:language="ru" fo:country="RU" officeooo:rsid="003cf3bb" officeooo:paragraph-rsid="003cf3bb"/>
    </style:style>
    <style:style style:name="P73" style:family="paragraph" style:parent-style-name="Standard">
      <style:text-properties fo:language="ru" fo:country="RU" officeooo:rsid="003cf3bb" officeooo:paragraph-rsid="00438696"/>
    </style:style>
    <style:style style:name="P74" style:family="paragraph" style:parent-style-name="Standard">
      <style:text-properties fo:language="ru" fo:country="RU" officeooo:rsid="003cf3bb" officeooo:paragraph-rsid="004b0ef6"/>
    </style:style>
    <style:style style:name="P75" style:family="paragraph" style:parent-style-name="Standard">
      <style:text-properties fo:language="ru" fo:country="RU" officeooo:rsid="003d3ddb" officeooo:paragraph-rsid="003d3ddb"/>
    </style:style>
    <style:style style:name="P76" style:family="paragraph" style:parent-style-name="Standard">
      <style:text-properties fo:language="ru" fo:country="RU" officeooo:rsid="003d3ddb" officeooo:paragraph-rsid="00438696"/>
    </style:style>
    <style:style style:name="P77" style:family="paragraph" style:parent-style-name="Standard">
      <style:text-properties fo:language="ru" fo:country="RU" officeooo:rsid="003d3ddb" officeooo:paragraph-rsid="004b0ef6"/>
    </style:style>
    <style:style style:name="P78" style:family="paragraph" style:parent-style-name="Standard">
      <style:text-properties fo:language="ru" fo:country="RU" officeooo:rsid="003f2ec9" officeooo:paragraph-rsid="003f2ec9"/>
    </style:style>
    <style:style style:name="P79" style:family="paragraph" style:parent-style-name="Standard">
      <style:text-properties fo:language="ru" fo:country="RU" officeooo:rsid="003f2ec9" officeooo:paragraph-rsid="00438696"/>
    </style:style>
    <style:style style:name="P80" style:family="paragraph" style:parent-style-name="Standard">
      <style:text-properties fo:language="ru" fo:country="RU" officeooo:rsid="003f2ec9" officeooo:paragraph-rsid="004b0ef6"/>
    </style:style>
    <style:style style:name="P81" style:family="paragraph" style:parent-style-name="Standard">
      <style:paragraph-properties fo:break-before="page"/>
      <style:text-properties fo:language="ru" fo:country="RU" officeooo:rsid="003f2ec9" officeooo:paragraph-rsid="004b0ef6"/>
    </style:style>
    <style:style style:name="P82" style:family="paragraph" style:parent-style-name="Standard">
      <style:text-properties fo:language="ru" fo:country="RU" officeooo:paragraph-rsid="002e175e"/>
    </style:style>
    <style:style style:name="P83" style:family="paragraph" style:parent-style-name="Standard">
      <style:text-properties fo:language="ru" fo:country="RU" officeooo:paragraph-rsid="002f2fe7"/>
    </style:style>
    <style:style style:name="P84" style:family="paragraph" style:parent-style-name="Standard">
      <style:text-properties fo:language="ru" fo:country="RU" officeooo:rsid="002f958f" officeooo:paragraph-rsid="002f958f"/>
    </style:style>
    <style:style style:name="P85" style:family="paragraph" style:parent-style-name="Standard">
      <style:text-properties fo:language="ru" fo:country="RU" officeooo:rsid="002f958f" officeooo:paragraph-rsid="00438696"/>
    </style:style>
    <style:style style:name="P86" style:family="paragraph" style:parent-style-name="Standard">
      <style:text-properties fo:language="ru" fo:country="RU" officeooo:rsid="002f958f" officeooo:paragraph-rsid="004b0ef6"/>
    </style:style>
    <style:style style:name="P87" style:family="paragraph" style:parent-style-name="Standard">
      <style:text-properties fo:language="ru" fo:country="RU" officeooo:paragraph-rsid="00438696"/>
    </style:style>
    <style:style style:name="P88" style:family="paragraph" style:parent-style-name="Standard">
      <style:text-properties fo:language="ru" fo:country="RU" officeooo:paragraph-rsid="004b0ef6"/>
    </style:style>
    <style:style style:name="P89" style:family="paragraph" style:parent-style-name="Standard">
      <style:text-properties fo:language="en" fo:country="US" officeooo:rsid="002f2fe7" officeooo:paragraph-rsid="002f2fe7"/>
    </style:style>
    <style:style style:name="P90" style:family="paragraph" style:parent-style-name="Standard">
      <style:text-properties fo:language="en" fo:country="US" officeooo:rsid="002f2fe7" officeooo:paragraph-rsid="00438696"/>
    </style:style>
    <style:style style:name="P91" style:family="paragraph" style:parent-style-name="Standard">
      <style:text-properties fo:language="en" fo:country="US" officeooo:rsid="002f2fe7" officeooo:paragraph-rsid="004b0ef6"/>
    </style:style>
    <style:style style:name="P92" style:family="paragraph" style:parent-style-name="Standard">
      <style:text-properties fo:language="en" fo:country="US" officeooo:rsid="00383b71" officeooo:paragraph-rsid="00383b71"/>
    </style:style>
    <style:style style:name="P93" style:family="paragraph" style:parent-style-name="Standard">
      <style:text-properties fo:language="en" fo:country="US" officeooo:rsid="00383b71" officeooo:paragraph-rsid="00438696"/>
    </style:style>
    <style:style style:name="P94" style:family="paragraph" style:parent-style-name="Standard">
      <style:text-properties fo:language="en" fo:country="US" officeooo:rsid="00383b71" officeooo:paragraph-rsid="004b0ef6"/>
    </style:style>
    <style:style style:name="P95" style:family="paragraph" style:parent-style-name="Standard">
      <style:text-properties fo:language="en" fo:country="US" officeooo:rsid="002d240f" officeooo:paragraph-rsid="002d240f"/>
    </style:style>
    <style:style style:name="P96" style:family="paragraph" style:parent-style-name="Standard">
      <style:text-properties fo:language="en" fo:country="US" officeooo:rsid="002d240f" officeooo:paragraph-rsid="00438696"/>
    </style:style>
    <style:style style:name="P97" style:family="paragraph" style:parent-style-name="Standard">
      <style:text-properties fo:language="en" fo:country="US" officeooo:rsid="002d240f" officeooo:paragraph-rsid="004b0ef6"/>
    </style:style>
    <style:style style:name="P98" style:family="paragraph" style:parent-style-name="Standard">
      <style:text-properties fo:language="en" fo:country="US"/>
    </style:style>
    <style:style style:name="P99" style:family="paragraph" style:parent-style-name="Standard">
      <style:text-properties fo:language="en" fo:country="US" officeooo:paragraph-rsid="00438696"/>
    </style:style>
    <style:style style:name="P100" style:family="paragraph" style:parent-style-name="Standard">
      <style:text-properties fo:language="en" fo:country="US" officeooo:paragraph-rsid="004b0ef6"/>
    </style:style>
    <style:style style:name="P101" style:family="paragraph" style:parent-style-name="Standard">
      <style:text-properties fo:language="zxx" fo:country="none" style:language-asian="zxx" style:country-asian="none" style:language-complex="zxx" style:country-complex="none"/>
    </style:style>
    <style:style style:name="P102" style:family="paragraph" style:parent-style-name="Standard">
      <style:text-properties fo:language="zxx" fo:country="none" officeooo:paragraph-rsid="004b0ef6" style:language-asian="zxx" style:country-asian="none" style:language-complex="zxx" style:country-complex="none"/>
    </style:style>
    <style:style style:name="P103" style:family="paragraph" style:parent-style-name="Table_20_Contents">
      <style:text-properties fo:language="zxx" fo:country="none" officeooo:paragraph-rsid="004b0ef6" style:language-asian="zxx" style:country-asian="none" style:language-complex="zxx" style:country-complex="none"/>
    </style:style>
    <style:style style:name="P104" style:family="paragraph" style:parent-style-name="Table_20_Contents">
      <style:text-properties fo:language="zxx" fo:country="none" style:language-asian="zxx" style:country-asian="none" style:language-complex="zxx" style:country-complex="none"/>
    </style:style>
    <style:style style:name="P105" style:family="paragraph" style:parent-style-name="Table_20_Contents">
      <style:text-properties fo:language="zxx" fo:country="none" officeooo:paragraph-rsid="00383b71" style:language-asian="zxx" style:country-asian="none" style:language-complex="zxx" style:country-complex="none"/>
    </style:style>
    <style:style style:name="P106" style:family="paragraph" style:parent-style-name="Table_20_Contents">
      <style:text-properties fo:language="zxx" fo:country="none" officeooo:rsid="002c401f" officeooo:paragraph-rsid="002c7052" style:language-asian="zxx" style:country-asian="none" style:language-complex="zxx" style:country-complex="none"/>
    </style:style>
    <style:style style:name="P107" style:family="paragraph" style:parent-style-name="Table_20_Contents">
      <style:text-properties fo:language="zxx" fo:country="none" officeooo:rsid="002c401f" officeooo:paragraph-rsid="002c401f" style:language-asian="zxx" style:country-asian="none" style:language-complex="zxx" style:country-complex="none"/>
    </style:style>
    <style:style style:name="P108" style:family="paragraph" style:parent-style-name="Table_20_Contents">
      <style:text-properties fo:language="zxx" fo:country="none" officeooo:rsid="002c401f" officeooo:paragraph-rsid="004b0ef6" style:language-asian="zxx" style:country-asian="none" style:language-complex="zxx" style:country-complex="none"/>
    </style:style>
    <style:style style:name="P109" style:family="paragraph" style:parent-style-name="Table_20_Contents">
      <style:paragraph-properties fo:text-align="start" style:justify-single-word="false"/>
      <style:text-properties fo:language="zxx" fo:country="none" officeooo:paragraph-rsid="00426951" style:language-asian="zxx" style:country-asian="none" style:language-complex="zxx" style:country-complex="none"/>
    </style:style>
    <style:style style:name="P110"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111" style:family="paragraph" style:parent-style-name="Table_20_Contents">
      <style:text-properties fo:language="zxx" fo:country="none" officeooo:paragraph-rsid="00438696" style:language-asian="zxx" style:country-asian="none" style:language-complex="zxx" style:country-complex="none"/>
    </style:style>
    <style:style style:name="P112" style:family="paragraph" style:parent-style-name="Standard">
      <style:text-properties officeooo:paragraph-rsid="002c7052"/>
    </style:style>
    <style:style style:name="P113" style:family="paragraph" style:parent-style-name="Table_20_Contents">
      <style:text-properties officeooo:paragraph-rsid="002c7052"/>
    </style:style>
    <style:style style:name="P114" style:family="paragraph" style:parent-style-name="Standard">
      <style:text-properties officeooo:rsid="002ca7c3" officeooo:paragraph-rsid="002ca7c3"/>
    </style:style>
    <style:style style:name="P115" style:family="paragraph" style:parent-style-name="Standard">
      <style:text-properties officeooo:rsid="002ca7c3" officeooo:paragraph-rsid="00438696"/>
    </style:style>
    <style:style style:name="P116" style:family="paragraph" style:parent-style-name="Standard">
      <style:text-properties officeooo:rsid="002ca7c3" officeooo:paragraph-rsid="004b0ef6"/>
    </style:style>
    <style:style style:name="P117" style:family="paragraph" style:parent-style-name="Standard">
      <style:text-properties officeooo:paragraph-rsid="002d240f"/>
    </style:style>
    <style:style style:name="P118" style:family="paragraph" style:parent-style-name="Standard">
      <style:text-properties officeooo:paragraph-rsid="00438696"/>
    </style:style>
    <style:style style:name="P119" style:family="paragraph" style:parent-style-name="Standard">
      <style:text-properties officeooo:paragraph-rsid="004b0ef6"/>
    </style:style>
    <style:style style:name="P120" style:family="paragraph" style:parent-style-name="Table_20_Contents">
      <style:text-properties fo:font-size="10pt" officeooo:paragraph-rsid="003a14e5" style:font-size-asian="10pt" style:font-size-complex="10pt"/>
    </style:style>
    <style:style style:name="P121" style:family="paragraph" style:parent-style-name="Table_20_Contents">
      <style:text-properties fo:font-size="10pt" officeooo:paragraph-rsid="002e175e" style:font-size-asian="10pt" style:font-size-complex="10pt"/>
    </style:style>
    <style:style style:name="P122" style:family="paragraph" style:parent-style-name="Table_20_Contents">
      <style:text-properties fo:font-size="10pt" officeooo:paragraph-rsid="00438696" style:font-size-asian="10pt" style:font-size-complex="10pt"/>
    </style:style>
    <style:style style:name="P123" style:family="paragraph" style:parent-style-name="Table_20_Contents">
      <style:text-properties fo:font-size="10pt" officeooo:paragraph-rsid="004b0ef6" style:font-size-asian="10pt" style:font-size-complex="10pt"/>
    </style:style>
    <style:style style:name="P124"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125" style:family="paragraph" style:parent-style-name="Table_20_Contents">
      <style:text-properties fo:font-size="10pt" fo:language="zxx" fo:country="none" officeooo:rsid="00385f0c" officeooo:paragraph-rsid="00385f0c" style:font-size-asian="10pt" style:language-asian="zxx" style:country-asian="none" style:font-size-complex="10pt" style:language-complex="zxx" style:country-complex="none"/>
    </style:style>
    <style:style style:name="P126" style:family="paragraph" style:parent-style-name="Table_20_Contents">
      <style:text-properties fo:font-size="10pt" fo:language="zxx" fo:country="none" officeooo:paragraph-rsid="00383b71" style:font-size-asian="10pt" style:language-asian="zxx" style:country-asian="none" style:font-size-complex="10pt" style:language-complex="zxx" style:country-complex="none"/>
    </style:style>
    <style:style style:name="P127" style:family="paragraph" style:parent-style-name="Table_20_Contents">
      <style:text-properties fo:font-size="10pt" fo:language="zxx" fo:country="none" officeooo:rsid="00339d5a" officeooo:paragraph-rsid="00375c06" style:font-size-asian="10pt" style:language-asian="zxx" style:country-asian="none" style:font-size-complex="10pt" style:language-complex="zxx" style:country-complex="none"/>
    </style:style>
    <style:style style:name="P128" style:family="paragraph" style:parent-style-name="Table_20_Contents">
      <style:text-properties fo:font-size="10pt" fo:language="zxx" fo:country="none" officeooo:rsid="00339d5a" officeooo:paragraph-rsid="00339d5a" style:font-size-asian="10pt" style:language-asian="zxx" style:country-asian="none" style:font-size-complex="10pt" style:language-complex="zxx" style:country-complex="none"/>
    </style:style>
    <style:style style:name="P129" style:family="paragraph" style:parent-style-name="Table_20_Contents">
      <style:text-properties fo:font-size="10pt" fo:language="zxx" fo:country="none" officeooo:rsid="00339d5a" officeooo:paragraph-rsid="00438696" style:font-size-asian="10pt" style:language-asian="zxx" style:country-asian="none" style:font-size-complex="10pt" style:language-complex="zxx" style:country-complex="none"/>
    </style:style>
    <style:style style:name="P130" style:family="paragraph" style:parent-style-name="Table_20_Contents">
      <style:text-properties fo:font-size="10pt" fo:language="zxx" fo:country="none" officeooo:paragraph-rsid="0030d524" style:font-size-asian="10pt" style:language-asian="zxx" style:country-asian="none" style:font-size-complex="10pt" style:language-complex="zxx" style:country-complex="none"/>
    </style:style>
    <style:style style:name="P131" style:family="paragraph" style:parent-style-name="Table_20_Contents">
      <style:text-properties fo:font-size="10pt" fo:language="zxx" fo:country="none" officeooo:paragraph-rsid="002f958f" style:font-size-asian="10pt" style:language-asian="zxx" style:country-asian="none" style:font-size-complex="10pt" style:language-complex="zxx" style:country-complex="none"/>
    </style:style>
    <style:style style:name="P132" style:family="paragraph" style:parent-style-name="Table_20_Contents">
      <style:text-properties fo:font-size="10pt" fo:language="zxx" fo:country="none" officeooo:paragraph-rsid="002f2fe7" style:font-size-asian="10pt" style:language-asian="zxx" style:country-asian="none" style:font-size-complex="10pt" style:language-complex="zxx" style:country-complex="none"/>
    </style:style>
    <style:style style:name="P133" style:family="paragraph" style:parent-style-name="Table_20_Contents">
      <style:text-properties fo:font-size="10pt" fo:language="zxx" fo:country="none" officeooo:paragraph-rsid="002d240f" style:font-size-asian="10pt" style:language-asian="zxx" style:country-asian="none" style:font-size-complex="10pt" style:language-complex="zxx" style:country-complex="none"/>
    </style:style>
    <style:style style:name="P134" style:family="paragraph" style:parent-style-name="Table_20_Contents">
      <style:text-properties fo:font-size="10pt" fo:language="zxx" fo:country="none" officeooo:paragraph-rsid="002dbf5b" style:font-size-asian="10pt" style:language-asian="zxx" style:country-asian="none" style:font-size-complex="10pt" style:language-complex="zxx" style:country-complex="none"/>
    </style:style>
    <style:style style:name="P135" style:family="paragraph" style:parent-style-name="Table_20_Contents">
      <style:text-properties fo:font-size="10pt" fo:language="zxx" fo:country="none" officeooo:rsid="002c401f" officeooo:paragraph-rsid="002d240f" style:font-size-asian="10pt" style:language-asian="zxx" style:country-asian="none" style:font-size-complex="10pt" style:language-complex="zxx" style:country-complex="none"/>
    </style:style>
    <style:style style:name="P136" style:family="paragraph" style:parent-style-name="Table_20_Contents">
      <style:text-properties fo:font-size="10pt" fo:language="zxx" fo:country="none" officeooo:rsid="002c401f" officeooo:paragraph-rsid="002dbf5b" style:font-size-asian="10pt" style:language-asian="zxx" style:country-asian="none" style:font-size-complex="10pt" style:language-complex="zxx" style:country-complex="none"/>
    </style:style>
    <style:style style:name="P137" style:family="paragraph" style:parent-style-name="Table_20_Contents">
      <style:text-properties fo:font-size="10pt" fo:language="zxx" fo:country="none" officeooo:rsid="002c401f" officeooo:paragraph-rsid="002c7052" style:font-size-asian="10pt" style:language-asian="zxx" style:country-asian="none" style:font-size-complex="10pt" style:language-complex="zxx" style:country-complex="none"/>
    </style:style>
    <style:style style:name="P138" style:family="paragraph" style:parent-style-name="Table_20_Contents">
      <style:text-properties fo:font-size="10pt" fo:language="zxx" fo:country="none" officeooo:rsid="002c401f" officeooo:paragraph-rsid="00438696" style:font-size-asian="10pt" style:language-asian="zxx" style:country-asian="none" style:font-size-complex="10pt" style:language-complex="zxx" style:country-complex="none"/>
    </style:style>
    <style:style style:name="P139" style:family="paragraph" style:parent-style-name="Table_20_Contents">
      <style:text-properties fo:font-size="10pt" fo:language="zxx" fo:country="none" officeooo:rsid="002c401f" officeooo:paragraph-rsid="00453608" style:font-size-asian="10pt" style:language-asian="zxx" style:country-asian="none" style:font-size-complex="10pt" style:language-complex="zxx" style:country-complex="none"/>
    </style:style>
    <style:style style:name="P140" style:family="paragraph" style:parent-style-name="Table_20_Contents">
      <style:text-properties fo:font-size="10pt" fo:language="zxx" fo:country="none" officeooo:rsid="002c401f" officeooo:paragraph-rsid="00462626" style:font-size-asian="10pt" style:language-asian="zxx" style:country-asian="none" style:font-size-complex="10pt" style:language-complex="zxx" style:country-complex="none"/>
    </style:style>
    <style:style style:name="P141" style:family="paragraph" style:parent-style-name="Table_20_Contents">
      <style:text-properties fo:font-size="10pt" fo:language="zxx" fo:country="none" officeooo:rsid="002c401f" officeooo:paragraph-rsid="004b0ef6" style:font-size-asian="10pt" style:language-asian="zxx" style:country-asian="none" style:font-size-complex="10pt" style:language-complex="zxx" style:country-complex="none"/>
    </style:style>
    <style:style style:name="P142" style:family="paragraph" style:parent-style-name="Table_20_Contents">
      <style:text-properties fo:font-size="10pt" fo:language="zxx" fo:country="none" officeooo:rsid="002c401f" officeooo:paragraph-rsid="004f1265" style:font-size-asian="10pt" style:language-asian="zxx" style:country-asian="none" style:font-size-complex="10pt" style:language-complex="zxx" style:country-complex="none"/>
    </style:style>
    <style:style style:name="P143" style:family="paragraph" style:parent-style-name="Table_20_Contents">
      <style:text-properties fo:font-size="10pt" fo:language="zxx" fo:country="none" officeooo:paragraph-rsid="002c7052" style:font-size-asian="10pt" style:language-asian="zxx" style:country-asian="none" style:font-size-complex="10pt" style:language-complex="zxx" style:country-complex="none"/>
    </style:style>
    <style:style style:name="P144" style:family="paragraph" style:parent-style-name="Table_20_Contents">
      <style:text-properties fo:font-size="10pt" fo:language="zxx" fo:country="none" officeooo:paragraph-rsid="003a14e5" style:font-size-asian="10pt" style:language-asian="zxx" style:country-asian="none" style:font-size-complex="10pt" style:language-complex="zxx" style:country-complex="none"/>
    </style:style>
    <style:style style:name="P145" style:family="paragraph" style:parent-style-name="Table_20_Contents">
      <style:text-properties fo:font-size="10pt" fo:language="zxx" fo:country="none" officeooo:paragraph-rsid="003be776" style:font-size-asian="10pt" style:language-asian="zxx" style:country-asian="none" style:font-size-complex="10pt" style:language-complex="zxx" style:country-complex="none"/>
    </style:style>
    <style:style style:name="P146" style:family="paragraph" style:parent-style-name="Table_20_Contents">
      <style:text-properties fo:font-size="10pt" fo:language="zxx" fo:country="none" officeooo:paragraph-rsid="003cf3bb" style:font-size-asian="10pt" style:language-asian="zxx" style:country-asian="none" style:font-size-complex="10pt" style:language-complex="zxx" style:country-complex="none"/>
    </style:style>
    <style:style style:name="P147" style:family="paragraph" style:parent-style-name="Table_20_Contents">
      <style:text-properties fo:font-size="10pt" fo:language="zxx" fo:country="none" officeooo:paragraph-rsid="003f2ec9" style:font-size-asian="10pt" style:language-asian="zxx" style:country-asian="none" style:font-size-complex="10pt" style:language-complex="zxx" style:country-complex="none"/>
    </style:style>
    <style:style style:name="P148" style:family="paragraph" style:parent-style-name="Table_20_Contents">
      <style:text-properties fo:font-size="10pt" fo:language="zxx" fo:country="none" officeooo:rsid="003f2ec9" officeooo:paragraph-rsid="003f2ec9" style:font-size-asian="10pt" style:language-asian="zxx" style:country-asian="none" style:font-size-complex="10pt" style:language-complex="zxx" style:country-complex="none"/>
    </style:style>
    <style:style style:name="P149" style:family="paragraph" style:parent-style-name="Table_20_Contents">
      <style:text-properties fo:font-size="10pt" fo:language="zxx" fo:country="none" officeooo:rsid="003f2ec9" officeooo:paragraph-rsid="00438696" style:font-size-asian="10pt" style:language-asian="zxx" style:country-asian="none" style:font-size-complex="10pt" style:language-complex="zxx" style:country-complex="none"/>
    </style:style>
    <style:style style:name="P150" style:family="paragraph" style:parent-style-name="Table_20_Contents">
      <style:text-properties fo:font-size="10pt" fo:language="zxx" fo:country="none" officeooo:rsid="003f2ec9" officeooo:paragraph-rsid="004b0ef6" style:font-size-asian="10pt" style:language-asian="zxx" style:country-asian="none" style:font-size-complex="10pt" style:language-complex="zxx" style:country-complex="none"/>
    </style:style>
    <style:style style:name="P151" style:family="paragraph" style:parent-style-name="Table_20_Contents">
      <style:text-properties fo:font-size="10pt" fo:language="zxx" fo:country="none" officeooo:paragraph-rsid="00407b15" style:font-size-asian="10pt" style:language-asian="zxx" style:country-asian="none" style:font-size-complex="10pt" style:language-complex="zxx" style:country-complex="none"/>
    </style:style>
    <style:style style:name="P152" style:family="paragraph" style:parent-style-name="Table_20_Contents">
      <style:paragraph-properties fo:text-align="start" style:justify-single-word="false"/>
      <style:text-properties fo:font-size="10pt" fo:language="zxx" fo:country="none" style:font-size-asian="10pt" style:language-asian="zxx" style:country-asian="none" style:font-size-complex="10pt" style:language-complex="zxx" style:country-complex="none"/>
    </style:style>
    <style:style style:name="P153" style:family="paragraph" style:parent-style-name="Table_20_Contents">
      <style:paragraph-properties fo:text-align="start" style:justify-single-word="false"/>
      <style:text-properties fo:font-size="10pt" fo:language="zxx" fo:country="none" officeooo:paragraph-rsid="00438696" style:font-size-asian="10pt" style:language-asian="zxx" style:country-asian="none" style:font-size-complex="10pt" style:language-complex="zxx" style:country-complex="none"/>
    </style:style>
    <style:style style:name="P154" style:family="paragraph" style:parent-style-name="Table_20_Contents">
      <style:text-properties fo:font-size="10pt" fo:language="zxx" fo:country="none" officeooo:paragraph-rsid="00438696" style:font-size-asian="10pt" style:language-asian="zxx" style:country-asian="none" style:font-size-complex="10pt" style:language-complex="zxx" style:country-complex="none"/>
    </style:style>
    <style:style style:name="P155" style:family="paragraph" style:parent-style-name="Table_20_Contents">
      <style:text-properties fo:font-size="10pt" fo:language="zxx" fo:country="none" officeooo:rsid="00438696" officeooo:paragraph-rsid="00438696" style:font-size-asian="10pt" style:language-asian="zxx" style:country-asian="none" style:font-size-complex="10pt" style:language-complex="zxx" style:country-complex="none"/>
    </style:style>
    <style:style style:name="P156" style:family="paragraph" style:parent-style-name="Table_20_Contents">
      <style:text-properties fo:font-size="10pt" fo:language="zxx" fo:country="none" officeooo:rsid="00462626" officeooo:paragraph-rsid="00462626" style:font-size-asian="10pt" style:language-asian="zxx" style:country-asian="none" style:font-size-complex="10pt" style:language-complex="zxx" style:country-complex="none"/>
    </style:style>
    <style:style style:name="P157" style:family="paragraph" style:parent-style-name="Table_20_Contents">
      <style:text-properties fo:font-size="10pt" fo:language="zxx" fo:country="none" officeooo:paragraph-rsid="00473e9b" style:font-size-asian="10pt" style:language-asian="zxx" style:country-asian="none" style:font-size-complex="10pt" style:language-complex="zxx" style:country-complex="none"/>
    </style:style>
    <style:style style:name="P158" style:family="paragraph" style:parent-style-name="Table_20_Contents">
      <style:text-properties fo:font-size="10pt" fo:language="zxx" fo:country="none" officeooo:paragraph-rsid="004925b7" style:font-size-asian="10pt" style:language-asian="zxx" style:country-asian="none" style:font-size-complex="10pt" style:language-complex="zxx" style:country-complex="none"/>
    </style:style>
    <style:style style:name="P159" style:family="paragraph" style:parent-style-name="Table_20_Contents">
      <style:text-properties fo:font-size="10pt" fo:language="zxx" fo:country="none" officeooo:paragraph-rsid="004b0ef6" style:font-size-asian="10pt" style:language-asian="zxx" style:country-asian="none" style:font-size-complex="10pt" style:language-complex="zxx" style:country-complex="none"/>
    </style:style>
    <style:style style:name="P160" style:family="paragraph" style:parent-style-name="Table_20_Contents">
      <style:text-properties fo:font-size="10pt" fo:language="zxx" fo:country="none" officeooo:paragraph-rsid="00503d6e" style:font-size-asian="10pt" style:language-asian="zxx" style:country-asian="none" style:font-size-complex="10pt" style:language-complex="zxx" style:country-complex="none"/>
    </style:style>
    <style:style style:name="P161" style:family="paragraph" style:parent-style-name="Table_20_Contents">
      <style:text-properties fo:font-size="10pt" fo:language="zxx" fo:country="none" officeooo:rsid="00533fd5" officeooo:paragraph-rsid="00533fd5" style:font-size-asian="10pt" style:language-asian="zxx" style:country-asian="none" style:font-size-complex="10pt" style:language-complex="zxx" style:country-complex="none"/>
    </style:style>
    <style:style style:name="P162" style:family="paragraph" style:parent-style-name="Table_20_Contents">
      <style:text-properties fo:font-size="10pt" fo:language="zxx" fo:country="none" officeooo:paragraph-rsid="00533fd5" style:font-size-asian="10pt" style:language-asian="zxx" style:country-asian="none" style:font-size-complex="10pt" style:language-complex="zxx" style:country-complex="none"/>
    </style:style>
    <style:style style:name="P163" style:family="paragraph" style:parent-style-name="Table_20_Contents">
      <style:text-properties fo:font-size="10pt" fo:language="zxx" fo:country="none" officeooo:paragraph-rsid="005409bc" style:font-size-asian="10pt" style:language-asian="zxx" style:country-asian="none" style:font-size-complex="10pt" style:language-complex="zxx" style:country-complex="none"/>
    </style:style>
    <style:style style:name="P164" style:family="paragraph" style:parent-style-name="Table_20_Contents">
      <style:text-properties fo:font-size="10pt" fo:language="zxx" fo:country="none" fo:background-color="#ffff00" style:font-size-asian="10pt" style:language-asian="zxx" style:country-asian="none" style:font-size-complex="10pt" style:language-complex="zxx" style:country-complex="none"/>
    </style:style>
    <style:style style:name="P165" style:family="paragraph" style:parent-style-name="Table_20_Contents">
      <style:text-properties fo:font-size="10pt" fo:language="zxx" fo:country="none" officeooo:paragraph-rsid="003f2ec9" fo:background-color="#ffff00" style:font-size-asian="10pt" style:language-asian="zxx" style:country-asian="none" style:font-size-complex="10pt" style:language-complex="zxx" style:country-complex="none"/>
    </style:style>
    <style:style style:name="P166" style:family="paragraph" style:parent-style-name="Table_20_Contents">
      <style:paragraph-properties fo:text-align="start" style:justify-single-word="false"/>
      <style:text-properties fo:font-size="10pt" fo:language="zxx" fo:country="none" officeooo:paragraph-rsid="00438696" fo:background-color="transparent" style:font-size-asian="10pt" style:language-asian="zxx" style:country-asian="none" style:font-size-complex="10pt" style:language-complex="zxx" style:country-complex="none"/>
    </style:style>
    <style:style style:name="P167" style:family="paragraph" style:parent-style-name="Table_20_Contents">
      <style:text-properties fo:font-size="10pt" fo:language="zxx" fo:country="none" officeooo:paragraph-rsid="00453608" fo:background-color="transparent" style:font-size-asian="10pt" style:language-asian="zxx" style:country-asian="none" style:font-size-complex="10pt" style:language-complex="zxx" style:country-complex="none"/>
    </style:style>
    <style:style style:name="P168" style:family="paragraph" style:parent-style-name="Table_20_Contents">
      <style:text-properties fo:font-size="10pt" fo:language="zxx" fo:country="none" officeooo:paragraph-rsid="00473e9b" fo:background-color="transparent" style:font-size-asian="10pt" style:language-asian="zxx" style:country-asian="none" style:font-size-complex="10pt" style:language-complex="zxx" style:country-complex="none"/>
    </style:style>
    <style:style style:name="P169" style:family="paragraph" style:parent-style-name="Table_20_Contents">
      <style:text-properties fo:font-size="10pt" fo:language="zxx" fo:country="none" officeooo:paragraph-rsid="004b0ef6" fo:background-color="transparent" style:font-size-asian="10pt" style:language-asian="zxx" style:country-asian="none" style:font-size-complex="10pt" style:language-complex="zxx" style:country-complex="none"/>
    </style:style>
    <style:style style:name="P170" style:family="paragraph" style:parent-style-name="Table_20_Contents">
      <style:text-properties fo:font-size="10pt" fo:language="zxx" fo:country="none" officeooo:paragraph-rsid="004f1265" fo:background-color="transparent" style:font-size-asian="10pt" style:language-asian="zxx" style:country-asian="none" style:font-size-complex="10pt" style:language-complex="zxx" style:country-complex="none"/>
    </style:style>
    <style:style style:name="P171" style:family="paragraph" style:parent-style-name="Table_20_Contents">
      <style:text-properties fo:font-size="10pt" fo:language="zxx" fo:country="none" officeooo:rsid="00339d5a" officeooo:paragraph-rsid="00438696" fo:background-color="transparent" style:font-size-asian="10pt" style:language-asian="zxx" style:country-asian="none" style:font-size-complex="10pt" style:language-complex="zxx" style:country-complex="none"/>
    </style:style>
    <style:style style:name="P172" style:family="paragraph" style:parent-style-name="Table_20_Contents">
      <style:text-properties fo:font-size="10pt" fo:language="zxx" fo:country="none" officeooo:rsid="00339d5a" officeooo:paragraph-rsid="00479fd9" fo:background-color="transparent" style:font-size-asian="10pt" style:language-asian="zxx" style:country-asian="none" style:font-size-complex="10pt" style:language-complex="zxx" style:country-complex="none"/>
    </style:style>
    <style:style style:name="P173" style:family="paragraph" style:parent-style-name="Table_20_Contents">
      <style:text-properties fo:font-size="10pt" fo:language="zxx" fo:country="none" officeooo:rsid="00339d5a" officeooo:paragraph-rsid="004b0ef6" fo:background-color="transparent" style:font-size-asian="10pt" style:language-asian="zxx" style:country-asian="none" style:font-size-complex="10pt" style:language-complex="zxx" style:country-complex="none"/>
    </style:style>
    <style:style style:name="P174" style:family="paragraph" style:parent-style-name="Table_20_Contents">
      <style:text-properties fo:font-size="10pt" fo:language="zxx" fo:country="none" officeooo:rsid="00339d5a" officeooo:paragraph-rsid="00530357" fo:background-color="transparent" style:font-size-asian="10pt" style:language-asian="zxx" style:country-asian="none" style:font-size-complex="10pt" style:language-complex="zxx" style:country-complex="none"/>
    </style:style>
    <style:style style:name="P175" style:family="paragraph" style:parent-style-name="Table_20_Contents">
      <style:text-properties fo:font-size="12pt" fo:language="zxx" fo:country="none" officeooo:rsid="002c401f" officeooo:paragraph-rsid="002f2fe7" style:font-size-asian="12pt" style:language-asian="zxx" style:country-asian="none" style:font-size-complex="12pt" style:language-complex="zxx" style:country-complex="none"/>
    </style:style>
    <style:style style:name="P176" style:family="paragraph" style:parent-style-name="Table_20_Contents">
      <style:text-properties fo:font-size="12pt" fo:language="zxx" fo:country="none" officeooo:rsid="002c401f" officeooo:paragraph-rsid="00438696" style:font-size-asian="12pt" style:language-asian="zxx" style:country-asian="none" style:font-size-complex="12pt" style:language-complex="zxx" style:country-complex="none"/>
    </style:style>
    <style:style style:name="P177" style:family="paragraph" style:parent-style-name="Table_20_Contents">
      <style:text-properties fo:font-size="12pt" fo:language="zxx" fo:country="none" officeooo:rsid="002c401f" officeooo:paragraph-rsid="00453608" style:font-size-asian="12pt" style:language-asian="zxx" style:country-asian="none" style:font-size-complex="12pt" style:language-complex="zxx" style:country-complex="none"/>
    </style:style>
    <style:style style:name="P178" style:family="paragraph" style:parent-style-name="Table_20_Contents">
      <style:text-properties fo:font-size="12pt" fo:language="zxx" fo:country="none" officeooo:rsid="002c401f" officeooo:paragraph-rsid="004b0ef6" style:font-size-asian="12pt" style:language-asian="zxx" style:country-asian="none" style:font-size-complex="12pt" style:language-complex="zxx" style:country-complex="none"/>
    </style:style>
    <style:style style:name="P179" style:family="paragraph" style:parent-style-name="Table_20_Contents">
      <style:text-properties fo:font-size="12pt" fo:language="zxx" fo:country="none" style:font-size-asian="12pt" style:language-asian="zxx" style:country-asian="none" style:font-size-complex="12pt" style:language-complex="zxx" style:country-complex="none"/>
    </style:style>
    <style:style style:name="P180" style:family="paragraph" style:parent-style-name="Table_20_Contents">
      <style:text-properties fo:font-size="12pt" fo:language="zxx" fo:country="none" officeooo:paragraph-rsid="00438696" style:font-size-asian="12pt" style:language-asian="zxx" style:country-asian="none" style:font-size-complex="12pt" style:language-complex="zxx" style:country-complex="none"/>
    </style:style>
    <style:style style:name="P181" style:family="paragraph" style:parent-style-name="Table_20_Contents">
      <style:text-properties fo:font-size="12pt" fo:language="zxx" fo:country="none" officeooo:paragraph-rsid="00474f03" style:font-size-asian="12pt" style:language-asian="zxx" style:country-asian="none" style:font-size-complex="12pt" style:language-complex="zxx" style:country-complex="none"/>
    </style:style>
    <style:style style:name="P182" style:family="paragraph" style:parent-style-name="Table_20_Contents">
      <style:text-properties fo:font-size="12pt" fo:language="zxx" fo:country="none" officeooo:paragraph-rsid="004b0ef6" style:font-size-asian="12pt" style:language-asian="zxx" style:country-asian="none" style:font-size-complex="12pt" style:language-complex="zxx" style:country-complex="none"/>
    </style:style>
    <style:style style:name="P183" style:family="paragraph" style:parent-style-name="Text_20_body">
      <style:paragraph-properties fo:text-align="start" style:justify-single-word="false"/>
    </style:style>
    <style:style style:name="P184" style:family="paragraph" style:parent-style-name="Title">
      <style:paragraph-properties fo:break-before="page"/>
      <style:text-properties officeooo:rsid="002c401f" officeooo:paragraph-rsid="002c401f"/>
    </style:style>
    <style:style style:name="P185" style:family="paragraph" style:parent-style-name="Title">
      <style:paragraph-properties fo:break-before="page"/>
    </style:style>
    <style:style style:name="P186" style:family="paragraph" style:parent-style-name="Title">
      <style:paragraph-properties fo:break-before="page"/>
      <style:text-properties officeooo:rsid="004b0ef6" officeooo:paragraph-rsid="004b0ef6"/>
    </style:style>
    <style:style style:name="P187" style:family="paragraph" style:parent-style-name="Standard">
      <style:text-properties fo:font-size="14pt" fo:language="ru" fo:country="RU" officeooo:rsid="00383b71" officeooo:paragraph-rsid="00383b71" fo:background-color="transparent" style:font-size-asian="12.25pt" style:font-size-complex="14pt"/>
    </style:style>
    <style:style style:name="P188" style:family="paragraph" style:parent-style-name="Standard">
      <style:text-properties fo:font-size="14pt" fo:language="ru" fo:country="RU" officeooo:rsid="00383b71" officeooo:paragraph-rsid="00438696" fo:background-color="transparent" style:font-size-asian="12.25pt" style:font-size-complex="14pt"/>
    </style:style>
    <style:style style:name="P189" style:family="paragraph" style:parent-style-name="Standard">
      <style:text-properties fo:font-size="14pt" fo:language="ru" fo:country="RU" officeooo:rsid="00383b71" officeooo:paragraph-rsid="004b0ef6" fo:background-color="transparent" style:font-size-asian="12.25pt" style:font-size-complex="14pt"/>
    </style:style>
    <style:style style:name="P190" style:family="paragraph" style:parent-style-name="Standard">
      <style:text-properties fo:font-size="14pt" fo:language="ru" fo:country="RU" officeooo:rsid="00385f0c" officeooo:paragraph-rsid="00385f0c" fo:background-color="transparent" style:font-size-asian="12.25pt" style:font-size-complex="14pt"/>
    </style:style>
    <style:style style:name="P191" style:family="paragraph" style:parent-style-name="Standard">
      <style:text-properties fo:font-size="14pt" fo:language="ru" fo:country="RU" officeooo:rsid="00385f0c" officeooo:paragraph-rsid="00438696" fo:background-color="transparent" style:font-size-asian="12.25pt" style:font-size-complex="14pt"/>
    </style:style>
    <style:style style:name="P192" style:family="paragraph" style:parent-style-name="Standard">
      <style:text-properties fo:font-size="14pt" fo:language="ru" fo:country="RU" officeooo:rsid="00385f0c" officeooo:paragraph-rsid="004b0ef6" fo:background-color="transparent" style:font-size-asian="12.25pt" style:font-size-complex="14pt"/>
    </style:style>
    <style:style style:name="P193" style:family="paragraph" style:parent-style-name="Standard">
      <style:text-properties fo:font-size="14pt" fo:language="ru" fo:country="RU" officeooo:rsid="003a14e5" officeooo:paragraph-rsid="003a14e5" fo:background-color="transparent" style:font-size-asian="12.25pt" style:font-size-complex="14pt"/>
    </style:style>
    <style:style style:name="P194" style:family="paragraph" style:parent-style-name="Standard">
      <style:text-properties fo:font-size="14pt" fo:language="ru" fo:country="RU" officeooo:rsid="003a14e5" officeooo:paragraph-rsid="00438696" fo:background-color="transparent" style:font-size-asian="12.25pt" style:font-size-complex="14pt"/>
    </style:style>
    <style:style style:name="P195" style:family="paragraph" style:parent-style-name="Standard">
      <style:text-properties fo:font-size="14pt" fo:language="ru" fo:country="RU" officeooo:rsid="003a14e5" officeooo:paragraph-rsid="004b0ef6" fo:background-color="transparent" style:font-size-asian="12.25pt" style:font-size-complex="14pt"/>
    </style:style>
    <style:style style:name="P196" style:family="paragraph" style:parent-style-name="Standard">
      <style:paragraph-properties fo:break-before="page"/>
      <style:text-properties fo:font-size="14pt" fo:language="ru" fo:country="RU" officeooo:rsid="003be776" officeooo:paragraph-rsid="003be776" fo:background-color="transparent" style:font-size-asian="12.25pt" style:font-size-complex="14pt"/>
    </style:style>
    <style:style style:name="P197" style:family="paragraph" style:parent-style-name="Standard">
      <style:text-properties fo:font-size="14pt" fo:language="ru" fo:country="RU" officeooo:rsid="003be776" officeooo:paragraph-rsid="003be776" fo:background-color="transparent" style:font-size-asian="12.25pt" style:font-size-complex="14pt"/>
    </style:style>
    <style:style style:name="P198" style:family="paragraph" style:parent-style-name="Standard">
      <style:paragraph-properties fo:break-before="page"/>
      <style:text-properties fo:font-size="14pt" fo:language="ru" fo:country="RU" officeooo:rsid="003be776" officeooo:paragraph-rsid="004b0ef6" fo:background-color="transparent" style:font-size-asian="12.25pt" style:font-size-complex="14pt"/>
    </style:style>
    <style:style style:name="P199" style:family="paragraph" style:parent-style-name="Standard">
      <style:text-properties fo:font-size="14pt" fo:language="ru" fo:country="RU" officeooo:rsid="003cf3bb" officeooo:paragraph-rsid="003cf3bb" fo:background-color="transparent" style:font-size-asian="12.25pt" style:font-size-complex="14pt"/>
    </style:style>
    <style:style style:name="P200" style:family="paragraph" style:parent-style-name="Standard">
      <style:text-properties fo:font-size="14pt" fo:language="ru" fo:country="RU" officeooo:rsid="003cf3bb" officeooo:paragraph-rsid="00438696" fo:background-color="transparent" style:font-size-asian="12.25pt" style:font-size-complex="14pt"/>
    </style:style>
    <style:style style:name="P201" style:family="paragraph" style:parent-style-name="Standard">
      <style:text-properties fo:font-size="14pt" fo:language="ru" fo:country="RU" officeooo:rsid="003cf3bb" officeooo:paragraph-rsid="004b0ef6" fo:background-color="transparent" style:font-size-asian="12.25pt" style:font-size-complex="14pt"/>
    </style:style>
    <style:style style:name="P202" style:family="paragraph" style:parent-style-name="Standard">
      <style:text-properties fo:font-size="14pt" fo:language="ru" fo:country="RU" officeooo:rsid="003d3ddb" officeooo:paragraph-rsid="003d3ddb" fo:background-color="transparent" style:font-size-asian="12.25pt" style:font-size-complex="14pt"/>
    </style:style>
    <style:style style:name="P203" style:family="paragraph" style:parent-style-name="Standard">
      <style:text-properties fo:font-size="14pt" fo:language="ru" fo:country="RU" officeooo:rsid="003d3ddb" officeooo:paragraph-rsid="00438696" fo:background-color="transparent" style:font-size-asian="12.25pt" style:font-size-complex="14pt"/>
    </style:style>
    <style:style style:name="P204" style:family="paragraph" style:parent-style-name="Standard">
      <style:text-properties fo:font-size="14pt" fo:language="ru" fo:country="RU" officeooo:rsid="003d3ddb" officeooo:paragraph-rsid="004b0ef6" fo:background-color="transparent" style:font-size-asian="12.25pt" style:font-size-complex="14pt"/>
    </style:style>
    <style:style style:name="P205" style:family="paragraph" style:parent-style-name="Standard">
      <style:text-properties fo:font-size="14pt" fo:language="ru" fo:country="RU" officeooo:rsid="003f2ec9" officeooo:paragraph-rsid="003f2ec9" fo:background-color="transparent" style:font-size-asian="12.25pt" style:font-size-complex="14pt"/>
    </style:style>
    <style:style style:name="P206" style:family="paragraph" style:parent-style-name="Standard">
      <style:text-properties fo:font-size="14pt" fo:language="ru" fo:country="RU" officeooo:rsid="003f2ec9" officeooo:paragraph-rsid="00438696" fo:background-color="transparent" style:font-size-asian="12.25pt" style:font-size-complex="14pt"/>
    </style:style>
    <style:style style:name="P207" style:family="paragraph" style:parent-style-name="Standard">
      <style:text-properties fo:font-size="14pt" fo:language="ru" fo:country="RU" officeooo:rsid="003f2ec9" officeooo:paragraph-rsid="004b0ef6" fo:background-color="transparent" style:font-size-asian="12.25pt" style:font-size-complex="14pt"/>
    </style:style>
    <style:style style:name="P208" style:family="paragraph" style:parent-style-name="Standard">
      <style:text-properties fo:font-size="14pt" fo:language="ru" fo:country="RU" officeooo:rsid="002f2fe7" officeooo:paragraph-rsid="00438696" fo:background-color="transparent" style:font-size-asian="12.25pt" style:font-size-complex="14pt"/>
    </style:style>
    <style:style style:name="P209" style:family="paragraph" style:parent-style-name="Standard">
      <style:text-properties fo:font-size="14pt" fo:language="ru" fo:country="RU" officeooo:rsid="00533fd5" officeooo:paragraph-rsid="00533fd5" fo:background-color="transparent" style:font-size-asian="12.25pt" style:font-size-complex="14pt"/>
    </style:style>
    <style:style style:name="P210" style:family="paragraph" style:parent-style-name="Standard">
      <style:text-properties fo:font-size="14pt" fo:language="ru" fo:country="RU" officeooo:rsid="005409bc" officeooo:paragraph-rsid="005409bc" fo:background-color="transparent" style:font-size-asian="12.25pt" style:font-size-complex="14pt"/>
    </style:style>
    <style:style style:name="P211" style:family="paragraph" style:parent-style-name="Standard">
      <style:text-properties fo:font-size="14pt" fo:language="ru" fo:country="RU" officeooo:rsid="0051f562" officeooo:paragraph-rsid="004b0ef6" style:font-size-asian="14pt" style:font-size-complex="14pt"/>
    </style:style>
    <style:style style:name="P212" style:family="paragraph" style:parent-style-name="Table_20_Contents">
      <style:text-properties fo:font-size="10pt" fo:language="zxx" fo:country="none" officeooo:rsid="00438696" officeooo:paragraph-rsid="00438696" style:font-size-asian="10pt" style:language-asian="zxx" style:country-asian="none" style:font-size-complex="10pt" style:language-complex="zxx" style:country-complex="none"/>
    </style:style>
    <style:style style:name="P213" style:family="paragraph" style:parent-style-name="Text_20_body">
      <style:paragraph-properties fo:text-align="start" style:justify-single-word="false"/>
      <style:text-properties officeooo:rsid="00426951" officeooo:paragraph-rsid="00426951"/>
    </style:style>
    <style:style style:name="T1" style:family="text">
      <style:text-properties fo:language="en" fo:country="US"/>
    </style:style>
    <style:style style:name="T2" style:family="text">
      <style:text-properties fo:language="en" fo:country="US" officeooo:rsid="001a7c31"/>
    </style:style>
    <style:style style:name="T3" style:family="text">
      <style:text-properties fo:language="en" fo:country="US" officeooo:rsid="002e175e"/>
    </style:style>
    <style:style style:name="T4" style:family="text">
      <style:text-properties fo:language="en" fo:country="US" officeooo:rsid="00375c06"/>
    </style:style>
    <style:style style:name="T5" style:family="text">
      <style:text-properties fo:language="en" fo:country="US" officeooo:rsid="00383b71"/>
    </style:style>
    <style:style style:name="T6" style:family="text">
      <style:text-properties officeooo:rsid="0012ae3d"/>
    </style:style>
    <style:style style:name="T7" style:family="text">
      <style:text-properties officeooo:rsid="0016efa9"/>
    </style:style>
    <style:style style:name="T8" style:family="text">
      <style:text-properties officeooo:rsid="001a7c31"/>
    </style:style>
    <style:style style:name="T9" style:family="text">
      <style:text-properties officeooo:rsid="00214e76"/>
    </style:style>
    <style:style style:name="T10" style:family="text">
      <style:text-properties officeooo:rsid="00226100"/>
    </style:style>
    <style:style style:name="T11" style:family="text">
      <style:text-properties officeooo:rsid="00255cb5"/>
    </style:style>
    <style:style style:name="T12" style:family="text">
      <style:text-properties officeooo:rsid="0026c071"/>
    </style:style>
    <style:style style:name="T13" style:family="text">
      <style:text-properties fo:background-color="transparent" loext:char-shading-value="0"/>
    </style:style>
    <style:style style:name="T14" style:family="text">
      <style:text-properties officeooo:rsid="00155f1d" fo:background-color="transparent" loext:char-shading-value="0"/>
    </style:style>
    <style:style style:name="T15" style:family="text">
      <style:text-properties officeooo:rsid="002897e7" fo:background-color="transparent" loext:char-shading-value="0"/>
    </style:style>
    <style:style style:name="T16" style:family="text">
      <style:text-properties fo:font-size="14pt" style:font-size-asian="12.25pt" style:font-size-complex="14pt"/>
    </style:style>
    <style:style style:name="T17" style:family="text">
      <style:text-properties fo:font-size="14pt" officeooo:rsid="002e175e" style:font-size-asian="12.25pt" style:font-size-complex="14pt"/>
    </style:style>
    <style:style style:name="T18" style:family="text">
      <style:text-properties fo:font-size="14pt" officeooo:rsid="00462626" style:font-size-asian="12.25pt" style:font-size-complex="14pt"/>
    </style:style>
    <style:style style:name="T19" style:family="text">
      <style:text-properties fo:font-size="14pt" officeooo:rsid="00503d6e" style:font-size-asian="12.25pt" style:font-size-complex="14pt"/>
    </style:style>
    <style:style style:name="T20" style:family="text">
      <style:text-properties fo:font-size="14pt" fo:language="en" fo:country="US" officeooo:rsid="002c401f" style:font-size-asian="12.25pt" style:font-size-complex="14pt"/>
    </style:style>
    <style:style style:name="T21" style:family="text">
      <style:text-properties fo:font-size="14pt" fo:language="en" fo:country="US" officeooo:rsid="003a14e5" fo:background-color="transparent" loext:char-shading-value="0" style:font-size-asian="12.25pt" style:font-size-complex="14pt"/>
    </style:style>
    <style:style style:name="T22" style:family="text">
      <style:text-properties fo:font-size="14pt" officeooo:rsid="002e175e" style:font-size-asian="14pt" style:font-size-complex="14pt"/>
    </style:style>
    <style:style style:name="T23" style:family="text">
      <style:text-properties fo:font-size="14pt" fo:background-color="transparent" loext:char-shading-value="0" style:font-size-asian="12.25pt" style:font-size-complex="14pt"/>
    </style:style>
    <style:style style:name="T24" style:family="text">
      <style:text-properties fo:font-size="14pt" officeooo:rsid="003a14e5" fo:background-color="transparent" loext:char-shading-value="0" style:font-size-asian="12.25pt" style:font-size-complex="14pt"/>
    </style:style>
    <style:style style:name="T25" style:family="text">
      <style:text-properties fo:font-size="14pt" officeooo:rsid="003d3ddb" fo:background-color="transparent" loext:char-shading-value="0" style:font-size-asian="12.25pt" style:font-size-complex="14pt"/>
    </style:style>
    <style:style style:name="T26" style:family="text">
      <style:text-properties fo:font-size="14pt" officeooo:rsid="00473e9b" fo:background-color="transparent" loext:char-shading-value="0" style:font-size-asian="12.25pt" style:font-size-complex="14pt"/>
    </style:style>
    <style:style style:name="T27" style:family="text">
      <style:text-properties fo:font-size="14pt" officeooo:rsid="0048fe35" fo:background-color="transparent" loext:char-shading-value="0" style:font-size-asian="12.25pt" style:font-size-complex="14pt"/>
    </style:style>
    <style:style style:name="T28" style:family="text">
      <style:text-properties fo:font-size="14pt" officeooo:rsid="00497e63" fo:background-color="transparent" loext:char-shading-value="0" style:font-size-asian="12.25pt" style:font-size-complex="14pt"/>
    </style:style>
    <style:style style:name="T29" style:family="text">
      <style:text-properties fo:font-size="14pt" officeooo:rsid="00503d6e" fo:background-color="transparent" loext:char-shading-value="0" style:font-size-asian="12.25pt" style:font-size-complex="14pt"/>
    </style:style>
    <style:style style:name="T30" style:family="text">
      <style:text-properties fo:font-size="14pt" officeooo:rsid="00533fd5" fo:background-color="transparent" loext:char-shading-value="0" style:font-size-asian="12.25pt" style:font-size-complex="14pt"/>
    </style:style>
    <style:style style:name="T31" style:family="text">
      <style:text-properties fo:font-size="14pt" officeooo:rsid="005409bc" fo:background-color="transparent" loext:char-shading-value="0" style:font-size-asian="12.25pt" style:font-size-complex="14pt"/>
    </style:style>
    <style:style style:name="T32" style:family="text">
      <style:text-properties fo:font-size="14pt" fo:language="ru" fo:country="RU" officeooo:rsid="002c401f" style:font-size-asian="12.25pt" style:font-size-complex="14pt"/>
    </style:style>
    <style:style style:name="T33" style:family="text">
      <style:text-properties fo:font-size="14pt" fo:language="ru" fo:country="RU" officeooo:rsid="002e175e" style:font-size-asian="12.25pt" style:font-size-complex="14pt"/>
    </style:style>
    <style:style style:name="T34" style:family="text">
      <style:text-properties fo:font-size="10pt" style:font-size-asian="10pt" style:font-size-complex="10pt"/>
    </style:style>
    <style:style style:name="T35" style:family="text">
      <style:text-properties fo:font-size="10pt" fo:language="zxx" fo:country="none" style:font-size-asian="10pt" style:language-asian="zxx" style:country-asian="none" style:font-size-complex="10pt" style:language-complex="zxx" style:country-complex="none"/>
    </style:style>
    <style:style style:name="T36" style:family="text">
      <style:text-properties fo:color="#000000" loext:opacity="100%" fo:font-size="10pt" fo:language="zxx" fo:country="none" style:text-underline-style="none" style:font-size-asian="10pt" style:language-asian="zxx" style:country-asian="none" style:font-size-complex="10pt" style:language-complex="zxx" style:country-complex="none"/>
    </style:style>
    <style:style style:name="T37" style:family="text">
      <style:text-properties fo:background-color="#ffff00" loext:char-shading-value="0"/>
    </style:style>
    <style:style style:name="T38" style:family="text">
      <style:text-properties officeooo:rsid="002dbf5b"/>
    </style:style>
    <style:style style:name="T39" style:family="text">
      <style:text-properties fo:background-color="#81d41a" loext:char-shading-value="0"/>
    </style:style>
    <style:style style:name="T40" style:family="text">
      <style:text-properties officeooo:rsid="00375c06"/>
    </style:style>
    <style:style style:name="T41" style:family="text">
      <style:text-properties officeooo:rsid="00407b15"/>
    </style:style>
    <style:style style:name="T42" style:family="text">
      <style:text-properties officeooo:rsid="00453608"/>
    </style:style>
    <style:style style:name="T43" style:family="text">
      <style:text-properties officeooo:rsid="00479fd9"/>
    </style:style>
    <style:style style:name="T44" style:family="text">
      <style:text-properties officeooo:rsid="004925b7"/>
    </style:style>
    <style:style style:name="T45" style:family="text">
      <style:text-properties officeooo:rsid="004bcd73"/>
    </style:style>
    <style:style style:name="T46" style:family="text">
      <style:text-properties officeooo:rsid="004d6450"/>
    </style:style>
    <style:style style:name="T47" style:family="text">
      <style:text-properties officeooo:rsid="004eb3c8"/>
    </style:style>
    <style:style style:name="T48" style:family="text">
      <style:text-properties officeooo:rsid="00503d6e"/>
    </style:style>
    <style:style style:name="T49" style:family="text">
      <style:text-properties officeooo:rsid="0051f562"/>
    </style:style>
    <style:style style:name="T50" style:family="text">
      <style:text-properties officeooo:rsid="00533fd5"/>
    </style:style>
    <style:style style:name="T51" style:family="text">
      <style:text-properties officeooo:rsid="0055c4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Операционная система: "Ubuntu 24.04.4 LTS"</text:p>
      <text:p text:style-name="P27">Архитектура: x86-64</text:p>
      <text:p text:style-name="P27">Процессор: AMD Ryzen 5 7530U with Radeon Graphics<text:line-break/><text:line-break/><text:span text:style-name="T9">Версии</text:span> компилятор<text:span text:style-name="T9">ов</text:span>:</text:p>
      <text:p text:style-name="P27">gcc (Ubuntu 13.3.0-6ubuntu2~24.04.1) 13.3.0</text:p>
      <text:p text:style-name="P27">clang Ubuntu version 18.1.3 (1ubuntu1)</text:p>
      <text:p text:style-name="P27">compcert 3.17</text:p>
      <text:p text:style-name="P28"><text:line-break/><text:span text:style-name="T8">Были обнаружены 2 проблемы при компиляции: деление на ноль и выход за границы массива invector5. В коде из статьи присутствует проверка на то, как компиляторы оптимизируют деление на ноль. При попытке генерации компиляторы выдают предупреждение, но деление на ноль не убирают, это позволяет убрать им некоторую часть кода как недостижимую. Блок с делением на ноль мешает замерам времени и проверке оптимизаций, поэтому он был убран встроенным флагом при компиляции. В случае же с invector5, в статье проверяется в первую очередь удаление переменной индукции, поэтому выход за рамки массива является второстепенным, однако в рамках моей работы предполагается ещё и замер времени, компиляторы предупреждают о undefind behavior при компиляции этого фрагмента, массив был расширен для поддержания чистоты проверки, выход за пределы массива не относится к проверки оптимизации по удалению переменной индукции, он лишь создаёт помехи </text:span><text:span text:style-name="T2">неопределённостью</text:span><text:span text:style-name="T8"> компиляции и проблемами с замером времени.</text:span></text:p>
      <text:p text:style-name="P28"/>
      <text:p text:style-name="P34">Без оптимизации (-O0)</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35">Компилятор</text:p>
          </table:table-cell>
          <table:table-cell table:style-name="Таблица1.A1" office:value-type="string">
            <text:p text:style-name="P29">ccomp</text:p>
          </table:table-cell>
          <table:table-cell table:style-name="Таблица1.A1" office:value-type="string">
            <text:p text:style-name="P29">gcc</text:p>
          </table:table-cell>
          <table:table-cell table:style-name="Таблица1.A1" office:value-type="string">
            <text:p text:style-name="P29">clang</text:p>
          </table:table-cell>
        </table:table-row>
        <table:table-row table:style-name="Таблица1.2">
          <table:table-cell table:style-name="Таблица1.A1" office:value-type="string">
            <text:p text:style-name="P28"><text:span text:style-name="T10">В</text:span><text:span text:style-name="T6">ремя работы </text:span><text:span text:style-name="T11">(сек)</text:span></text:p>
          </table:table-cell>
          <table:table-cell table:style-name="Таблица1.A1" office:value-type="string">
            <text:p text:style-name="P48">0,0011<text:span text:style-name="T9">3</text:span></text:p>
          </table:table-cell>
          <table:table-cell table:style-name="Таблица1.A1" office:value-type="string">
            <text:p text:style-name="P48">0,00114</text:p>
          </table:table-cell>
          <table:table-cell table:style-name="Таблица1.A1" office:value-type="string">
            <text:p text:style-name="P50">0,0011<text:span text:style-name="T9">5</text:span></text:p>
          </table:table-cell>
        </table:table-row>
        <table:table-row table:style-name="Таблица1.2">
          <table:table-cell table:style-name="Таблица1.A1" office:value-type="string">
            <text:p text:style-name="P38">Размер файла (бит)</text:p>
          </table:table-cell>
          <table:table-cell table:style-name="Таблица1.A1" office:value-type="string">
            <text:p text:style-name="P52">17072</text:p>
          </table:table-cell>
          <table:table-cell table:style-name="Таблица1.A1" office:value-type="string">
            <text:p text:style-name="P52">16992</text:p>
          </table:table-cell>
          <table:table-cell table:style-name="Таблица1.A1" office:value-type="string">
            <text:p text:style-name="P52">16992</text:p>
          </table:table-cell>
        </table:table-row>
      </table:table>
      <text:p text:style-name="P28"/>
      <text:p text:style-name="P30"><text:span text:style-name="T9">О</text:span>птимизаци<text:span text:style-name="T9">я</text:span> по объёму <text:span text:style-name="T9">(-Os)</text:span>:</text:p>
      <table:table table:name="Размер" table:style-name="Размер">
        <table:table-column table:style-name="Размер.A"/>
        <table:table-column table:style-name="Размер.B"/>
        <table:table-column table:style-name="Размер.C"/>
        <table:table-column table:style-name="Размер.D"/>
        <table:table-row table:style-name="Размер.1">
          <table:table-cell table:style-name="Размер.A1" office:value-type="string">
            <text:p text:style-name="P37">Компилятор</text:p>
          </table:table-cell>
          <table:table-cell table:style-name="Размер.A1" office:value-type="string">
            <text:p text:style-name="P31">ccomp</text:p>
          </table:table-cell>
          <table:table-cell table:style-name="Размер.A1" office:value-type="string">
            <text:p text:style-name="P31">gcc</text:p>
          </table:table-cell>
          <table:table-cell table:style-name="Размер.A1" office:value-type="string">
            <text:p text:style-name="P31">clang</text:p>
          </table:table-cell>
        </table:table-row>
        <table:table-row table:style-name="Размер.2">
          <table:table-cell table:style-name="Размер.A1" office:value-type="string">
            <text:p text:style-name="P28"><text:span text:style-name="T10">В</text:span><text:span text:style-name="T6">ремя работы </text:span><text:span text:style-name="T11">(сек)</text:span></text:p>
          </table:table-cell>
          <table:table-cell table:style-name="Размер.A1" office:value-type="string">
            <text:p text:style-name="P44">0,00112</text:p>
          </table:table-cell>
          <table:table-cell table:style-name="Размер.A1" office:value-type="string">
            <text:p text:style-name="P44">0,00115</text:p>
          </table:table-cell>
          <table:table-cell table:style-name="Размер.A1" office:value-type="string">
            <text:p text:style-name="P31">0,00113</text:p>
          </table:table-cell>
        </table:table-row>
        <table:table-row table:style-name="Размер.1">
          <table:table-cell table:style-name="Размер.A1" office:value-type="string">
            <text:p text:style-name="P38">Размер файла (бит)</text:p>
          </table:table-cell>
          <table:table-cell table:style-name="Размер.A1" office:value-type="string">
            <text:p text:style-name="P44">17032</text:p>
          </table:table-cell>
          <table:table-cell table:style-name="Размер.A1" office:value-type="string">
            <text:p text:style-name="P44">16992</text:p>
          </table:table-cell>
          <table:table-cell table:style-name="Размер.A1" office:value-type="string">
            <text:p text:style-name="P31">17048</text:p>
          </table:table-cell>
        </table:table-row>
      </table:table>
      <text:p text:style-name="P30"/>
      <text:p text:style-name="P36">Оптимизация по скорости (-O3)</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53">Компилятор</text:p>
          </table:table-cell>
          <table:table-cell table:style-name="Таблица3.A1" office:value-type="string">
            <text:p text:style-name="P49">ccomp</text:p>
          </table:table-cell>
          <table:table-cell table:style-name="Таблица3.A1" office:value-type="string">
            <text:p text:style-name="P49">gcc</text:p>
          </table:table-cell>
          <table:table-cell table:style-name="Таблица3.A1" office:value-type="string">
            <text:p text:style-name="P49">clang</text:p>
          </table:table-cell>
        </table:table-row>
        <table:table-row table:style-name="Таблица3.2">
          <table:table-cell table:style-name="Таблица3.A1" office:value-type="string">
            <text:p text:style-name="P28"><text:span text:style-name="T10">В</text:span><text:span text:style-name="T6">ремя работы </text:span><text:span text:style-name="T11">(сек)</text:span></text:p>
          </table:table-cell>
          <table:table-cell table:style-name="Таблица3.A1" office:value-type="string">
            <text:p text:style-name="P49">0,0011<text:span text:style-name="T9">2</text:span></text:p>
          </table:table-cell>
          <table:table-cell table:style-name="Таблица3.A1" office:value-type="string">
            <text:p text:style-name="P49">0,00112</text:p>
          </table:table-cell>
          <table:table-cell table:style-name="Таблица3.A1" office:value-type="string">
            <text:p text:style-name="P51">0,0011</text:p>
          </table:table-cell>
        </table:table-row>
        <table:table-row table:style-name="Таблица3.3">
          <table:table-cell table:style-name="Таблица3.A1" office:value-type="string">
            <text:p text:style-name="P38">Размер файла (бит)</text:p>
          </table:table-cell>
          <table:table-cell table:style-name="Таблица3.A1" office:value-type="string">
            <text:p text:style-name="P44">17032</text:p>
          </table:table-cell>
          <table:table-cell table:style-name="Таблица3.A1" office:value-type="string">
            <text:p text:style-name="P44">16992</text:p>
          </table:table-cell>
          <table:table-cell table:style-name="Таблица3.A1" office:value-type="string">
            <text:p text:style-name="P31">17048</text:p>
          </table:table-cell>
        </table:table-row>
      </table:table>
      <text:p text:style-name="P40"/>
      <text:p text:style-name="P33"/>
      <text:p text:style-name="P32"><text:span text:style-name="T10">В</text:span><text:span text:style-name="T6">ремя работы –</text:span><text:span text:style-name="T9"> усреднённое значение </text:span><text:span text:style-name="T10">времени работы </text:span><text:span text:style-name="T6">100 запусков </text:span><text:span text:style-name="T9">(фикс. Поток)</text:span></text:p>
      <text:p text:style-name="P38">Хоть размер файла при оптимизации по скорости и по объёму совпадает, файлы получаются разные. <text:span text:style-name="T12">Можно заметить, что при оптимизации по объёму clang выдал файл большего размера чем без этой оптимизации. Так произошло потому что при оптимизации по объёму компилятор сначала применяет оптимизации по скорости, которые могут как в данном случае и увеличить объём программы.</text:span></text:p>
      <text:p text:style-name="P38"/>
      <text:p text:style-name="P39">Все три компилятора показывают практически одинаковое время выполнения, <text:span text:style-name="T12">из-за малого времени выполнения программы отследить разницу очень сложно. Так происходит из-за отсутствия вычислительно сложных фрагментов, что приводит к очень близким результатам</text:span></text:p>
      <text:p text:style-name="P184">Clang</text:p>
      <text:p text:style-name="Standard"><text:line-break/><text:span text:style-name="T32">Размножение </text:span><text:span text:style-name="T33">копий</text:span><text:span text:style-name="T32"> не оптимизируется с -o0</text:span></text:p>
      <text:p text:style-name="Standard"><text:span text:style-name="T20"/></text:p>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143"><text:tab/>movl<text:tab/>$2, j4(%rip)</text:p>
            <text:p text:style-name="P124"/>
            <text:p text:style-name="P124"><text:tab/>movl<text:tab/>j4(%rip), %esi</text:p>
            <text:p text:style-name="P124"><text:tab/>leaq<text:tab/>.L.str(%rip), %rdi</text:p>
            <text:p text:style-name="P124"><text:tab/>movb<text:tab/>$0, %al</text:p>
            <text:p text:style-name="Table_20_Contents"><text:span text:style-name="T35"><text:tab/>callq<text:tab/></text:span><text:a xlink:type="simple" xlink:href="mailto:printf@PLT" text:style-name="Internet_20_link" text:visited-style-name="Visited_20_Internet_20_Link"><text:span text:style-name="T36">printf@PLT</text:span></text:a></text:p>
            <text:p text:style-name="P124"/>
            <text:p text:style-name="P124"><text:tab/>movl<text:tab/>i2(%rip), %eax</text:p>
            <text:p text:style-name="P124"><text:tab/>cmpl<text:tab/>j4(%rip), %eax</text:p>
            <text:p text:style-name="P124"><text:tab/>jge<text:tab/>.LBB0_3</text:p>
            <text:p text:style-name="P124"># %bb.1:</text:p>
            <text:p text:style-name="P124"><text:tab/>movl<text:tab/>i4(%rip), %eax</text:p>
            <text:p text:style-name="P124"><text:tab/>cmpl<text:tab/>j4(%rip), %eax</text:p>
            <text:p text:style-name="P124"><text:tab/>jge<text:tab/>.LBB0_3</text:p>
            <text:p text:style-name="P124"># %bb.2:</text:p>
            <text:p text:style-name="P124"/>
            <text:p text:style-name="P124"><text:tab/>movl<text:tab/>$2, i2(%rip)</text:p>
            <text:p text:style-name="P124"/>
            <text:p text:style-name="P124"><text:tab/>movl<text:tab/>i2(%rip), %esi</text:p>
            <text:p text:style-name="P124"><text:tab/>leaq<text:tab/>.L.str(%rip), %rdi</text:p>
            <text:p text:style-name="P124"><text:tab/>movb<text:tab/>$0, %al</text:p>
            <text:p text:style-name="Table_20_Contents"><text:span text:style-name="T35"><text:tab/>callq<text:tab/></text:span><text:a xlink:type="simple" xlink:href="mailto:printf@PLT" text:style-name="Internet_20_link" text:visited-style-name="Visited_20_Internet_20_Link"><text:span text:style-name="T36">printf@PLT</text:span></text:a></text:p>
            <text:p text:style-name="P124"/>
            <text:p text:style-name="P124">.LBB0_3:</text:p>
            <text:p text:style-name="P124"><text:tab/>movl<text:tab/>k5(%rip), %eax</text:p>
            <text:p text:style-name="P124"><text:tab/>movl<text:tab/>%eax, j4(%rip)</text:p>
            <text:p text:style-name="P124"/>
            <text:p text:style-name="P124"><text:tab/>movl<text:tab/>j4(%rip), %esi</text:p>
            <text:p text:style-name="P124"><text:tab/>leaq<text:tab/>.L.str(%rip), %rdi</text:p>
            <text:p text:style-name="P124"><text:tab/>movb<text:tab/>$0, %al</text:p>
            <text:p text:style-name="Table_20_Contents"><text:span text:style-name="T35"><text:tab/>callq<text:tab/></text:span><text:a xlink:type="simple" xlink:href="mailto:printf@PLT" text:style-name="Internet_20_link" text:visited-style-name="Visited_20_Internet_20_Link"><text:span text:style-name="T36">printf@PLT</text:span></text:a></text:p>
            <text:p text:style-name="P124"/>
            <text:p text:style-name="P124"><text:tab/>movl<text:tab/>i2(%rip), %eax</text:p>
            <text:p text:style-name="P124"><text:tab/>cmpl<text:tab/>j4(%rip), %eax</text:p>
            <text:p text:style-name="P124"><text:tab/>jge<text:tab/>.LBB0_6</text:p>
            <text:p text:style-name="P124"># %bb.4:</text:p>
            <text:p text:style-name="P124"><text:tab/>movl<text:tab/>i4(%rip), %eax</text:p>
            <text:p text:style-name="P124"><text:tab/>cmpl<text:tab/>j4(%rip), %eax</text:p>
            <text:p text:style-name="P124"><text:tab/>jge<text:tab/>.LBB0_6</text:p>
            <text:p text:style-name="P124"># %bb.5:</text:p>
            <text:p text:style-name="P124"/>
            <text:p text:style-name="P124"><text:tab/>movl<text:tab/>$3, i5(%rip)</text:p>
            <text:p text:style-name="P124"/>
            <text:p text:style-name="P124"><text:tab/>movl<text:tab/>i5(%rip), %esi</text:p>
            <text:p text:style-name="P124"><text:tab/>leaq<text:tab/>.L.str(%rip), %rdi</text:p>
            <text:p text:style-name="P124"><text:tab/>movb<text:tab/>$0, %al</text:p>
            <text:p text:style-name="P124"><text:tab/>callq<text:tab/>printf@PLT</text:p>
            <text:p text:style-name="P124">.LBB0_6:</text:p>
          </table:table-cell>
          <table:table-cell table:style-name="Таблица4.A1" office:value-type="string">
            <text:p text:style-name="P106"><text:span text:style-name="T34"><text:tab/></text:span>j4 = 2;</text:p>
            <text:p text:style-name="P107"><text:tab/>printf("%d", j4);</text:p>
            <text:p text:style-name="P107"><text:tab/>if (i2 &lt; j4 &amp;&amp; i4 &lt; j4) {</text:p>
            <text:p text:style-name="P107"><text:tab/><text:tab/>i2 = 2;</text:p>
            <text:p text:style-name="P107"><text:tab/><text:tab/>printf("%d", i2);</text:p>
            <text:p text:style-name="P107"><text:tab/>}</text:p>
            <text:p text:style-name="P107"><text:tab/>j4 = k5;</text:p>
            <text:p text:style-name="P107"><text:tab/>printf("%d", j4);</text:p>
            <text:p text:style-name="P107"><text:tab/>if (i2 &lt; j4 &amp;&amp; i4 &lt; j4) {</text:p>
            <text:p text:style-name="P107"><text:tab/><text:tab/>i5 = 3;</text:p>
            <text:p text:style-name="P107"><text:tab/><text:tab/>printf("%d", i5);</text:p>
            <text:p text:style-name="P101"><text:tab/>}</text:p>
          </table:table-cell>
        </table:table-row>
      </table:table>
      <text:p text:style-name="P112"><text:span text:style-name="T20"/></text:p>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143"><text:tab/>movl<text:tab/>$2, j4(%rip)</text:p>
            <text:p text:style-name="P143"/>
            <text:p text:style-name="P143"><text:tab/>movl<text:tab/><text:span text:style-name="T37">j4(%rip), %esi</text:span></text:p>
            <text:p text:style-name="P143"><text:tab/>leaq<text:tab/>.L.str(%rip), %rdi</text:p>
            <text:p text:style-name="P143"><text:tab/>movb<text:tab/>$0, %al</text:p>
            <text:p text:style-name="P113"><text:span text:style-name="T35"><text:tab/>callq<text:tab/></text:span><text:a xlink:type="simple" xlink:href="mailto:printf@PLT" text:style-name="Internet_20_link" text:visited-style-name="Visited_20_Internet_20_Link"><text:span text:style-name="T36">printf@PLT</text:span></text:a></text:p>
            <text:p text:style-name="P143"/>
            <text:p text:style-name="P143"><text:tab/>movl<text:tab/>i2(%rip), %eax</text:p>
            <text:p text:style-name="P143"><text:tab/>cmpl<text:tab/>j4(%rip), %eax</text:p>
            <text:p text:style-name="P143"><text:tab/>jge<text:tab/>.LBB0_3</text:p>
            <text:p text:style-name="P143"># %bb.1:</text:p>
            <text:p text:style-name="P143"><text:tab/>movl<text:tab/>i4(%rip), %eax</text:p>
            <text:p text:style-name="P143"><text:tab/>cmpl<text:tab/>j4(%rip), %eax</text:p>
            <text:p text:style-name="P143"><text:tab/>jge<text:tab/>.LBB0_3</text:p>
            <text:p text:style-name="P143"># %bb.2:</text:p>
            <text:p text:style-name="P143"/>
            <text:p text:style-name="P143"><text:tab/>movl<text:tab/>$2, i2(%rip)</text:p>
            <text:p text:style-name="P143"/>
            <text:p text:style-name="P143"><text:tab/>movl<text:tab/><text:span text:style-name="T37">i2(%rip), %esi</text:span></text:p>
            <text:p text:style-name="P143"><text:tab/>leaq<text:tab/>.L.str(%rip), %rdi</text:p>
            <text:p text:style-name="P143"><text:tab/>movb<text:tab/>$0, %al</text:p>
            <text:p text:style-name="P113"><text:span text:style-name="T35"><text:tab/>callq<text:tab/></text:span><text:a xlink:type="simple" xlink:href="mailto:printf@PLT" text:style-name="Internet_20_link" text:visited-style-name="Visited_20_Internet_20_Link"><text:span text:style-name="T36">printf@PLT</text:span></text:a></text:p>
            <text:p text:style-name="P143"/>
            <text:p text:style-name="P143">.LBB0_3:</text:p>
            <text:p text:style-name="P143"><text:tab/>movl<text:tab/>k5(%rip), %eax</text:p>
            <text:p text:style-name="P143"><text:tab/>movl<text:tab/>%eax, j4(%rip)</text:p>
            <text:p text:style-name="P143"/>
            <text:p text:style-name="P143"><text:tab/>movl<text:tab/>j4(%rip), %esi</text:p>
            <text:p text:style-name="P143"><text:tab/>leaq<text:tab/>.L.str(%rip), %rdi</text:p>
            <text:p text:style-name="P143"><text:tab/>movb<text:tab/>$0, %al</text:p>
            <text:p text:style-name="P113"><text:span text:style-name="T35"><text:tab/>callq<text:tab/></text:span><text:a xlink:type="simple" xlink:href="mailto:printf@PLT" text:style-name="Internet_20_link" text:visited-style-name="Visited_20_Internet_20_Link"><text:span text:style-name="T36">printf@PLT</text:span></text:a></text:p>
            <text:p text:style-name="P143"/>
            <text:p text:style-name="P143"><text:tab/>movl<text:tab/>i2(%rip), %eax</text:p>
            <text:p text:style-name="P143"><text:tab/>cmpl<text:tab/>j4(%rip), %eax</text:p>
            <text:p text:style-name="P143"><text:tab/>jge<text:tab/>.LBB0_6</text:p>
            <text:p text:style-name="P143"># %bb.4:</text:p>
            <text:p text:style-name="P143"><text:tab/>movl<text:tab/>i4(%rip), %eax</text:p>
            <text:p text:style-name="P143"><text:tab/>cmpl<text:tab/>j4(%rip), %eax</text:p>
            <text:p text:style-name="P143"><text:tab/>jge<text:tab/>.LBB0_6</text:p>
            <text:p text:style-name="P143"># %bb.5:</text:p>
            <text:p text:style-name="P143"/>
            <text:p text:style-name="P143"><text:tab/>movl<text:tab/>$3, i5(%rip)</text:p>
            <text:p text:style-name="P143"/>
            <text:p text:style-name="P143"><text:tab/>movl<text:tab/><text:span text:style-name="T37">i5(%rip), %esi</text:span></text:p>
            <text:p text:style-name="P143"><text:tab/>leaq<text:tab/>.L.str(%rip), %rdi</text:p>
            <text:p text:style-name="P143"><text:tab/>movb<text:tab/>$0, %al</text:p>
            <text:p text:style-name="P143"><text:tab/>callq<text:tab/>printf@PLT</text:p>
            <text:p text:style-name="P143">.LBB0_6:</text:p>
          </table:table-cell>
          <table:table-cell table:style-name="Таблица5.A1" office:value-type="string">
            <text:p text:style-name="P137"><text:tab/>movl<text:tab/>$2, j4(%rip)</text:p>
            <text:p text:style-name="P137"><text:tab/></text:p>
            <text:p text:style-name="P137"><text:tab/>leaq<text:tab/>.L.str(%rip), %rdi</text:p>
            <text:p text:style-name="P137"><text:tab/>movl<text:tab/><text:span text:style-name="T37">$2, %esi</text:span></text:p>
            <text:p text:style-name="P137"><text:tab/>xorl<text:tab/>%eax, %eax</text:p>
            <text:p text:style-name="P137"><text:tab/>callq<text:tab/>printf@PLT</text:p>
            <text:p text:style-name="P137"><text:tab/></text:p>
            <text:p text:style-name="P137"><text:tab/>movl<text:tab/>j4(%rip), %eax</text:p>
            <text:p text:style-name="P137"><text:tab/>cmpl<text:tab/>%eax, i2(%rip)</text:p>
            <text:p text:style-name="P137"><text:tab/>jge<text:tab/>.LBB0_3</text:p>
            <text:p text:style-name="P137"># %bb.1:</text:p>
            <text:p text:style-name="P137"><text:tab/>cmpl<text:tab/>%eax, i4(%rip)</text:p>
            <text:p text:style-name="P137"><text:tab/>jge<text:tab/>.LBB0_3</text:p>
            <text:p text:style-name="P137"># %bb.2:</text:p>
            <text:p text:style-name="P137"/>
            <text:p text:style-name="P137"/>
            <text:p text:style-name="P137"><text:tab/>movl<text:tab/>$2, i2(%rip)</text:p>
            <text:p text:style-name="P137"/>
            <text:p text:style-name="P137"><text:tab/>leaq<text:tab/>.L.str(%rip), %rdi</text:p>
            <text:p text:style-name="P137"><text:tab/>movl<text:tab/><text:span text:style-name="T37">$2, %esi</text:span></text:p>
            <text:p text:style-name="P137"><text:tab/>xorl<text:tab/>%eax, %eax</text:p>
            <text:p text:style-name="P137"><text:tab/>callq<text:tab/>printf@PLT</text:p>
            <text:p text:style-name="P137"/>
            <text:p text:style-name="P137">.LBB0_3:</text:p>
            <text:p text:style-name="P137"><text:tab/>movl<text:tab/>k5(%rip), %esi</text:p>
            <text:p text:style-name="P137"><text:tab/>movl<text:tab/>%esi, j4(%rip)</text:p>
            <text:p text:style-name="P137"/>
            <text:p text:style-name="P137"><text:tab/>leaq<text:tab/>.L.str(%rip), %rdi</text:p>
            <text:p text:style-name="P137"><text:tab/>xorl<text:tab/>%eax, %eax</text:p>
            <text:p text:style-name="P137"><text:tab/>callq<text:tab/>printf@PLT</text:p>
            <text:p text:style-name="P137"/>
            <text:p text:style-name="P137"/>
            <text:p text:style-name="P137"><text:tab/>movl<text:tab/>j4(%rip), %eax</text:p>
            <text:p text:style-name="P137"><text:tab/>cmpl<text:tab/>%eax, i2(%rip)</text:p>
            <text:p text:style-name="P137"><text:tab/>jge<text:tab/>.LBB0_6</text:p>
            <text:p text:style-name="P137"># %bb.4:</text:p>
            <text:p text:style-name="P137"><text:tab/>cmpl<text:tab/>%eax, i4(%rip)</text:p>
            <text:p text:style-name="P137"><text:tab/>jge<text:tab/>.LBB0_6</text:p>
            <text:p text:style-name="P137"># %bb.5:</text:p>
            <text:p text:style-name="P137"/>
            <text:p text:style-name="P137"/>
            <text:p text:style-name="P137"><text:tab/>movl<text:tab/>$3, i5(%rip)</text:p>
            <text:p text:style-name="P137"/>
            <text:p text:style-name="P137"><text:tab/>leaq<text:tab/>.L.str(%rip), %rdi</text:p>
            <text:p text:style-name="P137"><text:tab/>movl<text:tab/><text:span text:style-name="T37">$3, %esi</text:span></text:p>
            <text:p text:style-name="P137"><text:tab/>xorl<text:tab/>%eax, %eax</text:p>
            <text:p text:style-name="P137"><text:tab/>callq<text:tab/>printf@PLT</text:p>
          </table:table-cell>
        </table:table-row>
      </table:table>
      <text:p text:style-name="P114"><text:span text:style-name="T20"/></text:p>
      <text:p text:style-name="P6">При оптимизации по скорости мы видим оптимизацию размножения <text:span text:style-name="T3">копий</text:span></text:p>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167"><text:tab/>movl<text:tab/>$3, i3(%rip)</text:p>
            <text:p text:style-name="P167"/>
            <text:p text:style-name="P167"><text:tab/>movsd<text:tab/>.LCPI0_2(%rip), %xmm0</text:p>
            <text:p text:style-name="P167"><text:tab/>movsd<text:tab/>%xmm0, flt_1(%rip)</text:p>
            <text:p text:style-name="P167"/>
            <text:p text:style-name="P167"><text:tab/>movl<text:tab/>$5, i2(%rip)</text:p>
            <text:p text:style-name="P167"/>
            <text:p text:style-name="P167"><text:tab/>movl<text:tab/>i(%rip), %eax</text:p>
            <text:p text:style-name="P167"><text:tab/>addl<text:tab/>$0, %eax</text:p>
            <text:p text:style-name="P167"><text:tab/>movl<text:tab/>%eax, j2(%rip)</text:p>
            <text:p text:style-name="P167"/>
            <text:p text:style-name="P167"><text:tab/>movl<text:tab/>i(%rip), %eax</text:p>
            <text:p text:style-name="P167"><text:tab/>movl<text:tab/>$1, %ecx</text:p>
            <text:p text:style-name="P167"><text:tab/>cltd</text:p>
            <text:p text:style-name="P167"><text:tab/>idivl<text:tab/>%ecx</text:p>
            <text:p text:style-name="P167"><text:tab/>movl<text:tab/>%eax, k2(%rip)</text:p>
            <text:p text:style-name="P167"/>
            <text:p text:style-name="P167"><text:tab/>movl<text:tab/>i(%rip), %eax</text:p>
            <text:p text:style-name="P167"><text:tab/>shll<text:tab/>$0, %eax</text:p>
            <text:p text:style-name="P167"><text:tab/>movl<text:tab/>%eax, i4(%rip)</text:p>
            <text:p text:style-name="P167"/>
            <text:p text:style-name="P167"><text:tab/>imull<text:tab/>$0, i(%rip), %eax</text:p>
            <text:p text:style-name="P167"><text:tab/>movl<text:tab/>%eax, i5(%rip)</text:p>
            <text:p text:style-name="P167"/>
            <text:p text:style-name="P167"><text:tab/>movsd<text:tab/>.LCPI0_1(%rip), %xmm0</text:p>
            <text:p text:style-name="P167"><text:tab/>movsd<text:tab/>%xmm0, flt_3(%rip)</text:p>
            <text:p text:style-name="P167"/>
            <text:p text:style-name="P167"><text:tab/>movsd<text:tab/>.LCPI0_0(%rip), %xmm0</text:p>
            <text:p text:style-name="P167"><text:tab/>movsd<text:tab/>%xmm0, flt_4(%rip)</text:p>
            <text:p text:style-name="P167"/>
            <text:p text:style-name="P167"><text:tab/>xorps<text:tab/>%xmm0, %xmm0</text:p>
            <text:p text:style-name="P167"><text:tab/>mulsd<text:tab/>flt_6(%rip), %xmm0</text:p>
            <text:p text:style-name="P167"><text:tab/>movsd<text:tab/>%xmm0, flt_5(%rip)</text:p>
            <text:p text:style-name="P167"/>
            <text:p text:style-name="P167"><text:tab/>movsd<text:tab/>flt_2(%rip), %xmm0</text:p>
            <text:p text:style-name="P167"><text:tab/>mulsd<text:tab/>flt_3(%rip), %xmm0</text:p>
            <text:p text:style-name="P167"><text:tab/>movsd<text:tab/>%xmm0, flt_6(%rip)</text:p>
          </table:table-cell>
          <table:table-cell table:style-name="Таблица6.A1" office:value-type="string">
            <text:p text:style-name="P177"><text:tab/>I3 = 1 + 2;</text:p>
            <text:p text:style-name="P177"><text:tab/>flt_1 = 2.4 + 6.3;</text:p>
            <text:p text:style-name="P177"><text:tab/>i2 = 5;</text:p>
            <text:p text:style-name="P177"><text:tab/>j2 = i + 0;</text:p>
            <text:p text:style-name="P177"><text:tab/>k2 = i / 1;</text:p>
            <text:p text:style-name="P177"><text:tab/>i4 = i * 1;</text:p>
            <text:p text:style-name="P177"><text:tab/>i5 = i * 0;</text:p>
            <text:p text:style-name="P177"><text:tab/>printf("This compiler handles divide-by-zero as \</text:p>
            <text:p text:style-name="P177"><text:s text:c="20"/>an error\n");</text:p>
            <text:p text:style-name="P177"><text:tab/>flt_3 = 2.4 / 1.0;</text:p>
            <text:p text:style-name="P177"><text:tab/>flt_4 = 1.0 + 0.0000001;</text:p>
            <text:p text:style-name="P177"><text:tab/>flt_5 = flt_6 * 0.0;</text:p>
            <text:p text:style-name="P177"><text:tab/>flt_6 = flt_2 * flt_3;</text:p>
          </table:table-cell>
        </table:table-row>
      </table:table>
      <text:p text:style-name="P95"/>
      <text:p text:style-name="P6">Без оптимизации происходит свёртка констант, но арифметические тождества не оптимизируются</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133"><text:tab/>movl<text:tab/>$3, i3(%rip)</text:p>
            <text:p text:style-name="P133"/>
            <text:p text:style-name="P133"><text:tab/>movsd<text:tab/>.LCPI0_2(%rip), %xmm0</text:p>
            <text:p text:style-name="P133"><text:tab/>movsd<text:tab/>%xmm0, flt_1(%rip)</text:p>
            <text:p text:style-name="P133"/>
            <text:p text:style-name="P133"><text:tab/>movl<text:tab/>$5, i2(%rip)</text:p>
            <text:p text:style-name="P133"/>
            <text:p text:style-name="P133"><text:tab/><text:span text:style-name="T39">movl<text:tab/>i(%rip), %eax</text:span></text:p>
            <text:p text:style-name="P133"><text:tab/>addl<text:tab/>$0, %eax</text:p>
            <text:p text:style-name="P133"><text:tab/>movl<text:tab/>%eax, j2(%rip)</text:p>
            <text:p text:style-name="P133"/>
            <text:p text:style-name="P133"><text:tab/><text:span text:style-name="T39">movl<text:tab/>i(%rip), %eax</text:span></text:p>
            <text:p text:style-name="P133"><text:tab/>movl<text:tab/>$1, %ecx</text:p>
            <text:p text:style-name="P133"><text:tab/>cltd</text:p>
            <text:p text:style-name="P133"><text:tab/>idivl<text:tab/>%ecx</text:p>
            <text:p text:style-name="P133"><text:tab/>movl<text:tab/>%eax, k2(%rip)</text:p>
            <text:p text:style-name="P133"/>
            <text:p text:style-name="P133"><text:tab/><text:span text:style-name="T39">movl<text:tab/>i(%rip), %eax</text:span></text:p>
            <text:p text:style-name="P133"><text:tab/>shll<text:tab/>$0, %eax</text:p>
            <text:p text:style-name="P133"><text:tab/>movl<text:tab/>%eax, i4(%rip)</text:p>
            <text:p text:style-name="P133"/>
            <text:p text:style-name="P133"><text:tab/>imull<text:tab/>$0, i(%rip), %eax</text:p>
            <text:p text:style-name="P133"><text:tab/>movl<text:tab/>%eax, i5(%rip)</text:p>
            <text:p text:style-name="P133"/>
            <text:p text:style-name="P134"><text:tab/>movsd<text:tab/>.LCPI0_1(%rip), %xmm0</text:p>
            <text:p text:style-name="P133"><text:tab/>movsd<text:tab/>%xmm0, flt_3(%rip)</text:p>
            <text:p text:style-name="P133"/>
            <text:p text:style-name="P133"><text:tab/>movsd<text:tab/>.LCPI0_0(%rip), %xmm0</text:p>
            <text:p text:style-name="P133"><text:tab/>movsd<text:tab/>%xmm0, flt_4(%rip)</text:p>
            <text:p text:style-name="P133"/>
            <text:p text:style-name="P133"><text:tab/>xorps<text:tab/>%xmm0, %xmm0</text:p>
            <text:p text:style-name="P133"><text:tab/>mulsd<text:tab/>flt_6(%rip), %xmm0</text:p>
            <text:p text:style-name="P133"><text:tab/>movsd<text:tab/>%xmm0, flt_5(%rip)</text:p>
            <text:p text:style-name="P133"/>
            <text:p text:style-name="P133"><text:tab/>movsd<text:tab/>flt_2(%rip), %xmm0</text:p>
            <text:p text:style-name="P133"><text:tab/>mulsd<text:tab/>flt_3(%rip), %xmm0</text:p>
            <text:p text:style-name="P133"><text:tab/>movsd<text:tab/>%xmm0, flt_6(%rip)</text:p>
          </table:table-cell>
          <table:table-cell table:style-name="Таблица7.A1" office:value-type="string">
            <text:p text:style-name="P135"><text:tab/>movl<text:tab/>$3, i3(%rip)</text:p>
            <text:p text:style-name="P135"/>
            <text:p text:style-name="P135"><text:tab/>movabsq<text:tab/>$4621087282649523814, %rax</text:p>
            <text:p text:style-name="P135"><text:tab/>movq<text:tab/>%rax, flt_1(%rip)</text:p>
            <text:p text:style-name="P135"/>
            <text:p text:style-name="P135"><text:tab/>movl<text:tab/>$5, i2(%rip)</text:p>
            <text:p text:style-name="P135"/>
            <text:p text:style-name="P135"><text:tab/>movl<text:tab/>i(%rip), %eax</text:p>
            <text:p text:style-name="P135"><text:tab/>movl<text:tab/>%eax, j2(%rip)</text:p>
            <text:p text:style-name="P135"/>
            <text:p text:style-name="P135"/>
            <text:p text:style-name="P135"/>
            <text:p text:style-name="P135"/>
            <text:p text:style-name="P135"/>
            <text:p text:style-name="P135"/>
            <text:p text:style-name="P135"><text:tab/>movl<text:tab/>%eax, k2(%rip)</text:p>
            <text:p text:style-name="P135"/>
            <text:p text:style-name="P135"/>
            <text:p text:style-name="P135"/>
            <text:p text:style-name="P135"><text:tab/>movl<text:tab/>%eax, i4(%rip)</text:p>
            <text:p text:style-name="P135"/>
            <text:p text:style-name="P135"/>
            <text:p text:style-name="P135"><text:tab/>movl<text:tab/>$0, i5(%rip)</text:p>
            <text:p text:style-name="P135"/>
            <text:p text:style-name="P136"><text:tab/>movabsq<text:tab/>$4612586738352862003, %rax</text:p>
            <text:p text:style-name="P135"><text:tab/>movq<text:tab/>%rax, flt_3(%rip)</text:p>
            <text:p text:style-name="P135"/>
            <text:p text:style-name="P135"><text:tab/>movabsq<text:tab/>$4607182419250377371, %rax</text:p>
            <text:p text:style-name="P135"><text:tab/>movq<text:tab/>%rax, flt_4(%rip)</text:p>
            <text:p text:style-name="P135"/>
            <text:p text:style-name="P135"><text:tab/><text:span text:style-name="T37">xorpd<text:tab/>%xmm0, %xmm0</text:span></text:p>
            <text:p text:style-name="P135"><text:tab/><text:span text:style-name="T37">mulsd<text:tab/>flt_6(%rip), %xmm0</text:span></text:p>
            <text:p text:style-name="P135"><text:tab/><text:span text:style-name="T37">movsd<text:tab/>%xmm0, flt_5(%rip)</text:span></text:p>
            <text:p text:style-name="P135"/>
            <text:p text:style-name="P135"><text:tab/>movsd<text:tab/>flt_2(%rip), %xmm0</text:p>
            <text:p text:style-name="P135"><text:tab/>mulsd<text:tab/>.LCPI0_0(%rip), %xmm0</text:p>
            <text:p text:style-name="P135"><text:tab/>movsd<text:tab/>%xmm0, flt_6(%rip)</text:p>
          </table:table-cell>
        </table:table-row>
      </table:table>
      <text:p text:style-name="P117"/>
      <text:p text:style-name="P4">При оптимизации свёртка констант всё также происходит, но убирается ещё и вычисление арифметических тождеств, <text:span text:style-name="T38">кроме умножения на 0.0</text:span></text:p>
      <text:p text:style-name="P5"/>
      <text:p text:style-name="P1">Хорошо видна оптимизация излишних загрузок переменной в регистр.</text:p>
      <text:p text:style-name="P5"/>
      <table:table table:name="Таблица9" table:style-name="Таблица9">
        <table:table-column table:style-name="Таблица9.A"/>
        <table:table-column table:style-name="Таблица9.B"/>
        <table:table-row>
          <table:table-cell table:style-name="Таблица9.A1" office:value-type="string">
            <text:p text:style-name="P121">movl<text:tab/>$1, k3(%rip)</text:p>
            <text:p text:style-name="P121">movl<text:tab/>$1, k3(%rip)</text:p>
          </table:table-cell>
          <table:table-cell table:style-name="Таблица9.A1" office:value-type="string">
            <text:p text:style-name="P121">movl<text:tab/>$1, k3(%rip)</text:p>
          </table:table-cell>
        </table:table-row>
      </table:table>
      <text:p text:style-name="P5"/>
      <text:p text:style-name="P82"><text:span text:style-name="T22">Удаление излишнего присваивания проис</text:span><text:span text:style-name="T17">ходит только с оптимизацией</text:span></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132"><text:tab/>movl<text:tab/>j5(%rip), %eax</text:p>
            <text:p text:style-name="P132"><text:tab/><text:span text:style-name="T37">shll<text:tab/>$2, %eax</text:span></text:p>
            <text:p text:style-name="P132"><text:tab/>movl<text:tab/>%eax, k2(%rip)</text:p>
            <text:p text:style-name="P132"><text:tab/>movl<text:tab/>$0, i(%rip)</text:p>
            <text:p text:style-name="P132"/>
            <text:p text:style-name="P132">.LBB0_7:</text:p>
            <text:p text:style-name="P132"><text:tab/>cmpl<text:tab/>$5, i(%rip)</text:p>
            <text:p text:style-name="P132"><text:tab/>jg<text:tab/>.LBB0_10</text:p>
            <text:p text:style-name="P132"># %bb.8:</text:p>
            <text:p text:style-name="P132"><text:tab/>movl<text:tab/>i(%rip), %eax</text:p>
            <text:p text:style-name="P132"><text:tab/><text:span text:style-name="T37">shll<text:tab/>%eax</text:span></text:p>
            <text:p text:style-name="P132"><text:tab/>movw<text:tab/>%ax, %dx</text:p>
            <text:p text:style-name="P132"><text:tab/>movslq<text:tab/>i(%rip), %rcx</text:p>
            <text:p text:style-name="P132"><text:tab/>leaq<text:tab/>ivector4(%rip), %rax</text:p>
            <text:p text:style-name="P132"><text:tab/>movw<text:tab/>%dx, (%rax,%rcx,2)</text:p>
            <text:p text:style-name="P132"># %bb.9:</text:p>
            <text:p text:style-name="P132"><text:tab/>movl<text:tab/>i(%rip), %eax</text:p>
            <text:p text:style-name="P132"><text:tab/>addl<text:tab/>$1, %eax</text:p>
            <text:p text:style-name="P132"><text:tab/>movl<text:tab/>%eax, i(%rip)</text:p>
            <text:p text:style-name="P132"><text:tab/>jmp<text:tab/>.LBB0_7</text:p>
            <text:p text:style-name="P132">.LBB0_10:</text:p>
          </table:table-cell>
          <table:table-cell table:style-name="Таблица8.A1" office:value-type="string">
            <text:p text:style-name="P175"><text:tab/>k2 = 4 * j5;</text:p>
            <text:p text:style-name="P175"><text:tab/>for (i = 0; i &lt;= 5; i++)</text:p>
            <text:p text:style-name="P175"><text:tab/><text:tab/>ivector4[i] = i * 2;</text:p>
          </table:table-cell>
        </table:table-row>
      </table:table>
      <text:p text:style-name="P83"><text:span text:style-name="T17"/></text:p>
      <text:p text:style-name="P58"><text:span text:style-name="T17">С</text:span><text:span text:style-name="T16">нижение мощности происходит и без флага оптимизации. </text:span><text:span text:style-name="T23">Умножение на </text:span><text:span text:style-name="T26">2^n </text:span><text:span text:style-name="T23">заменяется битовым сдвигом.</text:span></text:p>
      <text:p text:style-name="P58"><text:span text:style-name="T23"/></text:p>
      <table:table table:name="Таблица11" table:style-name="Таблица11">
        <table:table-column table:style-name="Таблица11.A"/>
        <table:table-column table:style-name="Таблица11.B"/>
        <table:table-row>
          <table:table-cell table:style-name="Таблица11.A1" office:value-type="string">
            <text:p text:style-name="P131"><text:tab/>movl<text:tab/>j5(%rip), %eax</text:p>
            <text:p text:style-name="P131"><text:tab/>shll<text:tab/>$2, %eax</text:p>
            <text:p text:style-name="P131"><text:tab/>movl<text:tab/>%eax, k2(%rip)</text:p>
            <text:p text:style-name="P131"/>
            <text:p text:style-name="P131"><text:tab/>movl<text:tab/>$0, i(%rip)</text:p>
            <text:p text:style-name="P131">.LBB0_7: </text:p>
            <text:p text:style-name="P131"><text:tab/>cmpl<text:tab/>$5, i(%rip)</text:p>
            <text:p text:style-name="P131"><text:tab/>jg<text:tab/>.LBB0_10</text:p>
            <text:p text:style-name="P131"># %bb.8: <text:s text:c="2"/></text:p>
            <text:p text:style-name="P131"><text:tab/>movl<text:tab/>i(%rip), %eax</text:p>
            <text:p text:style-name="P131"><text:tab/>shll<text:tab/>%eax</text:p>
            <text:p text:style-name="P131"><text:tab/>movw<text:tab/>%ax, %dx</text:p>
            <text:p text:style-name="P131"><text:tab/>movslq<text:tab/>i(%rip), %rcx</text:p>
            <text:p text:style-name="P131"><text:tab/>leaq<text:tab/>ivector4(%rip), %rax</text:p>
            <text:p text:style-name="P131"><text:tab/>movw<text:tab/>%dx, (%rax,%rcx,2)</text:p>
            <text:p text:style-name="P131"># %bb.9: <text:s/></text:p>
            <text:p text:style-name="P131"><text:tab/>movl<text:tab/>i(%rip), %eax</text:p>
            <text:p text:style-name="P131"><text:tab/>addl<text:tab/>$1, %eax</text:p>
            <text:p text:style-name="P131"><text:tab/>movl<text:tab/>%eax, i(%rip)</text:p>
            <text:p text:style-name="P131"><text:tab/>jmp<text:tab/>.LBB0_7</text:p>
            <text:p text:style-name="P131">.LBB0_10:</text:p>
          </table:table-cell>
          <table:table-cell table:style-name="Таблица11.A1" office:value-type="string">
            <text:p text:style-name="P124"><text:tab/>movl<text:tab/>j5(%rip), %eax</text:p>
            <text:p text:style-name="P124"><text:tab/><text:span text:style-name="T37">shll<text:tab/>$2, %eax</text:span></text:p>
            <text:p text:style-name="P124"><text:tab/>movl<text:tab/>%eax, k2(%rip)</text:p>
            <text:p text:style-name="P124"/>
            <text:p text:style-name="P124"><text:tab/>movabsq<text:tab/>$1688867040264192, %rax</text:p>
            <text:p text:style-name="P124"><text:tab/>movq<text:tab/>%rax, ivector4(%rip)</text:p>
            <text:p text:style-name="P124"><text:tab/>movl<text:tab/>$655368, ivector4+8(%rip) </text:p>
          </table:table-cell>
        </table:table-row>
      </table:table>
      <text:p text:style-name="P58"><text:span text:style-name="T23"/></text:p>
      <text:p text:style-name="P84"><text:span text:style-name="T23">Снижение мощности видно и при оптимизации по скорости, </text:span><text:span text:style-name="T25">при этом</text:span><text:span text:style-name="T23"> цикл был убран.</text:span></text:p>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124"><text:tab/>movl<text:tab/>$0, j5(%rip)</text:p>
            <text:p text:style-name="P124"/>
            <text:p text:style-name="P124"><text:tab/>movl<text:tab/>$10000, k5(%rip)</text:p>
            <text:p text:style-name="P124"/>
            <text:p text:style-name="P124">.LBB0_11: </text:p>
            <text:p text:style-name="P124"/>
            <text:p text:style-name="P124"><text:tab/>movl<text:tab/>k5(%rip), %eax</text:p>
            <text:p text:style-name="P124"><text:tab/>subl<text:tab/>$1, %eax</text:p>
            <text:p text:style-name="P124"><text:tab/>movl<text:tab/>%eax, k5(%rip)</text:p>
            <text:p text:style-name="P124"/>
            <text:p text:style-name="P124"><text:tab/>movl<text:tab/>j5(%rip), %eax</text:p>
            <text:p text:style-name="P124"><text:tab/>addl<text:tab/>$1, %eax</text:p>
            <text:p text:style-name="P124"><text:tab/>movl<text:tab/>%eax, j5(%rip)</text:p>
            <text:p text:style-name="P124"/>
            <text:p text:style-name="P124"><text:tab/>imull<text:tab/>$3, k5(%rip), %eax</text:p>
            <text:p text:style-name="P124"><text:tab/>imull<text:tab/>$5, j5(%rip), %ecx</text:p>
            <text:p text:style-name="P124"><text:tab/>cltd</text:p>
            <text:p text:style-name="P124"><text:tab/>idivl<text:tab/>%ecx</text:p>
            <text:p text:style-name="P124"><text:tab/>movl<text:tab/>%eax, i5(%rip)</text:p>
            <text:p text:style-name="P124"/>
            <text:p text:style-name="P124"># %bb.12:</text:p>
            <text:p text:style-name="P124"><text:tab/>cmpl<text:tab/>$0, k5(%rip)</text:p>
            <text:p text:style-name="P124"><text:tab/>jg<text:tab/>.LBB0_11</text:p>
          </table:table-cell>
          <table:table-cell table:style-name="Таблица10.A1" office:value-type="string">
            <text:p text:style-name="P104"><text:tab/>j5 = 0;</text:p>
            <text:p text:style-name="P104"><text:tab/>k5 = 10000;</text:p>
            <text:p text:style-name="P104"><text:tab/>do {</text:p>
            <text:p text:style-name="P104"><text:tab/><text:tab/>k5 = k5 - 1;</text:p>
            <text:p text:style-name="P104"><text:tab/><text:tab/>j5 = j5 + 1;</text:p>
            <text:p text:style-name="P104"><text:tab/><text:tab/>i5 = (k5 * 3) / (j5 * constant5);</text:p>
            <text:p text:style-name="P104"><text:tab/>} while (k5 &gt; 0);</text:p>
          </table:table-cell>
        </table:table-row>
      </table:table>
      <text:p text:style-name="P98"/>
      <text:p text:style-name="P89"/>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130"><text:tab/>movl<text:tab/>$0, j5(%rip)</text:p>
            <text:p text:style-name="P130"/>
            <text:p text:style-name="P130"><text:tab/>movl<text:tab/>$10000, k5(%rip)</text:p>
            <text:p text:style-name="P130"/>
            <text:p text:style-name="P130">.LBB0_11: </text:p>
            <text:p text:style-name="P130"/>
            <text:p text:style-name="P130"><text:tab/>movl<text:tab/>k5(%rip), %eax</text:p>
            <text:p text:style-name="P130"><text:tab/>subl<text:tab/>$1, %eax</text:p>
            <text:p text:style-name="P130"><text:tab/>movl<text:tab/>%eax, k5(%rip)</text:p>
            <text:p text:style-name="P130"/>
            <text:p text:style-name="P130"><text:tab/>movl<text:tab/>j5(%rip), %eax</text:p>
            <text:p text:style-name="P130"><text:tab/>addl<text:tab/>$1, %eax</text:p>
            <text:p text:style-name="P130"><text:tab/>movl<text:tab/>%eax, j5(%rip)</text:p>
            <text:p text:style-name="P130"/>
            <text:p text:style-name="P130"><text:tab/>imull<text:tab/>$3, k5(%rip), %eax</text:p>
            <text:p text:style-name="P130"><text:tab/>imull<text:tab/>$5, j5(%rip), %ecx</text:p>
            <text:p text:style-name="P130"><text:tab/>cltd</text:p>
            <text:p text:style-name="P130"><text:tab/>idivl<text:tab/>%ecx</text:p>
            <text:p text:style-name="P130"><text:tab/>movl<text:tab/>%eax, i5(%rip)</text:p>
            <text:p text:style-name="P130"/>
            <text:p text:style-name="P130"># %bb.12:</text:p>
            <text:p text:style-name="P130"><text:tab/>cmpl<text:tab/>$0, k5(%rip)</text:p>
            <text:p text:style-name="P130"><text:tab/>jg<text:tab/>.LBB0_11</text:p>
          </table:table-cell>
          <table:table-cell table:style-name="Таблица12.A1" office:value-type="string">
            <text:p text:style-name="P151"><text:tab/>movl<text:tab/>$10000, j5(%rip)</text:p>
            <text:p text:style-name="P124"><text:tab/>movl<text:tab/>$0, i5(%rip)</text:p>
          </table:table-cell>
        </table:table-row>
      </table:table>
      <text:p text:style-name="P89"/>
      <text:p text:style-name="P21"><text:span text:style-name="T41">При оптимизации ц</text:span>икл был <text:span text:style-name="T41">удалён</text:span></text:p>
      <table:table table:name="Таблица26" table:style-name="Таблица26">
        <table:table-column table:style-name="Таблица26.A"/>
        <table:table-column table:style-name="Таблица26.B"/>
        <table:table-row>
          <table:table-cell table:style-name="Таблица26.A1" office:value-type="string">
            <text:p text:style-name="P124"><text:tab/>cmpl<text:tab/>$100, i(%rip)</text:p>
            <text:p text:style-name="P124"><text:tab/>jge<text:tab/>.LBB0_17</text:p>
            <text:p text:style-name="P124"># %bb.15: </text:p>
            <text:p text:style-name="P124"><text:tab/>movl<text:tab/>i(%rip), %eax</text:p>
            <text:p text:style-name="P124"><text:tab/>shll<text:tab/>%eax</text:p>
            <text:p text:style-name="P124"><text:tab/>addl<text:tab/>$3, %eax</text:p>
            <text:p text:style-name="P124"><text:tab/>movslq<text:tab/>%eax, %rcx</text:p>
            <text:p text:style-name="P124"><text:tab/>leaq<text:tab/>ivector5(%rip), %rax</text:p>
            <text:p text:style-name="P124"><text:tab/>movl<text:tab/>$5, (%rax,%rcx,4)</text:p>
            <text:p text:style-name="P124"># %bb.16: </text:p>
            <text:p text:style-name="P124"><text:tab/>movl<text:tab/>i(%rip), %eax</text:p>
            <text:p text:style-name="P124"><text:tab/>addl<text:tab/>$1, %eax</text:p>
            <text:p text:style-name="P124"><text:tab/>movl<text:tab/>%eax, i(%rip)</text:p>
            <text:p text:style-name="P124"><text:tab/>jmp<text:tab/>.LBB0_14<text:tab/></text:p>
            <text:p text:style-name="P124">.LBB0_17:</text:p>
          </table:table-cell>
          <table:table-cell table:style-name="Таблица26.A1" office:value-type="string">
            <text:p text:style-name="P179">for (i = 0; i &lt; 100; i++)</text:p>
            <text:p text:style-name="P179"><text:tab/><text:tab/>ivector5[i * 2 + 3] = 5;</text:p>
          </table:table-cell>
        </table:table-row>
      </table:table>
      <text:p text:style-name="P21"/>
      <text:p text:style-name="P24">Без оптимизации переменная индукции осталась<text:line-break/><text:line-break/></text:p>
      <table:table table:name="Таблица27" table:style-name="Таблица27">
        <table:table-column table:style-name="Таблица27.A"/>
        <table:table-column table:style-name="Таблица27.B"/>
        <table:table-row>
          <table:table-cell table:style-name="Таблица27.A1" office:value-type="string">
            <text:p text:style-name="P151"><text:tab/>cmpl<text:tab/>$100, i(%rip)</text:p>
            <text:p text:style-name="P151"><text:tab/>jge<text:tab/>.LBB0_17</text:p>
            <text:p text:style-name="P151"># %bb.15: </text:p>
            <text:p text:style-name="P151"><text:tab/>movl<text:tab/>i(%rip), %eax</text:p>
            <text:p text:style-name="P151"><text:tab/>shll<text:tab/>%eax</text:p>
            <text:p text:style-name="P151"><text:tab/>addl<text:tab/>$3, %eax</text:p>
            <text:p text:style-name="P151"><text:tab/>movslq<text:tab/>%eax, %rcx</text:p>
            <text:p text:style-name="P151"><text:tab/>leaq<text:tab/>ivector5(%rip), %rax</text:p>
            <text:p text:style-name="P151"><text:tab/>movl<text:tab/>$5, (%rax,%rcx,4)</text:p>
            <text:p text:style-name="P151"># %bb.16: </text:p>
            <text:p text:style-name="P151"><text:tab/>movl<text:tab/>i(%rip), %eax</text:p>
            <text:p text:style-name="P151"><text:tab/>addl<text:tab/>$1, %eax</text:p>
            <text:p text:style-name="P151"><text:tab/>movl<text:tab/>%eax, i(%rip)</text:p>
            <text:p text:style-name="P151"><text:tab/>jmp<text:tab/>.LBB0_14<text:tab/></text:p>
            <text:p text:style-name="P151">.LBB0_17:</text:p>
          </table:table-cell>
          <table:table-cell table:style-name="Таблица27.A1" office:value-type="string">
            <text:p text:style-name="P151"><text:tab/>xorl<text:tab/>%eax, %eax</text:p>
            <text:p text:style-name="P124"><text:tab/>leaq<text:tab/>ivector5(%rip), %rcx</text:p>
            <text:p text:style-name="P124"><text:tab/>.p2align<text:tab/>4, 0x90</text:p>
            <text:p text:style-name="P124"><text:tab/>.LBB0_7: <text:s text:c="2"/></text:p>
            <text:p text:style-name="P124"><text:tab/>movl<text:tab/>$5, 12(%rcx,%rax,8)</text:p>
            <text:p text:style-name="P124"><text:tab/>movl<text:tab/>$5, 20(%rcx,%rax,8)</text:p>
            <text:p text:style-name="P124"><text:tab/>movl<text:tab/>$5, 28(%rcx,%rax,8)</text:p>
            <text:p text:style-name="P124"><text:tab/>movl<text:tab/>$5, 36(%rcx,%rax,8)</text:p>
            <text:p text:style-name="P124"><text:tab/>addq<text:tab/>$4, %rax</text:p>
            <text:p text:style-name="P124"><text:tab/>cmpq<text:tab/>$100, %rax</text:p>
            <text:p text:style-name="P124"><text:tab/>jne<text:tab/>.LBB0_7</text:p>
          </table:table-cell>
        </table:table-row>
      </table:table>
      <text:p text:style-name="P24"/>
      <text:p text:style-name="P24">При оптимизации переменная индукции была убрана</text:p>
      <table:table table:name="Таблица14" table:style-name="Таблица14">
        <table:table-column table:style-name="Таблица14.A"/>
        <table:table-column table:style-name="Таблица14.B"/>
        <table:table-row>
          <table:table-cell table:style-name="Таблица14.A1" office:value-type="string">
            <text:p text:style-name="P128"><text:tab/><text:span text:style-name="T37">movl<text:tab/>h3(%rip), %eax</text:span></text:p>
            <text:p text:style-name="P128"><text:tab/><text:span text:style-name="T37">addl<text:tab/>k3(%rip), %eax</text:span></text:p>
            <text:p text:style-name="P128"><text:tab/>cmpl<text:tab/>$0, %eax</text:p>
            <text:p text:style-name="P128"><text:tab/>jl<text:tab/>.LBB0_22</text:p>
            <text:p text:style-name="P128"># %bb.21:</text:p>
            <text:p text:style-name="P128"><text:tab/><text:span text:style-name="T37">movl<text:tab/>h3(%rip), %eax</text:span></text:p>
            <text:p text:style-name="P128"><text:tab/><text:span text:style-name="T37">addl<text:tab/>k3(%rip), %eax</text:span></text:p>
            <text:p text:style-name="P128"><text:tab/>cmpl<text:tab/>$5, %eax</text:p>
            <text:p text:style-name="P128"><text:tab/>jle<text:tab/>.LBB0_23</text:p>
            <text:p text:style-name="P128">.LBB0_22:</text:p>
            <text:p text:style-name="P128"/>
            <text:p text:style-name="P128"><text:tab/>leaq<text:tab/>.L.str.2(%rip), %rdi</text:p>
            <text:p text:style-name="P128"><text:tab/>movb<text:tab/>$0, %al</text:p>
            <text:p text:style-name="P128"><text:tab/>callq<text:tab/>printf@PLT</text:p>
            <text:p text:style-name="P128"><text:tab/>mp<text:tab/>.LBB0_24</text:p>
            <text:p text:style-name="P128">.LBB0_23:</text:p>
            <text:p text:style-name="P128"/>
            <text:p text:style-name="P128"><text:tab/><text:span text:style-name="T37">movl<text:tab/>h3(%rip), %eax</text:span></text:p>
            <text:p text:style-name="P128"><text:tab/><text:span text:style-name="T37">addl<text:tab/>k3(%rip), %eax</text:span></text:p>
            <text:p text:style-name="P128"><text:tab/>cltd</text:p>
            <text:p text:style-name="P128"><text:tab/>idivl<text:tab/>i3(%rip)</text:p>
            <text:p text:style-name="P128"/>
            <text:p text:style-name="P128"><text:tab/>movl<text:tab/>%eax, m3(%rip)</text:p>
            <text:p text:style-name="P128"><text:tab/>movl<text:tab/>m3(%rip), %esi</text:p>
            <text:p text:style-name="P128"><text:tab/>leaq<text:tab/>.L.str(%rip), %rdi</text:p>
            <text:p text:style-name="P128"><text:tab/>movb<text:tab/>$0, %al</text:p>
            <text:p text:style-name="P128"><text:tab/>callq<text:tab/>printf@PLT</text:p>
            <text:p text:style-name="P128"/>
            <text:p text:style-name="P128"><text:tab/>movl<text:tab/>i3(%rip), %eax</text:p>
            <text:p text:style-name="P128"><text:tab/><text:span text:style-name="T37">movl<text:tab/>h3(%rip), %ecx</text:span></text:p>
            <text:p text:style-name="P128"><text:tab/><text:span text:style-name="T37">addl<text:tab/>k3(%rip), %ecx</text:span></text:p>
            <text:p text:style-name="P128"><text:tab/>addl<text:tab/>%ecx, %eax</text:p>
            <text:p text:style-name="P128"><text:tab/>movl<text:tab/>%eax, g3(%rip)</text:p>
            <text:p text:style-name="P128"/>
            <text:p text:style-name="P128"><text:tab/>movl<text:tab/>g3(%rip), %esi</text:p>
            <text:p text:style-name="P128"><text:tab/>leaq<text:tab/>.L.str(%rip), %rdi</text:p>
            <text:p text:style-name="P128"><text:tab/>movb<text:tab/>$0, %al</text:p>
            <text:p text:style-name="P128"><text:tab/>callq<text:tab/>printf@PLT</text:p>
            <text:p text:style-name="P128">.LBB0_24:</text:p>
          </table:table-cell>
          <table:table-cell table:style-name="Таблица14.A1" office:value-type="string">
            <text:p text:style-name="P54"><text:tab/>if ((h3 + k3) &lt; 0 || (h3 + k3) &gt; 5)</text:p>
            <text:p text:style-name="P54"><text:tab/><text:tab/>printf("Common subexpression elimination\n");</text:p>
            <text:p text:style-name="P54"><text:tab/>else {</text:p>
            <text:p text:style-name="P54"><text:tab/><text:tab/>m3 = (h3 + k3) / i3;</text:p>
            <text:p text:style-name="P54"><text:tab/><text:tab/>printf("%d", m3);</text:p>
            <text:p text:style-name="P54"><text:tab/><text:tab/>g3 = i3 + (h3 + k3);</text:p>
            <text:p text:style-name="P54"><text:tab/><text:tab/>printf("%d", g3);</text:p>
            <text:p text:style-name="P54"><text:tab/>}</text:p>
          </table:table-cell>
        </table:table-row>
      </table:table>
      <text:p text:style-name="P21"><text:span text:style-name="T1"/></text:p>
      <text:p text:style-name="P15">Без оптимизации вынесение общих подвыражений не наблюдается</text:p>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127"><text:tab/><text:span text:style-name="T37">movl<text:tab/>h3(%rip), %eax</text:span></text:p>
            <text:p text:style-name="P127"><text:tab/><text:span text:style-name="T37">addl<text:tab/>k3(%rip), %eax</text:span></text:p>
            <text:p text:style-name="P127"><text:tab/>cmpl<text:tab/>$0, %eax</text:p>
            <text:p text:style-name="P127"><text:tab/>jl<text:tab/>.LBB0_22</text:p>
            <text:p text:style-name="P127"># %bb.21:</text:p>
            <text:p text:style-name="P127"><text:tab/><text:span text:style-name="T37">movl<text:tab/>h3(%rip), %eax</text:span></text:p>
            <text:p text:style-name="P127"><text:tab/><text:span text:style-name="T37">addl<text:tab/>k3(%rip), %eax</text:span></text:p>
            <text:p text:style-name="P127"><text:tab/>cmpl<text:tab/>$5, %eax</text:p>
            <text:p text:style-name="P127"><text:tab/>jle<text:tab/>.LBB0_23</text:p>
            <text:p text:style-name="P127">.LBB0_22:</text:p>
            <text:p text:style-name="P127"/>
            <text:p text:style-name="P127"><text:tab/>leaq<text:tab/>.L.str.2(%rip), %rdi</text:p>
            <text:p text:style-name="P127"><text:tab/>movb<text:tab/>$0, %al</text:p>
            <text:p text:style-name="P127"><text:tab/>callq<text:tab/>printf@PLT</text:p>
            <text:p text:style-name="P127"><text:tab/>mp<text:tab/>.LBB0_24</text:p>
            <text:p text:style-name="P127">.LBB0_23:</text:p>
            <text:p text:style-name="P127"/>
            <text:p text:style-name="P127"><text:tab/><text:span text:style-name="T37">movl<text:tab/>h3(%rip), %eax</text:span></text:p>
            <text:p text:style-name="P127"><text:tab/><text:span text:style-name="T37">addl<text:tab/>k3(%rip), %eax</text:span></text:p>
            <text:p text:style-name="P127"><text:tab/>cltd</text:p>
            <text:p text:style-name="P127"><text:tab/>idivl<text:tab/>i3(%rip)</text:p>
            <text:p text:style-name="P127"/>
            <text:p text:style-name="P127"><text:tab/>movl<text:tab/>%eax, m3(%rip)</text:p>
            <text:p text:style-name="P127"><text:tab/>movl<text:tab/>m3(%rip), %esi</text:p>
            <text:p text:style-name="P127"><text:tab/>leaq<text:tab/>.L.str(%rip), %rdi</text:p>
            <text:p text:style-name="P127"><text:tab/>movb<text:tab/>$0, %al</text:p>
            <text:p text:style-name="P127"><text:tab/>callq<text:tab/>printf@PLT</text:p>
            <text:p text:style-name="P127"/>
            <text:p text:style-name="P127"><text:tab/>movl<text:tab/>i3(%rip), %eax</text:p>
            <text:p text:style-name="P127"><text:tab/><text:span text:style-name="T37">movl<text:tab/>h3(%rip), %ecx</text:span></text:p>
            <text:p text:style-name="P127"><text:tab/><text:span text:style-name="T37">addl<text:tab/>k3(%rip), %ecx</text:span></text:p>
            <text:p text:style-name="P127"><text:tab/>addl<text:tab/>%ecx, %eax</text:p>
            <text:p text:style-name="P127"><text:tab/>movl<text:tab/>%eax, g3(%rip)</text:p>
            <text:p text:style-name="P127"/>
            <text:p text:style-name="P127"><text:tab/>movl<text:tab/>g3(%rip), %esi</text:p>
            <text:p text:style-name="P127"><text:tab/>leaq<text:tab/>.L.str(%rip), %rdi</text:p>
            <text:p text:style-name="P127"><text:tab/>movb<text:tab/>$0, %al</text:p>
            <text:p text:style-name="P127"><text:tab/>callq<text:tab/>printf@PLT</text:p>
            <text:p text:style-name="P127">.LBB0_24:</text:p>
          </table:table-cell>
          <table:table-cell table:style-name="Таблица15.A1" office:value-type="string">
            <text:p text:style-name="P128"><text:tab/><text:span text:style-name="T37">movl<text:tab/>k3(%rip), %eax</text:span></text:p>
            <text:p text:style-name="P128"><text:tab/><text:span text:style-name="T37">addl<text:tab/>h3(%rip), %eax</text:span></text:p>
            <text:p text:style-name="P128"><text:tab/>cmpl<text:tab/>$6, <text:span text:style-name="T37">%eax</text:span></text:p>
            <text:p text:style-name="P128"><text:tab/>jb<text:tab/>.LBB0_10</text:p>
            <text:p text:style-name="P128"># %bb.9:</text:p>
            <text:p text:style-name="P128"><text:tab/>leaq<text:tab/>.Lstr.4(%rip), %rdi</text:p>
            <text:p text:style-name="P128"><text:tab/>callq<text:tab/>puts@PLT</text:p>
            <text:p text:style-name="P128"><text:tab/>jmp<text:tab/>.LBB0_11</text:p>
            <text:p text:style-name="P128">.LBB0_10:</text:p>
            <text:p text:style-name="P128"><text:tab/>cltd</text:p>
            <text:p text:style-name="P128"><text:tab/>idivl<text:tab/>i3(%rip)</text:p>
            <text:p text:style-name="P128"><text:tab/>movl<text:tab/><text:span text:style-name="T37">%eax</text:span>, m3(%rip)</text:p>
            <text:p text:style-name="P128"><text:tab/>leaq<text:tab/>.L.str(%rip), %rbx</text:p>
            <text:p text:style-name="P128"><text:tab/>movq<text:tab/>%rbx, %rdi</text:p>
            <text:p text:style-name="P128"><text:tab/><text:span text:style-name="T13">movl<text:tab/>%eax, %esi</text:span></text:p>
            <text:p text:style-name="P128"><text:tab/>xorl<text:tab/>%eax, %eax</text:p>
            <text:p text:style-name="P128"><text:tab/>callq<text:tab/>printf@PLT</text:p>
            <text:p text:style-name="P128"><text:tab/>movl<text:tab/>h3(%rip), %esi</text:p>
            <text:p text:style-name="P128"><text:tab/>addl<text:tab/>i3(%rip), %esi</text:p>
            <text:p text:style-name="P128"><text:tab/>addl<text:tab/>k3(%rip), %esi</text:p>
            <text:p text:style-name="P128"><text:tab/>movl<text:tab/>%esi, g3(%rip)</text:p>
            <text:p text:style-name="P128"><text:tab/>movq<text:tab/>%rbx, %rdi</text:p>
            <text:p text:style-name="P128"><text:tab/>xorl<text:tab/>%eax, %eax</text:p>
            <text:p text:style-name="P128"><text:tab/>callq<text:tab/>printf@PLT</text:p>
            <text:p text:style-name="P128">.LBB0_11:</text:p>
          </table:table-cell>
        </table:table-row>
      </table:table>
      <text:p text:style-name="P15"/>
      <text:p text:style-name="P18">Пот оптимизации clang вынес общее подвыражение <text:span text:style-name="T40">в регистр</text:span></text:p>
      <text:p text:style-name="P18"><text:span text:style-name="T4"/></text:p>
      <table:table table:name="Таблица13" table:style-name="Таблица13">
        <table:table-column table:style-name="Таблица13.A"/>
        <table:table-column table:style-name="Таблица13.B"/>
        <table:table-row>
          <table:table-cell table:style-name="Таблица13.A1" office:value-type="string">
            <text:p text:style-name="P124"><text:tab/>movl<text:tab/>$0, i4(%rip)</text:p>
            <text:p text:style-name="P124">.LBB0_25:</text:p>
            <text:p text:style-name="P124"><text:tab/>cmpl<text:tab/>$2, i4(%rip)</text:p>
            <text:p text:style-name="P124"><text:tab/>jg<text:tab/>.LBB0_28</text:p>
            <text:p text:style-name="P124"># %bb.26: </text:p>
            <text:p text:style-name="P124"><text:tab/><text:span text:style-name="T37">movl<text:tab/>j(%rip), %eax</text:span></text:p>
            <text:p text:style-name="P124"><text:tab/><text:span text:style-name="T37">imull<text:tab/>k(%rip), %eax</text:span></text:p>
            <text:p text:style-name="P124"><text:tab/>movb<text:tab/>%al, %dl</text:p>
            <text:p text:style-name="P124"><text:tab/>movslq<text:tab/>i4(%rip), %rcx</text:p>
            <text:p text:style-name="P124"><text:tab/>leaq<text:tab/>ivector2(%rip), %rax</text:p>
            <text:p text:style-name="P124"><text:tab/>movb<text:tab/>%dl, (%rax,%rcx)</text:p>
            <text:p text:style-name="P124"><text:tab/>movslq<text:tab/>i4(%rip), %rcx</text:p>
            <text:p text:style-name="P124"><text:tab/>leaq<text:tab/>ivector2(%rip), %rax</text:p>
            <text:p text:style-name="P124"><text:tab/>movzbl<text:tab/>(%rax,%rcx), %esi</text:p>
            <text:p text:style-name="P124"><text:tab/>leaq<text:tab/>.L.str(%rip), %rdi</text:p>
            <text:p text:style-name="P124"><text:tab/>movb<text:tab/>$0, %al</text:p>
            <text:p text:style-name="P124"><text:tab/>callq<text:tab/>printf@PLT</text:p>
            <text:p text:style-name="P124"># %bb.27:</text:p>
            <text:p text:style-name="P124"><text:tab/>movl<text:tab/>i4(%rip), %eax</text:p>
            <text:p text:style-name="P124"><text:tab/>addl<text:tab/>$1, %eax</text:p>
            <text:p text:style-name="P124"><text:tab/>movl<text:tab/>%eax, i4(%rip)</text:p>
            <text:p text:style-name="P124"><text:tab/>jmp<text:tab/>.LBB0_25</text:p>
            <text:p text:style-name="P124">.LBB0_28:</text:p>
          </table:table-cell>
          <table:table-cell table:style-name="Таблица13.A1" office:value-type="string">
            <text:p text:style-name="P105"><text:tab/>for (i4 = 0; i4 &lt;= max_vector; i4++){</text:p>
            <text:p text:style-name="P104"><text:tab/><text:tab/>ivector2[i4] = j * k;</text:p>
            <text:p text:style-name="P104"><text:tab/>printf("%d", ivector2[i4]);</text:p>
            <text:p text:style-name="P104">}</text:p>
          </table:table-cell>
        </table:table-row>
      </table:table>
      <text:p text:style-name="P57"><text:span text:style-name="T23"/></text:p>
      <text:p text:style-name="P187">Видно, что умножение происходит постоянно и инвариантный код не выносится из цикла</text:p>
      <text:p text:style-name="P92"><text:span text:style-name="T23"/></text:p>
      <table:table table:name="Таблица16" table:style-name="Таблица16">
        <table:table-column table:style-name="Таблица16.A"/>
        <table:table-column table:style-name="Таблица16.B"/>
        <table:table-row table:style-name="Таблица16.1">
          <table:table-cell table:style-name="Таблица16.A1" office:value-type="string">
            <text:p text:style-name="P126"><text:tab/>movl<text:tab/>$0, i4(%rip)</text:p>
            <text:p text:style-name="P126">.LBB0_25:</text:p>
            <text:p text:style-name="P126"><text:tab/>cmpl<text:tab/>$2, i4(%rip)</text:p>
            <text:p text:style-name="P126"><text:tab/>jg<text:tab/>.LBB0_28</text:p>
            <text:p text:style-name="P126"># %bb.26: </text:p>
            <text:p text:style-name="P126"><text:tab/><text:span text:style-name="T37">movl<text:tab/>j(%rip), %eax</text:span></text:p>
            <text:p text:style-name="P126"><text:tab/><text:span text:style-name="T37">imull<text:tab/>k(%rip), %eax</text:span></text:p>
            <text:p text:style-name="P126"><text:tab/>movb<text:tab/>%al, %dl</text:p>
            <text:p text:style-name="P126"><text:tab/>movslq<text:tab/>i4(%rip), %rcx</text:p>
            <text:p text:style-name="P126"><text:tab/>leaq<text:tab/>ivector2(%rip), %rax</text:p>
            <text:p text:style-name="P126"><text:tab/>movb<text:tab/>%dl, (%rax,%rcx)</text:p>
            <text:p text:style-name="P126"><text:tab/>movslq<text:tab/>i4(%rip), %rcx</text:p>
            <text:p text:style-name="P126"><text:tab/>leaq<text:tab/>ivector2(%rip), %rax</text:p>
            <text:p text:style-name="P126"><text:tab/>movzbl<text:tab/>(%rax,%rcx), %esi</text:p>
            <text:p text:style-name="P126"><text:tab/>leaq<text:tab/>.L.str(%rip), %rdi</text:p>
            <text:p text:style-name="P126"><text:tab/>movb<text:tab/>$0, %al</text:p>
            <text:p text:style-name="P126"><text:tab/>callq<text:tab/>printf@PLT</text:p>
            <text:p text:style-name="P126"># %bb.27:</text:p>
            <text:p text:style-name="P126"><text:tab/>movl<text:tab/>i4(%rip), %eax</text:p>
            <text:p text:style-name="P126"><text:tab/>addl<text:tab/>$1, %eax</text:p>
            <text:p text:style-name="P126"><text:tab/>movl<text:tab/>%eax, i4(%rip)</text:p>
            <text:p text:style-name="P126"><text:tab/>jmp<text:tab/>.LBB0_25</text:p>
            <text:p text:style-name="P126">.LBB0_28:</text:p>
          </table:table-cell>
          <table:table-cell table:style-name="Таблица16.A1" office:value-type="string">
            <text:p text:style-name="P124"><text:tab/>movl<text:tab/>$0, i4(%rip)</text:p>
            <text:p text:style-name="P124"><text:tab/>leaq<text:tab/>ivector2(%rip), %r14</text:p>
            <text:p text:style-name="P124"><text:tab/>leaq<text:tab/>.L.str(%rip), %rbx</text:p>
            <text:p text:style-name="P124"><text:tab/>xorl<text:tab/>%eax, %eax</text:p>
            <text:p text:style-name="P124"><text:tab/>.p2align<text:tab/>4, 0x90</text:p>
            <text:p text:style-name="P124">.LBB0_12:</text:p>
            <text:p text:style-name="P124"><text:tab/><text:span text:style-name="T37">movl<text:tab/>k(%rip), %ecx</text:span></text:p>
            <text:p text:style-name="P124"><text:tab/><text:span text:style-name="T37">imull<text:tab/>j(%rip), %ecx</text:span></text:p>
            <text:p text:style-name="P124"><text:tab/>cltq</text:p>
            <text:p text:style-name="P124"><text:tab/>movb<text:tab/>%cl, (%rax,%r14)</text:p>
            <text:p text:style-name="P124"><text:tab/>movzbl<text:tab/>%cl, %esi</text:p>
            <text:p text:style-name="P124"><text:tab/>movq<text:tab/>%rbx, %rdi</text:p>
            <text:p text:style-name="P124"><text:tab/>xorl<text:tab/>%eax, %eax</text:p>
            <text:p text:style-name="P124"><text:tab/>callq<text:tab/>printf@PLT</text:p>
            <text:p text:style-name="P125"><text:tab/>movl<text:tab/>i4(%rip), %ecx</text:p>
            <text:p text:style-name="P124"><text:tab/>leal<text:tab/>1(%rcx), %eax</text:p>
            <text:p text:style-name="P124"><text:tab/>movl<text:tab/>%eax, i4(%rip)</text:p>
            <text:p text:style-name="P124"><text:tab/>cmpl<text:tab/>$2, %ecx</text:p>
            <text:p text:style-name="P124"><text:tab/>jl<text:tab/>.LBB0_12</text:p>
          </table:table-cell>
        </table:table-row>
      </table:table>
      <text:p text:style-name="P92"><text:span text:style-name="T23"/></text:p>
      <text:p text:style-name="P190">При оптимизации по скорости работы инвариантный код всё равно не выносится</text:p>
      <table:table table:name="Таблица17" table:style-name="Таблица17">
        <table:table-column table:style-name="Таблица17.A"/>
        <table:table-column table:style-name="Таблица17.B"/>
        <table:table-row>
          <table:table-cell table:style-name="Таблица17.A1" office:value-type="string">
            <text:p text:style-name="P124">dead_code: <text:s text:c="29"/># @dead_code</text:p>
            <text:p text:style-name="P124"><text:tab/>.cfi_startproc</text:p>
            <text:p text:style-name="P124"># %bb.0:</text:p>
            <text:p text:style-name="P124"><text:tab/>pushq<text:tab/>%rbp</text:p>
            <text:p text:style-name="P124"><text:tab/>.cfi_def_cfa_offset 16</text:p>
            <text:p text:style-name="P124"><text:tab/>.cfi_offset %rbp, -16</text:p>
            <text:p text:style-name="P124"><text:tab/>movq<text:tab/>%rsp, %rbp</text:p>
            <text:p text:style-name="P124"><text:tab/>.cfi_def_cfa_register %rbp</text:p>
            <text:p text:style-name="P124"><text:tab/>movl<text:tab/>%edi, -4(%rbp)</text:p>
            <text:p text:style-name="P124"><text:tab/>movq<text:tab/>%rsi, -16(%rbp)</text:p>
            <text:p text:style-name="P124"><text:tab/>movl<text:tab/>-4(%rbp), %eax</text:p>
            <text:p text:style-name="P124"><text:tab/>movl<text:tab/>%eax, -20(%rbp)</text:p>
            <text:p text:style-name="P124"><text:tab/>popq<text:tab/>%rbp</text:p>
            <text:p text:style-name="P124"><text:tab/>.cfi_def_cfa %rsp, 8</text:p>
            <text:p text:style-name="P124"><text:tab/>retq</text:p>
          </table:table-cell>
          <table:table-cell table:style-name="Таблица17.A1" office:value-type="string">
            <text:p text:style-name="P104">void dead_code(int a,</text:p>
            <text:p text:style-name="P104"><text:tab/>char *b)</text:p>
            <text:p text:style-name="P104">{</text:p>
            <text:p text:style-name="P104"><text:tab/>int idead_store;</text:p>
            <text:p text:style-name="P104"/>
            <text:p text:style-name="P104"><text:tab/>idead_store = a;</text:p>
            <text:p text:style-name="P104"><text:tab/>if (0)</text:p>
            <text:p text:style-name="P104"><text:tab/><text:tab/>printf("%s\n", b);</text:p>
            <text:p text:style-name="P104">}</text:p>
          </table:table-cell>
        </table:table-row>
      </table:table>
      <text:p text:style-name="P61"><text:span text:style-name="T23"/></text:p>
      <text:p text:style-name="P61"><text:span text:style-name="T23">Без оптимизации компилятор напрямую сгенерировал функцию, с оптимизацией же функция сгенерировалась пустой, </text:span><text:span text:style-name="T24">без</text:span><text:span text:style-name="T21"> </text:span><text:span text:style-name="T23">недостижим</text:span><text:span text:style-name="T21">ого</text:span><text:span text:style-name="T23"> код</text:span><text:span text:style-name="T21">а</text:span><text:span text:style-name="T23"> и лишни</text:span><text:span text:style-name="T21">х</text:span><text:span text:style-name="T23"> присваивания</text:span></text:p>
      <table:table table:name="Таблица18" table:style-name="Таблица18">
        <table:table-column table:style-name="Таблица18.A"/>
        <table:table-column table:style-name="Таблица18.B"/>
        <table:table-row table:style-name="Таблица18.1">
          <table:table-cell table:style-name="Таблица18.A1" office:value-type="string">
            <text:p text:style-name="P124">unnecessary_loop: </text:p>
            <text:p text:style-name="P124"><text:tab/>.cfi_startproc</text:p>
            <text:p text:style-name="P124"># %bb.0:</text:p>
            <text:p text:style-name="P124"><text:tab/>pushq<text:tab/>%rbp</text:p>
            <text:p text:style-name="P124"><text:tab/>.cfi_def_cfa_offset 16</text:p>
            <text:p text:style-name="P124"><text:tab/>.cfi_offset %rbp, -16</text:p>
            <text:p text:style-name="P124"><text:tab/>movq<text:tab/>%rsp, %rbp</text:p>
            <text:p text:style-name="P124"><text:tab/>.cfi_def_cfa_register %rbp</text:p>
            <text:p text:style-name="P124"><text:tab/>subq<text:tab/>$16, %rsp</text:p>
            <text:p text:style-name="P124"><text:tab/>movl<text:tab/>$0, -4(%rbp)</text:p>
            <text:p text:style-name="P124"><text:tab/>movl<text:tab/>$0, i(%rip)</text:p>
            <text:p text:style-name="P124">.LBB2_1: <text:s/></text:p>
            <text:p text:style-name="P124"><text:tab/>cmpl<text:tab/>$5, i(%rip)</text:p>
            <text:p text:style-name="P124"><text:tab/>jge<text:tab/>.LBB2_4</text:p>
            <text:p text:style-name="P124"># %bb.2: <text:s text:c="2"/></text:p>
            <text:p text:style-name="P124"><text:tab/>movl<text:tab/>-4(%rbp), %eax</text:p>
            <text:p text:style-name="P124"><text:tab/>addl<text:tab/>j5(%rip), %eax</text:p>
            <text:p text:style-name="P124"><text:tab/>movl<text:tab/>%eax, k5(%rip)</text:p>
            <text:p text:style-name="P124"># %bb.3: <text:s/></text:p>
            <text:p text:style-name="P124"><text:tab/>movl<text:tab/>i(%rip), %eax</text:p>
            <text:p text:style-name="P124"><text:tab/>addl<text:tab/>$1, %eax</text:p>
            <text:p text:style-name="P124"><text:tab/>movl<text:tab/>%eax, i(%rip)</text:p>
            <text:p text:style-name="P124"><text:tab/>jmp<text:tab/>.LBB2_1</text:p>
            <text:p text:style-name="P124">.LBB2_4:</text:p>
            <text:p text:style-name="P124"><text:tab/>movl<text:tab/>k5(%rip), %esi</text:p>
            <text:p text:style-name="P124"><text:tab/>leaq<text:tab/>.L.str(%rip), %rdi</text:p>
            <text:p text:style-name="P124"><text:tab/>movb<text:tab/>$0, %al</text:p>
            <text:p text:style-name="P124"><text:tab/>callq<text:tab/>printf@PLT</text:p>
            <text:p text:style-name="P124"><text:tab/>addq<text:tab/>$16, %rsp</text:p>
            <text:p text:style-name="P124"><text:tab/>popq<text:tab/>%rbp</text:p>
            <text:p text:style-name="P124"><text:tab/>.cfi_def_cfa %rsp, 8</text:p>
            <text:p text:style-name="P124"><text:tab/>retq</text:p>
          </table:table-cell>
          <table:table-cell table:style-name="Таблица18.A1" office:value-type="string">
            <text:p text:style-name="P104">void unnecessary_loop()</text:p>
            <text:p text:style-name="P104">{</text:p>
            <text:p text:style-name="P104"><text:tab/>int x;</text:p>
            <text:p text:style-name="P104"/>
            <text:p text:style-name="P104"><text:tab/>x = 0;</text:p>
            <text:p text:style-name="P104"><text:tab/>for (i = 0; i &lt; 5; i++)</text:p>
            <text:p text:style-name="P104"><text:tab/><text:tab/>k5 = x + j5;</text:p>
            <text:p text:style-name="P104"><text:tab/>printf("%d", k5);</text:p>
            <text:p text:style-name="P104">}</text:p>
          </table:table-cell>
        </table:table-row>
      </table:table>
      <text:p text:style-name="P64"><text:span text:style-name="T23"/></text:p>
      <text:p text:style-name="P193">Без оптимизации цикл остался</text:p>
      <text:p text:style-name="P65"><text:span text:style-name="T23"/></text:p>
      <table:table table:name="Таблица19" table:style-name="Таблица19">
        <table:table-column table:style-name="Таблица19.A"/>
        <table:table-column table:style-name="Таблица19.B"/>
        <table:table-row>
          <table:table-cell table:style-name="Таблица19.A1" office:value-type="string">
            <text:p text:style-name="P144">unnecessary_loop: </text:p>
            <text:p text:style-name="P144"><text:tab/>.cfi_startproc</text:p>
            <text:p text:style-name="P144"># %bb.0:</text:p>
            <text:p text:style-name="P144"><text:tab/>pushq<text:tab/>%rbp</text:p>
            <text:p text:style-name="P144"><text:tab/>.cfi_def_cfa_offset 16</text:p>
            <text:p text:style-name="P144"><text:tab/>.cfi_offset %rbp, -16</text:p>
            <text:p text:style-name="P144"><text:tab/>movq<text:tab/>%rsp, %rbp</text:p>
            <text:p text:style-name="P144"><text:tab/>.cfi_def_cfa_register %rbp</text:p>
            <text:p text:style-name="P144"><text:tab/>subq<text:tab/>$16, %rsp</text:p>
            <text:p text:style-name="P144"><text:tab/>movl<text:tab/>$0, -4(%rbp)</text:p>
            <text:p text:style-name="P144"><text:tab/>movl<text:tab/>$0, i(%rip)</text:p>
            <text:p text:style-name="P144">.LBB2_1: <text:s/></text:p>
            <text:p text:style-name="P144"><text:tab/>cmpl<text:tab/>$5, i(%rip)</text:p>
            <text:p text:style-name="P144"><text:tab/>jge<text:tab/>.LBB2_4</text:p>
            <text:p text:style-name="P144"># %bb.2: <text:s text:c="2"/></text:p>
            <text:p text:style-name="P144"><text:tab/>movl<text:tab/>-4(%rbp), %eax</text:p>
            <text:p text:style-name="P144"><text:tab/>addl<text:tab/>j5(%rip), %eax</text:p>
            <text:p text:style-name="P144"><text:tab/>movl<text:tab/>%eax, k5(%rip)</text:p>
            <text:p text:style-name="P144"># %bb.3: <text:s/></text:p>
            <text:p text:style-name="P144"><text:tab/>movl<text:tab/>i(%rip), %eax</text:p>
            <text:p text:style-name="P144"><text:tab/>addl<text:tab/>$1, %eax</text:p>
            <text:p text:style-name="P144"><text:tab/>movl<text:tab/>%eax, i(%rip)</text:p>
            <text:p text:style-name="P144"><text:tab/>jmp<text:tab/>.LBB2_1</text:p>
            <text:p text:style-name="P144">.LBB2_4:</text:p>
            <text:p text:style-name="P144"><text:tab/>movl<text:tab/>k5(%rip), %esi</text:p>
            <text:p text:style-name="P144"><text:tab/>leaq<text:tab/>.L.str(%rip), %rdi</text:p>
            <text:p text:style-name="P144"><text:soft-page-break/><text:tab/>movb<text:tab/>$0, %al</text:p>
            <text:p text:style-name="P144"><text:tab/>callq<text:tab/>printf@PLT</text:p>
            <text:p text:style-name="P144"><text:tab/>addq<text:tab/>$16, %rsp</text:p>
            <text:p text:style-name="P144"><text:tab/>popq<text:tab/>%rbp</text:p>
            <text:p text:style-name="P144"><text:tab/>.cfi_def_cfa %rsp, 8</text:p>
            <text:p text:style-name="P144"><text:tab/>retq</text:p>
          </table:table-cell>
          <table:table-cell table:style-name="Таблица19.A1" office:value-type="string">
            <text:p text:style-name="P120">unnecessary_loop</text:p>
            <text:p text:style-name="P120"><text:tab/>.cfi_startproc</text:p>
            <text:p text:style-name="P120"># %bb.0:</text:p>
            <text:p text:style-name="P120"><text:tab/>movl<text:tab/>j5(%rip), %esi</text:p>
            <text:p text:style-name="P120"><text:tab/>movl<text:tab/>%esi, k5(%rip)</text:p>
            <text:p text:style-name="P120"><text:tab/>movl<text:tab/>$5, i(%rip)</text:p>
            <text:p text:style-name="P120"><text:tab/>leaq<text:tab/>.L.str(%rip), %rdi</text:p>
            <text:p text:style-name="P120"><text:tab/>xorl<text:tab/>%eax, %eax</text:p>
            <text:p text:style-name="P120"><text:tab/>jmp<text:tab/>printf@PLT <text:s text:c="5"/></text:p>
          </table:table-cell>
        </table:table-row>
      </table:table>
      <text:p text:style-name="P65"><text:span text:style-name="T23"/></text:p>
      <text:p text:style-name="P193">При оптимизации цикл был удалён</text:p>
      <text:p text:style-name="P65"><text:span text:style-name="T23"/></text:p>
      <text:p text:style-name="P65"><text:span text:style-name="T23"/></text:p>
      <table:table table:name="Таблица20" table:style-name="Таблица20">
        <table:table-column table:style-name="Таблица20.A"/>
        <table:table-column table:style-name="Таблица20.B"/>
        <table:table-row>
          <table:table-cell table:style-name="Таблица20.A1" office:value-type="string">
            <text:p text:style-name="P124">loop_jamming: <text:s text:c="26"/># @loop_jamming</text:p>
            <text:p text:style-name="P124"><text:tab/>.cfi_startproc</text:p>
            <text:p text:style-name="P124"># %bb.0:</text:p>
            <text:p text:style-name="P124"><text:tab/>pushq<text:tab/>%rbp</text:p>
            <text:p text:style-name="P124"><text:tab/>.cfi_def_cfa_offset 16</text:p>
            <text:p text:style-name="P124"><text:tab/>.cfi_offset %rbp, -16</text:p>
            <text:p text:style-name="P124"><text:tab/>movq<text:tab/>%rsp, %rbp</text:p>
            <text:p text:style-name="P124"><text:tab/>.cfi_def_cfa_register %rbp</text:p>
            <text:p text:style-name="P124"><text:tab/>subq<text:tab/>$16, %rsp</text:p>
            <text:p text:style-name="P124"><text:tab/>movl<text:tab/>%edi, -4(%rbp)</text:p>
            <text:p text:style-name="P124"><text:tab/>movl<text:tab/>$0, i(%rip)</text:p>
            <text:p text:style-name="P124">.LBB3_1: </text:p>
            <text:p text:style-name="P124"><text:tab/>cmpl<text:tab/>$5, i(%rip)</text:p>
            <text:p text:style-name="P124"><text:tab/>jge<text:tab/>.LBB3_4</text:p>
            <text:p text:style-name="P124"># %bb.2: <text:s text:c="2"/></text:p>
            <text:p text:style-name="P124"><text:tab/>movl<text:tab/>-4(%rbp), %eax</text:p>
            <text:p text:style-name="P124"><text:tab/>movl<text:tab/>j5(%rip), %ecx</text:p>
            <text:p text:style-name="P124"><text:tab/>imull<text:tab/>i(%rip), %ecx</text:p>
            <text:p text:style-name="P124"><text:tab/>addl<text:tab/>%ecx, %eax</text:p>
            <text:p text:style-name="P124"><text:tab/>movl<text:tab/>%eax, k5(%rip)</text:p>
            <text:p text:style-name="P124"><text:tab/>movl<text:tab/>k5(%rip), %esi</text:p>
            <text:p text:style-name="P124"><text:tab/>leaq<text:tab/>.L.str(%rip), %rdi</text:p>
            <text:p text:style-name="P124"><text:tab/>movb<text:tab/>$0, %al</text:p>
            <text:p text:style-name="P124"><text:tab/>callq<text:tab/>printf@PLT</text:p>
            <text:p text:style-name="P124"># %bb.3:</text:p>
            <text:p text:style-name="P124"><text:tab/>movl<text:tab/>i(%rip), %eax</text:p>
            <text:p text:style-name="P124"><text:tab/>addl<text:tab/>$1, %eax</text:p>
            <text:p text:style-name="P124"><text:tab/>movl<text:tab/>%eax, i(%rip)</text:p>
            <text:p text:style-name="P124"><text:tab/>jmp<text:tab/>.LBB3_1</text:p>
            <text:p text:style-name="P124">.LBB3_4:</text:p>
            <text:p text:style-name="P124"><text:tab/>movl<text:tab/>$0, i(%rip)</text:p>
            <text:p text:style-name="P124">.LBB3_5: <text:s text:c="9"/></text:p>
            <text:p text:style-name="P124"><text:tab/>cmpl<text:tab/>$5, i(%rip)</text:p>
            <text:p text:style-name="P124"><text:tab/>jge<text:tab/>.LBB3_8</text:p>
            <text:p text:style-name="P124"># %bb.6: <text:s text:c="6"/></text:p>
            <text:p text:style-name="P124"><text:tab/>movl<text:tab/>-4(%rbp), %eax</text:p>
            <text:p text:style-name="P124"><text:tab/>imull<text:tab/>k5(%rip), %eax</text:p>
            <text:p text:style-name="P124"><text:tab/>imull<text:tab/>i(%rip), %eax</text:p>
            <text:p text:style-name="P124"><text:tab/>movl<text:tab/>%eax, i5(%rip)</text:p>
            <text:p text:style-name="P124"><text:tab/>movl<text:tab/>k5(%rip), %esi</text:p>
            <text:p text:style-name="P124"><text:tab/>leaq<text:tab/>.L.str(%rip), %rdi</text:p>
            <text:p text:style-name="P124"><text:tab/>movb<text:tab/>$0, %al</text:p>
            <text:p text:style-name="P124"><text:tab/>callq<text:tab/>printf@PLT</text:p>
            <text:p text:style-name="P145"># %bb.7: <text:s text:c="2"/></text:p>
            <text:p text:style-name="P145"><text:tab/>movl<text:tab/>i(%rip), %eax</text:p>
            <text:p text:style-name="P124"><text:tab/>addl<text:tab/>$1, %eax</text:p>
            <text:p text:style-name="P124"><text:tab/>movl<text:tab/>%eax, i(%rip)</text:p>
            <text:p text:style-name="P124"><text:tab/>jmp<text:tab/>.LBB3_5</text:p>
            <text:p text:style-name="P124">.LBB3_8:</text:p>
            <text:p text:style-name="P124"><text:tab/>addq<text:tab/>$16, %rsp</text:p>
            <text:p text:style-name="P124"><text:tab/>popq<text:tab/>%rbp</text:p>
            <text:p text:style-name="P124"><text:tab/>.cfi_def_cfa %rsp, 8</text:p>
            <text:p text:style-name="P124"><text:tab/>retq</text:p>
          </table:table-cell>
          <table:table-cell table:style-name="Таблица20.A1" office:value-type="string">
            <text:p text:style-name="P104">void loop_jamming(int x)</text:p>
            <text:p text:style-name="P104">{</text:p>
            <text:p text:style-name="P104"><text:tab/>for (i = 0; i &lt; 5; i++) {</text:p>
            <text:p text:style-name="P104"><text:tab/><text:tab/>k5 = x + j5 * i;</text:p>
            <text:p text:style-name="P104"/>
            <text:p text:style-name="P104"><text:tab/><text:tab/>printf("%d", k5);</text:p>
            <text:p text:style-name="P104"><text:tab/>}</text:p>
            <text:p text:style-name="P104"><text:tab/>for (i = 0; i &lt; 5; i++) {</text:p>
            <text:p text:style-name="P104"><text:tab/><text:tab/>i5 = x * k5 * i;</text:p>
            <text:p text:style-name="P104"><text:tab/><text:tab/>printf("%d", k5);</text:p>
            <text:p text:style-name="P104"><text:tab/>}</text:p>
            <text:p text:style-name="P104">}</text:p>
          </table:table-cell>
        </table:table-row>
      </table:table>
      <text:p text:style-name="P65"><text:span text:style-name="T23"/></text:p>
      <text:p text:style-name="P68"><text:span text:style-name="T23"/></text:p>
      <text:p text:style-name="P196">Без оптимизации было сгенерированно 2 цикла</text:p>
      <text:p text:style-name="P68"><text:span text:style-name="T23"/></text:p>
      <table:table table:name="Таблица21" table:style-name="Таблица21">
        <table:table-column table:style-name="Таблица21.A"/>
        <table:table-column table:style-name="Таблица21.B"/>
        <table:table-row table:style-name="Таблица21.1">
          <table:table-cell table:style-name="Таблица21.A1" office:value-type="string">
            <text:p text:style-name="P145">loop_jamming: <text:s text:c="26"/># @loop_jamming</text:p>
            <text:p text:style-name="P145"><text:tab/>.cfi_startproc</text:p>
            <text:p text:style-name="P145"># %bb.0:</text:p>
            <text:p text:style-name="P145"><text:tab/>pushq<text:tab/>%rbp</text:p>
            <text:p text:style-name="P145"><text:tab/>.cfi_def_cfa_offset 16</text:p>
            <text:p text:style-name="P145"><text:tab/>.cfi_offset %rbp, -16</text:p>
            <text:p text:style-name="P145"><text:tab/>movq<text:tab/>%rsp, %rbp</text:p>
            <text:p text:style-name="P145"><text:tab/>.cfi_def_cfa_register %rbp</text:p>
            <text:p text:style-name="P145"><text:tab/>subq<text:tab/>$16, %rsp</text:p>
            <text:p text:style-name="P145"><text:tab/>movl<text:tab/>%edi, -4(%rbp)</text:p>
            <text:p text:style-name="P145"><text:tab/>movl<text:tab/>$0, i(%rip)</text:p>
            <text:p text:style-name="P145">.LBB3_1: </text:p>
            <text:p text:style-name="P145"><text:tab/>cmpl<text:tab/>$5, i(%rip)</text:p>
            <text:p text:style-name="P145"><text:tab/>jge<text:tab/>.LBB3_4</text:p>
            <text:p text:style-name="P145"># %bb.2: <text:s text:c="2"/></text:p>
            <text:p text:style-name="P145"><text:tab/>movl<text:tab/>-4(%rbp), %eax</text:p>
            <text:p text:style-name="P145"><text:tab/>movl<text:tab/>j5(%rip), %ecx</text:p>
            <text:p text:style-name="P145"><text:tab/>imull<text:tab/>i(%rip), %ecx</text:p>
            <text:p text:style-name="P145"><text:tab/>addl<text:tab/>%ecx, %eax</text:p>
            <text:p text:style-name="P145"><text:tab/>movl<text:tab/>%eax, k5(%rip)</text:p>
            <text:p text:style-name="P145"><text:tab/>movl<text:tab/>k5(%rip), %esi</text:p>
            <text:p text:style-name="P145"><text:tab/>leaq<text:tab/>.L.str(%rip), %rdi</text:p>
            <text:p text:style-name="P145"><text:tab/>movb<text:tab/>$0, %al</text:p>
            <text:p text:style-name="P145"><text:tab/>callq<text:tab/>printf@PLT</text:p>
            <text:p text:style-name="P145"># %bb.3:</text:p>
            <text:p text:style-name="P145"><text:tab/>movl<text:tab/>i(%rip), %eax</text:p>
            <text:p text:style-name="P145"><text:tab/>addl<text:tab/>$1, %eax</text:p>
            <text:p text:style-name="P145"><text:tab/>movl<text:tab/>%eax, i(%rip)</text:p>
            <text:p text:style-name="P145"><text:tab/>jmp<text:tab/>.LBB3_1</text:p>
            <text:p text:style-name="P145">.LBB3_4:</text:p>
            <text:p text:style-name="P145"><text:tab/>movl<text:tab/>$0, i(%rip)</text:p>
            <text:p text:style-name="P145">.LBB3_5: <text:s text:c="9"/></text:p>
            <text:p text:style-name="P145"><text:tab/>cmpl<text:tab/>$5, i(%rip)</text:p>
            <text:p text:style-name="P145"><text:tab/>jge<text:tab/>.LBB3_8</text:p>
            <text:p text:style-name="P145"># %bb.6: <text:s text:c="6"/></text:p>
            <text:p text:style-name="P145"><text:tab/>movl<text:tab/>-4(%rbp), %eax</text:p>
            <text:p text:style-name="P145"><text:tab/>imull<text:tab/>k5(%rip), %eax</text:p>
            <text:p text:style-name="P145"><text:tab/>imull<text:tab/>i(%rip), %eax</text:p>
            <text:p text:style-name="P145"><text:tab/>movl<text:tab/>%eax, i5(%rip)</text:p>
            <text:p text:style-name="P145"><text:tab/>movl<text:tab/>k5(%rip), %esi</text:p>
            <text:p text:style-name="P145"><text:tab/>leaq<text:tab/>.L.str(%rip), %rdi</text:p>
            <text:p text:style-name="P145"><text:tab/>movb<text:tab/>$0, %al</text:p>
            <text:p text:style-name="P145"><text:tab/>callq<text:tab/>printf@PLT</text:p>
            <text:p text:style-name="P145"># %bb.7: <text:s text:c="2"/></text:p>
            <text:p text:style-name="P145"><text:tab/>movl<text:tab/>i(%rip), %eax</text:p>
            <text:p text:style-name="P145"><text:tab/>addl<text:tab/>$1, %eax</text:p>
            <text:p text:style-name="P145"><text:tab/>movl<text:tab/>%eax, i(%rip)</text:p>
            <text:p text:style-name="P145"><text:tab/>jmp<text:tab/>.LBB3_5</text:p>
            <text:p text:style-name="P145">.LBB3_8:</text:p>
            <text:p text:style-name="P145"><text:tab/>addq<text:tab/>$16, %rsp</text:p>
            <text:p text:style-name="P145"><text:tab/>popq<text:tab/>%rbp</text:p>
            <text:p text:style-name="P145"><text:tab/>.cfi_def_cfa %rsp, 8</text:p>
            <text:p text:style-name="P145"><text:tab/>retq</text:p>
          </table:table-cell>
          <table:table-cell table:style-name="Таблица21.A1" office:value-type="string">
            <text:p text:style-name="P124">loop_jamming: <text:s text:c="26"/># @loop_jamming</text:p>
            <text:p text:style-name="P124"><text:tab/>.cfi_startproc</text:p>
            <text:p text:style-name="P124"># %bb.0:</text:p>
            <text:p text:style-name="P124"><text:tab/>pushq<text:tab/>%r14</text:p>
            <text:p text:style-name="P124"><text:tab/>.cfi_def_cfa_offset 16</text:p>
            <text:p text:style-name="P124"><text:tab/>pushq<text:tab/>%rbx</text:p>
            <text:p text:style-name="P124"><text:tab/>.cfi_def_cfa_offset 24</text:p>
            <text:p text:style-name="P124"><text:tab/>pushq<text:tab/>%rax</text:p>
            <text:p text:style-name="P124"><text:tab/>.cfi_def_cfa_offset 32</text:p>
            <text:p text:style-name="P124"><text:tab/>.cfi_offset %rbx, -24</text:p>
            <text:p text:style-name="P124"><text:tab/>.cfi_offset %r14, -16</text:p>
            <text:p text:style-name="P124"><text:tab/>movl<text:tab/>%edi, %ebx</text:p>
            <text:p text:style-name="P124"><text:tab/>movl<text:tab/>$0, i(%rip)</text:p>
            <text:p text:style-name="P124"><text:tab/>leaq<text:tab/>.L.str(%rip), %r14</text:p>
            <text:p text:style-name="P124"><text:tab/>xorl<text:tab/>%esi, %esi</text:p>
            <text:p text:style-name="P124"><text:tab/>.p2align<text:tab/>4, 0x90</text:p>
            <text:p text:style-name="P124">.LBB3_1: <text:s text:c="2"/></text:p>
            <text:p text:style-name="P124"><text:tab/>imull<text:tab/>j5(%rip), %esi</text:p>
            <text:p text:style-name="P124"><text:tab/>addl<text:tab/>%ebx, %esi</text:p>
            <text:p text:style-name="P124"><text:tab/>movl<text:tab/>%esi, k5(%rip)</text:p>
            <text:p text:style-name="P124"><text:tab/>movq<text:tab/>%r14, %rdi</text:p>
            <text:p text:style-name="P124"><text:tab/>xorl<text:tab/>%eax, %eax</text:p>
            <text:p text:style-name="P124"><text:tab/>callq<text:tab/>printf@PLT</text:p>
            <text:p text:style-name="P124"><text:tab/>movl<text:tab/>i(%rip), %eax</text:p>
            <text:p text:style-name="P124"><text:tab/>leal<text:tab/>1(%rax), %esi</text:p>
            <text:p text:style-name="P124"><text:tab/>movl<text:tab/>%esi, i(%rip)</text:p>
            <text:p text:style-name="P124"><text:tab/>cmpl<text:tab/>$4, %eax</text:p>
            <text:p text:style-name="P124"><text:tab/>jl<text:tab/>.LBB3_1</text:p>
            <text:p text:style-name="P124"># %bb.2:</text:p>
            <text:p text:style-name="P124"><text:tab/>movl<text:tab/>$0, i(%rip)</text:p>
            <text:p text:style-name="P124"><text:tab/>leaq<text:tab/>.L.str(%rip), %r14</text:p>
            <text:p text:style-name="P124"><text:tab/>xorl<text:tab/>%eax, %eax</text:p>
            <text:p text:style-name="P124"><text:tab/>.p2align<text:tab/>4, 0x90</text:p>
            <text:p text:style-name="P124">.LBB3_3: <text:s text:c="5"/></text:p>
            <text:p text:style-name="P124"><text:tab/>movl<text:tab/>k5(%rip), %esi</text:p>
            <text:p text:style-name="P124"><text:tab/>imull<text:tab/>%ebx, %eax</text:p>
            <text:p text:style-name="P124"><text:tab/>imull<text:tab/>%esi, %eax</text:p>
            <text:p text:style-name="P124"><text:tab/>movl<text:tab/>%eax, i5(%rip)</text:p>
            <text:p text:style-name="P124"><text:tab/>movq<text:tab/>%r14, %rdi</text:p>
            <text:p text:style-name="P124"><text:tab/>xorl<text:tab/>%eax, %eax</text:p>
            <text:p text:style-name="P124"><text:tab/>callq<text:tab/>printf@PLT</text:p>
            <text:p text:style-name="P124"><text:tab/>movl<text:tab/>i(%rip), %ecx</text:p>
            <text:p text:style-name="P124"><text:tab/>leal<text:tab/>1(%rcx), %eax</text:p>
            <text:p text:style-name="P124"><text:tab/>movl<text:tab/>%eax, i(%rip)</text:p>
            <text:p text:style-name="P124"><text:tab/>cmpl<text:tab/>$4, %ecx</text:p>
            <text:p text:style-name="P124"><text:tab/>jl<text:tab/>.LBB3_3</text:p>
            <text:p text:style-name="P124"># %bb.4:</text:p>
            <text:p text:style-name="P124"><text:tab/>addq<text:tab/>$8, %rsp</text:p>
            <text:p text:style-name="P124"><text:tab/>.cfi_def_cfa_offset 24</text:p>
            <text:p text:style-name="P124"><text:tab/>popq<text:tab/>%rbx</text:p>
            <text:p text:style-name="P124"><text:tab/>.cfi_def_cfa_offset 16</text:p>
            <text:p text:style-name="P124"><text:tab/>popq<text:tab/>%r14</text:p>
            <text:p text:style-name="P124"><text:tab/>.cfi_def_cfa_offset 8</text:p>
            <text:p text:style-name="P124"><text:tab/>retq</text:p>
          </table:table-cell>
        </table:table-row>
      </table:table>
      <text:p text:style-name="P68"><text:span text:style-name="T23"/></text:p>
      <text:p text:style-name="P197">При оптимизации слияния циклов не произошло. Явно видны два цикла .LBB3_1 и .LBB3_3</text:p>
      <table:table table:name="Таблица22" table:style-name="Таблица22">
        <table:table-column table:style-name="Таблица22.A"/>
        <table:table-column table:style-name="Таблица22.B"/>
        <table:table-row>
          <table:table-cell table:style-name="Таблица22.A1" office:value-type="string">
            <text:p text:style-name="P124">loop_unrolling: <text:s text:c="24"/># @loop_unrolling</text:p>
            <text:p text:style-name="P124"><text:tab/>.cfi_startproc</text:p>
            <text:p text:style-name="P124"># %bb.0:</text:p>
            <text:p text:style-name="P124"><text:tab/>pushq<text:tab/>%rbp</text:p>
            <text:p text:style-name="P124"><text:tab/>.cfi_def_cfa_offset 16</text:p>
            <text:p text:style-name="P124"><text:tab/>.cfi_offset %rbp, -16</text:p>
            <text:p text:style-name="P124"><text:tab/>movq<text:tab/>%rsp, %rbp</text:p>
            <text:p text:style-name="P124"><text:tab/>.cfi_def_cfa_register %rbp</text:p>
            <text:p text:style-name="P124"><text:tab/>subq<text:tab/>$16, %rsp</text:p>
            <text:p text:style-name="P124"><text:tab/>movl<text:tab/>%edi, -4(%rbp)</text:p>
            <text:p text:style-name="P124"><text:tab/>movl<text:tab/>$0, i(%rip)</text:p>
            <text:p text:style-name="P124">.LBB4_1: <text:s text:c="4"/></text:p>
            <text:p text:style-name="P124"><text:tab/>cmpl<text:tab/>$6, i(%rip)</text:p>
            <text:p text:style-name="P124"><text:tab/>jge<text:tab/>.LBB4_4</text:p>
            <text:p text:style-name="P124"># %bb.2: <text:s text:c="3"/></text:p>
            <text:p text:style-name="P124"><text:tab/>movslq<text:tab/>i(%rip), %rcx</text:p>
            <text:p text:style-name="P124"><text:tab/>leaq<text:tab/>ivector4(%rip), %rax</text:p>
            <text:p text:style-name="P124"><text:tab/>movw<text:tab/>$0, (%rax,%rcx,2)</text:p>
            <text:p text:style-name="P124"><text:tab/>movslq<text:tab/>i(%rip), %rcx</text:p>
            <text:p text:style-name="P124"><text:tab/>leaq<text:tab/>ivector4(%rip), %rax</text:p>
            <text:p text:style-name="P124"><text:tab/>movswl<text:tab/>(%rax,%rcx,2), %esi</text:p>
            <text:p text:style-name="P124"><text:tab/>leaq<text:tab/>.L.str(%rip), %rdi</text:p>
            <text:p text:style-name="P124"><text:tab/>movb<text:tab/>$0, %al</text:p>
            <text:p text:style-name="P124"><text:tab/>callq<text:tab/>printf@PLT</text:p>
            <text:p text:style-name="P124"># %bb.3: <text:s text:c="5"/></text:p>
            <text:p text:style-name="P124"><text:tab/>movl<text:tab/>i(%rip), %eax</text:p>
            <text:p text:style-name="P124"><text:tab/>addl<text:tab/>$1, %eax</text:p>
            <text:p text:style-name="P124"><text:tab/>movl<text:tab/>%eax, i(%rip)</text:p>
            <text:p text:style-name="P124"><text:tab/>jmp<text:tab/>.LBB4_1</text:p>
            <text:p text:style-name="P124">.LBB4_4:</text:p>
            <text:p text:style-name="P124"><text:tab/>addq<text:tab/>$16, %rsp</text:p>
            <text:p text:style-name="P124"><text:tab/>popq<text:tab/>%rbp</text:p>
            <text:p text:style-name="P124"><text:tab/>.cfi_def_cfa %rsp, 8</text:p>
            <text:p text:style-name="P124"><text:tab/>retq</text:p>
          </table:table-cell>
          <table:table-cell table:style-name="Таблица22.A1" office:value-type="string">
            <text:p text:style-name="P104">void loop_unrolling(int x)</text:p>
            <text:p text:style-name="P104">{</text:p>
            <text:p text:style-name="P104"><text:tab/>for (i = 0; i &lt; 6; i++) {</text:p>
            <text:p text:style-name="P104"><text:tab/><text:tab/>ivector4[i] = 0;</text:p>
            <text:p text:style-name="P104"><text:tab/><text:tab/>printf("%d", ivector4[i]);</text:p>
            <text:p text:style-name="P104"><text:tab/>}</text:p>
            <text:p text:style-name="P104">} </text:p>
          </table:table-cell>
        </table:table-row>
      </table:table>
      <text:p text:style-name="P68"><text:span text:style-name="T23"/></text:p>
      <text:p text:style-name="P199">Без оптимизации разворачивания циклов не происходит</text:p>
      <text:p text:style-name="P72"><text:span text:style-name="T23"/></text:p>
      <table:table table:name="Таблица23" table:style-name="Таблица23">
        <table:table-column table:style-name="Таблица23.A"/>
        <table:table-column table:style-name="Таблица23.B"/>
        <table:table-row table:style-name="Таблица23.1">
          <table:table-cell table:style-name="Таблица23.A1" office:value-type="string">
            <text:p text:style-name="P146">loop_unrolling: <text:s text:c="24"/># @loop_unrolling</text:p>
            <text:p text:style-name="P146"><text:tab/>.cfi_startproc</text:p>
            <text:p text:style-name="P146"># %bb.0:</text:p>
            <text:p text:style-name="P146"><text:tab/>pushq<text:tab/>%rbp</text:p>
            <text:p text:style-name="P146"><text:tab/>.cfi_def_cfa_offset 16</text:p>
            <text:p text:style-name="P146"><text:tab/>.cfi_offset %rbp, -16</text:p>
            <text:p text:style-name="P146"><text:tab/>movq<text:tab/>%rsp, %rbp</text:p>
            <text:p text:style-name="P146"><text:tab/>.cfi_def_cfa_register %rbp</text:p>
            <text:p text:style-name="P146"><text:tab/>subq<text:tab/>$16, %rsp</text:p>
            <text:p text:style-name="P146"><text:tab/>movl<text:tab/>%edi, -4(%rbp)</text:p>
            <text:p text:style-name="P146"><text:tab/>movl<text:tab/>$0, i(%rip)</text:p>
            <text:p text:style-name="P146">.LBB4_1: <text:s text:c="4"/></text:p>
            <text:p text:style-name="P146"><text:tab/>cmpl<text:tab/>$6, i(%rip)</text:p>
            <text:p text:style-name="P146"><text:tab/>jge<text:tab/>.LBB4_4</text:p>
            <text:p text:style-name="P146"># %bb.2: <text:s text:c="3"/></text:p>
            <text:p text:style-name="P146"><text:tab/>movslq<text:tab/>i(%rip), %rcx</text:p>
            <text:p text:style-name="P146"><text:tab/>leaq<text:tab/>ivector4(%rip), %rax</text:p>
            <text:p text:style-name="P146"><text:tab/>movw<text:tab/>$0, (%rax,%rcx,2)</text:p>
            <text:p text:style-name="P146"><text:tab/>movslq<text:tab/>i(%rip), %rcx</text:p>
            <text:p text:style-name="P146"><text:tab/>leaq<text:tab/>ivector4(%rip), %rax</text:p>
            <text:p text:style-name="P146"><text:tab/>movswl<text:tab/>(%rax,%rcx,2), %esi</text:p>
            <text:p text:style-name="P146"><text:tab/>leaq<text:tab/>.L.str(%rip), %rdi</text:p>
            <text:p text:style-name="P146"><text:tab/>movb<text:tab/>$0, %al</text:p>
            <text:p text:style-name="P146"><text:tab/>callq<text:tab/>printf@PLT</text:p>
            <text:p text:style-name="P146"># %bb.3: <text:s text:c="5"/></text:p>
            <text:p text:style-name="P146"><text:tab/>movl<text:tab/>i(%rip), %eax</text:p>
            <text:p text:style-name="P146"><text:tab/>addl<text:tab/>$1, %eax</text:p>
            <text:p text:style-name="P146"><text:tab/>movl<text:tab/>%eax, i(%rip)</text:p>
            <text:p text:style-name="P146"><text:tab/>jmp<text:tab/>.LBB4_1</text:p>
            <text:p text:style-name="P146">.LBB4_4:</text:p>
            <text:p text:style-name="P146"><text:tab/>addq<text:tab/>$16, %rsp</text:p>
            <text:p text:style-name="P146"><text:tab/>popq<text:tab/>%rbp</text:p>
            <text:p text:style-name="P146"><text:tab/>.cfi_def_cfa %rsp, 8</text:p>
            <text:p text:style-name="P146"><text:tab/>retq</text:p>
          </table:table-cell>
          <table:table-cell table:style-name="Таблица23.A1" office:value-type="string">
            <text:p text:style-name="P124">loop_unrolling: <text:s text:c="24"/># @loop_unrolling</text:p>
            <text:p text:style-name="P124"><text:tab/>.cfi_startproc</text:p>
            <text:p text:style-name="P124"># %bb.0:</text:p>
            <text:p text:style-name="P124"><text:tab/>pushq<text:tab/>%r14</text:p>
            <text:p text:style-name="P124"><text:tab/>.cfi_def_cfa_offset 16</text:p>
            <text:p text:style-name="P124"><text:tab/>pushq<text:tab/>%rbx</text:p>
            <text:p text:style-name="P124"><text:tab/>.cfi_def_cfa_offset 24</text:p>
            <text:p text:style-name="P124"><text:tab/>pushq<text:tab/>%rax</text:p>
            <text:p text:style-name="P124"><text:tab/>.cfi_def_cfa_offset 32</text:p>
            <text:p text:style-name="P124"><text:tab/>.cfi_offset %rbx, -24</text:p>
            <text:p text:style-name="P124"><text:tab/>.cfi_offset %r14, -16</text:p>
            <text:p text:style-name="P124"><text:tab/>movl<text:tab/>$0, i(%rip)</text:p>
            <text:p text:style-name="P124"><text:tab/>leaq<text:tab/>ivector4(%rip), %r14</text:p>
            <text:p text:style-name="P124"><text:tab/>leaq<text:tab/>.L.str(%rip), %rbx</text:p>
            <text:p text:style-name="P124"><text:tab/>xorl<text:tab/>%eax, %eax</text:p>
            <text:p text:style-name="P124"><text:tab/>.p2align<text:tab/>4, 0x90</text:p>
            <text:p text:style-name="P124">.LBB4_1: </text:p>
            <text:p text:style-name="P124"><text:tab/>cltq</text:p>
            <text:p text:style-name="P124"><text:tab/>movw<text:tab/>$0, (%r14,%rax,2)</text:p>
            <text:p text:style-name="P124"><text:tab/>movq<text:tab/>%rbx, %rdi</text:p>
            <text:p text:style-name="P124"><text:tab/>xorl<text:tab/>%esi, %esi</text:p>
            <text:p text:style-name="P124"><text:tab/>xorl<text:tab/>%eax, %eax</text:p>
            <text:p text:style-name="P124"><text:tab/>callq<text:tab/>printf@PLT</text:p>
            <text:p text:style-name="P124"><text:tab/>movl<text:tab/>i(%rip), %ecx</text:p>
            <text:p text:style-name="P124"><text:tab/>leal<text:tab/>1(%rcx), %eax</text:p>
            <text:p text:style-name="P124"><text:tab/>movl<text:tab/>%eax, i(%rip)</text:p>
            <text:p text:style-name="P124"><text:tab/>cmpl<text:tab/>$5, %ecx</text:p>
            <text:p text:style-name="P124"><text:tab/>jl<text:tab/>.LBB4_1</text:p>
            <text:p text:style-name="P124"># %bb.2:</text:p>
            <text:p text:style-name="P124"><text:tab/>addq<text:tab/>$8, %rsp</text:p>
            <text:p text:style-name="P124"><text:tab/>.cfi_def_cfa_offset 24</text:p>
            <text:p text:style-name="P124"><text:tab/>popq<text:tab/>%rbx</text:p>
            <text:p text:style-name="P124"><text:tab/>.cfi_def_cfa_offset 16</text:p>
            <text:p text:style-name="P124"><text:tab/>popq<text:tab/>%r14</text:p>
            <text:p text:style-name="P124"><text:tab/>.cfi_def_cfa_offset 8</text:p>
            <text:p text:style-name="P124"><text:tab/>retq</text:p>
          </table:table-cell>
        </table:table-row>
      </table:table>
      <text:p text:style-name="P72"><text:span text:style-name="T23"/></text:p>
      <text:p text:style-name="P202">Даже при оптимизации цикл остался, разворачивание цикла не произошло, что странно</text:p>
      <table:table table:name="Таблица24" table:style-name="Таблица24">
        <table:table-column table:style-name="Таблица24.A"/>
        <table:table-column table:style-name="Таблица24.B"/>
        <table:table-row>
          <table:table-cell table:style-name="Таблица24.A1" office:value-type="string">
            <text:p text:style-name="P124">jump_compression: <text:s text:c="22"/># @jump_compression</text:p>
            <text:p text:style-name="P124"><text:tab/>.cfi_startproc</text:p>
            <text:p text:style-name="P124"># %bb.0:</text:p>
            <text:p text:style-name="P124"><text:tab/>pushq<text:tab/>%rbp</text:p>
            <text:p text:style-name="P124"><text:tab/>.cfi_def_cfa_offset 16</text:p>
            <text:p text:style-name="P124"><text:tab/>.cfi_offset %rbp, -16</text:p>
            <text:p text:style-name="P124"><text:tab/>movq<text:tab/>%rsp, %rbp</text:p>
            <text:p text:style-name="P124"><text:tab/>.cfi_def_cfa_register %rbp</text:p>
            <text:p text:style-name="P124"><text:tab/>subq<text:tab/>$32, %rsp</text:p>
            <text:p text:style-name="P124"><text:tab/>movl<text:tab/>%edi, -4(%rbp)</text:p>
            <text:p text:style-name="P124"><text:tab/>movl<text:tab/>%esi, -8(%rbp)</text:p>
            <text:p text:style-name="P124"><text:tab/>movl<text:tab/>%edx, -12(%rbp)</text:p>
            <text:p text:style-name="P124"><text:tab/>movl<text:tab/>%ecx, -16(%rbp)</text:p>
            <text:p text:style-name="P124"><text:tab/>movl<text:tab/>%r8d, -20(%rbp)</text:p>
            <text:p text:style-name="P124">.LBB5_1: <text:s/></text:p>
            <text:p text:style-name="P124"><text:tab/>movl<text:tab/>-4(%rbp), %eax</text:p>
            <text:p text:style-name="P124"><text:tab/>cmpl<text:tab/>-8(%rbp), %eax</text:p>
            <text:p text:style-name="P124"><text:tab/>jge<text:tab/>.LBB5_13</text:p>
            <text:p text:style-name="P124"># %bb.2: <text:s/></text:p>
            <text:p text:style-name="P124"><text:tab/>movl<text:tab/>-8(%rbp), %eax</text:p>
            <text:p text:style-name="P124"><text:tab/>cmpl<text:tab/>-12(%rbp), %eax</text:p>
            <text:p text:style-name="P124"><text:tab/>jge<text:tab/>.LBB5_10</text:p>
            <text:p text:style-name="P124"># %bb.3: </text:p>
            <text:p text:style-name="P124"><text:tab/>movl<text:tab/>-12(%rbp), %eax</text:p>
            <text:p text:style-name="P124"><text:tab/>cmpl<text:tab/>-16(%rbp), %eax</text:p>
            <text:p text:style-name="P124"><text:tab/>jge<text:tab/>.LBB5_8</text:p>
            <text:p text:style-name="P124"># %bb.4: <text:s/></text:p>
            <text:p text:style-name="P124"><text:tab/>movl<text:tab/>-16(%rbp), %eax</text:p>
            <text:p text:style-name="P124"><text:tab/>cmpl<text:tab/>-20(%rbp), %eax</text:p>
            <text:p text:style-name="P124"><text:tab/>jge<text:tab/>.LBB5_6</text:p>
            <text:p text:style-name="P124"># %bb.5:</text:p>
            <text:p text:style-name="P124"><text:tab/>movl<text:tab/>-20(%rbp), %eax</text:p>
            <text:p text:style-name="P124"><text:tab/>addl<text:tab/>-16(%rbp), %eax</text:p>
            <text:p text:style-name="P124"><text:tab/>movl<text:tab/>%eax, -16(%rbp)</text:p>
            <text:p text:style-name="P124"><text:tab/>jmp<text:tab/>.LBB5_7</text:p>
            <text:p text:style-name="P164">.LBB5_6: </text:p>
            <text:p text:style-name="P164"><text:tab/>jmp<text:tab/>.LBB5_11</text:p>
            <text:p text:style-name="P124">.LBB5_7:</text:p>
            <text:p text:style-name="P124"><text:tab/>jmp<text:tab/>.LBB5_9</text:p>
            <text:p text:style-name="P124">.LBB5_8:</text:p>
            <text:p text:style-name="P124"><text:tab/>movl<text:tab/>-16(%rbp), %eax</text:p>
            <text:p text:style-name="P124"><text:tab/>addl<text:tab/>-12(%rbp), %eax</text:p>
            <text:p text:style-name="P124"><text:tab/>movl<text:tab/>%eax, -12(%rbp)</text:p>
            <text:p text:style-name="P164">.LBB5_9:</text:p>
            <text:p text:style-name="P164"><text:tab/>jmp<text:tab/>.LBB5_12</text:p>
            <text:p text:style-name="P124">.LBB5_10: <text:s/></text:p>
            <text:p text:style-name="P124"><text:tab/>movl<text:tab/>-12(%rbp), %eax</text:p>
            <text:p text:style-name="P124"><text:tab/>addl<text:tab/>-8(%rbp), %eax</text:p>
            <text:p text:style-name="P124"><text:tab/>movl<text:tab/>%eax, -8(%rbp)</text:p>
            <text:p text:style-name="P124"><text:tab/>movl<text:tab/>-8(%rbp), %esi</text:p>
            <text:p text:style-name="P124"><text:tab/>leaq<text:tab/>.L.str(%rip), %rdi</text:p>
            <text:p text:style-name="P124"><text:tab/>movb<text:tab/>$0, %al</text:p>
            <text:p text:style-name="P124"><text:tab/>callq<text:tab/>printf@PLT</text:p>
            <text:p text:style-name="P164">.LBB5_11: </text:p>
            <text:p text:style-name="P164"><text:tab/>jmp<text:tab/>.LBB5_1</text:p>
            <text:p text:style-name="P124">.LBB5_12:</text:p>
            <text:p text:style-name="P124"><text:tab/>jmp<text:tab/>.LBB5_14</text:p>
            <text:p text:style-name="P124">.LBB5_13:</text:p>
            <text:p text:style-name="P124"><text:tab/>movl<text:tab/>-8(%rbp), %eax</text:p>
            <text:p text:style-name="P124"><text:tab/>addl<text:tab/>-4(%rbp), %eax</text:p>
            <text:p text:style-name="P124"><text:tab/>movl<text:tab/>%eax, -4(%rbp)</text:p>
            <text:p text:style-name="P124">.LBB5_14:</text:p>
            <text:p text:style-name="P124"><text:tab/>movl<text:tab/>-4(%rbp), %eax</text:p>
            <text:p text:style-name="P124"><text:soft-page-break/><text:tab/>addl<text:tab/>-8(%rbp), %eax</text:p>
            <text:p text:style-name="P124"><text:tab/>addl<text:tab/>-12(%rbp), %eax</text:p>
            <text:p text:style-name="P124"><text:tab/>addl<text:tab/>-16(%rbp), %eax</text:p>
            <text:p text:style-name="P124"><text:tab/>addl<text:tab/>-20(%rbp), %eax</text:p>
            <text:p text:style-name="P124"><text:tab/>addq<text:tab/>$32, %rsp</text:p>
            <text:p text:style-name="P124"><text:tab/>popq<text:tab/>%rbp</text:p>
            <text:p text:style-name="P124"><text:tab/>.cfi_def_cfa %rsp, 8</text:p>
            <text:p text:style-name="P124"><text:tab/>retq</text:p>
          </table:table-cell>
          <table:table-cell table:style-name="Таблица24.A1" office:value-type="string">
            <text:p text:style-name="P104">int jump_compression(int i, int j, int k, int l, int m)</text:p>
            <text:p text:style-name="P104">{</text:p>
            <text:p text:style-name="P104">beg_1:</text:p>
            <text:p text:style-name="P104"><text:tab/>if (i &lt; j)</text:p>
            <text:p text:style-name="P104"><text:tab/><text:tab/>if (j &lt; k)</text:p>
            <text:p text:style-name="P104"><text:tab/><text:tab/><text:tab/>if (k &lt; l)</text:p>
            <text:p text:style-name="P104"><text:tab/><text:tab/><text:tab/><text:tab/>if (l &lt; m)</text:p>
            <text:p text:style-name="P104"><text:tab/><text:tab/><text:tab/><text:tab/><text:tab/>l += m;</text:p>
            <text:p text:style-name="P104"><text:tab/><text:tab/><text:tab/><text:tab/>else</text:p>
            <text:p text:style-name="P104"><text:tab/><text:tab/><text:tab/><text:tab/><text:tab/>goto end_1;</text:p>
            <text:p text:style-name="P104"><text:tab/><text:tab/><text:tab/>else</text:p>
            <text:p text:style-name="P104"><text:tab/><text:tab/><text:tab/><text:tab/>k += l;</text:p>
            <text:p text:style-name="P104"><text:tab/><text:tab/>else {</text:p>
            <text:p text:style-name="P104"><text:tab/><text:tab/><text:tab/>j += k;</text:p>
            <text:p text:style-name="P104"><text:tab/><text:tab/><text:tab/>printf("%d", j);</text:p>
            <text:p text:style-name="P104"><text:tab/><text:tab/>end_1:</text:p>
            <text:p text:style-name="P104"><text:tab/><text:tab/><text:tab/>goto beg_1;</text:p>
            <text:p text:style-name="P104"><text:tab/><text:tab/>}</text:p>
            <text:p text:style-name="P104"><text:tab/>else</text:p>
            <text:p text:style-name="P104"><text:tab/><text:tab/>i += j;</text:p>
            <text:p text:style-name="P104"><text:tab/>return(i + j + k + l + m);</text:p>
            <text:p text:style-name="P104">}</text:p>
          </table:table-cell>
        </table:table-row>
      </table:table>
      <text:p text:style-name="P75"><text:span text:style-name="T23"/></text:p>
      <text:p text:style-name="P205">Без оптимизации компилятор оставляет лишние цепочки переходов, оптимизация позволяет избежать этого</text:p>
      <text:p text:style-name="P78"><text:span text:style-name="T23"/></text:p>
      <table:table table:name="Таблица25" table:style-name="Таблица25">
        <table:table-column table:style-name="Таблица25.A"/>
        <table:table-column table:style-name="Таблица25.B"/>
        <table:table-row>
          <table:table-cell table:style-name="Таблица25.A1" office:value-type="string">
            <text:p text:style-name="P147">jump_compression: <text:s text:c="22"/># @jump_compression</text:p>
            <text:p text:style-name="P147"><text:tab/>.cfi_startproc</text:p>
            <text:p text:style-name="P147"># %bb.0:</text:p>
            <text:p text:style-name="P147"><text:tab/>pushq<text:tab/>%rbp</text:p>
            <text:p text:style-name="P147"><text:tab/>.cfi_def_cfa_offset 16</text:p>
            <text:p text:style-name="P147"><text:tab/>.cfi_offset %rbp, -16</text:p>
            <text:p text:style-name="P147"><text:tab/>movq<text:tab/>%rsp, %rbp</text:p>
            <text:p text:style-name="P147"><text:tab/>.cfi_def_cfa_register %rbp</text:p>
            <text:p text:style-name="P147"><text:tab/>subq<text:tab/>$32, %rsp</text:p>
            <text:p text:style-name="P147"><text:tab/>movl<text:tab/>%edi, -4(%rbp)</text:p>
            <text:p text:style-name="P147"><text:tab/>movl<text:tab/>%esi, -8(%rbp)</text:p>
            <text:p text:style-name="P147"><text:tab/>movl<text:tab/>%edx, -12(%rbp)</text:p>
            <text:p text:style-name="P147"><text:tab/>movl<text:tab/>%ecx, -16(%rbp)</text:p>
            <text:p text:style-name="P147"><text:tab/>movl<text:tab/>%r8d, -20(%rbp)</text:p>
            <text:p text:style-name="P147">.LBB5_1: <text:s/></text:p>
            <text:p text:style-name="P147"><text:tab/>movl<text:tab/>-4(%rbp), %eax</text:p>
            <text:p text:style-name="P147"><text:tab/>cmpl<text:tab/>-8(%rbp), %eax</text:p>
            <text:p text:style-name="P147"><text:tab/>jge<text:tab/>.LBB5_13</text:p>
            <text:p text:style-name="P147"># %bb.2: <text:s/></text:p>
            <text:p text:style-name="P147"><text:tab/>movl<text:tab/>-8(%rbp), %eax</text:p>
            <text:p text:style-name="P147"><text:tab/>cmpl<text:tab/>-12(%rbp), %eax</text:p>
            <text:p text:style-name="P147"><text:tab/>jge<text:tab/>.LBB5_10</text:p>
            <text:p text:style-name="P147"># %bb.3: </text:p>
            <text:p text:style-name="P147"><text:tab/>movl<text:tab/>-12(%rbp), %eax</text:p>
            <text:p text:style-name="P147"><text:tab/>cmpl<text:tab/>-16(%rbp), %eax</text:p>
            <text:p text:style-name="P147"><text:tab/>jge<text:tab/>.LBB5_8</text:p>
            <text:p text:style-name="P147"># %bb.4: <text:s/></text:p>
            <text:p text:style-name="P147"><text:tab/>movl<text:tab/>-16(%rbp), %eax</text:p>
            <text:p text:style-name="P147"><text:tab/>cmpl<text:tab/>-20(%rbp), %eax</text:p>
            <text:p text:style-name="P147"><text:tab/>jge<text:tab/>.LBB5_6</text:p>
            <text:p text:style-name="P147"># %bb.5:</text:p>
            <text:p text:style-name="P147"><text:tab/>movl<text:tab/>-20(%rbp), %eax</text:p>
            <text:p text:style-name="P147"><text:tab/>addl<text:tab/>-16(%rbp), %eax</text:p>
            <text:p text:style-name="P147"><text:tab/>movl<text:tab/>%eax, -16(%rbp)</text:p>
            <text:p text:style-name="P147"><text:tab/>jmp<text:tab/>.LBB5_7</text:p>
            <text:p text:style-name="P165">.LBB5_6: </text:p>
            <text:p text:style-name="P165"><text:tab/>jmp<text:tab/>.LBB5_11</text:p>
            <text:p text:style-name="P147">.LBB5_7:</text:p>
            <text:p text:style-name="P147"><text:tab/>jmp<text:tab/>.LBB5_9</text:p>
            <text:p text:style-name="P147">.LBB5_8:</text:p>
            <text:p text:style-name="P147"><text:tab/>movl<text:tab/>-16(%rbp), %eax</text:p>
            <text:p text:style-name="P147"><text:tab/>addl<text:tab/>-12(%rbp), %eax</text:p>
            <text:p text:style-name="P147"><text:tab/>movl<text:tab/>%eax, -12(%rbp)</text:p>
            <text:p text:style-name="P165">.LBB5_9:</text:p>
            <text:p text:style-name="P165"><text:tab/>jmp<text:tab/>.LBB5_12</text:p>
            <text:p text:style-name="P147">.LBB5_10: <text:s/></text:p>
            <text:p text:style-name="P147"><text:tab/>movl<text:tab/>-12(%rbp), %eax</text:p>
            <text:p text:style-name="P147"><text:tab/>addl<text:tab/>-8(%rbp), %eax</text:p>
            <text:p text:style-name="P147"><text:tab/>movl<text:tab/>%eax, -8(%rbp)</text:p>
            <text:p text:style-name="P147"><text:soft-page-break/><text:tab/>movl<text:tab/>-8(%rbp), %esi</text:p>
            <text:p text:style-name="P147"><text:tab/>leaq<text:tab/>.L.str(%rip), %rdi</text:p>
            <text:p text:style-name="P147"><text:tab/>movb<text:tab/>$0, %al</text:p>
            <text:p text:style-name="P147"><text:tab/>callq<text:tab/>printf@PLT</text:p>
            <text:p text:style-name="P165">.LBB5_11: </text:p>
            <text:p text:style-name="P165"><text:tab/>jmp<text:tab/>.LBB5_1</text:p>
            <text:p text:style-name="P147">.LBB5_12:</text:p>
            <text:p text:style-name="P147"><text:tab/>jmp<text:tab/>.LBB5_14</text:p>
            <text:p text:style-name="P147">.LBB5_13:</text:p>
            <text:p text:style-name="P147"><text:tab/>movl<text:tab/>-8(%rbp), %eax</text:p>
            <text:p text:style-name="P147"><text:tab/>addl<text:tab/>-4(%rbp), %eax</text:p>
            <text:p text:style-name="P147"><text:tab/>movl<text:tab/>%eax, -4(%rbp)</text:p>
            <text:p text:style-name="P147">.LBB5_14:</text:p>
            <text:p text:style-name="P147"><text:tab/>movl<text:tab/>-4(%rbp), %eax</text:p>
            <text:p text:style-name="P147"><text:tab/>addl<text:tab/>-8(%rbp), %eax</text:p>
            <text:p text:style-name="P147"><text:tab/>addl<text:tab/>-12(%rbp), %eax</text:p>
            <text:p text:style-name="P147"><text:tab/>addl<text:tab/>-16(%rbp), %eax</text:p>
            <text:p text:style-name="P147"><text:tab/>addl<text:tab/>-20(%rbp), %eax</text:p>
            <text:p text:style-name="P147"><text:tab/>addq<text:tab/>$32, %rsp</text:p>
            <text:p text:style-name="P147"><text:tab/>popq<text:tab/>%rbp</text:p>
            <text:p text:style-name="P147"><text:tab/>.cfi_def_cfa %rsp, 8</text:p>
            <text:p text:style-name="P147"><text:tab/>retq</text:p>
          </table:table-cell>
          <table:table-cell table:style-name="Таблица25.A1" office:value-type="string">
            <text:p text:style-name="P148">jump_compression: <text:s text:c="22"/># @jump_compression</text:p>
            <text:p text:style-name="P148"><text:tab/>.cfi_startproc</text:p>
            <text:p text:style-name="P148"># %bb.0:</text:p>
            <text:p text:style-name="P148"><text:tab/>pushq<text:tab/>%rbp</text:p>
            <text:p text:style-name="P148"><text:tab/>.cfi_def_cfa_offset 16</text:p>
            <text:p text:style-name="P148"><text:tab/>pushq<text:tab/>%r15</text:p>
            <text:p text:style-name="P148"><text:tab/>.cfi_def_cfa_offset 24</text:p>
            <text:p text:style-name="P148"><text:tab/>pushq<text:tab/>%r14</text:p>
            <text:p text:style-name="P148"><text:tab/>.cfi_def_cfa_offset 32</text:p>
            <text:p text:style-name="P148"><text:tab/>pushq<text:tab/>%r13</text:p>
            <text:p text:style-name="P148"><text:tab/>.cfi_def_cfa_offset 40</text:p>
            <text:p text:style-name="P148"><text:tab/>pushq<text:tab/>%r12</text:p>
            <text:p text:style-name="P148"><text:tab/>.cfi_def_cfa_offset 48</text:p>
            <text:p text:style-name="P148"><text:tab/>pushq<text:tab/>%rbx</text:p>
            <text:p text:style-name="P148"><text:tab/>.cfi_def_cfa_offset 56</text:p>
            <text:p text:style-name="P148"><text:tab/>pushq<text:tab/>%rax</text:p>
            <text:p text:style-name="P148"><text:tab/>.cfi_def_cfa_offset 64</text:p>
            <text:p text:style-name="P148"><text:tab/>.cfi_offset %rbx, -56</text:p>
            <text:p text:style-name="P148"><text:tab/>.cfi_offset %r12, -48</text:p>
            <text:p text:style-name="P148"><text:tab/>.cfi_offset %r13, -40</text:p>
            <text:p text:style-name="P148"><text:tab/>.cfi_offset %r14, -32</text:p>
            <text:p text:style-name="P148"><text:tab/>.cfi_offset %r15, -24</text:p>
            <text:p text:style-name="P148"><text:tab/>.cfi_offset %rbp, -16</text:p>
            <text:p text:style-name="P148"><text:tab/>movl<text:tab/>%r8d, %r14d</text:p>
            <text:p text:style-name="P148"><text:tab/>movl<text:tab/>%ecx, %r12d</text:p>
            <text:p text:style-name="P148"><text:tab/>movl<text:tab/>%edx, %ebp</text:p>
            <text:p text:style-name="P148"><text:tab/>movl<text:tab/>%esi, %ebx</text:p>
            <text:p text:style-name="P148"><text:tab/>movl<text:tab/>%edi, %r15d</text:p>
            <text:p text:style-name="P148"><text:tab/>cmpl<text:tab/>%edi, %esi</text:p>
            <text:p text:style-name="P148"><text:tab/>jle<text:tab/>.LBB5_12</text:p>
            <text:p text:style-name="P148"># %bb.1:</text:p>
            <text:p text:style-name="P148"><text:tab/>leaq<text:tab/>.L.str(%rip), %r13</text:p>
            <text:p text:style-name="P148"><text:tab/>cmpl<text:tab/>%r12d, %ebp</text:p>
            <text:p text:style-name="P148"><text:tab/>jge<text:tab/>.LBB5_2</text:p>
            <text:p text:style-name="P148"># %bb.4:</text:p>
            <text:p text:style-name="P148"><text:tab/>cmpl<text:tab/>%r14d, %r12d</text:p>
            <text:p text:style-name="P148"><text:tab/>jge<text:tab/>.LBB5_5</text:p>
            <text:p text:style-name="P148"><text:tab/>.p2align<text:tab/>4, 0x90</text:p>
            <text:p text:style-name="P148">.LBB5_8: <text:s text:c="3"/></text:p>
            <text:p text:style-name="P148"><text:tab/>cmpl<text:tab/>%ebp, %ebx</text:p>
            <text:p text:style-name="P148"><text:tab/>jl<text:tab/>.LBB5_10</text:p>
            <text:p text:style-name="P148"># %bb.9: <text:s text:c="4"/></text:p>
            <text:p text:style-name="P148"><text:tab/>addl<text:tab/>%ebp, %ebx</text:p>
            <text:p text:style-name="P148"><text:tab/>movq<text:tab/>%r13, %rdi</text:p>
            <text:p text:style-name="P148"><text:tab/>movl<text:tab/>%ebx, %esi</text:p>
            <text:p text:style-name="P148"><text:tab/>xorl<text:tab/>%eax, %eax</text:p>
            <text:p text:style-name="P148"><text:tab/>callq<text:tab/>printf@PLT</text:p>
            <text:p text:style-name="P148"><text:tab/>cmpl<text:tab/>%r15d, %ebx</text:p>
            <text:p text:style-name="P148"><text:tab/>jg<text:tab/>.LBB5_8</text:p>
            <text:p text:style-name="P148"><text:soft-page-break/><text:tab/>jmp<text:tab/>.LBB5_12</text:p>
            <text:p text:style-name="P148"><text:tab/>.p2align<text:tab/>4, 0x90</text:p>
            <text:p text:style-name="P148">.LBB5_2: <text:s text:c="4"/></text:p>
            <text:p text:style-name="P148"><text:tab/>cmpl<text:tab/>%ebp, %ebx</text:p>
            <text:p text:style-name="P148"><text:tab/>jl<text:tab/>.LBB5_3</text:p>
            <text:p text:style-name="P148"># %bb.11: <text:s text:c="2"/></text:p>
            <text:p text:style-name="P148"><text:tab/>addl<text:tab/>%ebp, %ebx</text:p>
            <text:p text:style-name="P148"><text:tab/>movq<text:tab/>%r13, %rdi</text:p>
            <text:p text:style-name="P148"><text:tab/>movl<text:tab/>%ebx, %esi</text:p>
            <text:p text:style-name="P148"><text:tab/>xorl<text:tab/>%eax, %eax</text:p>
            <text:p text:style-name="P148"><text:tab/>callq<text:tab/>printf@PLT</text:p>
            <text:p text:style-name="P148"><text:tab/>cmpl<text:tab/>%r15d, %ebx</text:p>
            <text:p text:style-name="P148"><text:tab/>jg<text:tab/>.LBB5_2</text:p>
            <text:p text:style-name="P148">.LBB5_12:</text:p>
            <text:p text:style-name="P148"><text:tab/>addl<text:tab/>%ebx, %r15d</text:p>
            <text:p text:style-name="P148">.LBB5_13:</text:p>
            <text:p text:style-name="P148"><text:tab/>addl<text:tab/>%r12d, %ebp</text:p>
            <text:p text:style-name="P148"><text:tab/>addl<text:tab/>%r14d, %ebx</text:p>
            <text:p text:style-name="P148"><text:tab/>addl<text:tab/>%r15d, %ebx</text:p>
            <text:p text:style-name="P148"><text:tab/>addl<text:tab/>%ebp, %ebx</text:p>
            <text:p text:style-name="P148"><text:tab/>movl<text:tab/>%ebx, %eax</text:p>
            <text:p text:style-name="P148"><text:tab/>addq<text:tab/>$8, %rsp</text:p>
            <text:p text:style-name="P148"><text:tab/>.cfi_def_cfa_offset 56</text:p>
            <text:p text:style-name="P148"><text:tab/>popq<text:tab/>%rbx</text:p>
            <text:p text:style-name="P148"><text:tab/>.cfi_def_cfa_offset 48</text:p>
            <text:p text:style-name="P148"><text:tab/>popq<text:tab/>%r12</text:p>
            <text:p text:style-name="P148"><text:tab/>.cfi_def_cfa_offset 40</text:p>
            <text:p text:style-name="P148"><text:tab/>popq<text:tab/>%r13</text:p>
            <text:p text:style-name="P148"><text:tab/>.cfi_def_cfa_offset 32</text:p>
            <text:p text:style-name="P148"><text:tab/>popq<text:tab/>%r14</text:p>
            <text:p text:style-name="P148"><text:tab/>.cfi_def_cfa_offset 24</text:p>
            <text:p text:style-name="P148"><text:tab/>popq<text:tab/>%r15</text:p>
            <text:p text:style-name="P148"><text:tab/>.cfi_def_cfa_offset 16</text:p>
            <text:p text:style-name="P148"><text:tab/>popq<text:tab/>%rbp</text:p>
            <text:p text:style-name="P148"><text:tab/>.cfi_def_cfa_offset 8</text:p>
            <text:p text:style-name="P148"><text:tab/>retq</text:p>
            <text:p text:style-name="P148"><text:tab/>.p2align<text:tab/>4, 0x90</text:p>
            <text:p text:style-name="P148">.LBB5_7: <text:s/></text:p>
            <text:p text:style-name="P148"><text:tab/>.cfi_def_cfa_offset 64</text:p>
            <text:p text:style-name="P148"><text:tab/>cmpl<text:tab/>%r15d, %ebx</text:p>
            <text:p text:style-name="P148"><text:tab/>jle<text:tab/>.LBB5_12</text:p>
            <text:p text:style-name="P148">.LBB5_5: <text:s text:c="3"/></text:p>
            <text:p text:style-name="P148"><text:tab/>cmpl<text:tab/>%ebp, %ebx</text:p>
            <text:p text:style-name="P148"><text:tab/>jl<text:tab/>.LBB5_7</text:p>
            <text:p text:style-name="P148"># %bb.6: </text:p>
            <text:p text:style-name="P148"><text:tab/>addl<text:tab/>%ebp, %ebx</text:p>
            <text:p text:style-name="P148"><text:tab/>movq<text:tab/>%r13, %rdi</text:p>
            <text:p text:style-name="P148"><text:tab/>movl<text:tab/>%ebx, %esi</text:p>
            <text:p text:style-name="P148"><text:tab/>xorl<text:tab/>%eax, %eax</text:p>
            <text:p text:style-name="P148"><text:tab/>callq<text:tab/>printf@PLT</text:p>
            <text:p text:style-name="P148"><text:tab/>jmp<text:tab/>.LBB5_7</text:p>
            <text:p text:style-name="P148">.LBB5_3:</text:p>
            <text:p text:style-name="P148"><text:tab/>addl<text:tab/>%r12d, %ebp</text:p>
            <text:p text:style-name="P148"><text:tab/>jmp<text:tab/>.LBB5_13</text:p>
            <text:p text:style-name="P148">.LBB5_10:</text:p>
            <text:p text:style-name="P148"><text:tab/>addl<text:tab/>%r14d, %r12d</text:p>
            <text:p text:style-name="P148"><text:tab/>jmp<text:tab/>.LBB5_13</text:p>
          </table:table-cell>
        </table:table-row>
      </table:table>
      <text:p text:style-name="P78"><text:span text:style-name="T23"/></text:p>
      <text:p text:style-name="P185">GCC</text:p>
      <table:table table:name="Таблица28" table:style-name="Таблица28">
        <table:table-column table:style-name="Таблица28.A"/>
        <table:table-column table:style-name="Таблица28.B"/>
        <table:table-row>
          <table:table-cell table:style-name="Таблица28.A1" office:value-type="string">
            <text:p text:style-name="P152"><text:tab/><text:span text:style-name="T37">movl<text:tab/>$2, j4(%rip)</text:span></text:p>
            <text:p text:style-name="P152"><text:tab/><text:span text:style-name="T37">movl<text:tab/>j4(%rip), %eax</text:span></text:p>
            <text:p text:style-name="P152"><text:tab/><text:span text:style-name="T37">movl<text:tab/>%eax, %esi</text:span></text:p>
            <text:p text:style-name="P152"><text:tab/><text:span text:style-name="T39">leaq<text:tab/>.LC0(%rip), %rax</text:span></text:p>
            <text:p text:style-name="P152"><text:tab/><text:span text:style-name="T39">movq<text:tab/>%rax, %rdi</text:span></text:p>
            <text:p text:style-name="P152"><text:tab/>movl<text:tab/>$0, %eax</text:p>
            <text:p text:style-name="P152"><text:tab/>call<text:tab/>printf@PLT</text:p>
            <text:p text:style-name="P152"><text:tab/>movl<text:tab/>i2(%rip), %edx</text:p>
            <text:p text:style-name="P152"><text:tab/>movl<text:tab/>j4(%rip), %eax</text:p>
            <text:p text:style-name="P152"><text:tab/>cmpl<text:tab/>%eax, %edx</text:p>
            <text:p text:style-name="P152"><text:tab/>jge<text:tab/>.L2</text:p>
            <text:p text:style-name="P152"><text:tab/>movl<text:tab/>i4(%rip), %edx</text:p>
            <text:p text:style-name="P152"><text:tab/>movl<text:tab/>j4(%rip), %eax</text:p>
            <text:p text:style-name="P152"><text:tab/>cmpl<text:tab/>%eax, %edx</text:p>
            <text:p text:style-name="P152"><text:tab/>jge<text:tab/>.L2</text:p>
            <text:p text:style-name="P152"><text:tab/>movl<text:tab/>$2, i2(%rip)</text:p>
            <text:p text:style-name="P152"><text:tab/>movl<text:tab/>i2(%rip), %eax</text:p>
            <text:p text:style-name="P152"><text:tab/>movl<text:tab/>%eax, %esi</text:p>
            <text:p text:style-name="P152"><text:tab/>leaq<text:tab/>.LC0(%rip), %rax</text:p>
            <text:p text:style-name="P152"><text:tab/>movq<text:tab/>%rax, %rdi</text:p>
            <text:p text:style-name="P152"><text:tab/>movl<text:tab/>$0, %eax</text:p>
            <text:p text:style-name="P152"><text:tab/>call<text:tab/>printf@PLT</text:p>
            <text:p text:style-name="P152">.L2:</text:p>
            <text:p text:style-name="P152"><text:tab/>movl<text:tab/>k5(%rip), %eax</text:p>
            <text:p text:style-name="P152"><text:tab/>movl<text:tab/>%eax, j4(%rip)</text:p>
            <text:p text:style-name="P152"><text:tab/>movl<text:tab/>j4(%rip), %eax</text:p>
            <text:p text:style-name="P152"><text:tab/>movl<text:tab/>%eax, %esi</text:p>
            <text:p text:style-name="P152"><text:tab/>leaq<text:tab/>.LC0(%rip), %rax</text:p>
            <text:p text:style-name="P152"><text:tab/>movq<text:tab/>%rax, %rdi</text:p>
            <text:p text:style-name="P152"><text:tab/>movl<text:tab/>$0, %eax</text:p>
            <text:p text:style-name="P152"><text:tab/>call<text:tab/>printf@PLT</text:p>
            <text:p text:style-name="P152"><text:tab/>movl<text:tab/>i2(%rip), %edx</text:p>
            <text:p text:style-name="P152"><text:tab/>movl<text:tab/>j4(%rip), %eax</text:p>
            <text:p text:style-name="P152"><text:tab/>cmpl<text:tab/>%eax, %edx</text:p>
            <text:p text:style-name="P152"><text:tab/>jge<text:tab/>.L3</text:p>
            <text:p text:style-name="P152"><text:tab/>movl<text:tab/>i4(%rip), %edx</text:p>
            <text:p text:style-name="P152"><text:tab/>movl<text:tab/>j4(%rip), %eax</text:p>
            <text:p text:style-name="P152"><text:tab/>cmpl<text:tab/>%eax, %edx</text:p>
            <text:p text:style-name="P152"><text:tab/>jge<text:tab/>.L3</text:p>
            <text:p text:style-name="P152"><text:tab/>movl<text:tab/>$3, i5(%rip)</text:p>
            <text:p text:style-name="P152"><text:tab/>movl<text:tab/>i5(%rip), %eax</text:p>
            <text:p text:style-name="P152"><text:tab/>movl<text:tab/>%eax, %esi</text:p>
            <text:p text:style-name="P152"><text:tab/>leaq<text:tab/>.LC0(%rip), %rax</text:p>
            <text:p text:style-name="P152"><text:tab/>movq<text:tab/>%rax, %rdi</text:p>
            <text:p text:style-name="P152"><text:tab/>movl<text:tab/>$0, %eax</text:p>
            <text:p text:style-name="P152"><text:tab/>call<text:tab/>printf@PLT</text:p>
            <text:p text:style-name="P152">.L3:</text:p>
          </table:table-cell>
          <table:table-cell table:style-name="Таблица28.A1" office:value-type="string">
            <text:p text:style-name="P109"><text:tab/>j4 = 2;</text:p>
            <text:p text:style-name="P110"><text:tab/>printf("%d", j4);</text:p>
            <text:p text:style-name="P110"><text:tab/>if (i2 &lt; j4 &amp;&amp; i4 &lt; j4) {</text:p>
            <text:p text:style-name="P110"><text:tab/><text:tab/>i2 = 2;</text:p>
            <text:p text:style-name="P110"><text:tab/><text:tab/>printf("%d", i2);</text:p>
            <text:p text:style-name="P110"><text:tab/>}</text:p>
            <text:p text:style-name="P110"><text:tab/>j4 = k5;</text:p>
            <text:p text:style-name="P110"><text:tab/>printf("%d", j4);</text:p>
            <text:p text:style-name="P110"><text:tab/>if (i2 &lt; j4 &amp;&amp; i4 &lt; j4) {</text:p>
            <text:p text:style-name="P110"><text:tab/><text:tab/>i5 = 3;</text:p>
            <text:p text:style-name="P110"><text:tab/><text:tab/>printf("%d", i5);</text:p>
            <text:p text:style-name="P110"><text:tab/>}</text:p>
          </table:table-cell>
        </table:table-row>
      </table:table>
      <text:p text:style-name="P183"/>
      <text:p text:style-name="P213">GCC с флагом -o0 не оптимизирует размножение копий. Более того явно бросается в глаза, что при записи j4 в регистр %esi он записывает j4 в %eax, а уже %eax в %esi. Похожим образом он поступает и дальше с %rax и %rdi. Clang в этом аспекте показывал себя намного лучше.</text:p>
      <table:table table:name="Таблица30" table:style-name="Таблица30">
        <table:table-column table:style-name="Таблица30.A"/>
        <table:table-column table:style-name="Таблица30.B"/>
        <table:table-row table:style-name="Таблица30.1">
          <table:table-cell table:style-name="Таблица30.A1" office:value-type="string">
            <text:p text:style-name="P166"><text:tab/>movl<text:tab/>$2, j4(%rip)</text:p>
            <text:p text:style-name="P166"><text:tab/>movl<text:tab/>j4(%rip), %eax</text:p>
            <text:p text:style-name="P166"><text:tab/>movl<text:tab/>%eax, %esi</text:p>
            <text:p text:style-name="P166"><text:tab/>leaq<text:tab/>.LC0(%rip), %rax</text:p>
            <text:p text:style-name="P166"><text:tab/>movq<text:tab/>%rax, %rdi</text:p>
            <text:p text:style-name="P153"><text:tab/>movl<text:tab/>$0, %eax</text:p>
            <text:p text:style-name="P153"><text:tab/>call<text:tab/>printf@PLT</text:p>
            <text:p text:style-name="P153"><text:tab/>movl<text:tab/>i2(%rip), %edx</text:p>
            <text:p text:style-name="P153"><text:tab/>movl<text:tab/>j4(%rip), %eax</text:p>
            <text:p text:style-name="P153"><text:tab/>cmpl<text:tab/>%eax, %edx</text:p>
            <text:p text:style-name="P153"><text:tab/>jge<text:tab/>.L2</text:p>
            <text:p text:style-name="P153"><text:tab/>movl<text:tab/>i4(%rip), %edx</text:p>
            <text:p text:style-name="P153"><text:tab/>movl<text:tab/>j4(%rip), %eax</text:p>
            <text:p text:style-name="P153"><text:tab/>cmpl<text:tab/>%eax, %edx</text:p>
            <text:p text:style-name="P153"><text:tab/>jge<text:tab/>.L2</text:p>
            <text:p text:style-name="P153"><text:tab/>movl<text:tab/>$2, i2(%rip)</text:p>
            <text:p text:style-name="P153"><text:tab/>movl<text:tab/>i2(%rip), %eax</text:p>
            <text:p text:style-name="P153"><text:tab/>movl<text:tab/>%eax, %esi</text:p>
            <text:p text:style-name="P153"><text:tab/>leaq<text:tab/>.LC0(%rip), %rax</text:p>
            <text:p text:style-name="P153"><text:tab/>movq<text:tab/>%rax, %rdi</text:p>
            <text:p text:style-name="P153"><text:tab/>movl<text:tab/>$0, %eax</text:p>
            <text:p text:style-name="P153"><text:tab/>call<text:tab/>printf@PLT</text:p>
            <text:p text:style-name="P153">.L2:</text:p>
            <text:p text:style-name="P153"><text:tab/>movl<text:tab/>k5(%rip), %eax</text:p>
            <text:p text:style-name="P153"><text:tab/>movl<text:tab/>%eax, j4(%rip)</text:p>
            <text:p text:style-name="P153"><text:tab/>movl<text:tab/>j4(%rip), %eax</text:p>
            <text:p text:style-name="P153"><text:tab/>movl<text:tab/>%eax, %esi</text:p>
            <text:p text:style-name="P153"><text:tab/>leaq<text:tab/>.LC0(%rip), %rax</text:p>
            <text:p text:style-name="P153"><text:tab/>movq<text:tab/>%rax, %rdi</text:p>
            <text:p text:style-name="P153"><text:tab/>movl<text:tab/>$0, %eax</text:p>
            <text:p text:style-name="P153"><text:tab/>call<text:tab/>printf@PLT</text:p>
            <text:p text:style-name="P153"><text:tab/>movl<text:tab/>i2(%rip), %edx</text:p>
            <text:p text:style-name="P153"><text:tab/>movl<text:tab/>j4(%rip), %eax</text:p>
            <text:p text:style-name="P153"><text:tab/>cmpl<text:tab/>%eax, %edx</text:p>
            <text:p text:style-name="P153"><text:tab/>jge<text:tab/>.L3</text:p>
            <text:p text:style-name="P153"><text:tab/>movl<text:tab/>i4(%rip), %edx</text:p>
            <text:p text:style-name="P153"><text:tab/>movl<text:tab/>j4(%rip), %eax</text:p>
            <text:p text:style-name="P153"><text:tab/>cmpl<text:tab/>%eax, %edx</text:p>
            <text:p text:style-name="P153"><text:tab/>jge<text:tab/>.L3</text:p>
            <text:p text:style-name="P153"><text:tab/>movl<text:tab/>$3, i5(%rip)</text:p>
            <text:p text:style-name="P153"><text:tab/>movl<text:tab/>i5(%rip), %eax</text:p>
            <text:p text:style-name="P153"><text:tab/>movl<text:tab/>%eax, %esi</text:p>
            <text:p text:style-name="P153"><text:tab/>leaq<text:tab/>.LC0(%rip), %rax</text:p>
            <text:p text:style-name="P153"><text:tab/>movq<text:tab/>%rax, %rdi</text:p>
            <text:p text:style-name="P153"><text:tab/>movl<text:tab/>$0, %eax</text:p>
            <text:p text:style-name="P153"><text:tab/>call<text:tab/>printf@PLT</text:p>
            <text:p text:style-name="P153">.L3:</text:p>
          </table:table-cell>
          <table:table-cell table:style-name="Таблица30.A1" office:value-type="string">
            <text:p text:style-name="P138"><text:tab/><text:span text:style-name="T37">movl<text:tab/>$2, j4(%rip)</text:span></text:p>
            <text:p text:style-name="P138"><text:tab/>call<text:tab/>__printf_chk@PLT</text:p>
            <text:p text:style-name="P138"><text:tab/><text:span text:style-name="T37">movl<text:tab/>j4(%rip), %eax</text:span></text:p>
            <text:p text:style-name="P138"><text:tab/>cmpl<text:tab/>%eax, i2(%rip)</text:p>
            <text:p text:style-name="P138"><text:tab/>jge<text:tab/>.L36</text:p>
            <text:p text:style-name="P138"><text:tab/>cmpl<text:tab/>i4(%rip), %eax</text:p>
            <text:p text:style-name="P138"><text:tab/>jg<text:tab/>.L46</text:p>
            <text:p text:style-name="P138">.L36:</text:p>
            <text:p text:style-name="P138"><text:tab/>movl<text:tab/>k5(%rip), %edx</text:p>
            <text:p text:style-name="P138"><text:tab/>xorl<text:tab/>%eax, %eax</text:p>
            <text:p text:style-name="P138"><text:tab/>movq<text:tab/>%rbx, %rsi</text:p>
            <text:p text:style-name="P138"><text:tab/>movl<text:tab/>$2, %edi</text:p>
            <text:p text:style-name="P138"><text:tab/>movl<text:tab/>%edx, j4(%rip)</text:p>
            <text:p text:style-name="P138"><text:tab/>call<text:tab/>__printf_chk@PLT</text:p>
            <text:p text:style-name="P138"><text:tab/>movl<text:tab/>j4(%rip), %eax</text:p>
            <text:p text:style-name="P138"><text:tab/>cmpl<text:tab/>%eax, i2(%rip)</text:p>
            <text:p text:style-name="P138"><text:tab/>jge<text:tab/>.L37</text:p>
            <text:p text:style-name="P138"><text:tab/>cmpl<text:tab/>i4(%rip), %eax</text:p>
            <text:p text:style-name="P138"><text:tab/>jg<text:tab/>.L47</text:p>
            <text:p text:style-name="P138">.L37:<text:line-break/></text:p>
            <text:p text:style-name="P155">...</text:p>
            <text:p text:style-name="P138"/>
            <text:p text:style-name="P155"/>
            <text:p text:style-name="P138"/>
            <text:p text:style-name="P138"/>
            <text:p text:style-name="P138"/>
            <text:p text:style-name="P138"><text:line-break/><text:line-break/>.L47:</text:p>
            <text:p text:style-name="P138"><text:tab/>movl<text:tab/>$3, %edx</text:p>
            <text:p text:style-name="P138"><text:tab/>movq<text:tab/>%rbx, %rsi</text:p>
            <text:p text:style-name="P138"><text:tab/>movl<text:tab/>$2, %edi</text:p>
            <text:p text:style-name="P138"><text:tab/>xorl<text:tab/>%eax, %eax</text:p>
            <text:p text:style-name="P138"><text:tab/>movl<text:tab/>$3, i5(%rip)</text:p>
            <text:p text:style-name="P138"><text:tab/>call<text:tab/>__printf_chk@PLT</text:p>
            <text:p text:style-name="P138"><text:tab/>jmp<text:tab/>.L37</text:p>
            <text:p text:style-name="P138">.L46:</text:p>
            <text:p text:style-name="P138"><text:tab/>movl<text:tab/>$2, %edx</text:p>
            <text:p text:style-name="P138"><text:tab/>movq<text:tab/>%rbx, %rsi</text:p>
            <text:p text:style-name="P138"><text:tab/>movl<text:tab/>$2, %edi</text:p>
            <text:p text:style-name="P138"><text:tab/>xorl<text:tab/>%eax, %eax</text:p>
            <text:p text:style-name="P138"><text:tab/>movl<text:tab/>$2, i2(%rip)</text:p>
            <text:p text:style-name="P138"><text:tab/>call<text:tab/>__printf_chk@PLT</text:p>
            <text:p text:style-name="P138"><text:tab/>jmp<text:tab/>.L36</text:p>
          </table:table-cell>
        </table:table-row>
      </table:table>
      <text:p text:style-name="P115"><text:span text:style-name="T20"/></text:p>
      <text:p text:style-name="P42">Почему-то gcc не оптимизирует размножение копий в данном случае <text:span text:style-name="T44">при оптимизации по скорости</text:span></text:p>
      <table:table table:name="Таблица31" table:style-name="Таблица31">
        <table:table-column table:style-name="Таблица31.A"/>
        <table:table-column table:style-name="Таблица31.B"/>
        <table:table-row table:style-name="Таблица31.1">
          <table:table-cell table:style-name="Таблица31.A1" office:value-type="string">
            <text:p text:style-name="P167"><text:tab/>movl<text:tab/>$3, i3(%rip)</text:p>
            <text:p text:style-name="P167"/>
            <text:p text:style-name="P167"><text:tab/>movsd<text:tab/>.LC1(%rip), %xmm0</text:p>
            <text:p text:style-name="P167"><text:tab/>movsd<text:tab/>%xmm0, flt_1(%rip)</text:p>
            <text:p text:style-name="P167"/>
            <text:p text:style-name="P167"><text:tab/>movl<text:tab/>$5, i2(%rip)</text:p>
            <text:p text:style-name="P167"/>
            <text:p text:style-name="P167"><text:tab/><text:span text:style-name="T37">movl<text:tab/>i(%rip), %eax</text:span></text:p>
            <text:p text:style-name="P167"><text:tab/>movl<text:tab/>%eax, j2(%rip)</text:p>
            <text:p text:style-name="P167"/>
            <text:p text:style-name="P167"><text:tab/><text:span text:style-name="T37">movl<text:tab/>i(%rip), %eax</text:span></text:p>
            <text:p text:style-name="P167"><text:tab/>movl<text:tab/>%eax, k2(%rip)</text:p>
            <text:p text:style-name="P167"/>
            <text:p text:style-name="P167"><text:tab/>movl<text:tab/>i(%rip), %eax</text:p>
            <text:p text:style-name="P167"><text:tab/>movl<text:tab/>%eax, i4(%rip)</text:p>
            <text:p text:style-name="P167"/>
            <text:p text:style-name="P167"><text:tab/>movl<text:tab/>$0, i5(%rip)</text:p>
            <text:p text:style-name="P167"/>
            <text:p text:style-name="P167"><text:tab/>leaq<text:tab/>.LC2(%rip), %rax</text:p>
            <text:p text:style-name="P167"><text:tab/>movq<text:tab/>%rax, %rdi</text:p>
            <text:p text:style-name="P167"><text:tab/>call<text:tab/>puts@PLT</text:p>
            <text:p text:style-name="P167"/>
            <text:p text:style-name="P167"><text:tab/>movsd<text:tab/>.LC3(%rip), %xmm0</text:p>
            <text:p text:style-name="P167"><text:tab/>movsd<text:tab/>%xmm0, flt_3(%rip)</text:p>
            <text:p text:style-name="P167"/>
            <text:p text:style-name="P167"><text:tab/>movsd<text:tab/>.LC4(%rip), %xmm0</text:p>
            <text:p text:style-name="P167"><text:tab/>movsd<text:tab/>%xmm0, flt_4(%rip)</text:p>
            <text:p text:style-name="P167"/>
            <text:p text:style-name="P167"><text:tab/>movsd<text:tab/>flt_6(%rip), %xmm1</text:p>
            <text:p text:style-name="P167"><text:tab/>pxor<text:tab/>%xmm0, %xmm0</text:p>
            <text:p text:style-name="P167"><text:tab/>mulsd<text:tab/>%xmm1, %xmm0</text:p>
            <text:p text:style-name="P167"><text:tab/>movsd<text:tab/>%xmm0, flt_5(%rip)</text:p>
            <text:p text:style-name="P167"/>
            <text:p text:style-name="P167"><text:tab/>movsd<text:tab/>flt_2(%rip), %xmm1</text:p>
            <text:p text:style-name="P167"><text:tab/>movsd<text:tab/>flt_3(%rip), %xmm0</text:p>
            <text:p text:style-name="P167"><text:tab/>mulsd<text:tab/>%xmm1, %xmm0</text:p>
            <text:p text:style-name="P167"><text:tab/>movsd<text:tab/>%xmm0, flt_6(%rip)</text:p>
          </table:table-cell>
          <table:table-cell table:style-name="Таблица31.A1" office:value-type="string">
            <text:p text:style-name="P176"><text:tab/>I3 = 1 + 2;</text:p>
            <text:p text:style-name="P176"><text:tab/>flt_1 = 2.4 + 6.3;</text:p>
            <text:p text:style-name="P176"><text:tab/>i2 = 5;</text:p>
            <text:p text:style-name="P176"><text:tab/>j2 = i + 0;</text:p>
            <text:p text:style-name="P176"><text:tab/>k2 = i / 1;</text:p>
            <text:p text:style-name="P176"><text:tab/>i4 = i * 1;</text:p>
            <text:p text:style-name="P176"><text:tab/>i5 = i * 0;</text:p>
            <text:p text:style-name="P177"><text:tab/>printf("This compiler handles divide-by-zero as \</text:p>
            <text:p text:style-name="P177"><text:s text:c="20"/>an error\n");</text:p>
            <text:p text:style-name="P177"><text:tab/>flt_3 = 2.4 / 1.0;</text:p>
            <text:p text:style-name="P176"><text:tab/>flt_4 = 1.0 + 0.0000001;</text:p>
            <text:p text:style-name="P176"><text:tab/>flt_5 = flt_6 * 0.0;</text:p>
            <text:p text:style-name="P176"><text:tab/>flt_6 = flt_2 * flt_3;</text:p>
          </table:table-cell>
        </table:table-row>
      </table:table>
      <text:p text:style-name="P96"/>
      <text:p text:style-name="P7">Без оптимизации происходит <text:span text:style-name="T42">как </text:span>свёртка констант, <text:span text:style-name="T42">так и оптимизация </text:span>арифметически<text:span text:style-name="T42">х</text:span> тождеств, <text:span text:style-name="T42">чего не было у clang. Явно видно, что без оптимизации нет удаления лишних загрузок в память</text:span></text:p>
      <table:table table:name="Таблица32" table:style-name="Таблица32">
        <table:table-column table:style-name="Таблица32.A"/>
        <table:table-column table:style-name="Таблица32.B"/>
        <table:table-row table:style-name="Таблица32.1">
          <table:table-cell table:style-name="Таблица32.A1" office:value-type="string">
            <text:p text:style-name="P167"><text:tab/>movl<text:tab/>$3, i3(%rip)</text:p>
            <text:p text:style-name="P167"/>
            <text:p text:style-name="P167"><text:tab/>movsd<text:tab/>.LC1(%rip), %xmm0</text:p>
            <text:p text:style-name="P167"><text:tab/>movsd<text:tab/>%xmm0, flt_1(%rip)</text:p>
            <text:p text:style-name="P167"/>
            <text:p text:style-name="P167"><text:tab/>movl<text:tab/>$5, i2(%rip)</text:p>
            <text:p text:style-name="P167"/>
            <text:p text:style-name="P167"><text:tab/>movl<text:tab/>i(%rip), %eax</text:p>
            <text:p text:style-name="P167"><text:tab/>movl<text:tab/>%eax, j2(%rip)</text:p>
            <text:p text:style-name="P167"/>
            <text:p text:style-name="P167"><text:tab/>movl<text:tab/>i(%rip), %eax</text:p>
            <text:p text:style-name="P167"><text:tab/>movl<text:tab/>%eax, k2(%rip)</text:p>
            <text:p text:style-name="P167"/>
            <text:p text:style-name="P167"><text:tab/>movl<text:tab/>i(%rip), %eax</text:p>
            <text:p text:style-name="P167"><text:tab/>movl<text:tab/>%eax, i4(%rip)</text:p>
            <text:p text:style-name="P167"/>
            <text:p text:style-name="P167"><text:tab/>movl<text:tab/>$0, i5(%rip)</text:p>
            <text:p text:style-name="P167"/>
            <text:p text:style-name="P167"><text:tab/>leaq<text:tab/>.LC2(%rip), %rax</text:p>
            <text:p text:style-name="P167"><text:tab/>movq<text:tab/>%rax, %rdi</text:p>
            <text:p text:style-name="P167"><text:tab/>call<text:tab/>puts@PLT</text:p>
            <text:p text:style-name="P167"/>
            <text:p text:style-name="P167"><text:tab/>movsd<text:tab/>.LC3(%rip), %xmm0</text:p>
            <text:p text:style-name="P167"><text:tab/>movsd<text:tab/>%xmm0, flt_3(%rip)</text:p>
            <text:p text:style-name="P167"/>
            <text:p text:style-name="P167"><text:tab/>movsd<text:tab/>.LC4(%rip), %xmm0</text:p>
            <text:p text:style-name="P167"><text:tab/>movsd<text:tab/>%xmm0, flt_4(%rip)</text:p>
            <text:p text:style-name="P167"/>
            <text:p text:style-name="P167"><text:tab/>movsd<text:tab/>flt_6(%rip), %xmm1</text:p>
            <text:p text:style-name="P167"><text:tab/>pxor<text:tab/>%xmm0, %xmm0</text:p>
            <text:p text:style-name="P167"><text:tab/>mulsd<text:tab/>%xmm1, %xmm0</text:p>
            <text:p text:style-name="P167"><text:tab/>movsd<text:tab/>%xmm0, flt_5(%rip)</text:p>
            <text:p text:style-name="P167"/>
            <text:p text:style-name="P167"><text:tab/>movsd<text:tab/>flt_2(%rip), %xmm1</text:p>
            <text:p text:style-name="P167"><text:tab/>movsd<text:tab/>flt_3(%rip), %xmm0</text:p>
            <text:p text:style-name="P167"><text:tab/>mulsd<text:tab/>%xmm1, %xmm0</text:p>
            <text:p text:style-name="P167"><text:tab/>movsd<text:tab/>%xmm0, flt_6(%rip)</text:p>
          </table:table-cell>
          <table:table-cell table:style-name="Таблица32.A1" office:value-type="string">
            <text:p text:style-name="P139"><text:tab/>movq<text:tab/>.LC1(%rip), %rax</text:p>
            <text:p text:style-name="P138"><text:tab/>leaq<text:tab/>.LC2(%rip), %rdi</text:p>
            <text:p text:style-name="P138"/>
            <text:p text:style-name="P138"><text:tab/>movl<text:tab/>$3, i3(%rip)</text:p>
            <text:p text:style-name="P138"/>
            <text:p text:style-name="P138"><text:tab/>movl<text:tab/>$5, i2(%rip)</text:p>
            <text:p text:style-name="P138"/>
            <text:p text:style-name="P138"><text:tab/>movq<text:tab/>%rax, flt_1(%rip)</text:p>
            <text:p text:style-name="P138"><text:tab/>movl<text:tab/>i(%rip), %eax</text:p>
            <text:p text:style-name="P140"/>
            <text:p text:style-name="P140"><text:tab/>movl<text:tab/>$0, i5(%rip)</text:p>
            <text:p text:style-name="P138"><text:tab/>movl<text:tab/>%eax, j2(%rip)</text:p>
            <text:p text:style-name="P138"><text:tab/>movl<text:tab/>%eax, k2(%rip)</text:p>
            <text:p text:style-name="P138"><text:tab/>movl<text:tab/>%eax, i4(%rip)</text:p>
            <text:p text:style-name="P140"/>
            <text:p text:style-name="P140"><text:tab/>call<text:tab/>puts@PLT</text:p>
            <text:p text:style-name="P138"/>
            <text:p text:style-name="P138"><text:tab/>movq<text:tab/>.LC4(%rip), %rax</text:p>
            <text:p text:style-name="P138"><text:tab/>pxor<text:tab/>%xmm1, %xmm1</text:p>
            <text:p text:style-name="P138"/>
            <text:p text:style-name="P138"><text:tab/>movsd<text:tab/>.LC3(%rip), %xmm0</text:p>
            <text:p text:style-name="P138"><text:tab/>mulsd<text:tab/>flt_6(%rip), %xmm1</text:p>
            <text:p text:style-name="P156"/>
            <text:p text:style-name="P156"><text:tab/>movq<text:tab/>%rax, flt_4(%rip)</text:p>
            <text:p text:style-name="P156"/>
            <text:p text:style-name="P156"><text:tab/>movsd<text:tab/>%xmm0, flt_3(%rip)</text:p>
            <text:p text:style-name="P156"/>
            <text:p text:style-name="P156"><text:tab/>mulsd<text:tab/>flt_2(%rip), %xmm0</text:p>
            <text:p text:style-name="P156"/>
            <text:p text:style-name="P156"><text:tab/>movsd<text:tab/>%xmm1, flt_5(%rip)</text:p>
            <text:p text:style-name="P156"><text:tab/>movsd<text:tab/>%xmm0, flt_6(%rip)</text:p>
          </table:table-cell>
        </table:table-row>
      </table:table>
      <text:p text:style-name="P118"/>
      <text:p text:style-name="P8">При оптимизации gcc оптимизировал арифметическое тождество с умножением на 0.0, что не смог сделать clang</text:p>
      <text:p text:style-name="P7"/>
      <text:p text:style-name="P2">Хорошо видна оптимизация излишних загрузок переменной в регистр.</text:p>
      <text:p text:style-name="P7"/>
      <table:table table:name="Таблица33" table:style-name="Таблица33">
        <table:table-column table:style-name="Таблица33.A"/>
        <table:table-column table:style-name="Таблица33.B"/>
        <table:table-row>
          <table:table-cell table:style-name="Таблица33.A1" office:value-type="string">
            <text:p text:style-name="P122">movl<text:tab/>$1, k3(%rip)</text:p>
            <text:p text:style-name="P122">movl<text:tab/>$1, k3(%rip)</text:p>
          </table:table-cell>
          <table:table-cell table:style-name="Таблица33.A1" office:value-type="string">
            <text:p text:style-name="P122">movl<text:tab/>$1, k3(%rip)</text:p>
          </table:table-cell>
        </table:table-row>
      </table:table>
      <text:p text:style-name="P7"/>
      <text:p text:style-name="P87"><text:span text:style-name="T22">Удаление излишнего присваивания проис</text:span><text:span text:style-name="T17">ходит только с оптимизацией, </text:span><text:span text:style-name="T18">так же как у clang</text:span></text:p>
      <table:table table:name="Таблица34" table:style-name="Таблица34">
        <table:table-column table:style-name="Таблица34.A"/>
        <table:table-column table:style-name="Таблица34.B"/>
        <table:table-row table:style-name="Таблица34.1">
          <table:table-cell table:style-name="Таблица34.A1" office:value-type="string">
            <text:p text:style-name="P157"><text:span text:style-name="T13"><text:tab/></text:span>movl<text:tab/>j5(%rip), %eax</text:p>
            <text:p text:style-name="P154"><text:tab/><text:span text:style-name="T37">sall<text:tab/>$2, %eax</text:span></text:p>
            <text:p text:style-name="P154"><text:tab/>movl<text:tab/>%eax, k2(%rip)</text:p>
            <text:p text:style-name="P154"><text:tab/>movl<text:tab/>$0, i(%rip)</text:p>
            <text:p text:style-name="P154"><text:tab/>jmp<text:tab/>.L4</text:p>
            <text:p text:style-name="P154">.L5:</text:p>
            <text:p text:style-name="P154"><text:tab/>movl<text:tab/>i(%rip), %eax</text:p>
            <text:p text:style-name="P154"><text:tab/>leal<text:tab/>(%rax,%rax), %edx</text:p>
            <text:p text:style-name="P154"><text:tab/>movl<text:tab/>i(%rip), %eax</text:p>
            <text:p text:style-name="P154"><text:tab/>movl<text:tab/>%edx, %ecx</text:p>
            <text:p text:style-name="P154"><text:tab/>cltq</text:p>
            <text:p text:style-name="P154"><text:tab/>leaq<text:tab/>(%rax,%rax), %rdx</text:p>
            <text:p text:style-name="P154"><text:tab/>leaq<text:tab/>ivector4(%rip), %rax</text:p>
            <text:p text:style-name="P154"><text:tab/>movw<text:tab/>%cx, (%rdx,%rax)</text:p>
            <text:p text:style-name="P154"><text:tab/>movl<text:tab/>i(%rip), %eax</text:p>
            <text:p text:style-name="P154"><text:tab/>addl<text:tab/>$1, %eax</text:p>
            <text:p text:style-name="P154"><text:tab/>movl<text:tab/>%eax, i(%rip)</text:p>
            <text:p text:style-name="P154">.L4:</text:p>
            <text:p text:style-name="P154"><text:tab/>movl<text:tab/>i(%rip), %eax</text:p>
            <text:p text:style-name="P154"><text:tab/>cmpl<text:tab/>$5, %eax</text:p>
            <text:p text:style-name="P154"><text:tab/>jle<text:tab/>.L5</text:p>
          </table:table-cell>
          <table:table-cell table:style-name="Таблица34.A1" office:value-type="string">
            <text:p text:style-name="P176"><text:tab/>k2 = 4 * j5;</text:p>
            <text:p text:style-name="P176"><text:tab/>for (i = 0; i &lt;= 5; i++)</text:p>
            <text:p text:style-name="P176"><text:tab/><text:tab/>ivector4[i] = i * 2;</text:p>
          </table:table-cell>
        </table:table-row>
      </table:table>
      <text:p text:style-name="P87"><text:span text:style-name="T17"/></text:p>
      <text:p text:style-name="P208">Даже без флага оптимизации выполняется снижение мощности: умножение на степень двойки превращается в битовый сдвиг</text:p>
      <text:p text:style-name="P59"><text:span text:style-name="T23"/></text:p>
      <table:table table:name="Таблица35" table:style-name="Таблица35">
        <table:table-column table:style-name="Таблица35.A"/>
        <table:table-column table:style-name="Таблица35.B"/>
        <table:table-row>
          <table:table-cell table:style-name="Таблица35.A1" office:value-type="string">
            <text:p text:style-name="P168"><text:tab/>movl<text:tab/>j5(%rip), %eax</text:p>
            <text:p text:style-name="P168"><text:tab/>sall<text:tab/>$2, %eax</text:p>
            <text:p text:style-name="P168"><text:tab/>movl<text:tab/>%eax, k2(%rip)</text:p>
            <text:p text:style-name="P168"><text:tab/>movl<text:tab/>$0, i(%rip)</text:p>
            <text:p text:style-name="P168"><text:tab/>jmp<text:tab/>.L4</text:p>
            <text:p text:style-name="P168">.L5:</text:p>
            <text:p text:style-name="P168"><text:tab/>movl<text:tab/>i(%rip), %eax</text:p>
            <text:p text:style-name="P168"><text:tab/>leal<text:tab/>(%rax,%rax), %edx</text:p>
            <text:p text:style-name="P168"><text:tab/>movl<text:tab/>i(%rip), %eax</text:p>
            <text:p text:style-name="P168"><text:tab/>movl<text:tab/>%edx, %ecx</text:p>
            <text:p text:style-name="P168"><text:tab/>cltq</text:p>
            <text:p text:style-name="P168"><text:tab/>leaq<text:tab/>(%rax,%rax), %rdx</text:p>
            <text:p text:style-name="P168"><text:tab/>leaq<text:tab/>ivector4(%rip), %rax</text:p>
            <text:p text:style-name="P168"><text:tab/>movw<text:tab/>%cx, (%rdx,%rax)</text:p>
            <text:p text:style-name="P168"><text:tab/>movl<text:tab/>i(%rip), %eax</text:p>
            <text:p text:style-name="P168"><text:tab/>addl<text:tab/>$1, %eax</text:p>
            <text:p text:style-name="P168"><text:tab/>movl<text:tab/>%eax, i(%rip)</text:p>
            <text:p text:style-name="P168">.L4:</text:p>
            <text:p text:style-name="P168"><text:tab/>movl<text:tab/>i(%rip), %eax</text:p>
            <text:p text:style-name="P168"><text:tab/>cmpl<text:tab/>$5, %eax</text:p>
            <text:p text:style-name="P168"><text:tab/>jle<text:tab/>.L5</text:p>
          </table:table-cell>
          <table:table-cell table:style-name="Таблица35.A1" office:value-type="string">
            <text:p text:style-name="P154"><text:tab/>movl<text:tab/>j5(%rip), %eax</text:p>
            <text:p text:style-name="P154"><text:tab/>movl<text:tab/>$655368, 8+ivector4(%rip)</text:p>
            <text:p text:style-name="P154"><text:tab/><text:span text:style-name="T37">sall<text:tab/>$2, %eax</text:span></text:p>
            <text:p text:style-name="P154"><text:tab/>movl<text:tab/>%eax, k2(%rip)</text:p>
          </table:table-cell>
        </table:table-row>
      </table:table>
      <text:p text:style-name="P59"><text:span text:style-name="T23"/></text:p>
      <text:p text:style-name="P85"><text:span text:style-name="T23">Снижение мощности </text:span><text:span text:style-name="T28">остаётся</text:span><text:span text:style-name="T23"> и при оптимизации по скорости, </text:span><text:span text:style-name="T25">при этом</text:span><text:span text:style-name="T23"> цикл был убран.</text:span></text:p>
      <table:table table:name="Таблица36" table:style-name="Таблица36">
        <table:table-column table:style-name="Таблица36.A"/>
        <table:table-column table:style-name="Таблица36.B"/>
        <table:table-row table:style-name="Таблица36.1">
          <table:table-cell table:style-name="Таблица36.A1" office:value-type="string">
            <text:p text:style-name="P154"><text:tab/>movl<text:tab/>$0, j5(%rip)</text:p>
            <text:p text:style-name="P154"><text:tab/>movl<text:tab/>$10000, k5(%rip)</text:p>
            <text:p text:style-name="P154">.L6:</text:p>
            <text:p text:style-name="P154"><text:tab/>movl<text:tab/>k5(%rip), %eax</text:p>
            <text:p text:style-name="P154"><text:tab/>subl<text:tab/>$1, %eax</text:p>
            <text:p text:style-name="P154"><text:tab/>movl<text:tab/>%eax, k5(%rip)</text:p>
            <text:p text:style-name="P154"><text:tab/>movl<text:tab/>j5(%rip), %eax</text:p>
            <text:p text:style-name="P154"><text:tab/>addl<text:tab/>$1, %eax</text:p>
            <text:p text:style-name="P154"><text:tab/>movl<text:tab/>%eax, j5(%rip)</text:p>
            <text:p text:style-name="P154"><text:tab/>movl<text:tab/>k5(%rip), %edx</text:p>
            <text:p text:style-name="P154"><text:tab/>movl<text:tab/>%edx, %eax</text:p>
            <text:p text:style-name="P154"><text:tab/>addl<text:tab/>%eax, %eax</text:p>
            <text:p text:style-name="P154"><text:tab/>leal<text:tab/>(%rax,%rdx), %ecx</text:p>
            <text:p text:style-name="P154"><text:tab/>movl<text:tab/>j5(%rip), %edx</text:p>
            <text:p text:style-name="P154"><text:tab/>movl<text:tab/>%edx, %eax</text:p>
            <text:p text:style-name="P154"><text:tab/>sall<text:tab/>$2, %eax</text:p>
            <text:p text:style-name="P154"><text:tab/>leal<text:tab/>(%rdx,%rax), %esi</text:p>
            <text:p text:style-name="P154"><text:tab/>movl<text:tab/>%ecx, %eax</text:p>
            <text:p text:style-name="P154"><text:tab/>cltd</text:p>
            <text:p text:style-name="P154"><text:tab/>idivl<text:tab/>%esi</text:p>
            <text:p text:style-name="P154"><text:tab/>movl<text:tab/>%eax, i5(%rip)</text:p>
            <text:p text:style-name="P154"><text:tab/>movl<text:tab/>k5(%rip), %eax</text:p>
            <text:p text:style-name="P154"><text:tab/>testl<text:tab/>%eax, %eax</text:p>
            <text:p text:style-name="P154"><text:tab/>jg<text:tab/>.L6</text:p>
          </table:table-cell>
          <table:table-cell table:style-name="Таблица36.A1" office:value-type="string">
            <text:p text:style-name="P111"><text:tab/>j5 = 0;</text:p>
            <text:p text:style-name="P111"><text:tab/>k5 = 10000;</text:p>
            <text:p text:style-name="P111"><text:tab/>do {</text:p>
            <text:p text:style-name="P111"><text:tab/><text:tab/>k5 = k5 - 1;</text:p>
            <text:p text:style-name="P111"><text:tab/><text:tab/>j5 = j5 + 1;</text:p>
            <text:p text:style-name="P111"><text:tab/><text:tab/>i5 = (k5 * 3) / (j5 * constant5);</text:p>
            <text:p text:style-name="P111"><text:tab/>} while (k5 &gt; 0);</text:p>
          </table:table-cell>
        </table:table-row>
      </table:table>
      <text:p text:style-name="P99"/>
      <text:p text:style-name="P90"/>
      <table:table table:name="Таблица37" table:style-name="Таблица37">
        <table:table-column table:style-name="Таблица37.A"/>
        <table:table-column table:style-name="Таблица37.B"/>
        <table:table-row table:style-name="Таблица37.1">
          <table:table-cell table:style-name="Таблица37.A1" office:value-type="string">
            <text:p text:style-name="P154"><text:tab/>movl<text:tab/>$0, j5(%rip)</text:p>
            <text:p text:style-name="P154"><text:tab/>movl<text:tab/>$10000, k5(%rip)</text:p>
            <text:p text:style-name="P154">.L6:</text:p>
            <text:p text:style-name="P154"><text:tab/>movl<text:tab/>k5(%rip), %eax</text:p>
            <text:p text:style-name="P154"><text:tab/>subl<text:tab/>$1, %eax</text:p>
            <text:p text:style-name="P154"><text:tab/>movl<text:tab/>%eax, k5(%rip)</text:p>
            <text:p text:style-name="P154"><text:tab/>movl<text:tab/>j5(%rip), %eax</text:p>
            <text:p text:style-name="P154"><text:tab/>addl<text:tab/>$1, %eax</text:p>
            <text:p text:style-name="P154"><text:tab/>movl<text:tab/>%eax, j5(%rip)</text:p>
            <text:p text:style-name="P154"><text:tab/>movl<text:tab/>k5(%rip), %edx</text:p>
            <text:p text:style-name="P154"><text:tab/>movl<text:tab/>%edx, %eax</text:p>
            <text:p text:style-name="P154"><text:tab/>addl<text:tab/>%eax, %eax</text:p>
            <text:p text:style-name="P154"><text:tab/>leal<text:tab/>(%rax,%rdx), %ecx</text:p>
            <text:p text:style-name="P154"><text:tab/>movl<text:tab/>j5(%rip), %edx</text:p>
            <text:p text:style-name="P154"><text:tab/>movl<text:tab/>%edx, %eax</text:p>
            <text:p text:style-name="P154"><text:tab/>sall<text:tab/>$2, %eax</text:p>
            <text:p text:style-name="P154"><text:tab/>leal<text:tab/>(%rdx,%rax), %esi</text:p>
            <text:p text:style-name="P154"><text:tab/>movl<text:tab/>%ecx, %eax</text:p>
            <text:p text:style-name="P154"><text:tab/>cltd</text:p>
            <text:p text:style-name="P154"><text:tab/>idivl<text:tab/>%esi</text:p>
            <text:p text:style-name="P154"><text:tab/>movl<text:tab/>%eax, i5(%rip)</text:p>
            <text:p text:style-name="P154"><text:tab/>movl<text:tab/>k5(%rip), %eax</text:p>
            <text:p text:style-name="P154"><text:tab/>testl<text:tab/>%eax, %eax</text:p>
            <text:p text:style-name="P154"><text:tab/>jg<text:tab/>.L6</text:p>
          </table:table-cell>
          <table:table-cell table:style-name="Таблица37.A1" office:value-type="string">
            <text:p text:style-name="P154"><text:tab/>movl<text:tab/>$10000, j5(%rip)</text:p>
            <text:p text:style-name="P154"><text:tab/>movl<text:tab/>$0, i5(%rip)</text:p>
          </table:table-cell>
        </table:table-row>
      </table:table>
      <text:p text:style-name="P90"/>
      <text:p text:style-name="P22">В результате оптимизации цикл исчез</text:p>
      <table:table table:name="Таблица38" table:style-name="Таблица38">
        <table:table-column table:style-name="Таблица38.A"/>
        <table:table-column table:style-name="Таблица38.B"/>
        <table:table-row>
          <table:table-cell table:style-name="Таблица38.A1" office:value-type="string">
            <text:p text:style-name="P154"><text:tab/>movl<text:tab/>$0, i(%rip)</text:p>
            <text:p text:style-name="P154"><text:tab/>jmp<text:tab/>.L7</text:p>
            <text:p text:style-name="P154">.L8:</text:p>
            <text:p text:style-name="P154"><text:tab/>movl<text:tab/>i(%rip), %eax</text:p>
            <text:p text:style-name="P154"><text:tab/>addl<text:tab/>%eax, %eax</text:p>
            <text:p text:style-name="P154"><text:tab/>addl<text:tab/>$3, %eax</text:p>
            <text:p text:style-name="P154"><text:tab/>cltq</text:p>
            <text:p text:style-name="P154"><text:tab/>leaq<text:tab/>0(,%rax,4), %rdx</text:p>
            <text:p text:style-name="P154"><text:tab/>leaq<text:tab/>ivector5(%rip), %rax</text:p>
            <text:p text:style-name="P154"><text:tab/>movl<text:tab/>$5, (%rdx,%rax)</text:p>
            <text:p text:style-name="P154"><text:tab/>movl<text:tab/>i(%rip), %eax</text:p>
            <text:p text:style-name="P154"><text:tab/>addl<text:tab/>$1, %eax</text:p>
            <text:p text:style-name="P154"><text:tab/>movl<text:tab/>%eax, i(%rip)</text:p>
            <text:p text:style-name="P154">.L7:</text:p>
            <text:p text:style-name="P154"><text:tab/>movl<text:tab/>i(%rip), %eax</text:p>
            <text:p text:style-name="P154"><text:tab/>cmpl<text:tab/>$99, %eax</text:p>
            <text:p text:style-name="P154"><text:tab/>jle<text:tab/>.L8</text:p>
          </table:table-cell>
          <table:table-cell table:style-name="Таблица38.A1" office:value-type="string">
            <text:p text:style-name="P181"><text:tab/>for (i = 0; i &lt; 100; i++)</text:p>
            <text:p text:style-name="P180"><text:tab/><text:tab/>ivector5[i * 2 + 3] = 5;</text:p>
          </table:table-cell>
        </table:table-row>
      </table:table>
      <text:p text:style-name="P22"/>
      <text:p text:style-name="P25">Без оптимизации переменная индукции осталась<text:line-break/><text:line-break/></text:p>
      <table:table table:name="Таблица39" table:style-name="Таблица39">
        <table:table-column table:style-name="Таблица39.A"/>
        <table:table-column table:style-name="Таблица39.B"/>
        <table:table-row>
          <table:table-cell table:style-name="Таблица39.A1" office:value-type="string">
            <text:p text:style-name="P154"><text:tab/>movl<text:tab/>$0, i(%rip)</text:p>
            <text:p text:style-name="P154"><text:tab/>jmp<text:tab/>.L7</text:p>
            <text:p text:style-name="P154">.L8:</text:p>
            <text:p text:style-name="P154"><text:tab/>movl<text:tab/>i(%rip), %eax</text:p>
            <text:p text:style-name="P154"><text:tab/>addl<text:tab/>%eax, %eax</text:p>
            <text:p text:style-name="P154"><text:tab/>addl<text:tab/>$3, %eax</text:p>
            <text:p text:style-name="P154"><text:tab/>cltq</text:p>
            <text:p text:style-name="P154"><text:tab/>leaq<text:tab/>0(,%rax,4), %rdx</text:p>
            <text:p text:style-name="P154"><text:tab/>leaq<text:tab/>ivector5(%rip), %rax</text:p>
            <text:p text:style-name="P154"><text:tab/>movl<text:tab/>$5, (%rdx,%rax)</text:p>
            <text:p text:style-name="P154"><text:tab/>movl<text:tab/>i(%rip), %eax</text:p>
            <text:p text:style-name="P154"><text:tab/>addl<text:tab/>$1, %eax</text:p>
            <text:p text:style-name="P154"><text:tab/>movl<text:tab/>%eax, i(%rip)</text:p>
            <text:p text:style-name="P154">.L7:</text:p>
            <text:p text:style-name="P154"><text:tab/>movl<text:tab/>i(%rip), %eax</text:p>
            <text:p text:style-name="P154"><text:tab/>cmpl<text:tab/>$99, %eax</text:p>
            <text:p text:style-name="P154"><text:tab/>jle<text:tab/>.L8</text:p>
          </table:table-cell>
          <table:table-cell table:style-name="Таблица39.A1" office:value-type="string">
            <text:p text:style-name="P154"><text:tab/>movq<text:tab/>.LC6(%rip), %rax</text:p>
            <text:p text:style-name="P154"><text:tab/>movq<text:tab/>%rax, ivector4(%rip)</text:p>
            <text:p text:style-name="P154"><text:tab/>leaq<text:tab/>12+ivector5(%rip), %rax</text:p>
            <text:p text:style-name="P154"><text:tab/>leaq<text:tab/>800(%rax), %rdx</text:p>
            <text:p text:style-name="P154">.L38:</text:p>
            <text:p text:style-name="P154"><text:tab/>movl<text:tab/>$5, (%rax)</text:p>
            <text:p text:style-name="P154"><text:tab/>addq<text:tab/>$16, %rax</text:p>
            <text:p text:style-name="P154"><text:tab/>movl<text:tab/>$5, -8(%rax)</text:p>
            <text:p text:style-name="P154"><text:tab/>cmpq<text:tab/>%rdx, %rax</text:p>
            <text:p text:style-name="P154"><text:tab/>jne<text:tab/>.L38</text:p>
          </table:table-cell>
        </table:table-row>
      </table:table>
      <text:p text:style-name="P25"/>
      <text:p text:style-name="P25">При оптимизации переменная индукции была убрана</text:p>
      <table:table table:name="Таблица40" table:style-name="Таблица40">
        <table:table-column table:style-name="Таблица40.A"/>
        <table:table-column table:style-name="Таблица40.B"/>
        <table:table-row>
          <table:table-cell table:style-name="Таблица40.A1" office:value-type="string">
            <text:p text:style-name="P171"><text:tab/><text:span text:style-name="T37">movl<text:tab/>h3(%rip), %edx</text:span></text:p>
            <text:p text:style-name="P171"><text:tab/><text:span text:style-name="T37">movl<text:tab/>k3(%rip), %eax</text:span></text:p>
            <text:p text:style-name="P171"><text:tab/>addl<text:tab/>%edx, %eax</text:p>
            <text:p text:style-name="P171"><text:tab/>testl<text:tab/>%eax, %eax</text:p>
            <text:p text:style-name="P171"><text:tab/>js<text:tab/>.L11</text:p>
            <text:p text:style-name="P171"><text:tab/><text:span text:style-name="T37">movl<text:tab/>h3(%rip), %edx</text:span></text:p>
            <text:p text:style-name="P171"><text:tab/><text:span text:style-name="T37">movl<text:tab/>k3(%rip), %eax</text:span></text:p>
            <text:p text:style-name="P171"><text:tab/>addl<text:tab/>%edx, %eax</text:p>
            <text:p text:style-name="P171"><text:tab/>cmpl<text:tab/>$5, %eax</text:p>
            <text:p text:style-name="P171"><text:tab/>jle<text:tab/>.L12</text:p>
            <text:p text:style-name="P171">.L11:</text:p>
            <text:p text:style-name="P171"><text:tab/>leaq<text:tab/>.LC6(%rip), %rax</text:p>
            <text:p text:style-name="P171"><text:tab/>movq<text:tab/>%rax, %rdi</text:p>
            <text:p text:style-name="P171"><text:tab/>call<text:tab/>puts@PLT</text:p>
            <text:p text:style-name="P171"><text:tab/>jmp<text:tab/>.L13</text:p>
            <text:p text:style-name="P171">.L12:</text:p>
            <text:p text:style-name="P171"><text:tab/><text:span text:style-name="T37">movl<text:tab/>h3(%rip), %edx</text:span></text:p>
            <text:p text:style-name="P171"><text:tab/><text:span text:style-name="T37">movl<text:tab/>k3(%rip), %eax</text:span></text:p>
            <text:p text:style-name="P171"><text:tab/>addl<text:tab/>%edx, %eax</text:p>
            <text:p text:style-name="P171"><text:tab/>movl<text:tab/>i3(%rip), %ecx</text:p>
            <text:p text:style-name="P171"><text:tab/>cltd</text:p>
            <text:p text:style-name="P171"><text:tab/>idivl<text:tab/>%ecx</text:p>
            <text:p text:style-name="P171"><text:tab/>movl<text:tab/>%eax, m3(%rip)</text:p>
            <text:p text:style-name="P171"><text:tab/>movl<text:tab/>m3(%rip), %eax</text:p>
            <text:p text:style-name="P171"><text:tab/>movl<text:tab/>%eax, %esi</text:p>
            <text:p text:style-name="P171"><text:tab/>leaq<text:tab/>.LC0(%rip), %rax</text:p>
            <text:p text:style-name="P171"><text:tab/>movq<text:tab/>%rax, %rdi</text:p>
            <text:p text:style-name="P171"><text:tab/>movl<text:tab/>$0, %eax</text:p>
            <text:p text:style-name="P171"><text:tab/>call<text:tab/>printf@PLT</text:p>
            <text:p text:style-name="P171"><text:tab/><text:span text:style-name="T37">movl<text:tab/>h3(%rip), %edx</text:span></text:p>
            <text:p text:style-name="P171"><text:tab/><text:span text:style-name="T37">movl<text:tab/>k3(%rip), %eax</text:span></text:p>
            <text:p text:style-name="P171"><text:tab/>addl<text:tab/>%eax, %edx</text:p>
            <text:p text:style-name="P171"><text:tab/>movl<text:tab/>i3(%rip), %eax</text:p>
            <text:p text:style-name="P171"><text:tab/>addl<text:tab/>%edx, %eax</text:p>
            <text:p text:style-name="P171"><text:tab/>movl<text:tab/>%eax, g3(%rip)</text:p>
            <text:p text:style-name="P171"><text:tab/>movl<text:tab/>g3(%rip), %eax</text:p>
            <text:p text:style-name="P171"><text:tab/>movl<text:tab/>%eax, %esi</text:p>
            <text:p text:style-name="P171"><text:tab/>leaq<text:tab/>.LC0(%rip), %rax</text:p>
            <text:p text:style-name="P171"><text:tab/>movq<text:tab/>%rax, %rdi</text:p>
            <text:p text:style-name="P171"><text:tab/>movl<text:tab/>$0, %eax</text:p>
            <text:p text:style-name="P171"><text:tab/>call<text:tab/>printf@PLT</text:p>
          </table:table-cell>
          <table:table-cell table:style-name="Таблица40.A1" office:value-type="string">
            <text:p text:style-name="P55"><text:tab/>if ((h3 + k3) &lt; 0 || (h3 + k3) &gt; 5)</text:p>
            <text:p text:style-name="P55"><text:tab/><text:tab/>printf("Common subexpression elimination\n");</text:p>
            <text:p text:style-name="P55"><text:tab/>else {</text:p>
            <text:p text:style-name="P55"><text:tab/><text:tab/>m3 = (h3 + k3) / i3;</text:p>
            <text:p text:style-name="P55"><text:tab/><text:tab/>printf("%d", m3);</text:p>
            <text:p text:style-name="P55"><text:tab/><text:tab/>g3 = i3 + (h3 + k3);</text:p>
            <text:p text:style-name="P55"><text:tab/><text:tab/>printf("%d", g3);</text:p>
            <text:p text:style-name="P55"><text:tab/>}</text:p>
          </table:table-cell>
        </table:table-row>
      </table:table>
      <text:p text:style-name="P22"><text:span text:style-name="T1"/></text:p>
      <text:p text:style-name="P16">Без оптимизации вынесение общих подвыражений не наблюдается</text:p>
      <table:table table:name="Таблица41" table:style-name="Таблица41">
        <table:table-column table:style-name="Таблица41.A"/>
        <table:table-column table:style-name="Таблица41.B"/>
        <table:table-row table:style-name="Таблица41.1">
          <table:table-cell table:style-name="Таблица41.A1" office:value-type="string">
            <text:p text:style-name="P129"><text:tab/><text:span text:style-name="T37">movl<text:tab/>h3(%rip), %eax</text:span></text:p>
            <text:p text:style-name="P129"><text:tab/><text:span text:style-name="T37">addl<text:tab/>k3(%rip), %eax</text:span></text:p>
            <text:p text:style-name="P129"><text:tab/>cmpl<text:tab/>$0, %eax</text:p>
            <text:p text:style-name="P129"><text:tab/>jl<text:tab/>.LBB0_22</text:p>
            <text:p text:style-name="P129"># %bb.21:</text:p>
            <text:p text:style-name="P129"><text:tab/><text:span text:style-name="T37">movl<text:tab/>h3(%rip), %eax</text:span></text:p>
            <text:p text:style-name="P129"><text:tab/><text:span text:style-name="T37">addl<text:tab/>k3(%rip), %eax</text:span></text:p>
            <text:p text:style-name="P129"><text:tab/>cmpl<text:tab/>$5, %eax</text:p>
            <text:p text:style-name="P129"><text:tab/>jle<text:tab/>.LBB0_23</text:p>
            <text:p text:style-name="P129">.LBB0_22:</text:p>
            <text:p text:style-name="P129"/>
            <text:p text:style-name="P129"><text:tab/>leaq<text:tab/>.L.str.2(%rip), %rdi</text:p>
            <text:p text:style-name="P129"><text:tab/>movb<text:tab/>$0, %al</text:p>
            <text:p text:style-name="P129"><text:tab/>callq<text:tab/>printf@PLT</text:p>
            <text:p text:style-name="P129"><text:tab/>mp<text:tab/>.LBB0_24</text:p>
            <text:p text:style-name="P129">.LBB0_23:</text:p>
            <text:p text:style-name="P129"/>
            <text:p text:style-name="P129"><text:tab/><text:span text:style-name="T37">movl<text:tab/>h3(%rip), %eax</text:span></text:p>
            <text:p text:style-name="P129"><text:tab/><text:span text:style-name="T37">addl<text:tab/>k3(%rip), %eax</text:span></text:p>
            <text:p text:style-name="P129"><text:tab/>cltd</text:p>
            <text:p text:style-name="P129"><text:tab/>idivl<text:tab/>i3(%rip)</text:p>
            <text:p text:style-name="P129"/>
            <text:p text:style-name="P129"><text:tab/>movl<text:tab/>%eax, m3(%rip)</text:p>
            <text:p text:style-name="P129"><text:tab/>movl<text:tab/>m3(%rip), %esi</text:p>
            <text:p text:style-name="P129"><text:tab/>leaq<text:tab/>.L.str(%rip), %rdi</text:p>
            <text:p text:style-name="P129"><text:tab/>movb<text:tab/>$0, %al</text:p>
            <text:p text:style-name="P129"><text:tab/>callq<text:tab/>printf@PLT</text:p>
            <text:p text:style-name="P129"/>
            <text:p text:style-name="P129"><text:tab/>movl<text:tab/>i3(%rip), %eax</text:p>
            <text:p text:style-name="P129"><text:tab/><text:span text:style-name="T37">movl<text:tab/>h3(%rip), %ecx</text:span></text:p>
            <text:p text:style-name="P129"><text:tab/><text:span text:style-name="T37">addl<text:tab/>k3(%rip), %ecx</text:span></text:p>
            <text:p text:style-name="P129"><text:tab/>addl<text:tab/>%ecx, %eax</text:p>
            <text:p text:style-name="P129"><text:tab/>movl<text:tab/>%eax, g3(%rip)</text:p>
            <text:p text:style-name="P129"/>
            <text:p text:style-name="P129"><text:tab/>movl<text:tab/>g3(%rip), %esi</text:p>
            <text:p text:style-name="P129"><text:tab/>leaq<text:tab/>.L.str(%rip), %rdi</text:p>
            <text:p text:style-name="P129"><text:tab/>movb<text:tab/>$0, %al</text:p>
            <text:p text:style-name="P129"><text:tab/>callq<text:tab/>printf@PLT</text:p>
            <text:p text:style-name="P129">.LBB0_24:</text:p>
          </table:table-cell>
          <table:table-cell table:style-name="Таблица41.A1" office:value-type="string">
            <text:p text:style-name="P171"><text:tab/><text:span text:style-name="T37">movl<text:tab/>k3(%rip), %eax</text:span></text:p>
            <text:p text:style-name="P171"><text:tab/><text:span text:style-name="T37">addl<text:tab/>h3(%rip), %eax</text:span></text:p>
            <text:p text:style-name="P171"><text:tab/>cmpl<text:tab/>$5, %eax</text:p>
            <text:p text:style-name="P171"><text:tab/>jbe<text:tab/>.L39</text:p>
            <text:p text:style-name="P171"><text:tab/>leaq<text:tab/>.LC8(%rip), %rdi</text:p>
            <text:p text:style-name="P171"><text:tab/>call<text:tab/>puts@PLT</text:p>
            <text:p text:style-name="P172">.<text:span text:style-name="T43">L40:</text:span></text:p>
            <text:p text:style-name="P172">...</text:p>
            <text:p text:style-name="P172">...</text:p>
            <text:p text:style-name="P172">...</text:p>
            <text:p text:style-name="P172"/>
            <text:p text:style-name="P172"/>
            <text:p text:style-name="P172"/>
            <text:p text:style-name="P172"/>
            <text:p text:style-name="P172"/>
            <text:p text:style-name="P172"/>
            <text:p text:style-name="P172"/>
            <text:p text:style-name="P172"/>
            <text:p text:style-name="P172"/>
            <text:p text:style-name="P172"/>
            <text:p text:style-name="P172">L39:</text:p>
            <text:p text:style-name="P171"><text:tab/>.cfi_restore_state</text:p>
            <text:p text:style-name="P171"><text:tab/>cltd</text:p>
            <text:p text:style-name="P171"><text:tab/>movq<text:tab/>%rbx, %rsi</text:p>
            <text:p text:style-name="P171"><text:tab/>movl<text:tab/>$2, %edi</text:p>
            <text:p text:style-name="P171"><text:tab/><text:span text:style-name="T37">idivl</text:span><text:tab/>i3(%rip)</text:p>
            <text:p text:style-name="P171"><text:tab/>movl<text:tab/>%eax, %edx</text:p>
            <text:p text:style-name="P171"><text:tab/>movl<text:tab/><text:span text:style-name="T37">%eax</text:span>, m3(%rip)</text:p>
            <text:p text:style-name="P171"><text:tab/>xorl<text:tab/>%eax, %eax</text:p>
            <text:p text:style-name="P171"><text:tab/>call<text:tab/>__printf_chk@PLT</text:p>
            <text:p text:style-name="P171"><text:tab/>movl<text:tab/>k3(%rip), %edx</text:p>
            <text:p text:style-name="P171"><text:tab/>movq<text:tab/>%rbx, %rsi</text:p>
            <text:p text:style-name="P171"><text:tab/>xorl<text:tab/>%eax, %eax</text:p>
            <text:p text:style-name="P171"><text:tab/>addl<text:tab/>h3(%rip), %edx</text:p>
            <text:p text:style-name="P171"><text:tab/>movl<text:tab/>$2, %edi</text:p>
            <text:p text:style-name="P171"><text:tab/>addl<text:tab/>i3(%rip), %edx</text:p>
            <text:p text:style-name="P171"><text:tab/>movl<text:tab/>%edx, g3(%rip)</text:p>
            <text:p text:style-name="P171"><text:tab/>call<text:tab/>__printf_chk@PLT</text:p>
            <text:p text:style-name="P171"><text:tab/>jmp<text:tab/>.L40</text:p>
          </table:table-cell>
        </table:table-row>
      </table:table>
      <text:p text:style-name="P16"/>
      <text:p text:style-name="P19">Под действием оптимизации GCC вынес общее подвыражение в регистр.</text:p>
      <text:p text:style-name="P19"/>
      <text:p text:style-name="P19"><text:span text:style-name="T4"/></text:p>
      <table:table table:name="Таблица42" table:style-name="Таблица42">
        <table:table-column table:style-name="Таблица42.A"/>
        <table:table-column table:style-name="Таблица42.B"/>
        <table:table-row>
          <table:table-cell table:style-name="Таблица42.A1" office:value-type="string">
            <text:p text:style-name="P154"><text:tab/>movl<text:tab/>$0, i4(%rip)</text:p>
            <text:p text:style-name="P154"><text:tab/>jmp<text:tab/>.L14</text:p>
            <text:p text:style-name="P154">.L15:</text:p>
            <text:p text:style-name="P154"><text:tab/><text:span text:style-name="T37">movl<text:tab/>j(%rip), %eax</text:span></text:p>
            <text:p text:style-name="P154"><text:tab/>movl<text:tab/>%eax, %esi</text:p>
            <text:p text:style-name="P154"><text:tab/><text:span text:style-name="T37">movl<text:tab/>k(%rip), %eax</text:span></text:p>
            <text:p text:style-name="P154"><text:tab/><text:span text:style-name="T37">movl<text:tab/>%eax, %edx</text:span></text:p>
            <text:p text:style-name="P154"><text:tab/>movl<text:tab/>i4(%rip), %ecx</text:p>
            <text:p text:style-name="P154"><text:tab/>movl<text:tab/>%esi, %eax</text:p>
            <text:p text:style-name="P154"><text:tab/><text:span text:style-name="T37">imull<text:tab/>%edx, %eax</text:span></text:p>
            <text:p text:style-name="P154"><text:tab/>movl<text:tab/>%eax, %edx</text:p>
            <text:p text:style-name="P154"><text:tab/>movslq<text:tab/>%ecx, %rax</text:p>
            <text:p text:style-name="P154"><text:tab/>leaq<text:tab/>ivector2(%rip), %rcx</text:p>
            <text:p text:style-name="P154"><text:tab/>movb<text:tab/>%dl, (%rax,%rcx)</text:p>
            <text:p text:style-name="P154"><text:tab/>movl<text:tab/>i4(%rip), %eax</text:p>
            <text:p text:style-name="P154"><text:tab/>cltq</text:p>
            <text:p text:style-name="P154"><text:tab/>leaq<text:tab/>ivector2(%rip), %rdx</text:p>
            <text:p text:style-name="P154"><text:tab/>movzbl<text:tab/>(%rax,%rdx), %eax</text:p>
            <text:p text:style-name="P154"><text:tab/>movzbl<text:tab/>%al, %eax</text:p>
            <text:p text:style-name="P154"><text:tab/>movl<text:tab/>%eax, %esi</text:p>
            <text:p text:style-name="P154"><text:tab/>leaq<text:tab/>.LC0(%rip), %rax</text:p>
            <text:p text:style-name="P154"><text:tab/>movq<text:tab/>%rax, %rdi</text:p>
            <text:p text:style-name="P154"><text:tab/>movl<text:tab/>$0, %eax</text:p>
            <text:p text:style-name="P154"><text:tab/>call<text:tab/>printf@PLT</text:p>
            <text:p text:style-name="P154"><text:tab/>movl<text:tab/>i4(%rip), %eax</text:p>
            <text:p text:style-name="P154"><text:tab/>addl<text:tab/>$1, %eax</text:p>
            <text:p text:style-name="P154"><text:tab/>movl<text:tab/>%eax, i4(%rip)</text:p>
            <text:p text:style-name="P154">.L14:</text:p>
            <text:p text:style-name="P154"><text:tab/>movl<text:tab/>i4(%rip), %eax</text:p>
            <text:p text:style-name="P154"><text:tab/>cmpl<text:tab/>$2, %eax</text:p>
            <text:p text:style-name="P154"><text:tab/>jle<text:tab/>.L15</text:p>
          </table:table-cell>
          <table:table-cell table:style-name="Таблица42.A1" office:value-type="string">
            <text:p text:style-name="P111"><text:tab/>for (i4 = 0; i4 &lt;= max_vector; i4++){</text:p>
            <text:p text:style-name="P111"><text:tab/><text:tab/>ivector2[i4] = j * k;</text:p>
            <text:p text:style-name="P111"><text:tab/>printf("%d", ivector2[i4]);</text:p>
            <text:p text:style-name="P111">}</text:p>
          </table:table-cell>
        </table:table-row>
      </table:table>
      <text:p text:style-name="P59"><text:span text:style-name="T23"/></text:p>
      <text:p text:style-name="P188">Заметно, что умножение выполняется на каждой итерации, а инвариантный код из цикла не выносится.</text:p>
      <table:table table:name="Таблица43" table:style-name="Таблица43">
        <table:table-column table:style-name="Таблица43.A"/>
        <table:table-column table:style-name="Таблица43.B"/>
        <table:table-row table:style-name="Таблица43.1">
          <table:table-cell table:style-name="Таблица43.A1" office:value-type="string">
            <text:p text:style-name="P154"><text:tab/>movl<text:tab/>$0, i4(%rip)</text:p>
            <text:p text:style-name="P154"><text:tab/>jmp<text:tab/>.L14</text:p>
            <text:p text:style-name="P154">.L15:</text:p>
            <text:p text:style-name="P154"><text:tab/>movl<text:tab/>j(%rip), %eax</text:p>
            <text:p text:style-name="P154"><text:tab/>movl<text:tab/>%eax, %esi</text:p>
            <text:p text:style-name="P154"><text:tab/>movl<text:tab/>k(%rip), %eax</text:p>
            <text:p text:style-name="P154"><text:tab/>movl<text:tab/>%eax, %edx</text:p>
            <text:p text:style-name="P154"><text:tab/>movl<text:tab/>i4(%rip), %ecx</text:p>
            <text:p text:style-name="P154"><text:tab/>movl<text:tab/>%esi, %eax</text:p>
            <text:p text:style-name="P154"><text:tab/>imull<text:tab/>%edx, %eax</text:p>
            <text:p text:style-name="P154"><text:tab/>movl<text:tab/>%eax, %edx</text:p>
            <text:p text:style-name="P154"><text:tab/>movslq<text:tab/>%ecx, %rax</text:p>
            <text:p text:style-name="P154"><text:tab/>leaq<text:tab/>ivector2(%rip), %rcx</text:p>
            <text:p text:style-name="P154"><text:tab/>movb<text:tab/>%dl, (%rax,%rcx)</text:p>
            <text:p text:style-name="P154"><text:tab/>movl<text:tab/>i4(%rip), %eax</text:p>
            <text:p text:style-name="P154"><text:tab/>cltq</text:p>
            <text:p text:style-name="P154"><text:tab/>leaq<text:tab/>ivector2(%rip), %rdx</text:p>
            <text:p text:style-name="P154"><text:tab/>movzbl<text:tab/>(%rax,%rdx), %eax</text:p>
            <text:p text:style-name="P154"><text:tab/>movzbl<text:tab/>%al, %eax</text:p>
            <text:p text:style-name="P154"><text:tab/>movl<text:tab/>%eax, %esi</text:p>
            <text:p text:style-name="P154"><text:tab/>leaq<text:tab/>.LC0(%rip), %rax</text:p>
            <text:p text:style-name="P154"><text:tab/>movq<text:tab/>%rax, %rdi</text:p>
            <text:p text:style-name="P154"><text:tab/>movl<text:tab/>$0, %eax</text:p>
            <text:p text:style-name="P154"><text:tab/>call<text:tab/>printf@PLT</text:p>
            <text:p text:style-name="P154"><text:tab/>movl<text:tab/>i4(%rip), %eax</text:p>
            <text:p text:style-name="P154"><text:tab/>addl<text:tab/>$1, %eax</text:p>
            <text:p text:style-name="P154"><text:tab/>movl<text:tab/>%eax, i4(%rip)</text:p>
            <text:p text:style-name="P154">.L14:</text:p>
            <text:p text:style-name="P154"><text:tab/>movl<text:tab/>i4(%rip), %eax</text:p>
            <text:p text:style-name="P154"><text:tab/>cmpl<text:tab/>$2, %eax</text:p>
            <text:p text:style-name="P154"><text:tab/>jle<text:tab/>.L15</text:p>
          </table:table-cell>
          <table:table-cell table:style-name="Таблица43.A1" office:value-type="string">
            <text:p text:style-name="P154"><text:tab/>movl<text:tab/>$0, i4(%rip)</text:p>
            <text:p text:style-name="P154"><text:tab/>xorl<text:tab/>%ecx, %ecx</text:p>
            <text:p text:style-name="P154"><text:tab/>leaq<text:tab/>ivector2(%rip), %rbp</text:p>
            <text:p text:style-name="P154"><text:tab/>.p2align 4,,10</text:p>
            <text:p text:style-name="P154"><text:tab/>.p2align 3</text:p>
            <text:p text:style-name="P154">.L41:</text:p>
            <text:p text:style-name="P154"><text:tab/>movzbl<text:tab/>j(%rip), %eax</text:p>
            <text:p text:style-name="P154"><text:tab/>movslq<text:tab/>%ecx, %rcx</text:p>
            <text:p text:style-name="P154"><text:tab/>movq<text:tab/>%rbx, %rsi</text:p>
            <text:p text:style-name="P154"><text:tab/>movl<text:tab/>$2, %edi</text:p>
            <text:p text:style-name="P154"><text:tab/><text:span text:style-name="T37">mulb<text:tab/>k(%rip)</text:span></text:p>
            <text:p text:style-name="P154"><text:tab/>movb<text:tab/>%al, 0(%rbp,%rcx)</text:p>
            <text:p text:style-name="P154"><text:tab/>movzbl<text:tab/>%al, %edx</text:p>
            <text:p text:style-name="P154"><text:tab/>xorl<text:tab/>%eax, %eax</text:p>
            <text:p text:style-name="P154"><text:tab/>call<text:tab/>__printf_chk@PLT</text:p>
            <text:p text:style-name="P154"><text:tab/>movl<text:tab/>i4(%rip), %eax</text:p>
            <text:p text:style-name="P154"><text:tab/>leal<text:tab/>1(%rax), %ecx</text:p>
            <text:p text:style-name="P154"><text:tab/>movl<text:tab/>%ecx, i4(%rip)</text:p>
            <text:p text:style-name="P154"><text:tab/>cmpl<text:tab/>$2, %ecx</text:p>
            <text:p text:style-name="P154"><text:tab/>jle<text:tab/>.L41</text:p>
          </table:table-cell>
        </table:table-row>
      </table:table>
      <text:p text:style-name="P93"><text:span text:style-name="T23"/></text:p>
      <text:p text:style-name="P191">Даже при оптимизации, нацеленной на скорость, инвариантный код остаётся внутри цикла.</text:p>
      <text:p text:style-name="P62"><text:span text:style-name="T23"/></text:p>
      <table:table table:name="Таблица44" table:style-name="Таблица44">
        <table:table-column table:style-name="Таблица44.A"/>
        <table:table-column table:style-name="Таблица44.B"/>
        <table:table-row>
          <table:table-cell table:style-name="Таблица44.A1" office:value-type="string">
            <text:p text:style-name="P154">dead_code:</text:p>
            <text:p text:style-name="P154">.LFB1:</text:p>
            <text:p text:style-name="P154"><text:tab/>.cfi_startproc</text:p>
            <text:p text:style-name="P154"><text:tab/>endbr64</text:p>
            <text:p text:style-name="P154"><text:tab/>pushq<text:tab/>%rbp</text:p>
            <text:p text:style-name="P154"><text:tab/>.cfi_def_cfa_offset 16</text:p>
            <text:p text:style-name="P154"><text:tab/>.cfi_offset 6, -16</text:p>
            <text:p text:style-name="P154"><text:tab/>movq<text:tab/>%rsp, %rbp</text:p>
            <text:p text:style-name="P154"><text:tab/>.cfi_def_cfa_register 6</text:p>
            <text:p text:style-name="P154"><text:tab/>movl<text:tab/>%edi, -20(%rbp)</text:p>
            <text:p text:style-name="P154"><text:tab/>movq<text:tab/>%rsi, -32(%rbp)</text:p>
            <text:p text:style-name="P154"><text:tab/>movl<text:tab/>-20(%rbp), %eax</text:p>
            <text:p text:style-name="P154"><text:tab/>movl<text:tab/>%eax, -4(%rbp)</text:p>
            <text:p text:style-name="P154"><text:tab/>nop</text:p>
            <text:p text:style-name="P154"><text:tab/>popq<text:tab/>%rbp</text:p>
            <text:p text:style-name="P154"><text:tab/>.cfi_def_cfa 7, 8</text:p>
            <text:p text:style-name="P154"><text:tab/>ret</text:p>
          </table:table-cell>
          <table:table-cell table:style-name="Таблица44.A1" office:value-type="string">
            <text:p text:style-name="P111">void dead_code(int a,</text:p>
            <text:p text:style-name="P111"><text:tab/>char *b)</text:p>
            <text:p text:style-name="P111">{</text:p>
            <text:p text:style-name="P111"><text:tab/>int idead_store;</text:p>
            <text:p text:style-name="P111"/>
            <text:p text:style-name="P111"><text:tab/>idead_store = a;</text:p>
            <text:p text:style-name="P111"><text:tab/>if (0)</text:p>
            <text:p text:style-name="P111"><text:tab/><text:tab/>printf("%s\n", b);</text:p>
            <text:p text:style-name="P111">}</text:p>
          </table:table-cell>
        </table:table-row>
      </table:table>
      <text:p text:style-name="P62"><text:span text:style-name="T23"/></text:p>
      <text:p text:style-name="P191">При выключенной оптимизации компилятор создал функцию непосредственно, а при включённой - функция получилась пустой, без недостижимых фрагментов и избыточных присваиваний.</text:p>
      <table:table table:name="Таблица45" table:style-name="Таблица45">
        <table:table-column table:style-name="Таблица45.A"/>
        <table:table-column table:style-name="Таблица45.B"/>
        <table:table-row table:style-name="Таблица45.1">
          <table:table-cell table:style-name="Таблица45.A1" office:value-type="string">
            <text:p text:style-name="P154">unnecessary_loop:</text:p>
            <text:p text:style-name="P154">.LFB2:</text:p>
            <text:p text:style-name="P154"><text:tab/>.cfi_startproc</text:p>
            <text:p text:style-name="P154"><text:tab/>endbr64</text:p>
            <text:p text:style-name="P154"><text:tab/>pushq<text:tab/>%rbp</text:p>
            <text:p text:style-name="P154"><text:tab/>.cfi_def_cfa_offset 16</text:p>
            <text:p text:style-name="P154"><text:tab/>.cfi_offset 6, -16</text:p>
            <text:p text:style-name="P154"><text:tab/>movq<text:tab/>%rsp, %rbp</text:p>
            <text:p text:style-name="P154"><text:tab/>.cfi_def_cfa_register 6</text:p>
            <text:p text:style-name="P154"><text:tab/>subq<text:tab/>$16, %rsp</text:p>
            <text:p text:style-name="P154"><text:tab/>movl<text:tab/>$0, -4(%rbp)</text:p>
            <text:p text:style-name="P154"><text:tab/>movl<text:tab/>$0, i(%rip)</text:p>
            <text:p text:style-name="P154"><text:tab/>jmp<text:tab/>.L19</text:p>
            <text:p text:style-name="P154">.L20:</text:p>
            <text:p text:style-name="P154"><text:tab/>movl<text:tab/>j5(%rip), %edx</text:p>
            <text:p text:style-name="P154"><text:tab/>movl<text:tab/>-4(%rbp), %eax</text:p>
            <text:p text:style-name="P154"><text:tab/>addl<text:tab/>%edx, %eax</text:p>
            <text:p text:style-name="P154"><text:tab/>movl<text:tab/>%eax, k5(%rip)</text:p>
            <text:p text:style-name="P154"><text:tab/>movl<text:tab/>i(%rip), %eax</text:p>
            <text:p text:style-name="P154"><text:tab/>addl<text:tab/>$1, %eax</text:p>
            <text:p text:style-name="P154"><text:tab/>movl<text:tab/>%eax, i(%rip)</text:p>
            <text:p text:style-name="P154">.L19:</text:p>
            <text:p text:style-name="P154"><text:tab/>movl<text:tab/>i(%rip), %eax</text:p>
            <text:p text:style-name="P154"><text:tab/>cmpl<text:tab/>$4, %eax</text:p>
            <text:p text:style-name="P154"><text:tab/>jle<text:tab/>.L20</text:p>
            <text:p text:style-name="P154"><text:tab/>movl<text:tab/>k5(%rip), %eax</text:p>
            <text:p text:style-name="P154"><text:tab/>movl<text:tab/>%eax, %esi</text:p>
            <text:p text:style-name="P154"><text:tab/>leaq<text:tab/>.LC0(%rip), %rax</text:p>
            <text:p text:style-name="P154"><text:tab/>movq<text:tab/>%rax, %rdi</text:p>
            <text:p text:style-name="P154"><text:tab/>movl<text:tab/>$0, %eax</text:p>
            <text:p text:style-name="P154"><text:tab/>call<text:tab/>printf@PLT</text:p>
            <text:p text:style-name="P154"><text:tab/>nop</text:p>
            <text:p text:style-name="P154"><text:tab/>leave</text:p>
            <text:p text:style-name="P154"><text:tab/>.cfi_def_cfa 7, 8</text:p>
            <text:p text:style-name="P154"><text:tab/>ret</text:p>
          </table:table-cell>
          <table:table-cell table:style-name="Таблица45.A1" office:value-type="string">
            <text:p text:style-name="P111">void unnecessary_loop()</text:p>
            <text:p text:style-name="P111">{</text:p>
            <text:p text:style-name="P111"><text:tab/>int x;</text:p>
            <text:p text:style-name="P111"/>
            <text:p text:style-name="P111"><text:tab/>x = 0;</text:p>
            <text:p text:style-name="P111"><text:tab/>for (i = 0; i &lt; 5; i++)</text:p>
            <text:p text:style-name="P111"><text:tab/><text:tab/>k5 = x + j5;</text:p>
            <text:p text:style-name="P111"><text:tab/>printf("%d", k5);</text:p>
            <text:p text:style-name="P111">}</text:p>
          </table:table-cell>
        </table:table-row>
      </table:table>
      <text:p text:style-name="P66"><text:span text:style-name="T23"/></text:p>
      <text:p text:style-name="P194">Без оптимизации цикл остался</text:p>
      <text:p text:style-name="P66"><text:span text:style-name="T23"/></text:p>
      <table:table table:name="Таблица46" table:style-name="Таблица46">
        <table:table-column table:style-name="Таблица46.A"/>
        <table:table-column table:style-name="Таблица46.B"/>
        <table:table-row>
          <table:table-cell table:style-name="Таблица46.A1" office:value-type="string">
            <text:p text:style-name="P154">unnecessary_loop:</text:p>
            <text:p text:style-name="P154">.LFB2:</text:p>
            <text:p text:style-name="P154"><text:tab/>.cfi_startproc</text:p>
            <text:p text:style-name="P154"><text:tab/>endbr64</text:p>
            <text:p text:style-name="P154"><text:tab/>pushq<text:tab/>%rbp</text:p>
            <text:p text:style-name="P154"><text:tab/>.cfi_def_cfa_offset 16</text:p>
            <text:p text:style-name="P154"><text:tab/>.cfi_offset 6, -16</text:p>
            <text:p text:style-name="P154"><text:tab/>movq<text:tab/>%rsp, %rbp</text:p>
            <text:p text:style-name="P154"><text:tab/>.cfi_def_cfa_register 6</text:p>
            <text:p text:style-name="P154"><text:tab/>subq<text:tab/>$16, %rsp</text:p>
            <text:p text:style-name="P154"><text:tab/>movl<text:tab/>$0, -4(%rbp)</text:p>
            <text:p text:style-name="P154"><text:tab/>movl<text:tab/>$0, i(%rip)</text:p>
            <text:p text:style-name="P154"><text:tab/>jmp<text:tab/>.L19</text:p>
            <text:p text:style-name="P154">.L20:</text:p>
            <text:p text:style-name="P154"><text:tab/>movl<text:tab/>j5(%rip), %edx</text:p>
            <text:p text:style-name="P154"><text:tab/>movl<text:tab/>-4(%rbp), %eax</text:p>
            <text:p text:style-name="P154"><text:tab/>addl<text:tab/>%edx, %eax</text:p>
            <text:p text:style-name="P154"><text:tab/>movl<text:tab/>%eax, k5(%rip)</text:p>
            <text:p text:style-name="P154"><text:tab/>movl<text:tab/>i(%rip), %eax</text:p>
            <text:p text:style-name="P154"><text:tab/>addl<text:tab/>$1, %eax</text:p>
            <text:p text:style-name="P154"><text:tab/>movl<text:tab/>%eax, i(%rip)</text:p>
            <text:p text:style-name="P154">.L19:</text:p>
            <text:p text:style-name="P154"><text:tab/>movl<text:tab/>i(%rip), %eax</text:p>
            <text:p text:style-name="P154"><text:soft-page-break/><text:tab/>cmpl<text:tab/>$4, %eax</text:p>
            <text:p text:style-name="P154"><text:tab/>jle<text:tab/>.L20</text:p>
            <text:p text:style-name="P154"><text:tab/>movl<text:tab/>k5(%rip), %eax</text:p>
            <text:p text:style-name="P154"><text:tab/>movl<text:tab/>%eax, %esi</text:p>
            <text:p text:style-name="P154"><text:tab/>leaq<text:tab/>.LC0(%rip), %rax</text:p>
            <text:p text:style-name="P154"><text:tab/>movq<text:tab/>%rax, %rdi</text:p>
            <text:p text:style-name="P154"><text:tab/>movl<text:tab/>$0, %eax</text:p>
            <text:p text:style-name="P154"><text:tab/>call<text:tab/>printf@PLT</text:p>
            <text:p text:style-name="P154"><text:tab/>nop</text:p>
            <text:p text:style-name="P154"><text:tab/>leave</text:p>
            <text:p text:style-name="P154"><text:tab/>.cfi_def_cfa 7, 8</text:p>
            <text:p text:style-name="P154"><text:tab/>ret</text:p>
          </table:table-cell>
          <table:table-cell table:style-name="Таблица46.A1" office:value-type="string">
            <text:p text:style-name="P154">unnecessary_loop:</text:p>
            <text:p text:style-name="P154">.LFB39:</text:p>
            <text:p text:style-name="P154"><text:tab/>.cfi_startproc</text:p>
            <text:p text:style-name="P154"><text:tab/>endbr64</text:p>
            <text:p text:style-name="P154"><text:tab/>movl<text:tab/>j5(%rip), %edx</text:p>
            <text:p text:style-name="P154"><text:tab/>leaq<text:tab/>.LC0(%rip), %rsi</text:p>
            <text:p text:style-name="P154"><text:tab/>movl<text:tab/>$2, %edi</text:p>
            <text:p text:style-name="P154"><text:tab/>xorl<text:tab/>%eax, %eax</text:p>
            <text:p text:style-name="P154"><text:tab/>movl<text:tab/>$5, i(%rip)</text:p>
            <text:p text:style-name="P154"><text:tab/>movl<text:tab/>%edx, k5(%rip)</text:p>
            <text:p text:style-name="P154"><text:tab/>jmp<text:tab/>__printf_chk@PLT</text:p>
            <text:p text:style-name="P154"><text:tab/>.cfi_endproc</text:p>
          </table:table-cell>
        </table:table-row>
      </table:table>
      <text:p text:style-name="P66"><text:span text:style-name="T23"/></text:p>
      <text:p text:style-name="P194">При оптимизации цикл был удалён</text:p>
      <text:p text:style-name="P66"><text:span text:style-name="T23"/></text:p>
      <text:p text:style-name="P66"><text:span text:style-name="T23"/></text:p>
      <table:table table:name="Таблица47" table:style-name="Таблица47">
        <table:table-column table:style-name="Таблица47.A"/>
        <table:table-column table:style-name="Таблица47.B"/>
        <table:table-row>
          <table:table-cell table:style-name="Таблица47.A1" office:value-type="string">
            <text:p text:style-name="P154">loop_jamming:</text:p>
            <text:p text:style-name="P154">.LFB3:</text:p>
            <text:p text:style-name="P154"><text:tab/>.cfi_startproc</text:p>
            <text:p text:style-name="P154"><text:tab/>endbr64</text:p>
            <text:p text:style-name="P154"><text:tab/>pushq<text:tab/>%rbp</text:p>
            <text:p text:style-name="P154"><text:tab/>.cfi_def_cfa_offset 16</text:p>
            <text:p text:style-name="P154"><text:tab/>.cfi_offset 6, -16</text:p>
            <text:p text:style-name="P154"><text:tab/>movq<text:tab/>%rsp, %rbp</text:p>
            <text:p text:style-name="P154"><text:tab/>.cfi_def_cfa_register 6</text:p>
            <text:p text:style-name="P154"><text:tab/>subq<text:tab/>$16, %rsp</text:p>
            <text:p text:style-name="P154"><text:tab/>movl<text:tab/>%edi, -4(%rbp)</text:p>
            <text:p text:style-name="P154"><text:tab/>movl<text:tab/>$0, i(%rip)</text:p>
            <text:p text:style-name="P154"><text:tab/>jmp<text:tab/>.L22</text:p>
            <text:p text:style-name="P154">.L23:</text:p>
            <text:p text:style-name="P154"><text:tab/>movl<text:tab/>j5(%rip), %edx</text:p>
            <text:p text:style-name="P154"><text:tab/>movl<text:tab/>i(%rip), %eax</text:p>
            <text:p text:style-name="P154"><text:tab/>imull<text:tab/>%eax, %edx</text:p>
            <text:p text:style-name="P154"><text:tab/>movl<text:tab/>-4(%rbp), %eax</text:p>
            <text:p text:style-name="P154"><text:tab/>addl<text:tab/>%edx, %eax</text:p>
            <text:p text:style-name="P154"><text:tab/>movl<text:tab/>%eax, k5(%rip)</text:p>
            <text:p text:style-name="P154"><text:tab/>movl<text:tab/>k5(%rip), %eax</text:p>
            <text:p text:style-name="P154"><text:tab/>movl<text:tab/>%eax, %esi</text:p>
            <text:p text:style-name="P154"><text:tab/>leaq<text:tab/>.LC0(%rip), %rax</text:p>
            <text:p text:style-name="P154"><text:tab/>movq<text:tab/>%rax, %rdi</text:p>
            <text:p text:style-name="P154"><text:tab/>movl<text:tab/>$0, %eax</text:p>
            <text:p text:style-name="P154"><text:tab/>call<text:tab/>printf@PLT</text:p>
            <text:p text:style-name="P154"><text:tab/>movl<text:tab/>i(%rip), %eax</text:p>
            <text:p text:style-name="P154"><text:tab/>addl<text:tab/>$1, %eax</text:p>
            <text:p text:style-name="P154"><text:tab/>movl<text:tab/>%eax, i(%rip)</text:p>
            <text:p text:style-name="P154">.L22:</text:p>
            <text:p text:style-name="P154"><text:tab/>movl<text:tab/>i(%rip), %eax</text:p>
            <text:p text:style-name="P154"><text:tab/>cmpl<text:tab/>$4, %eax</text:p>
            <text:p text:style-name="P154"><text:tab/>jle<text:tab/>.L23</text:p>
            <text:p text:style-name="P154"><text:tab/>movl<text:tab/>$0, i(%rip)</text:p>
            <text:p text:style-name="P154"><text:tab/>jmp<text:tab/>.L24</text:p>
            <text:p text:style-name="P154">.L25:</text:p>
            <text:p text:style-name="P154"><text:tab/>movl<text:tab/>k5(%rip), %eax</text:p>
            <text:p text:style-name="P154"><text:tab/>imull<text:tab/>-4(%rbp), %eax</text:p>
            <text:p text:style-name="P154"><text:tab/>movl<text:tab/>%eax, %edx</text:p>
            <text:p text:style-name="P154"><text:tab/>movl<text:tab/>i(%rip), %eax</text:p>
            <text:p text:style-name="P154"><text:tab/>imull<text:tab/>%edx, %eax</text:p>
            <text:p text:style-name="P154"><text:tab/>movl<text:tab/>%eax, i5(%rip)</text:p>
            <text:p text:style-name="P154"><text:tab/>movl<text:tab/>k5(%rip), %eax</text:p>
            <text:p text:style-name="P154"><text:tab/>movl<text:tab/>%eax, %esi</text:p>
            <text:p text:style-name="P154"><text:tab/>leaq<text:tab/>.LC0(%rip), %rax</text:p>
            <text:p text:style-name="P154"><text:tab/>movq<text:tab/>%rax, %rdi</text:p>
            <text:p text:style-name="P154"><text:tab/>movl<text:tab/>$0, %eax</text:p>
            <text:p text:style-name="P154"><text:tab/>call<text:tab/>printf@PLT</text:p>
            <text:p text:style-name="P154"><text:tab/>movl<text:tab/>i(%rip), %eax</text:p>
            <text:p text:style-name="P154"><text:tab/>addl<text:tab/>$1, %eax</text:p>
            <text:p text:style-name="P154"><text:tab/>movl<text:tab/>%eax, i(%rip)</text:p>
            <text:p text:style-name="P154">.L24:</text:p>
            <text:p text:style-name="P154"><text:tab/>movl<text:tab/>i(%rip), %eax</text:p>
            <text:p text:style-name="P154"><text:tab/>cmpl<text:tab/>$4, %eax</text:p>
            <text:p text:style-name="P154"><text:tab/>jle<text:tab/>.L25</text:p>
            <text:p text:style-name="P154"><text:tab/>nop</text:p>
            <text:p text:style-name="P154"><text:tab/>nop</text:p>
            <text:p text:style-name="P154"><text:tab/>leave</text:p>
            <text:p text:style-name="P154"><text:tab/>.cfi_def_cfa 7, 8</text:p>
            <text:p text:style-name="P154"><text:tab/>ret</text:p>
            <text:p text:style-name="P154"><text:tab/>.cfi_endproc</text:p>
          </table:table-cell>
          <table:table-cell table:style-name="Таблица47.A1" office:value-type="string">
            <text:p text:style-name="P111">void loop_jamming(int x)</text:p>
            <text:p text:style-name="P111">{</text:p>
            <text:p text:style-name="P111"><text:tab/>for (i = 0; i &lt; 5; i++) {</text:p>
            <text:p text:style-name="P111"><text:tab/><text:tab/>k5 = x + j5 * i;</text:p>
            <text:p text:style-name="P111"/>
            <text:p text:style-name="P111"><text:tab/><text:tab/>printf("%d", k5);</text:p>
            <text:p text:style-name="P111"><text:tab/>}</text:p>
            <text:p text:style-name="P111"><text:tab/>for (i = 0; i &lt; 5; i++) {</text:p>
            <text:p text:style-name="P111"><text:tab/><text:tab/>i5 = x * k5 * i;</text:p>
            <text:p text:style-name="P111"><text:tab/><text:tab/>printf("%d", k5);</text:p>
            <text:p text:style-name="P111"><text:tab/>}</text:p>
            <text:p text:style-name="P111">}</text:p>
          </table:table-cell>
        </table:table-row>
      </table:table>
      <text:p text:style-name="P69"><text:span text:style-name="T23"/></text:p>
      <text:p text:style-name="P70"><text:span text:style-name="T23">При </text:span><text:span text:style-name="T28">отсутствии</text:span><text:span text:style-name="T23"> оптимизации сгенерировано два цикла.</text:span></text:p>
      <text:p text:style-name="P69"/>
      <table:table table:name="Таблица48" table:style-name="Таблица48">
        <table:table-column table:style-name="Таблица48.A"/>
        <table:table-column table:style-name="Таблица48.B"/>
        <table:table-row table:style-name="Таблица48.1">
          <table:table-cell table:style-name="Таблица48.A1" office:value-type="string">
            <text:p text:style-name="P154">loop_jamming: <text:s text:c="26"/># @loop_jamming</text:p>
            <text:p text:style-name="P154"><text:tab/>.cfi_startproc</text:p>
            <text:p text:style-name="P154"># %bb.0:</text:p>
            <text:p text:style-name="P154"><text:tab/>pushq<text:tab/>%rbp</text:p>
            <text:p text:style-name="P154"><text:tab/>.cfi_def_cfa_offset 16</text:p>
            <text:p text:style-name="P154"><text:tab/>.cfi_offset %rbp, -16</text:p>
            <text:p text:style-name="P154"><text:tab/>movq<text:tab/>%rsp, %rbp</text:p>
            <text:p text:style-name="P154"><text:tab/>.cfi_def_cfa_register %rbp</text:p>
            <text:p text:style-name="P154"><text:tab/>subq<text:tab/>$16, %rsp</text:p>
            <text:p text:style-name="P154"><text:tab/>movl<text:tab/>%edi, -4(%rbp)</text:p>
            <text:p text:style-name="P154"><text:tab/>movl<text:tab/>$0, i(%rip)</text:p>
            <text:p text:style-name="P154">.LBB3_1: </text:p>
            <text:p text:style-name="P154"><text:tab/>cmpl<text:tab/>$5, i(%rip)</text:p>
            <text:p text:style-name="P154"><text:tab/>jge<text:tab/>.LBB3_4</text:p>
            <text:p text:style-name="P154"># %bb.2: <text:s text:c="2"/></text:p>
            <text:p text:style-name="P154"><text:tab/>movl<text:tab/>-4(%rbp), %eax</text:p>
            <text:p text:style-name="P154"><text:tab/>movl<text:tab/>j5(%rip), %ecx</text:p>
            <text:p text:style-name="P154"><text:tab/>imull<text:tab/>i(%rip), %ecx</text:p>
            <text:p text:style-name="P154"><text:tab/>addl<text:tab/>%ecx, %eax</text:p>
            <text:p text:style-name="P154"><text:tab/>movl<text:tab/>%eax, k5(%rip)</text:p>
            <text:p text:style-name="P154"><text:tab/>movl<text:tab/>k5(%rip), %esi</text:p>
            <text:p text:style-name="P154"><text:tab/>leaq<text:tab/>.L.str(%rip), %rdi</text:p>
            <text:p text:style-name="P154"><text:tab/>movb<text:tab/>$0, %al</text:p>
            <text:p text:style-name="P154"><text:tab/>callq<text:tab/>printf@PLT</text:p>
            <text:p text:style-name="P154"># %bb.3:</text:p>
            <text:p text:style-name="P154"><text:tab/>movl<text:tab/>i(%rip), %eax</text:p>
            <text:p text:style-name="P154"><text:tab/>addl<text:tab/>$1, %eax</text:p>
            <text:p text:style-name="P154"><text:tab/>movl<text:tab/>%eax, i(%rip)</text:p>
            <text:p text:style-name="P154"><text:tab/>jmp<text:tab/>.LBB3_1</text:p>
            <text:p text:style-name="P154">.LBB3_4:</text:p>
            <text:p text:style-name="P154"><text:tab/>movl<text:tab/>$0, i(%rip)</text:p>
            <text:p text:style-name="P154">.LBB3_5: <text:s text:c="9"/></text:p>
            <text:p text:style-name="P154"><text:tab/>cmpl<text:tab/>$5, i(%rip)</text:p>
            <text:p text:style-name="P154"><text:tab/>jge<text:tab/>.LBB3_8</text:p>
            <text:p text:style-name="P154"># %bb.6: <text:s text:c="6"/></text:p>
            <text:p text:style-name="P154"><text:tab/>movl<text:tab/>-4(%rbp), %eax</text:p>
            <text:p text:style-name="P154"><text:tab/>imull<text:tab/>k5(%rip), %eax</text:p>
            <text:p text:style-name="P154"><text:tab/>imull<text:tab/>i(%rip), %eax</text:p>
            <text:p text:style-name="P154"><text:tab/>movl<text:tab/>%eax, i5(%rip)</text:p>
            <text:p text:style-name="P154"><text:tab/>movl<text:tab/>k5(%rip), %esi</text:p>
            <text:p text:style-name="P154"><text:tab/>leaq<text:tab/>.L.str(%rip), %rdi</text:p>
            <text:p text:style-name="P154"><text:tab/>movb<text:tab/>$0, %al</text:p>
            <text:p text:style-name="P154"><text:tab/>callq<text:tab/>printf@PLT</text:p>
            <text:p text:style-name="P154"># %bb.7: <text:s text:c="2"/></text:p>
            <text:p text:style-name="P154"><text:tab/>movl<text:tab/>i(%rip), %eax</text:p>
            <text:p text:style-name="P154"><text:tab/>addl<text:tab/>$1, %eax</text:p>
            <text:p text:style-name="P154"><text:tab/>movl<text:tab/>%eax, i(%rip)</text:p>
            <text:p text:style-name="P154"><text:tab/>jmp<text:tab/>.LBB3_5</text:p>
            <text:p text:style-name="P154">.LBB3_8:</text:p>
            <text:p text:style-name="P154"><text:tab/>addq<text:tab/>$16, %rsp</text:p>
            <text:p text:style-name="P154"><text:tab/>popq<text:tab/>%rbp</text:p>
            <text:p text:style-name="P154"><text:tab/>.cfi_def_cfa %rsp, 8</text:p>
            <text:p text:style-name="P154"><text:tab/>retq</text:p>
          </table:table-cell>
          <table:table-cell table:style-name="Таблица48.A1" office:value-type="string">
            <text:p text:style-name="P154">loop_jamming:</text:p>
            <text:p text:style-name="P154">.LFB40:</text:p>
            <text:p text:style-name="P154"><text:tab/>.cfi_startproc</text:p>
            <text:p text:style-name="P154"><text:tab/>endbr64</text:p>
            <text:p text:style-name="P154"><text:tab/>pushq<text:tab/>%rbp</text:p>
            <text:p text:style-name="P154"><text:tab/>.cfi_def_cfa_offset 16</text:p>
            <text:p text:style-name="P154"><text:tab/>.cfi_offset 6, -16</text:p>
            <text:p text:style-name="P154"><text:tab/>xorl<text:tab/>%edx, %edx</text:p>
            <text:p text:style-name="P154"><text:tab/>leaq<text:tab/>.LC0(%rip), %rbp</text:p>
            <text:p text:style-name="P154"><text:tab/>pushq<text:tab/>%rbx</text:p>
            <text:p text:style-name="P154"><text:tab/>.cfi_def_cfa_offset 24</text:p>
            <text:p text:style-name="P154"><text:tab/>.cfi_offset 3, -24</text:p>
            <text:p text:style-name="P154"><text:tab/>movl<text:tab/>%edi, %ebx</text:p>
            <text:p text:style-name="P154"><text:tab/>subq<text:tab/>$8, %rsp</text:p>
            <text:p text:style-name="P154"><text:tab/>.cfi_def_cfa_offset 32</text:p>
            <text:p text:style-name="P154"><text:tab/>movl<text:tab/>$0, i(%rip)</text:p>
            <text:p text:style-name="P154"><text:tab/>.p2align 4,,10</text:p>
            <text:p text:style-name="P154"><text:tab/>.p2align 3</text:p>
            <text:p text:style-name="P154">.L5:</text:p>
            <text:p text:style-name="P154"><text:tab/>imull<text:tab/>j5(%rip), %edx</text:p>
            <text:p text:style-name="P154"><text:tab/>movq<text:tab/>%rbp, %rsi</text:p>
            <text:p text:style-name="P154"><text:tab/>movl<text:tab/>$2, %edi</text:p>
            <text:p text:style-name="P154"><text:tab/>xorl<text:tab/>%eax, %eax</text:p>
            <text:p text:style-name="P154"><text:tab/>addl<text:tab/>%ebx, %edx</text:p>
            <text:p text:style-name="P154"><text:tab/>movl<text:tab/>%edx, k5(%rip)</text:p>
            <text:p text:style-name="P154"><text:tab/>call<text:tab/>__printf_chk@PLT</text:p>
            <text:p text:style-name="P154"><text:tab/>movl<text:tab/>i(%rip), %eax</text:p>
            <text:p text:style-name="P154"><text:tab/>leal<text:tab/>1(%rax), %edx</text:p>
            <text:p text:style-name="P154"><text:tab/>movl<text:tab/>%edx, i(%rip)</text:p>
            <text:p text:style-name="P154"><text:tab/>cmpl<text:tab/>$4, %edx</text:p>
            <text:p text:style-name="P154"><text:tab/>jle<text:tab/>.L5</text:p>
            <text:p text:style-name="P154"><text:tab/>movl<text:tab/>$0, i(%rip)</text:p>
            <text:p text:style-name="P154"><text:tab/>xorl<text:tab/>%eax, %eax</text:p>
            <text:p text:style-name="P154"><text:tab/>.p2align 4,,10</text:p>
            <text:p text:style-name="P154"><text:tab/>.p2align 3</text:p>
            <text:p text:style-name="P154">.L6:</text:p>
            <text:p text:style-name="P154"><text:tab/>movl<text:tab/>k5(%rip), %ecx</text:p>
            <text:p text:style-name="P154"><text:tab/>movq<text:tab/>%rbp, %rsi</text:p>
            <text:p text:style-name="P154"><text:tab/>movl<text:tab/>$2, %edi</text:p>
            <text:p text:style-name="P154"><text:tab/>movl<text:tab/>%ecx, %edx</text:p>
            <text:p text:style-name="P154"><text:tab/>imull<text:tab/>%ebx, %edx</text:p>
            <text:p text:style-name="P154"><text:tab/>imull<text:tab/>%edx, %eax</text:p>
            <text:p text:style-name="P154"><text:tab/>movl<text:tab/>%ecx, %edx</text:p>
            <text:p text:style-name="P154"><text:tab/>movl<text:tab/>%eax, i5(%rip)</text:p>
            <text:p text:style-name="P154"><text:tab/>xorl<text:tab/>%eax, %eax</text:p>
            <text:p text:style-name="P154"><text:tab/>call<text:tab/>__printf_chk@PLT</text:p>
            <text:p text:style-name="P154"><text:tab/>movl<text:tab/>i(%rip), %eax</text:p>
            <text:p text:style-name="P154"><text:tab/>addl<text:tab/>$1, %eax</text:p>
            <text:p text:style-name="P154"><text:tab/>movl<text:tab/>%eax, i(%rip)</text:p>
            <text:p text:style-name="P154"><text:tab/>cmpl<text:tab/>$4, %eax</text:p>
            <text:p text:style-name="P154"><text:tab/>jle<text:tab/>.L6</text:p>
            <text:p text:style-name="P154"><text:tab/>addq<text:tab/>$8, %rsp</text:p>
            <text:p text:style-name="P154"><text:tab/>.cfi_def_cfa_offset 24</text:p>
            <text:p text:style-name="P154"><text:tab/>popq<text:tab/>%rbx</text:p>
            <text:p text:style-name="P154"><text:tab/>.cfi_def_cfa_offset 16</text:p>
            <text:p text:style-name="P154"><text:tab/>popq<text:tab/>%rbp</text:p>
            <text:p text:style-name="P154"><text:tab/>.cfi_def_cfa_offset 8</text:p>
            <text:p text:style-name="P154"><text:tab/>ret</text:p>
            <text:p text:style-name="P154"><text:tab/>.cfi_endproc</text:p>
          </table:table-cell>
        </table:table-row>
      </table:table>
      <text:p text:style-name="P69"><text:span text:style-name="T23"/></text:p>
      <text:p text:style-name="P69"><text:soft-page-break/><text:span text:style-name="T27">Даже при оптимизации слияние циклов не выполнилось: отчётливо различимы два цикла с метками .L5 и .L6</text:span></text:p>
      <table:table table:name="Таблица49" table:style-name="Таблица49">
        <table:table-column table:style-name="Таблица49.A"/>
        <table:table-column table:style-name="Таблица49.B"/>
        <table:table-row>
          <table:table-cell table:style-name="Таблица49.A1" office:value-type="string">
            <text:p text:style-name="P154">loop_unrolling:</text:p>
            <text:p text:style-name="P154">.LFB4:</text:p>
            <text:p text:style-name="P154"><text:tab/>.cfi_startproc</text:p>
            <text:p text:style-name="P154"><text:tab/>endbr64</text:p>
            <text:p text:style-name="P154"><text:tab/>pushq<text:tab/>%rbp</text:p>
            <text:p text:style-name="P154"><text:tab/>.cfi_def_cfa_offset 16</text:p>
            <text:p text:style-name="P154"><text:tab/>.cfi_offset 6, -16</text:p>
            <text:p text:style-name="P154"><text:tab/>movq<text:tab/>%rsp, %rbp</text:p>
            <text:p text:style-name="P154"><text:tab/>.cfi_def_cfa_register 6</text:p>
            <text:p text:style-name="P154"><text:tab/>subq<text:tab/>$16, %rsp</text:p>
            <text:p text:style-name="P154"><text:tab/>movl<text:tab/>%edi, -4(%rbp)</text:p>
            <text:p text:style-name="P154"><text:tab/>movl<text:tab/>$0, i(%rip)</text:p>
            <text:p text:style-name="P154"><text:tab/>jmp<text:tab/>.L27</text:p>
            <text:p text:style-name="P154">.L28:</text:p>
            <text:p text:style-name="P154"><text:tab/>movl<text:tab/>i(%rip), %eax</text:p>
            <text:p text:style-name="P154"><text:tab/>cltq</text:p>
            <text:p text:style-name="P154"><text:tab/>leaq<text:tab/>(%rax,%rax), %rdx</text:p>
            <text:p text:style-name="P154"><text:tab/>leaq<text:tab/>ivector4(%rip), %rax</text:p>
            <text:p text:style-name="P154"><text:tab/>movw<text:tab/>$0, (%rdx,%rax)</text:p>
            <text:p text:style-name="P154"><text:tab/>movl<text:tab/>i(%rip), %eax</text:p>
            <text:p text:style-name="P154"><text:tab/>cltq</text:p>
            <text:p text:style-name="P154"><text:tab/>leaq<text:tab/>(%rax,%rax), %rdx</text:p>
            <text:p text:style-name="P154"><text:tab/>leaq<text:tab/>ivector4(%rip), %rax</text:p>
            <text:p text:style-name="P154"><text:tab/>movzwl<text:tab/>(%rdx,%rax), %eax</text:p>
            <text:p text:style-name="P154"><text:tab/>cwtl</text:p>
            <text:p text:style-name="P154"><text:tab/>movl<text:tab/>%eax, %esi</text:p>
            <text:p text:style-name="P154"><text:tab/>leaq<text:tab/>.LC0(%rip), %rax</text:p>
            <text:p text:style-name="P154"><text:tab/>movq<text:tab/>%rax, %rdi</text:p>
            <text:p text:style-name="P154"><text:tab/>movl<text:tab/>$0, %eax</text:p>
            <text:p text:style-name="P154"><text:tab/>call<text:tab/>printf@PLT</text:p>
            <text:p text:style-name="P154"><text:tab/>movl<text:tab/>i(%rip), %eax</text:p>
            <text:p text:style-name="P154"><text:tab/>addl<text:tab/>$1, %eax</text:p>
            <text:p text:style-name="P154"><text:tab/>movl<text:tab/>%eax, i(%rip)</text:p>
            <text:p text:style-name="P154">.L27:</text:p>
            <text:p text:style-name="P154"><text:tab/>movl<text:tab/>i(%rip), %eax</text:p>
            <text:p text:style-name="P154"><text:tab/>cmpl<text:tab/>$5, %eax</text:p>
            <text:p text:style-name="P154"><text:tab/>jle<text:tab/>.L28</text:p>
            <text:p text:style-name="P154"><text:tab/>nop</text:p>
            <text:p text:style-name="P154"><text:tab/>nop</text:p>
            <text:p text:style-name="P154"><text:tab/>leave</text:p>
            <text:p text:style-name="P154"><text:tab/>.cfi_def_cfa 7, 8</text:p>
            <text:p text:style-name="P154"><text:tab/>ret</text:p>
            <text:p text:style-name="P154"><text:tab/>.cfi_endproc</text:p>
          </table:table-cell>
          <table:table-cell table:style-name="Таблица49.A1" office:value-type="string">
            <text:p text:style-name="P111">void loop_unrolling(int x)</text:p>
            <text:p text:style-name="P111">{</text:p>
            <text:p text:style-name="P111"><text:tab/>for (i = 0; i &lt; 6; i++) {</text:p>
            <text:p text:style-name="P111"><text:tab/><text:tab/>ivector4[i] = 0;</text:p>
            <text:p text:style-name="P111"><text:tab/><text:tab/>printf("%d", ivector4[i]);</text:p>
            <text:p text:style-name="P111"><text:tab/>}</text:p>
            <text:p text:style-name="P111">} </text:p>
          </table:table-cell>
        </table:table-row>
      </table:table>
      <text:p text:style-name="P69"><text:span text:style-name="T23"/></text:p>
      <text:p text:style-name="P200">При отсутствии оптимизации развёртка циклов не применяется</text:p>
      <text:p text:style-name="P73"><text:span text:style-name="T23"/></text:p>
      <table:table table:name="Таблица50" table:style-name="Таблица50">
        <table:table-column table:style-name="Таблица50.A"/>
        <table:table-column table:style-name="Таблица50.B"/>
        <table:table-row table:style-name="Таблица50.1">
          <table:table-cell table:style-name="Таблица50.A1" office:value-type="string">
            <text:p text:style-name="P158">loop_unrolling:</text:p>
            <text:p text:style-name="P158">.LFB4:</text:p>
            <text:p text:style-name="P158"><text:tab/>.cfi_startproc</text:p>
            <text:p text:style-name="P158"><text:tab/>endbr64</text:p>
            <text:p text:style-name="P158"><text:tab/>pushq<text:tab/>%rbp</text:p>
            <text:p text:style-name="P158"><text:tab/>.cfi_def_cfa_offset 16</text:p>
            <text:p text:style-name="P158"><text:tab/>.cfi_offset 6, -16</text:p>
            <text:p text:style-name="P158"><text:tab/>movq<text:tab/>%rsp, %rbp</text:p>
            <text:p text:style-name="P158"><text:tab/>.cfi_def_cfa_register 6</text:p>
            <text:p text:style-name="P158"><text:tab/>subq<text:tab/>$16, %rsp</text:p>
            <text:p text:style-name="P158"><text:tab/>movl<text:tab/>%edi, -4(%rbp)</text:p>
            <text:p text:style-name="P158"><text:tab/>movl<text:tab/>$0, i(%rip)</text:p>
            <text:p text:style-name="P158"><text:tab/>jmp<text:tab/>.L27</text:p>
            <text:p text:style-name="P158">.L28:</text:p>
            <text:p text:style-name="P158"><text:tab/>movl<text:tab/>i(%rip), %eax</text:p>
            <text:p text:style-name="P158"><text:tab/>cltq</text:p>
            <text:p text:style-name="P158"><text:tab/>leaq<text:tab/>(%rax,%rax), %rdx</text:p>
            <text:p text:style-name="P158"><text:tab/>leaq<text:tab/>ivector4(%rip), %rax</text:p>
            <text:p text:style-name="P158"><text:tab/>movw<text:tab/>$0, (%rdx,%rax)</text:p>
            <text:p text:style-name="P158"><text:tab/>movl<text:tab/>i(%rip), %eax</text:p>
            <text:p text:style-name="P158"><text:tab/>cltq</text:p>
            <text:p text:style-name="P158"><text:tab/>leaq<text:tab/>(%rax,%rax), %rdx</text:p>
            <text:p text:style-name="P158"><text:tab/>leaq<text:tab/>ivector4(%rip), %rax</text:p>
            <text:p text:style-name="P158"><text:tab/>movzwl<text:tab/>(%rdx,%rax), %eax</text:p>
            <text:p text:style-name="P158"><text:tab/>cwtl</text:p>
            <text:p text:style-name="P158"><text:tab/>movl<text:tab/>%eax, %esi</text:p>
            <text:p text:style-name="P158"><text:tab/>leaq<text:tab/>.LC0(%rip), %rax</text:p>
            <text:p text:style-name="P158"><text:tab/>movq<text:tab/>%rax, %rdi</text:p>
            <text:p text:style-name="P158"><text:tab/>movl<text:tab/>$0, %eax</text:p>
            <text:p text:style-name="P158"><text:tab/>call<text:tab/>printf@PLT</text:p>
            <text:p text:style-name="P158"><text:tab/>movl<text:tab/>i(%rip), %eax</text:p>
            <text:p text:style-name="P158"><text:tab/>addl<text:tab/>$1, %eax</text:p>
            <text:p text:style-name="P158"><text:tab/>movl<text:tab/>%eax, i(%rip)</text:p>
            <text:p text:style-name="P158">.L27:</text:p>
            <text:p text:style-name="P158"><text:tab/>movl<text:tab/>i(%rip), %eax</text:p>
            <text:p text:style-name="P158"><text:tab/>cmpl<text:tab/>$5, %eax</text:p>
            <text:p text:style-name="P158"><text:tab/>jle<text:tab/>.L28</text:p>
            <text:p text:style-name="P158"><text:tab/>nop</text:p>
            <text:p text:style-name="P158"><text:tab/>nop</text:p>
            <text:p text:style-name="P158"><text:tab/>leave</text:p>
            <text:p text:style-name="P158"><text:tab/>.cfi_def_cfa 7, 8</text:p>
            <text:p text:style-name="P158"><text:tab/>ret</text:p>
            <text:p text:style-name="P158"><text:tab/>.cfi_endproc</text:p>
          </table:table-cell>
          <table:table-cell table:style-name="Таблица50.A1" office:value-type="string">
            <text:p text:style-name="P154">loop_unrolling:</text:p>
            <text:p text:style-name="P154">.LFB41:</text:p>
            <text:p text:style-name="P154"><text:tab/>.cfi_startproc</text:p>
            <text:p text:style-name="P154"><text:tab/>endbr64</text:p>
            <text:p text:style-name="P154"><text:tab/>pushq<text:tab/>%rbp</text:p>
            <text:p text:style-name="P154"><text:tab/>.cfi_def_cfa_offset 16</text:p>
            <text:p text:style-name="P154"><text:tab/>.cfi_offset 6, -16</text:p>
            <text:p text:style-name="P154"><text:tab/>xorl<text:tab/>%eax, %eax</text:p>
            <text:p text:style-name="P154"><text:tab/>leaq<text:tab/>ivector4(%rip), %rbp</text:p>
            <text:p text:style-name="P154"><text:tab/>pushq<text:tab/>%rbx</text:p>
            <text:p text:style-name="P154"><text:tab/>.cfi_def_cfa_offset 24</text:p>
            <text:p text:style-name="P154"><text:tab/>.cfi_offset 3, -24</text:p>
            <text:p text:style-name="P154"><text:tab/>leaq<text:tab/>.LC0(%rip), %rbx</text:p>
            <text:p text:style-name="P154"><text:tab/>subq<text:tab/>$8, %rsp</text:p>
            <text:p text:style-name="P154"><text:tab/>.cfi_def_cfa_offset 32</text:p>
            <text:p text:style-name="P154"><text:tab/>movl<text:tab/>$0, i(%rip)</text:p>
            <text:p text:style-name="P154"><text:tab/>.p2align 4,,10</text:p>
            <text:p text:style-name="P154"><text:tab/>.p2align 3</text:p>
            <text:p text:style-name="P154">.L11:</text:p>
            <text:p text:style-name="P154"><text:tab/>cltq</text:p>
            <text:p text:style-name="P154"><text:tab/>xorl<text:tab/>%edx, %edx</text:p>
            <text:p text:style-name="P154"><text:tab/>movq<text:tab/>%rbx, %rsi</text:p>
            <text:p text:style-name="P154"><text:tab/>movl<text:tab/>$2, %edi</text:p>
            <text:p text:style-name="P154"><text:tab/>movw<text:tab/>%dx, 0(%rbp,%rax,2)</text:p>
            <text:p text:style-name="P154"><text:tab/>xorl<text:tab/>%edx, %edx</text:p>
            <text:p text:style-name="P154"><text:tab/>xorl<text:tab/>%eax, %eax</text:p>
            <text:p text:style-name="P154"><text:tab/>call<text:tab/>__printf_chk@PLT</text:p>
            <text:p text:style-name="P154"><text:tab/>movl<text:tab/>i(%rip), %eax</text:p>
            <text:p text:style-name="P154"><text:tab/>addl<text:tab/>$1, %eax</text:p>
            <text:p text:style-name="P154"><text:tab/>movl<text:tab/>%eax, i(%rip)</text:p>
            <text:p text:style-name="P154"><text:tab/>cmpl<text:tab/>$5, %eax</text:p>
            <text:p text:style-name="P154"><text:tab/>jle<text:tab/>.L11</text:p>
            <text:p text:style-name="P154"><text:tab/>addq<text:tab/>$8, %rsp</text:p>
            <text:p text:style-name="P154"><text:tab/>.cfi_def_cfa_offset 24</text:p>
            <text:p text:style-name="P154"><text:tab/>popq<text:tab/>%rbx</text:p>
            <text:p text:style-name="P154"><text:tab/>.cfi_def_cfa_offset 16</text:p>
            <text:p text:style-name="P154"><text:tab/>popq<text:tab/>%rbp</text:p>
            <text:p text:style-name="P154"><text:tab/>.cfi_def_cfa_offset 8</text:p>
            <text:p text:style-name="P154"><text:tab/>ret</text:p>
            <text:p text:style-name="P154"><text:tab/>.cfi_endproc</text:p>
          </table:table-cell>
        </table:table-row>
      </table:table>
      <text:p text:style-name="P73"><text:span text:style-name="T23"/></text:p>
      <text:p text:style-name="P203">Цикл сохранился и на фоне оптимизации, его развёртывание не состоялось.</text:p>
      <table:table table:name="Таблица51" table:style-name="Таблица51">
        <table:table-column table:style-name="Таблица51.A"/>
        <table:table-column table:style-name="Таблица51.B"/>
        <table:table-row>
          <table:table-cell table:style-name="Таблица51.A1" office:value-type="string">
            <text:p text:style-name="P154">jump_compression:</text:p>
            <text:p text:style-name="P154">.LFB5:</text:p>
            <text:p text:style-name="P154"><text:tab/>.cfi_startproc</text:p>
            <text:p text:style-name="P154"><text:tab/>endbr64</text:p>
            <text:p text:style-name="P154"><text:tab/>pushq<text:tab/>%rbp</text:p>
            <text:p text:style-name="P154"><text:tab/>.cfi_def_cfa_offset 16</text:p>
            <text:p text:style-name="P154"><text:tab/>.cfi_offset 6, -16</text:p>
            <text:p text:style-name="P154"><text:tab/>movq<text:tab/>%rsp, %rbp</text:p>
            <text:p text:style-name="P154"><text:tab/>.cfi_def_cfa_register 6</text:p>
            <text:p text:style-name="P154"><text:tab/>subq<text:tab/>$32, %rsp</text:p>
            <text:p text:style-name="P154"><text:tab/>movl<text:tab/>%edi, -4(%rbp)</text:p>
            <text:p text:style-name="P154"><text:tab/>movl<text:tab/>%esi, -8(%rbp)</text:p>
            <text:p text:style-name="P154"><text:tab/>movl<text:tab/>%edx, -12(%rbp)</text:p>
            <text:p text:style-name="P154"><text:tab/>movl<text:tab/>%ecx, -16(%rbp)</text:p>
            <text:p text:style-name="P154"><text:tab/>movl<text:tab/>%r8d, -20(%rbp)</text:p>
            <text:p text:style-name="P154">.L30:</text:p>
            <text:p text:style-name="P154"><text:tab/>movl<text:tab/>-4(%rbp), %eax</text:p>
            <text:p text:style-name="P154"><text:tab/>cmpl<text:tab/>-8(%rbp), %eax</text:p>
            <text:p text:style-name="P154"><text:tab/>jge<text:tab/>.L31</text:p>
            <text:p text:style-name="P154"><text:tab/>movl<text:tab/>-8(%rbp), %eax</text:p>
            <text:p text:style-name="P154"><text:tab/>cmpl<text:tab/>-12(%rbp), %eax</text:p>
            <text:p text:style-name="P154"><text:tab/>jge<text:tab/>.L32</text:p>
            <text:p text:style-name="P154"><text:tab/>movl<text:tab/>-12(%rbp), %eax</text:p>
            <text:p text:style-name="P154"><text:tab/>cmpl<text:tab/>-16(%rbp), %eax</text:p>
            <text:p text:style-name="P154"><text:tab/>jge<text:tab/>.L33</text:p>
            <text:p text:style-name="P154"><text:tab/>movl<text:tab/>-16(%rbp), %eax</text:p>
            <text:p text:style-name="P154"><text:tab/>cmpl<text:tab/>-20(%rbp), %eax</text:p>
            <text:p text:style-name="P154"><text:tab/>jge<text:tab/>.L38</text:p>
            <text:p text:style-name="P154"><text:tab/>movl<text:tab/>-20(%rbp), %eax</text:p>
            <text:p text:style-name="P154"><text:tab/>addl<text:tab/>%eax, -16(%rbp)</text:p>
            <text:p text:style-name="P154"><text:tab/>jmp<text:tab/>.L35</text:p>
            <text:p text:style-name="P154">.L33:</text:p>
            <text:p text:style-name="P154"><text:tab/>movl<text:tab/>-16(%rbp), %eax</text:p>
            <text:p text:style-name="P154"><text:tab/>addl<text:tab/>%eax, -12(%rbp)</text:p>
            <text:p text:style-name="P154"><text:tab/>jmp<text:tab/>.L35</text:p>
            <text:p text:style-name="P154">.L32:</text:p>
            <text:p text:style-name="P154"><text:tab/>movl<text:tab/>-12(%rbp), %eax</text:p>
            <text:p text:style-name="P154"><text:tab/>addl<text:tab/>%eax, -8(%rbp)</text:p>
            <text:p text:style-name="P154"><text:tab/>movl<text:tab/>-8(%rbp), %eax</text:p>
            <text:p text:style-name="P154"><text:tab/>movl<text:tab/>%eax, %esi</text:p>
            <text:p text:style-name="P154"><text:tab/>leaq<text:tab/>.LC0(%rip), %rax</text:p>
            <text:p text:style-name="P154"><text:tab/>movq<text:tab/>%rax, %rdi</text:p>
            <text:p text:style-name="P154"><text:tab/>movl<text:tab/>$0, %eax</text:p>
            <text:p text:style-name="P154"><text:tab/>call<text:tab/>printf@PLT</text:p>
            <text:p text:style-name="P154"><text:tab/>jmp<text:tab/>.L30</text:p>
            <text:p text:style-name="P154">.L38:</text:p>
            <text:p text:style-name="P154"><text:tab/><text:span text:style-name="T37">nop</text:span></text:p>
            <text:p text:style-name="P154">.L36:</text:p>
            <text:p text:style-name="P154"><text:tab/><text:span text:style-name="T37">jmp<text:tab/>.L30</text:span></text:p>
            <text:p text:style-name="P154">.L31:</text:p>
            <text:p text:style-name="P154"><text:tab/>movl<text:tab/>-8(%rbp), %eax</text:p>
            <text:p text:style-name="P154"><text:tab/>addl<text:tab/>%eax, -4(%rbp)</text:p>
            <text:p text:style-name="P154">.L35:</text:p>
            <text:p text:style-name="P154"><text:tab/>movl<text:tab/>-4(%rbp), %edx</text:p>
            <text:p text:style-name="P154"><text:tab/>movl<text:tab/>-8(%rbp), %eax</text:p>
            <text:p text:style-name="P154"><text:tab/>addl<text:tab/>%eax, %edx</text:p>
            <text:p text:style-name="P154"><text:tab/>movl<text:tab/>-12(%rbp), %eax</text:p>
            <text:p text:style-name="P154"><text:tab/>addl<text:tab/>%eax, %edx</text:p>
            <text:p text:style-name="P154"><text:tab/>movl<text:tab/>-16(%rbp), %eax</text:p>
            <text:p text:style-name="P154"><text:tab/>addl<text:tab/>%eax, %edx</text:p>
            <text:p text:style-name="P154"><text:tab/>movl<text:tab/>-20(%rbp), %eax</text:p>
            <text:p text:style-name="P154"><text:tab/>addl<text:tab/>%edx, %eax</text:p>
            <text:p text:style-name="P154"><text:tab/>leave</text:p>
            <text:p text:style-name="P154"><text:soft-page-break/><text:tab/>.cfi_def_cfa 7, 8</text:p>
            <text:p text:style-name="P154"><text:tab/>ret</text:p>
            <text:p text:style-name="P154"><text:tab/>.cfi_endproc</text:p>
          </table:table-cell>
          <table:table-cell table:style-name="Таблица51.A1" office:value-type="string">
            <text:p text:style-name="P111">int jump_compression(int i, int j, int k, int l, int m)</text:p>
            <text:p text:style-name="P111">{</text:p>
            <text:p text:style-name="P111">beg_1:</text:p>
            <text:p text:style-name="P111"><text:tab/>if (i &lt; j)</text:p>
            <text:p text:style-name="P111"><text:tab/><text:tab/>if (j &lt; k)</text:p>
            <text:p text:style-name="P111"><text:tab/><text:tab/><text:tab/>if (k &lt; l)</text:p>
            <text:p text:style-name="P111"><text:tab/><text:tab/><text:tab/><text:tab/>if (l &lt; m)</text:p>
            <text:p text:style-name="P111"><text:tab/><text:tab/><text:tab/><text:tab/><text:tab/>l += m;</text:p>
            <text:p text:style-name="P111"><text:tab/><text:tab/><text:tab/><text:tab/>else</text:p>
            <text:p text:style-name="P111"><text:tab/><text:tab/><text:tab/><text:tab/><text:tab/>goto end_1;</text:p>
            <text:p text:style-name="P111"><text:tab/><text:tab/><text:tab/>else</text:p>
            <text:p text:style-name="P111"><text:tab/><text:tab/><text:tab/><text:tab/>k += l;</text:p>
            <text:p text:style-name="P111"><text:tab/><text:tab/>else {</text:p>
            <text:p text:style-name="P111"><text:tab/><text:tab/><text:tab/>j += k;</text:p>
            <text:p text:style-name="P111"><text:tab/><text:tab/><text:tab/>printf("%d", j);</text:p>
            <text:p text:style-name="P111"><text:tab/><text:tab/>end_1:</text:p>
            <text:p text:style-name="P111"><text:tab/><text:tab/><text:tab/>goto beg_1;</text:p>
            <text:p text:style-name="P111"><text:tab/><text:tab/>}</text:p>
            <text:p text:style-name="P111"><text:tab/>else</text:p>
            <text:p text:style-name="P111"><text:tab/><text:tab/>i += j;</text:p>
            <text:p text:style-name="P111"><text:tab/>return(i + j + k + l + m);</text:p>
            <text:p text:style-name="P111">}</text:p>
          </table:table-cell>
        </table:table-row>
      </table:table>
      <text:p text:style-name="P76"><text:span text:style-name="T23"/></text:p>
      <text:p text:style-name="P206">При выключенной оптимизации компилятор сохраняет ненужные цепочки переходов, а включённая оптимизация избавляет от них</text:p>
      <text:p text:style-name="P79"><text:span text:style-name="T23"/></text:p>
      <table:table table:name="Таблица52" table:style-name="Таблица52">
        <table:table-column table:style-name="Таблица52.A"/>
        <table:table-column table:style-name="Таблица52.B"/>
        <table:table-row>
          <table:table-cell table:style-name="Таблица52.A1" office:value-type="string">
            <text:p text:style-name="P158">jump_compression:</text:p>
            <text:p text:style-name="P158">.LFB5:</text:p>
            <text:p text:style-name="P158"><text:tab/>.cfi_startproc</text:p>
            <text:p text:style-name="P158"><text:tab/>endbr64</text:p>
            <text:p text:style-name="P158"><text:tab/>pushq<text:tab/>%rbp</text:p>
            <text:p text:style-name="P158"><text:tab/>.cfi_def_cfa_offset 16</text:p>
            <text:p text:style-name="P158"><text:tab/>.cfi_offset 6, -16</text:p>
            <text:p text:style-name="P158"><text:tab/>movq<text:tab/>%rsp, %rbp</text:p>
            <text:p text:style-name="P158"><text:tab/>.cfi_def_cfa_register 6</text:p>
            <text:p text:style-name="P158"><text:tab/>subq<text:tab/>$32, %rsp</text:p>
            <text:p text:style-name="P158"><text:tab/>movl<text:tab/>%edi, -4(%rbp)</text:p>
            <text:p text:style-name="P158"><text:tab/>movl<text:tab/>%esi, -8(%rbp)</text:p>
            <text:p text:style-name="P158"><text:tab/>movl<text:tab/>%edx, -12(%rbp)</text:p>
            <text:p text:style-name="P158"><text:tab/>movl<text:tab/>%ecx, -16(%rbp)</text:p>
            <text:p text:style-name="P158"><text:tab/>movl<text:tab/>%r8d, -20(%rbp)</text:p>
            <text:p text:style-name="P158">.L30:</text:p>
            <text:p text:style-name="P158"><text:tab/>movl<text:tab/>-4(%rbp), %eax</text:p>
            <text:p text:style-name="P158"><text:tab/>cmpl<text:tab/>-8(%rbp), %eax</text:p>
            <text:p text:style-name="P158"><text:tab/>jge<text:tab/>.L31</text:p>
            <text:p text:style-name="P158"><text:tab/>movl<text:tab/>-8(%rbp), %eax</text:p>
            <text:p text:style-name="P158"><text:tab/>cmpl<text:tab/>-12(%rbp), %eax</text:p>
            <text:p text:style-name="P158"><text:tab/>jge<text:tab/>.L32</text:p>
            <text:p text:style-name="P158"><text:tab/>movl<text:tab/>-12(%rbp), %eax</text:p>
            <text:p text:style-name="P158"><text:tab/>cmpl<text:tab/>-16(%rbp), %eax</text:p>
            <text:p text:style-name="P158"><text:tab/>jge<text:tab/>.L33</text:p>
            <text:p text:style-name="P158"><text:tab/>movl<text:tab/>-16(%rbp), %eax</text:p>
            <text:p text:style-name="P158"><text:tab/>cmpl<text:tab/>-20(%rbp), %eax</text:p>
            <text:p text:style-name="P158"><text:tab/>jge<text:tab/>.L38</text:p>
            <text:p text:style-name="P158"><text:tab/>movl<text:tab/>-20(%rbp), %eax</text:p>
            <text:p text:style-name="P158"><text:tab/>addl<text:tab/>%eax, -16(%rbp)</text:p>
            <text:p text:style-name="P158"><text:tab/>jmp<text:tab/>.L35</text:p>
            <text:p text:style-name="P158">.L33:</text:p>
            <text:p text:style-name="P158"><text:tab/>movl<text:tab/>-16(%rbp), %eax</text:p>
            <text:p text:style-name="P158"><text:tab/>addl<text:tab/>%eax, -12(%rbp)</text:p>
            <text:p text:style-name="P158"><text:tab/>jmp<text:tab/>.L35</text:p>
            <text:p text:style-name="P158">.L32:</text:p>
            <text:p text:style-name="P158"><text:tab/>movl<text:tab/>-12(%rbp), %eax</text:p>
            <text:p text:style-name="P158"><text:tab/>addl<text:tab/>%eax, -8(%rbp)</text:p>
            <text:p text:style-name="P158"><text:tab/>movl<text:tab/>-8(%rbp), %eax</text:p>
            <text:p text:style-name="P158"><text:tab/>movl<text:tab/>%eax, %esi</text:p>
            <text:p text:style-name="P158"><text:tab/>leaq<text:tab/>.LC0(%rip), %rax</text:p>
            <text:p text:style-name="P158"><text:tab/>movq<text:tab/>%rax, %rdi</text:p>
            <text:p text:style-name="P158"><text:tab/>movl<text:tab/>$0, %eax</text:p>
            <text:p text:style-name="P158"><text:tab/>call<text:tab/>printf@PLT</text:p>
            <text:p text:style-name="P158"><text:tab/>jmp<text:tab/>.L30</text:p>
            <text:p text:style-name="P158">.L38:</text:p>
            <text:p text:style-name="P158"><text:tab/><text:span text:style-name="T37">nop</text:span></text:p>
            <text:p text:style-name="P158">.L36:</text:p>
            <text:p text:style-name="P158"><text:tab/><text:span text:style-name="T37">jmp<text:tab/>.L30</text:span></text:p>
            <text:p text:style-name="P158">.L31:</text:p>
            <text:p text:style-name="P158"><text:tab/>movl<text:tab/>-8(%rbp), %eax</text:p>
            <text:p text:style-name="P158"><text:tab/>addl<text:tab/>%eax, -4(%rbp)</text:p>
            <text:p text:style-name="P158">.L35:</text:p>
            <text:p text:style-name="P158"><text:tab/>movl<text:tab/>-4(%rbp), %edx</text:p>
            <text:p text:style-name="P158"><text:soft-page-break/><text:tab/>movl<text:tab/>-8(%rbp), %eax</text:p>
            <text:p text:style-name="P158"><text:tab/>addl<text:tab/>%eax, %edx</text:p>
            <text:p text:style-name="P158"><text:tab/>movl<text:tab/>-12(%rbp), %eax</text:p>
            <text:p text:style-name="P158"><text:tab/>addl<text:tab/>%eax, %edx</text:p>
            <text:p text:style-name="P158"><text:tab/>movl<text:tab/>-16(%rbp), %eax</text:p>
            <text:p text:style-name="P158"><text:tab/>addl<text:tab/>%eax, %edx</text:p>
            <text:p text:style-name="P158"><text:tab/>movl<text:tab/>-20(%rbp), %eax</text:p>
            <text:p text:style-name="P158"><text:tab/>addl<text:tab/>%edx, %eax</text:p>
            <text:p text:style-name="P158"><text:tab/>leave</text:p>
            <text:p text:style-name="P158"><text:tab/>.cfi_def_cfa 7, 8</text:p>
            <text:p text:style-name="P158"><text:tab/>ret</text:p>
            <text:p text:style-name="P158"><text:tab/>.cfi_endproc</text:p>
          </table:table-cell>
          <table:table-cell table:style-name="Таблица52.A1" office:value-type="string">
            <text:p text:style-name="P149">jump_compression:</text:p>
            <text:p text:style-name="P149">.LFB42:</text:p>
            <text:p text:style-name="P149"><text:tab/>.cfi_startproc</text:p>
            <text:p text:style-name="P149"><text:tab/>endbr64</text:p>
            <text:p text:style-name="P149"><text:tab/>pushq<text:tab/>%r15</text:p>
            <text:p text:style-name="P149"><text:tab/>.cfi_def_cfa_offset 16</text:p>
            <text:p text:style-name="P149"><text:tab/>.cfi_offset 15, -16</text:p>
            <text:p text:style-name="P149"><text:tab/>pushq<text:tab/>%r14</text:p>
            <text:p text:style-name="P149"><text:tab/>.cfi_def_cfa_offset 24</text:p>
            <text:p text:style-name="P149"><text:tab/>.cfi_offset 14, -24</text:p>
            <text:p text:style-name="P149"><text:tab/>movl<text:tab/>%edx, %r14d</text:p>
            <text:p text:style-name="P149"><text:tab/>pushq<text:tab/>%r13</text:p>
            <text:p text:style-name="P149"><text:tab/>.cfi_def_cfa_offset 32</text:p>
            <text:p text:style-name="P149"><text:tab/>.cfi_offset 13, -32</text:p>
            <text:p text:style-name="P149"><text:tab/>movl<text:tab/>%ecx, %r13d</text:p>
            <text:p text:style-name="P149"><text:tab/>pushq<text:tab/>%r12</text:p>
            <text:p text:style-name="P149"><text:tab/>.cfi_def_cfa_offset 40</text:p>
            <text:p text:style-name="P149"><text:tab/>.cfi_offset 12, -40</text:p>
            <text:p text:style-name="P149"><text:tab/>movl<text:tab/>%r8d, %r12d</text:p>
            <text:p text:style-name="P149"><text:tab/>pushq<text:tab/>%rbp</text:p>
            <text:p text:style-name="P149"><text:tab/>.cfi_def_cfa_offset 48</text:p>
            <text:p text:style-name="P149"><text:tab/>.cfi_offset 6, -48</text:p>
            <text:p text:style-name="P149"><text:tab/>movl<text:tab/>%edi, %ebp</text:p>
            <text:p text:style-name="P149"><text:tab/>pushq<text:tab/>%rbx</text:p>
            <text:p text:style-name="P149"><text:tab/>.cfi_def_cfa_offset 56</text:p>
            <text:p text:style-name="P149"><text:tab/>.cfi_offset 3, -56</text:p>
            <text:p text:style-name="P149"><text:tab/>movl<text:tab/>%esi, %ebx</text:p>
            <text:p text:style-name="P149"><text:tab/>subq<text:tab/>$8, %rsp</text:p>
            <text:p text:style-name="P149"><text:tab/>.cfi_def_cfa_offset 64</text:p>
            <text:p text:style-name="P149"><text:tab/>cmpl<text:tab/>%edi, %esi</text:p>
            <text:p text:style-name="P149"><text:tab/>jle<text:tab/>.L15</text:p>
            <text:p text:style-name="P149"><text:tab/>leaq<text:tab/>.LC0(%rip), %r15</text:p>
            <text:p text:style-name="P149"><text:tab/>cmpl<text:tab/>%ecx, %edx</text:p>
            <text:p text:style-name="P149"><text:tab/>jge<text:tab/>.L16</text:p>
            <text:p text:style-name="P149"><text:tab/>cmpl<text:tab/>%r8d, %ecx</text:p>
            <text:p text:style-name="P149"><text:tab/>jl<text:tab/>.L17</text:p>
            <text:p text:style-name="P149">.L19:</text:p>
            <text:p text:style-name="P149"><text:tab/>cmpl<text:tab/>%ebx, %r14d</text:p>
            <text:p text:style-name="P149"><text:tab/>jle<text:tab/>.L33</text:p>
            <text:p text:style-name="P149"><text:tab/>cmpl<text:tab/>%ebx, %ebp</text:p>
            <text:p text:style-name="P149"><text:tab/>jge<text:tab/>.L15</text:p>
            <text:p text:style-name="P149">.L21:</text:p>
            <text:p text:style-name="P149"><text:tab/>jmp<text:tab/>.L21</text:p>
            <text:p text:style-name="P149"><text:tab/>.p2align 4,,10</text:p>
            <text:p text:style-name="P149"><text:tab/>.p2align 3</text:p>
            <text:p text:style-name="P149">.L33:</text:p>
            <text:p text:style-name="P149"><text:tab/>addl<text:tab/>%r14d, %ebx</text:p>
            <text:p text:style-name="P149"><text:tab/>xorl<text:tab/>%eax, %eax</text:p>
            <text:p text:style-name="P149"><text:tab/>movq<text:tab/>%r15, %rsi</text:p>
            <text:p text:style-name="P149"><text:tab/>movl<text:tab/>$2, %edi</text:p>
            <text:p text:style-name="P149"><text:tab/>movl<text:tab/>%ebx, %edx</text:p>
            <text:p text:style-name="P149"><text:tab/>call<text:tab/>__printf_chk@PLT</text:p>
            <text:p text:style-name="P149"><text:tab/>cmpl<text:tab/>%ebx, %ebp</text:p>
            <text:p text:style-name="P149"><text:tab/>jl<text:tab/>.L19</text:p>
            <text:p text:style-name="P149"><text:soft-page-break/>.L15:</text:p>
            <text:p text:style-name="P149"><text:tab/>addl<text:tab/>%ebx, %ebp</text:p>
            <text:p text:style-name="P149">.L24:</text:p>
            <text:p text:style-name="P149"><text:tab/>leal<text:tab/>0(%rbp,%rbx), %eax</text:p>
            <text:p text:style-name="P149"><text:tab/>addq<text:tab/>$8, %rsp</text:p>
            <text:p text:style-name="P149"><text:tab/>.cfi_remember_state</text:p>
            <text:p text:style-name="P149"><text:tab/>.cfi_def_cfa_offset 56</text:p>
            <text:p text:style-name="P149"><text:tab/>addl<text:tab/>%r14d, %eax</text:p>
            <text:p text:style-name="P149"><text:tab/>popq<text:tab/>%rbx</text:p>
            <text:p text:style-name="P149"><text:tab/>.cfi_def_cfa_offset 48</text:p>
            <text:p text:style-name="P149"><text:tab/>popq<text:tab/>%rbp</text:p>
            <text:p text:style-name="P149"><text:tab/>.cfi_def_cfa_offset 40</text:p>
            <text:p text:style-name="P149"><text:tab/>addl<text:tab/>%r13d, %eax</text:p>
            <text:p text:style-name="P149"><text:tab/>addl<text:tab/>%r12d, %eax</text:p>
            <text:p text:style-name="P149"><text:tab/>popq<text:tab/>%r12</text:p>
            <text:p text:style-name="P149"><text:tab/>.cfi_def_cfa_offset 32</text:p>
            <text:p text:style-name="P149"><text:tab/>popq<text:tab/>%r13</text:p>
            <text:p text:style-name="P149"><text:tab/>.cfi_def_cfa_offset 24</text:p>
            <text:p text:style-name="P149"><text:tab/>popq<text:tab/>%r14</text:p>
            <text:p text:style-name="P149"><text:tab/>.cfi_def_cfa_offset 16</text:p>
            <text:p text:style-name="P149"><text:tab/>popq<text:tab/>%r15</text:p>
            <text:p text:style-name="P149"><text:tab/>.cfi_def_cfa_offset 8</text:p>
            <text:p text:style-name="P149"><text:tab/>ret</text:p>
            <text:p text:style-name="P149">.L34:</text:p>
            <text:p text:style-name="P149"><text:tab/>.cfi_restore_state</text:p>
            <text:p text:style-name="P149"><text:tab/>addl<text:tab/>%r14d, %ebx</text:p>
            <text:p text:style-name="P149"><text:tab/>xorl<text:tab/>%eax, %eax</text:p>
            <text:p text:style-name="P149"><text:tab/>movq<text:tab/>%r15, %rsi</text:p>
            <text:p text:style-name="P149"><text:tab/>movl<text:tab/>$2, %edi</text:p>
            <text:p text:style-name="P149"><text:tab/>movl<text:tab/>%ebx, %edx</text:p>
            <text:p text:style-name="P149"><text:tab/>call<text:tab/>__printf_chk@PLT</text:p>
            <text:p text:style-name="P149"><text:tab/>cmpl<text:tab/>%ebx, %ebp</text:p>
            <text:p text:style-name="P149"><text:tab/>jge<text:tab/>.L15</text:p>
            <text:p text:style-name="P149">.L16:</text:p>
            <text:p text:style-name="P149"><text:tab/>cmpl<text:tab/>%ebx, %r14d</text:p>
            <text:p text:style-name="P149"><text:tab/>jle<text:tab/>.L34</text:p>
            <text:p text:style-name="P149"><text:tab/>addl<text:tab/>%r13d, %r14d</text:p>
            <text:p text:style-name="P149"><text:tab/>jmp<text:tab/>.L24</text:p>
            <text:p text:style-name="P149">.L23:</text:p>
            <text:p text:style-name="P149"><text:tab/>addl<text:tab/>%r14d, %ebx</text:p>
            <text:p text:style-name="P149"><text:tab/>xorl<text:tab/>%eax, %eax</text:p>
            <text:p text:style-name="P149"><text:tab/>movq<text:tab/>%r15, %rsi</text:p>
            <text:p text:style-name="P149"><text:tab/>movl<text:tab/>$2, %edi</text:p>
            <text:p text:style-name="P149"><text:tab/>movl<text:tab/>%ebx, %edx</text:p>
            <text:p text:style-name="P149"><text:tab/>call<text:tab/>__printf_chk@PLT</text:p>
            <text:p text:style-name="P149"><text:tab/>cmpl<text:tab/>%ebx, %ebp</text:p>
            <text:p text:style-name="P149"><text:tab/>jge<text:tab/>.L15</text:p>
            <text:p text:style-name="P149">.L17:</text:p>
            <text:p text:style-name="P149"><text:tab/>cmpl<text:tab/>%ebx, %r14d</text:p>
            <text:p text:style-name="P149"><text:tab/>jle<text:tab/>.L23</text:p>
            <text:p text:style-name="P149"><text:tab/>addl<text:tab/>%r12d, %r13d</text:p>
            <text:p text:style-name="P149"><text:tab/>jmp<text:tab/>.L24</text:p>
            <text:p text:style-name="P149"><text:tab/>.cfi_endproc</text:p>
          </table:table-cell>
        </table:table-row>
      </table:table>
      <text:p text:style-name="P118"/>
      <text:p text:style-name="P186">CompCert</text:p>
      <text:p text:style-name="P119"><text:line-break/><text:span text:style-name="T32">Размножение </text:span><text:span text:style-name="T33">копий</text:span><text:span text:style-name="T32"> не оптимизируется с -o0</text:span></text:p>
      <text:p text:style-name="P119"/>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159"><text:tab/>movq <text:s text:c="3"/>j4@GOTPCREL(%rip), %rsi</text:p>
            <text:p text:style-name="P159"><text:tab/>movl<text:tab/>$2, %r8d</text:p>
            <text:p text:style-name="P159"><text:tab/>movl<text:tab/>%r8d, 0(%rsi)</text:p>
            <text:p text:style-name="P159"><text:tab/>leaq<text:tab/>__stringlit_1(%rip), %rdi</text:p>
            <text:p text:style-name="P159"><text:tab/>movq <text:s text:c="3"/>j4@GOTPCREL(%rip), %rdx</text:p>
            <text:p text:style-name="P159"><text:tab/>movl<text:tab/>0(%rdx), %esi</text:p>
            <text:p text:style-name="P159"><text:tab/>movl<text:tab/>$0, %eax</text:p>
            <text:p text:style-name="P159"><text:tab/>call<text:tab/>printf@PLT</text:p>
            <text:p text:style-name="P159"><text:tab/>movq <text:s text:c="3"/>i2@GOTPCREL(%rip), %rax</text:p>
            <text:p text:style-name="P159"><text:tab/>movl<text:tab/>0(%rax), %esi</text:p>
            <text:p text:style-name="P159"><text:tab/>movq <text:s text:c="3"/>j4@GOTPCREL(%rip), %rax</text:p>
            <text:p text:style-name="P159"><text:tab/>movl<text:tab/>0(%rax), %r10d</text:p>
            <text:p text:style-name="P159"><text:tab/>cmpl<text:tab/>%r10d, %esi</text:p>
            <text:p text:style-name="P159"><text:tab/>jge<text:tab/>.L100</text:p>
            <text:p text:style-name="P159"><text:tab/>movq <text:s text:c="3"/>i4@GOTPCREL(%rip), %rax</text:p>
            <text:p text:style-name="P159"><text:tab/>movl<text:tab/>0(%rax), %ecx</text:p>
            <text:p text:style-name="P159"><text:tab/>movq <text:s text:c="3"/>j4@GOTPCREL(%rip), %r9</text:p>
            <text:p text:style-name="P159"><text:tab/>movl<text:tab/>0(%r9), %esi</text:p>
            <text:p text:style-name="P159"><text:tab/>cmpl<text:tab/>%esi, %ecx</text:p>
            <text:p text:style-name="P159"><text:tab/>setl<text:tab/>%al</text:p>
            <text:p text:style-name="P159"><text:tab/><text:span text:style-name="T37">movzbl<text:tab/>%al, %eax</text:span></text:p>
            <text:p text:style-name="P159"><text:tab/>jmp<text:tab/>.L101</text:p>
            <text:p text:style-name="P159">.L100:</text:p>
            <text:p text:style-name="P159"><text:tab/>xorl<text:tab/>%eax, %eax</text:p>
            <text:p text:style-name="P159">.L101:</text:p>
            <text:p text:style-name="P159"><text:tab/>cmpl<text:tab/>$0, %eax</text:p>
            <text:p text:style-name="P159"><text:tab/>je<text:tab/>.L102</text:p>
            <text:p text:style-name="P159"><text:tab/>movq <text:s text:c="3"/>i2@GOTPCREL(%rip), %rsi</text:p>
            <text:p text:style-name="P159"><text:tab/>movl<text:tab/>$2, %ecx</text:p>
            <text:p text:style-name="P159"><text:tab/>movl<text:tab/>%ecx, 0(%rsi)</text:p>
            <text:p text:style-name="P159"><text:tab/>leaq<text:tab/>__stringlit_1(%rip), %rdi</text:p>
            <text:p text:style-name="P159"><text:tab/>movq <text:s text:c="3"/>i2@GOTPCREL(%rip), %r9</text:p>
            <text:p text:style-name="P159"><text:tab/>movl<text:tab/>0(%r9), %esi</text:p>
            <text:p text:style-name="P159"><text:tab/>movl<text:tab/>$0, %eax</text:p>
            <text:p text:style-name="P159"><text:tab/>call<text:tab/>printf@PLT</text:p>
            <text:p text:style-name="P159">.L102:</text:p>
            <text:p text:style-name="P159"><text:tab/>movq <text:s text:c="3"/>j4@GOTPCREL(%rip), %rsi</text:p>
            <text:p text:style-name="P159"><text:tab/>movq <text:s text:c="3"/>k5@GOTPCREL(%rip), %r8</text:p>
            <text:p text:style-name="P159"><text:tab/>movl<text:tab/>0(%r8), %r9d</text:p>
            <text:p text:style-name="P159"><text:tab/>movl<text:tab/>%r9d, 0(%rsi)</text:p>
            <text:p text:style-name="P159"><text:tab/>leaq<text:tab/>__stringlit_1(%rip), %rdi</text:p>
            <text:p text:style-name="P159"><text:tab/>movq <text:s text:c="3"/>j4@GOTPCREL(%rip), %rcx</text:p>
            <text:p text:style-name="P159"><text:tab/>movl<text:tab/>0(%rcx), %esi</text:p>
            <text:p text:style-name="P159"><text:tab/>movl<text:tab/>$0, %eax</text:p>
            <text:p text:style-name="P159"><text:tab/>call<text:tab/>printf@PLT</text:p>
            <text:p text:style-name="P159"><text:tab/>movq <text:s text:c="3"/>i2@GOTPCREL(%rip), %rax</text:p>
            <text:p text:style-name="P159"><text:tab/>movl<text:tab/>0(%rax), %eax</text:p>
            <text:p text:style-name="P159"><text:tab/>movq <text:s text:c="3"/>j4@GOTPCREL(%rip), %rdi</text:p>
            <text:p text:style-name="P159"><text:tab/>movl<text:tab/>0(%rdi), %edi</text:p>
            <text:p text:style-name="P159"><text:tab/>cmpl<text:tab/>%edi, %eax</text:p>
            <text:p text:style-name="P159"><text:tab/>jge<text:tab/>.L103</text:p>
            <text:p text:style-name="P159"><text:tab/>movq <text:s text:c="3"/>i4@GOTPCREL(%rip), %rax</text:p>
            <text:p text:style-name="P159"><text:tab/>movl<text:tab/>0(%rax), %r11d</text:p>
            <text:p text:style-name="P159"><text:tab/>movq <text:s text:c="3"/>j4@GOTPCREL(%rip), %rax</text:p>
            <text:p text:style-name="P159"><text:soft-page-break/><text:tab/>movl<text:tab/>0(%rax), %ecx</text:p>
            <text:p text:style-name="P159"><text:tab/>cmpl<text:tab/>%ecx, %r11d</text:p>
            <text:p text:style-name="P159"><text:tab/>setl<text:tab/>%al</text:p>
            <text:p text:style-name="P159"><text:tab/>movzbl<text:tab/>%al, %eax</text:p>
            <text:p text:style-name="P159"><text:tab/>jmp<text:tab/>.L104</text:p>
            <text:p text:style-name="P159">.L103:</text:p>
            <text:p text:style-name="P159"><text:tab/>xorl<text:tab/>%eax, %eax</text:p>
            <text:p text:style-name="P159">.L104:</text:p>
            <text:p text:style-name="P159"><text:tab/>cmpl<text:tab/>$0, %eax</text:p>
            <text:p text:style-name="P159"><text:tab/>je<text:tab/>.L105</text:p>
            <text:p text:style-name="P159"><text:tab/>movq <text:s text:c="3"/>i5@GOTPCREL(%rip), %r10</text:p>
            <text:p text:style-name="P159"><text:tab/>movl<text:tab/>$3, %eax</text:p>
            <text:p text:style-name="P159"><text:tab/>movl<text:tab/>%eax, 0(%r10)</text:p>
            <text:p text:style-name="P159"><text:tab/>leaq<text:tab/>__stringlit_1(%rip), %rdi</text:p>
            <text:p text:style-name="P159"><text:tab/>movq <text:s text:c="3"/>i5@GOTPCREL(%rip), %rdx</text:p>
            <text:p text:style-name="P159"><text:tab/>movl<text:tab/>0(%rdx), %esi</text:p>
            <text:p text:style-name="P159"><text:tab/>movl<text:tab/>$0, %eax</text:p>
            <text:p text:style-name="P159"><text:tab/>call<text:tab/>printf@PLT</text:p>
            <text:p text:style-name="P159">.L105:</text:p>
            <text:p text:style-name="P159"/>
          </table:table-cell>
          <table:table-cell table:style-name="Таблица2.A1" office:value-type="string">
            <text:p text:style-name="P108"><text:span text:style-name="T34"><text:tab/></text:span>j4 = 2;</text:p>
            <text:p text:style-name="P108"><text:tab/>printf("%d", j4);</text:p>
            <text:p text:style-name="P108"><text:tab/>if (i2 &lt; j4 &amp;&amp; i4 &lt; j4) {</text:p>
            <text:p text:style-name="P108"><text:tab/><text:tab/>i2 = 2;</text:p>
            <text:p text:style-name="P108"><text:tab/><text:tab/>printf("%d", i2);</text:p>
            <text:p text:style-name="P108"><text:tab/>}</text:p>
            <text:p text:style-name="P108"><text:tab/>j4 = k5;</text:p>
            <text:p text:style-name="P108"><text:tab/>printf("%d", j4);</text:p>
            <text:p text:style-name="P108"><text:tab/>if (i2 &lt; j4 &amp;&amp; i4 &lt; j4) {</text:p>
            <text:p text:style-name="P108"><text:tab/><text:tab/>i5 = 3;</text:p>
            <text:p text:style-name="P108"><text:tab/><text:tab/>printf("%d", i5);</text:p>
            <text:p text:style-name="P102"><text:tab/>}</text:p>
          </table:table-cell>
        </table:table-row>
      </table:table>
      <table:table table:name="Таблица53" table:style-name="Таблица53">
        <table:table-column table:style-name="Таблица53.A"/>
        <table:table-column table:style-name="Таблица53.B"/>
        <table:table-row table:style-name="Таблица53.1">
          <table:table-cell table:style-name="Таблица53.A1" office:value-type="string">
            <text:p text:style-name="P159"><text:tab/>movq <text:s text:c="3"/>j4@GOTPCREL(%rip), %rsi</text:p>
            <text:p text:style-name="P159"><text:tab/>movl<text:tab/>$2, %r8d</text:p>
            <text:p text:style-name="P159"><text:tab/>movl<text:tab/>%r8d, 0(%rsi)</text:p>
            <text:p text:style-name="P159"><text:tab/>leaq<text:tab/>__stringlit_1(%rip), %rdi</text:p>
            <text:p text:style-name="P159"><text:tab/>movq <text:s text:c="3"/>j4@GOTPCREL(%rip), %rdx</text:p>
            <text:p text:style-name="P159"><text:tab/>movl<text:tab/>0(%rdx), %esi</text:p>
            <text:p text:style-name="P159"><text:tab/>movl<text:tab/>$0, %eax</text:p>
            <text:p text:style-name="P159"><text:tab/>call<text:tab/>printf@PLT</text:p>
            <text:p text:style-name="P159"><text:tab/>movq <text:s text:c="3"/>i2@GOTPCREL(%rip), %rax</text:p>
            <text:p text:style-name="P159"><text:tab/>movl<text:tab/>0(%rax), %esi</text:p>
            <text:p text:style-name="P159"><text:tab/>movq <text:s text:c="3"/>j4@GOTPCREL(%rip), %rax</text:p>
            <text:p text:style-name="P159"><text:tab/>movl<text:tab/>0(%rax), %r10d</text:p>
            <text:p text:style-name="P159"><text:tab/>cmpl<text:tab/>%r10d, %esi</text:p>
            <text:p text:style-name="P159"><text:tab/>jge<text:tab/>.L100</text:p>
            <text:p text:style-name="P159"><text:tab/>movq <text:s text:c="3"/>i4@GOTPCREL(%rip), %rax</text:p>
            <text:p text:style-name="P159"><text:tab/>movl<text:tab/>0(%rax), %ecx</text:p>
            <text:p text:style-name="P159"><text:tab/>movq <text:s text:c="3"/>j4@GOTPCREL(%rip), %r9</text:p>
            <text:p text:style-name="P159"><text:tab/>movl<text:tab/>0(%r9), %esi</text:p>
            <text:p text:style-name="P159"><text:tab/>cmpl<text:tab/>%esi, %ecx</text:p>
            <text:p text:style-name="P159"><text:tab/>setl<text:tab/>%al</text:p>
            <text:p text:style-name="P159"><text:tab/><text:span text:style-name="T13">movzbl<text:tab/>%al, %eax</text:span></text:p>
            <text:p text:style-name="P159"><text:tab/>jmp<text:tab/>.L101</text:p>
            <text:p text:style-name="P159">.L100:</text:p>
            <text:p text:style-name="P159"><text:tab/>xorl<text:tab/>%eax, %eax</text:p>
            <text:p text:style-name="P159">.L101:</text:p>
            <text:p text:style-name="P159"><text:tab/>cmpl<text:tab/>$0, %eax</text:p>
            <text:p text:style-name="P159"><text:tab/>je<text:tab/>.L102</text:p>
            <text:p text:style-name="P159"><text:tab/>movq <text:s text:c="3"/>i2@GOTPCREL(%rip), %rsi</text:p>
            <text:p text:style-name="P159"><text:tab/>movl<text:tab/>$2, %ecx</text:p>
            <text:p text:style-name="P159"><text:tab/>movl<text:tab/>%ecx, 0(%rsi)</text:p>
            <text:p text:style-name="P159"><text:tab/>leaq<text:tab/>__stringlit_1(%rip), %rdi</text:p>
            <text:p text:style-name="P159"><text:tab/>movq <text:s text:c="3"/>i2@GOTPCREL(%rip), %r9</text:p>
            <text:p text:style-name="P159"><text:tab/><text:span text:style-name="T37">movl<text:tab/>0(%r9), %esi</text:span></text:p>
            <text:p text:style-name="P159"><text:tab/>movl<text:tab/>$0, %eax</text:p>
            <text:p text:style-name="P159"><text:tab/>call<text:tab/>printf@PLT</text:p>
            <text:p text:style-name="P159">.L102:</text:p>
            <text:p text:style-name="P159"><text:tab/>movq <text:s text:c="3"/>j4@GOTPCREL(%rip), %rsi</text:p>
            <text:p text:style-name="P159"><text:tab/>movq <text:s text:c="3"/>k5@GOTPCREL(%rip), %r8</text:p>
            <text:p text:style-name="P159"><text:tab/>movl<text:tab/>0(%r8), %r9d</text:p>
            <text:p text:style-name="P159"><text:tab/>movl<text:tab/>%r9d, 0(%rsi)</text:p>
            <text:p text:style-name="P159"><text:tab/>leaq<text:tab/>__stringlit_1(%rip), %rdi</text:p>
            <text:p text:style-name="P159"><text:tab/>movq <text:s text:c="3"/>j4@GOTPCREL(%rip), %rcx</text:p>
            <text:p text:style-name="P159"><text:tab/>movl<text:tab/>0(%rcx), %esi</text:p>
            <text:p text:style-name="P159"><text:tab/>movl<text:tab/>$0, %eax</text:p>
            <text:p text:style-name="P159"><text:tab/>call<text:tab/>printf@PLT</text:p>
            <text:p text:style-name="P159"><text:tab/>movq <text:s text:c="3"/>i2@GOTPCREL(%rip), %rax</text:p>
            <text:p text:style-name="P159"><text:tab/>movl<text:tab/>0(%rax), %eax</text:p>
            <text:p text:style-name="P159"><text:tab/>movq <text:s text:c="3"/>j4@GOTPCREL(%rip), %rdi</text:p>
            <text:p text:style-name="P159"><text:tab/>movl<text:tab/>0(%rdi), %edi</text:p>
            <text:p text:style-name="P159"><text:tab/>cmpl<text:tab/>%edi, %eax</text:p>
            <text:p text:style-name="P159"><text:tab/>jge<text:tab/>.L103</text:p>
            <text:p text:style-name="P159"><text:tab/>movq <text:s text:c="3"/>i4@GOTPCREL(%rip), %rax</text:p>
            <text:p text:style-name="P159"><text:tab/>movl<text:tab/>0(%rax), %r11d</text:p>
            <text:p text:style-name="P159"><text:tab/>movq <text:s text:c="3"/>j4@GOTPCREL(%rip), %rax</text:p>
            <text:p text:style-name="P159"><text:tab/>movl<text:tab/>0(%rax), %ecx</text:p>
            <text:p text:style-name="P159"><text:tab/>cmpl<text:tab/>%ecx, %r11d</text:p>
            <text:p text:style-name="P159"><text:tab/>setl<text:tab/>%al</text:p>
            <text:p text:style-name="P159"><text:tab/>movzbl<text:tab/>%al, %eax</text:p>
            <text:p text:style-name="P159"><text:tab/>jmp<text:tab/>.L104</text:p>
            <text:p text:style-name="P159">.L103:</text:p>
            <text:p text:style-name="P159"><text:tab/>xorl<text:tab/>%eax, %eax</text:p>
            <text:p text:style-name="P159">.L104:</text:p>
            <text:p text:style-name="P159"><text:tab/>cmpl<text:tab/>$0, %eax</text:p>
            <text:p text:style-name="P159"><text:soft-page-break/><text:tab/>je<text:tab/>.L105</text:p>
            <text:p text:style-name="P159"><text:tab/>movq <text:s text:c="3"/>i5@GOTPCREL(%rip), %r10</text:p>
            <text:p text:style-name="P159"><text:tab/>movl<text:tab/>$3, %eax</text:p>
            <text:p text:style-name="P159"><text:tab/>movl<text:tab/>%eax, 0(%r10)</text:p>
            <text:p text:style-name="P159"><text:tab/>leaq<text:tab/>__stringlit_1(%rip), %rdi</text:p>
            <text:p text:style-name="P159"><text:tab/>movq <text:s text:c="3"/>i5@GOTPCREL(%rip), %rdx</text:p>
            <text:p text:style-name="P159"><text:tab/>movl<text:tab/>0(%rdx), %esi</text:p>
            <text:p text:style-name="P159"><text:tab/>movl<text:tab/>$0, %eax</text:p>
            <text:p text:style-name="P159"><text:tab/>call<text:tab/>printf@PLT</text:p>
            <text:p text:style-name="P159">.L105:</text:p>
          </table:table-cell>
          <table:table-cell table:style-name="Таблица53.A1" office:value-type="string">
            <text:p text:style-name="P141"><text:tab/>movq<text:tab/>%rax, 0(%rsp)</text:p>
            <text:p text:style-name="P141"><text:tab/>movq <text:s text:c="3"/>j4@GOTPCREL(%rip), %rdx</text:p>
            <text:p text:style-name="P141"><text:tab/>movl<text:tab/>$2, %edi</text:p>
            <text:p text:style-name="P141"><text:tab/>movl<text:tab/>%edi, 0(%rdx)</text:p>
            <text:p text:style-name="P141"><text:tab/>leaq<text:tab/>__stringlit_1(%rip), %rdi</text:p>
            <text:p text:style-name="P141"><text:tab/>movl<text:tab/>$2, %esi</text:p>
            <text:p text:style-name="P141"><text:tab/>movl<text:tab/>$0, %eax</text:p>
            <text:p text:style-name="P141"><text:tab/>call<text:tab/>printf@PLT</text:p>
            <text:p text:style-name="P141"><text:tab/>movq <text:s text:c="3"/>i2@GOTPCREL(%rip), %r10</text:p>
            <text:p text:style-name="P141"><text:tab/>movl<text:tab/>0(%r10), %esi</text:p>
            <text:p text:style-name="P141"><text:tab/>movq <text:s text:c="3"/>j4@GOTPCREL(%rip), %r8</text:p>
            <text:p text:style-name="P141"><text:tab/>movl<text:tab/>0(%r8), %eax</text:p>
            <text:p text:style-name="P141"><text:tab/>cmpl<text:tab/>%eax, %esi</text:p>
            <text:p text:style-name="P141"><text:tab/>jge<text:tab/>.L100</text:p>
            <text:p text:style-name="P141"><text:tab/>movq <text:s text:c="3"/>i4@GOTPCREL(%rip), %rcx</text:p>
            <text:p text:style-name="P141"><text:tab/>movl<text:tab/>0(%rcx), %r8d</text:p>
            <text:p text:style-name="P141"><text:tab/>cmpl<text:tab/>%eax, %r8d</text:p>
            <text:p text:style-name="P141"><text:tab/>jge<text:tab/>.L100</text:p>
            <text:p text:style-name="P141"><text:tab/>movl<text:tab/>$2, %edx</text:p>
            <text:p text:style-name="P141"><text:tab/>movl<text:tab/>%edx, 0(%r10)</text:p>
            <text:p text:style-name="P141"><text:tab/>leaq<text:tab/>__stringlit_1(%rip), %rdi</text:p>
            <text:p text:style-name="P141"><text:tab/><text:span text:style-name="T37">movl<text:tab/>$2, %esi</text:span></text:p>
            <text:p text:style-name="P141"><text:tab/>movl<text:tab/>$0, %eax</text:p>
            <text:p text:style-name="P141"><text:tab/>call<text:tab/>printf@PLT</text:p>
            <text:p text:style-name="P141">.L100:</text:p>
            <text:p text:style-name="P141"><text:tab/>movq <text:s text:c="3"/>j4@GOTPCREL(%rip), %r10</text:p>
            <text:p text:style-name="P141"><text:tab/>movq <text:s text:c="3"/>k5@GOTPCREL(%rip), %rax</text:p>
            <text:p text:style-name="P141"><text:tab/>movl<text:tab/>0(%rax), %esi</text:p>
            <text:p text:style-name="P141"><text:tab/>movl<text:tab/>%esi, 0(%r10)</text:p>
            <text:p text:style-name="P141"><text:tab/>leaq<text:tab/>__stringlit_1(%rip), %rdi</text:p>
            <text:p text:style-name="P141"><text:tab/>movl<text:tab/>$0, %eax</text:p>
            <text:p text:style-name="P141"><text:tab/>call<text:tab/>printf@PLT</text:p>
            <text:p text:style-name="P141"><text:tab/>movq <text:s text:c="3"/>i2@GOTPCREL(%rip), %rax</text:p>
            <text:p text:style-name="P141"><text:tab/>movl<text:tab/>0(%rax), %edx</text:p>
            <text:p text:style-name="P141"><text:tab/>movq <text:s text:c="3"/>j4@GOTPCREL(%rip), %rcx</text:p>
            <text:p text:style-name="P141"><text:tab/>movl<text:tab/>0(%rcx), %r8d</text:p>
            <text:p text:style-name="P141"><text:tab/>cmpl<text:tab/>%r8d, %edx</text:p>
            <text:p text:style-name="P141"><text:tab/>jge<text:tab/>.L101</text:p>
            <text:p text:style-name="P141"><text:tab/>movq <text:s text:c="3"/>i4@GOTPCREL(%rip), %rax</text:p>
            <text:p text:style-name="P141"><text:tab/>movl<text:tab/>0(%rax), %r11d</text:p>
            <text:p text:style-name="P141"><text:tab/>cmpl<text:tab/>%r8d, %r11d</text:p>
            <text:p text:style-name="P141"><text:tab/>jge<text:tab/>.L101</text:p>
            <text:p text:style-name="P141"><text:tab/>movq <text:s text:c="3"/>i5@GOTPCREL(%rip), %r11</text:p>
            <text:p text:style-name="P141"><text:tab/>movl<text:tab/>$3, %r9d</text:p>
            <text:p text:style-name="P141"><text:tab/>movl<text:tab/>%r9d, 0(%r11)</text:p>
            <text:p text:style-name="P141"><text:tab/>leaq<text:tab/>__stringlit_1(%rip), %rdi</text:p>
            <text:p text:style-name="P141"><text:tab/>movl<text:tab/>$3, %esi</text:p>
            <text:p text:style-name="P141"><text:tab/>movl<text:tab/>$0, %eax</text:p>
            <text:p text:style-name="P141"><text:tab/>call<text:tab/>printf@PLT</text:p>
            <text:p text:style-name="P141">.L101:</text:p>
          </table:table-cell>
        </table:table-row>
      </table:table>
      <text:p text:style-name="P116"><text:span text:style-name="T20"/></text:p>
      <text:p text:style-name="P9">При оптимизации по скорости <text:span text:style-name="T45">происходит</text:span> оптимизаци<text:span text:style-name="T45">я</text:span> размножения <text:span text:style-name="T3">копий</text:span></text:p>
      <table:table table:name="Таблица54" table:style-name="Таблица54">
        <table:table-column table:style-name="Таблица54.A"/>
        <table:table-column table:style-name="Таблица54.B"/>
        <table:table-row table:style-name="Таблица54.1">
          <table:table-cell table:style-name="Таблица54.A1" office:value-type="string">
            <text:p text:style-name="P169"><text:tab/>movq <text:s text:c="3"/>i3@GOTPCREL(%rip), %r9</text:p>
            <text:p text:style-name="P169"><text:tab/>movl<text:tab/>$3, %r10d</text:p>
            <text:p text:style-name="P169"><text:tab/>movl<text:tab/>%r10d, 0(%r9)</text:p>
            <text:p text:style-name="P169"><text:tab/>movq <text:s text:c="3"/>flt_1@GOTPCREL(%rip), %rdi</text:p>
            <text:p text:style-name="P169"><text:tab/><text:span text:style-name="T37">movsd<text:tab/>.L106(%rip), %xmm1 </text:span></text:p>
            <text:p text:style-name="P169"><text:tab/><text:span text:style-name="T37">movsd<text:tab/>.L107(%rip), %xmm2</text:span></text:p>
            <text:p text:style-name="P169"><text:tab/><text:span text:style-name="T37">addsd<text:tab/>%xmm2, %xmm1</text:span></text:p>
            <text:p text:style-name="P169"><text:tab/>movsd<text:tab/>%xmm1, 0(%rdi)</text:p>
            <text:p text:style-name="P169"><text:tab/>movq <text:s text:c="3"/>i2@GOTPCREL(%rip), %rsi</text:p>
            <text:p text:style-name="P169"><text:tab/>movl<text:tab/>$5, %edx</text:p>
            <text:p text:style-name="P169"><text:tab/>movl<text:tab/>%edx, 0(%rsi)</text:p>
            <text:p text:style-name="P169"><text:tab/>movq <text:s text:c="3"/>j2@GOTPCREL(%rip), %r9</text:p>
            <text:p text:style-name="P169"><text:tab/>movq <text:s text:c="3"/>i@GOTPCREL(%rip), %r8</text:p>
            <text:p text:style-name="P169"><text:tab/>movl<text:tab/>0(%r8), %ecx</text:p>
            <text:p text:style-name="P169"><text:tab/>movl<text:tab/>%ecx, 0(%r9)</text:p>
            <text:p text:style-name="P169"><text:tab/>movq <text:s text:c="3"/>k2@GOTPCREL(%rip), %rax</text:p>
            <text:p text:style-name="P169"><text:tab/>movq <text:s text:c="3"/>i@GOTPCREL(%rip), %r10</text:p>
            <text:p text:style-name="P169"><text:tab/>movl<text:tab/>0(%r10), %r10d</text:p>
            <text:p text:style-name="P169"><text:tab/>movl<text:tab/>%r10d, 0(%rax)</text:p>
            <text:p text:style-name="P169"><text:tab/>movq <text:s text:c="3"/>i4@GOTPCREL(%rip), %rax</text:p>
            <text:p text:style-name="P169"><text:tab/>movq <text:s text:c="3"/>i@GOTPCREL(%rip), %rdi</text:p>
            <text:p text:style-name="P169"><text:tab/>movl<text:tab/>0(%rdi), %edi</text:p>
            <text:p text:style-name="P169"><text:tab/>movl<text:tab/>%edi, 0(%rax)</text:p>
            <text:p text:style-name="P169"><text:tab/>movq <text:s text:c="3"/>i5@GOTPCREL(%rip), %r11</text:p>
            <text:p text:style-name="P169"><text:tab/>xorl<text:tab/>%r9d, %r9d</text:p>
            <text:p text:style-name="P169"><text:tab/>movl<text:tab/>%r9d, 0(%r11)</text:p>
            <text:p text:style-name="P169"><text:tab/>leaq<text:tab/>__stringlit_2(%rip), %rdi</text:p>
            <text:p text:style-name="P169"><text:tab/>movl<text:tab/>$0, %eax</text:p>
            <text:p text:style-name="P169"><text:tab/>call<text:tab/>printf@PLT</text:p>
            <text:p text:style-name="P169"><text:tab/>movq <text:s text:c="3"/>flt_3@GOTPCREL(%rip), %r8</text:p>
            <text:p text:style-name="P169"><text:tab/>movsd<text:tab/>.L106(%rip), %xmm4</text:p>
            <text:p text:style-name="P169"><text:tab/>movsd<text:tab/>.L108(%rip), %xmm5 # 1</text:p>
            <text:p text:style-name="P169"><text:tab/>mulsd<text:tab/>%xmm5, %xmm4</text:p>
            <text:p text:style-name="P169"><text:tab/>movsd<text:tab/>%xmm4, 0(%r8)</text:p>
            <text:p text:style-name="P169"><text:tab/>movq <text:s text:c="3"/>flt_4@GOTPCREL(%rip), %rdi</text:p>
            <text:p text:style-name="P169"><text:tab/>movsd<text:tab/>.L108(%rip), %xmm2 # 1</text:p>
            <text:p text:style-name="P169"><text:tab/>movsd<text:tab/>.L109(%rip), %xmm4</text:p>
            <text:p text:style-name="P169"><text:tab/>addsd<text:tab/>%xmm4, %xmm2</text:p>
            <text:p text:style-name="P169"><text:tab/>movsd<text:tab/>%xmm2, 0(%rdi)</text:p>
            <text:p text:style-name="P169"><text:tab/>movq <text:s text:c="3"/>flt_5@GOTPCREL(%rip), %rcx</text:p>
            <text:p text:style-name="P169"><text:tab/>movq <text:s text:c="3"/>flt_6@GOTPCREL(%rip), %rdx</text:p>
            <text:p text:style-name="P169"><text:tab/>movsd<text:tab/>0(%rdx), %xmm0</text:p>
            <text:p text:style-name="P169"><text:tab/>xorpd<text:tab/>%xmm15, %xmm15</text:p>
            <text:p text:style-name="P169"><text:tab/>mulsd<text:tab/>%xmm15, %xmm0</text:p>
            <text:p text:style-name="P169"><text:tab/>movsd<text:tab/>%xmm0, 0(%rcx)</text:p>
            <text:p text:style-name="P169"><text:tab/>movq <text:s text:c="3"/>flt_6@GOTPCREL(%rip), %r11</text:p>
            <text:p text:style-name="P169"><text:tab/>movq <text:s text:c="3"/>flt_2@GOTPCREL(%rip), %rcx</text:p>
            <text:p text:style-name="P169"><text:tab/>movsd<text:tab/>0(%rcx), %xmm3</text:p>
            <text:p text:style-name="P169"><text:tab/>movq <text:s text:c="3"/>flt_3@GOTPCREL(%rip), %rsi</text:p>
            <text:p text:style-name="P169"><text:tab/>movsd<text:tab/>0(%rsi), %xmm4</text:p>
            <text:p text:style-name="P169"><text:tab/>mulsd<text:tab/>%xmm4, %xmm3</text:p>
            <text:p text:style-name="P169"><text:tab/>movsd<text:tab/>%xmm3, 0(%r11)</text:p>
            <text:p text:style-name="P169"><text:tab/></text:p>
          </table:table-cell>
          <table:table-cell table:style-name="Таблица54.A1" office:value-type="string">
            <text:p text:style-name="P178"><text:tab/>I3 = 1 + 2;</text:p>
            <text:p text:style-name="P178"><text:tab/>flt_1 = 2.4 + 6.3;</text:p>
            <text:p text:style-name="P178"><text:tab/>i2 = 5;</text:p>
            <text:p text:style-name="P178"><text:tab/>j2 = i + 0;</text:p>
            <text:p text:style-name="P178"><text:tab/>k2 = i / 1;</text:p>
            <text:p text:style-name="P178"><text:tab/>i4 = i * 1;</text:p>
            <text:p text:style-name="P178"><text:tab/>i5 = i * 0;</text:p>
            <text:p text:style-name="P178"><text:tab/>printf("This compiler handles divide-by-zero as \</text:p>
            <text:p text:style-name="P178"><text:s text:c="20"/>an error\n");</text:p>
            <text:p text:style-name="P178"><text:tab/>flt_3 = 2.4 / 1.0;</text:p>
            <text:p text:style-name="P178"><text:tab/>flt_4 = 1.0 + 0.0000001;</text:p>
            <text:p text:style-name="P178"><text:tab/>flt_5 = flt_6 * 0.0;</text:p>
            <text:p text:style-name="P178"><text:tab/>flt_6 = flt_2 * flt_3;</text:p>
          </table:table-cell>
        </table:table-row>
      </table:table>
      <text:p text:style-name="P97"/>
      <text:p text:style-name="P9">Без оптимизации <text:span text:style-name="T46">произошла</text:span> свёртка <text:span text:style-name="T46">целой </text:span>констант<text:span text:style-name="T46">ы, не целую не свернуло</text:span>, <text:span text:style-name="T47">А</text:span>рифметические тождества оптимизируются <text:span text:style-name="T47">частично</text:span></text:p>
      <table:table table:name="Таблица55" table:style-name="Таблица55">
        <table:table-column table:style-name="Таблица55.A"/>
        <table:table-column table:style-name="Таблица55.B"/>
        <table:table-row table:style-name="Таблица55.1">
          <table:table-cell table:style-name="Таблица55.A1" office:value-type="string">
            <text:p text:style-name="P170"><text:tab/>movq <text:s text:c="3"/>i3@GOTPCREL(%rip), %r9</text:p>
            <text:p text:style-name="P170"><text:tab/>movl<text:tab/>$3, %r10d</text:p>
            <text:p text:style-name="P170"><text:tab/>movl<text:tab/>%r10d, 0(%r9)</text:p>
            <text:p text:style-name="P170"><text:tab/>movq <text:s text:c="3"/>flt_1@GOTPCREL(%rip), %rdi</text:p>
            <text:p text:style-name="P170"><text:tab/><text:span text:style-name="T37">movsd<text:tab/>.L106(%rip), %xmm1 </text:span></text:p>
            <text:p text:style-name="P170"><text:tab/><text:span text:style-name="T37">movsd<text:tab/>.L107(%rip), %xmm2</text:span></text:p>
            <text:p text:style-name="P170"><text:tab/><text:span text:style-name="T37">addsd<text:tab/>%xmm2, %xmm1</text:span></text:p>
            <text:p text:style-name="P170"><text:tab/>movsd<text:tab/>%xmm1, 0(%rdi)</text:p>
            <text:p text:style-name="P170"><text:tab/>movq <text:s text:c="3"/>i2@GOTPCREL(%rip), %rsi</text:p>
            <text:p text:style-name="P170"><text:tab/>movl<text:tab/>$5, %edx</text:p>
            <text:p text:style-name="P170"><text:tab/>movl<text:tab/>%edx, 0(%rsi)</text:p>
            <text:p text:style-name="P170"><text:tab/>movq <text:s text:c="3"/>j2@GOTPCREL(%rip), %r9</text:p>
            <text:p text:style-name="P170"><text:tab/><text:span text:style-name="T39">movq <text:s text:c="3"/>i@GOTPCREL(%rip), %r8</text:span></text:p>
            <text:p text:style-name="P170"><text:tab/>movl<text:tab/>0(%r8), %ecx</text:p>
            <text:p text:style-name="P170"><text:tab/>movl<text:tab/>%ecx, 0(%r9)</text:p>
            <text:p text:style-name="P170"><text:tab/>movq <text:s text:c="3"/>k2@GOTPCREL(%rip), %rax</text:p>
            <text:p text:style-name="P170"><text:tab/><text:span text:style-name="T39">movq <text:s text:c="3"/>i@GOTPCREL(%rip), %r10</text:span></text:p>
            <text:p text:style-name="P170"><text:tab/>movl<text:tab/>0(%r10), %r10d</text:p>
            <text:p text:style-name="P170"><text:tab/>movl<text:tab/>%r10d, 0(%rax)</text:p>
            <text:p text:style-name="P170"><text:tab/>movq <text:s text:c="3"/>i4@GOTPCREL(%rip), %rax</text:p>
            <text:p text:style-name="P170"><text:tab/><text:span text:style-name="T39">movq <text:s text:c="3"/>i@GOTPCREL(%rip), %rdi</text:span></text:p>
            <text:p text:style-name="P170"><text:tab/>movl<text:tab/>0(%rdi), %edi</text:p>
            <text:p text:style-name="P170"><text:tab/>movl<text:tab/>%edi, 0(%rax)</text:p>
            <text:p text:style-name="P170"><text:tab/>movq <text:s text:c="3"/>i5@GOTPCREL(%rip), %r11</text:p>
            <text:p text:style-name="P170"><text:tab/>xorl<text:tab/>%r9d, %r9d</text:p>
            <text:p text:style-name="P170"><text:tab/>movl<text:tab/>%r9d, 0(%r11)</text:p>
            <text:p text:style-name="P170"><text:tab/>leaq<text:tab/>__stringlit_2(%rip), %rdi</text:p>
            <text:p text:style-name="P170"><text:tab/>movl<text:tab/>$0, %eax</text:p>
            <text:p text:style-name="P170"><text:tab/>call<text:tab/>printf@PLT</text:p>
            <text:p text:style-name="P170"><text:tab/>movq <text:s text:c="3"/>flt_3@GOTPCREL(%rip), %r8</text:p>
            <text:p text:style-name="P170"><text:tab/>movsd<text:tab/>.L106(%rip), %xmm4</text:p>
            <text:p text:style-name="P170"><text:tab/>movsd<text:tab/>.L108(%rip), %xmm5 # 1</text:p>
            <text:p text:style-name="P170"><text:tab/>mulsd<text:tab/>%xmm5, %xmm4</text:p>
            <text:p text:style-name="P170"><text:tab/>movsd<text:tab/>%xmm4, 0(%r8)</text:p>
            <text:p text:style-name="P170"><text:tab/>movq <text:s text:c="3"/>flt_4@GOTPCREL(%rip), %rdi</text:p>
            <text:p text:style-name="P170"><text:tab/>movsd<text:tab/>.L108(%rip), %xmm2 # 1</text:p>
            <text:p text:style-name="P170"><text:tab/>movsd<text:tab/>.L109(%rip), %xmm4</text:p>
            <text:p text:style-name="P170"><text:tab/>addsd<text:tab/>%xmm4, %xmm2</text:p>
            <text:p text:style-name="P170"><text:tab/>movsd<text:tab/>%xmm2, 0(%rdi)</text:p>
            <text:p text:style-name="P170"><text:tab/>movq <text:s text:c="3"/>flt_5@GOTPCREL(%rip), %rcx</text:p>
            <text:p text:style-name="P170"><text:tab/>movq <text:s text:c="3"/>flt_6@GOTPCREL(%rip), %rdx</text:p>
            <text:p text:style-name="P170"><text:tab/>movsd<text:tab/>0(%rdx), %xmm0</text:p>
            <text:p text:style-name="P170"><text:tab/>xorpd<text:tab/>%xmm15, %xmm15</text:p>
            <text:p text:style-name="P170"><text:tab/>mulsd<text:tab/>%xmm15, %xmm0</text:p>
            <text:p text:style-name="P170"><text:tab/>movsd<text:tab/>%xmm0, 0(%rcx)</text:p>
            <text:p text:style-name="P170"><text:tab/>movq <text:s text:c="3"/>flt_6@GOTPCREL(%rip), %r11</text:p>
            <text:p text:style-name="P170"><text:tab/>movq <text:s text:c="3"/>flt_2@GOTPCREL(%rip), %rcx</text:p>
            <text:p text:style-name="P170"><text:tab/>movsd<text:tab/>0(%rcx), %xmm3</text:p>
            <text:p text:style-name="P170"><text:tab/>movq <text:s text:c="3"/>flt_3@GOTPCREL(%rip), %rsi</text:p>
            <text:p text:style-name="P170"><text:tab/>movsd<text:tab/>0(%rsi), %xmm4</text:p>
            <text:p text:style-name="P170"><text:tab/>mulsd<text:tab/>%xmm4, %xmm3</text:p>
            <text:p text:style-name="P170"><text:tab/>movsd<text:tab/>%xmm3, 0(%r11)</text:p>
            <text:p text:style-name="P170"><text:tab/></text:p>
          </table:table-cell>
          <table:table-cell table:style-name="Таблица55.A1" office:value-type="string">
            <text:p text:style-name="P142"><text:tab/>movq <text:s text:c="3"/>i3@GOTPCREL(%rip), %rax</text:p>
            <text:p text:style-name="P141"><text:tab/>movl<text:tab/>$3, %r8d</text:p>
            <text:p text:style-name="P141"><text:tab/>movl<text:tab/>%r8d, 0(%rax)</text:p>
            <text:p text:style-name="P141"><text:tab/>movq <text:s text:c="3"/>flt_1@GOTPCREL(%rip), %r10</text:p>
            <text:p text:style-name="P141"><text:tab/>movsd<text:tab/>.L102(%rip), %xmm0</text:p>
            <text:p text:style-name="P141"><text:tab/>movsd<text:tab/>%xmm0, 0(%r10)</text:p>
            <text:p text:style-name="P141"><text:tab/>movq <text:s text:c="3"/>i2@GOTPCREL(%rip), %r8</text:p>
            <text:p text:style-name="P141"><text:tab/>movl<text:tab/>$5, %esi</text:p>
            <text:p text:style-name="P141"><text:tab/>movl<text:tab/>%esi, 0(%r8)</text:p>
            <text:p text:style-name="P141"><text:tab/>movq <text:s text:c="3"/>j2@GOTPCREL(%rip), %r9</text:p>
            <text:p text:style-name="P141"><text:tab/>movq <text:s text:c="3"/><text:span text:style-name="T39">i@GOTPCREL(%rip), %r8</text:span></text:p>
            <text:p text:style-name="P141"><text:tab/>movl<text:tab/><text:span text:style-name="T39">0(%r8), %esi</text:span></text:p>
            <text:p text:style-name="P141"><text:tab/>movl<text:tab/><text:span text:style-name="T39">%esi, 0(%r9)</text:span></text:p>
            <text:p text:style-name="P141"><text:tab/>movq <text:s text:c="3"/>k2@GOTPCREL(%rip), %rdi</text:p>
            <text:p text:style-name="P141"><text:tab/>movl<text:tab/><text:span text:style-name="T39">%esi, 0(%rdi)</text:span></text:p>
            <text:p text:style-name="P141"><text:tab/>movq <text:s text:c="3"/>i4@GOTPCREL(%rip), %r10</text:p>
            <text:p text:style-name="P141"><text:tab/>movl<text:tab/><text:span text:style-name="T39">%esi, 0(%r10)</text:span></text:p>
            <text:p text:style-name="P141"><text:tab/>movq <text:s text:c="3"/>i5@GOTPCREL(%rip), %r8</text:p>
            <text:p text:style-name="P141"><text:tab/>xorl<text:tab/>%r9d, %r9d</text:p>
            <text:p text:style-name="P141"><text:tab/>movl<text:tab/>%r9d, 0(%r8)</text:p>
            <text:p text:style-name="P141"><text:tab/>leaq<text:tab/>__stringlit_2(%rip), %rdi</text:p>
            <text:p text:style-name="P141"><text:tab/>movl<text:tab/>$0, %eax</text:p>
            <text:p text:style-name="P141"><text:tab/>call<text:tab/>printf@PLT</text:p>
            <text:p text:style-name="P141"><text:tab/>movq <text:s text:c="3"/>flt_3@GOTPCREL(%rip), %r11</text:p>
            <text:p text:style-name="P141"><text:tab/>movsd<text:tab/>.L103(%rip), %xmm1 </text:p>
            <text:p text:style-name="P141"><text:tab/>movsd<text:tab/>%xmm1, 0(%r11)</text:p>
            <text:p text:style-name="P141"><text:tab/>movq <text:s text:c="3"/>flt_4@GOTPCREL(%rip), %r11</text:p>
            <text:p text:style-name="P141"><text:tab/>movsd<text:tab/>.L104(%rip), %xmm6 </text:p>
            <text:p text:style-name="P141"><text:tab/>movsd<text:tab/>%xmm6, 0(%r11)</text:p>
            <text:p text:style-name="P141"><text:tab/>movq <text:s text:c="3"/>flt_5@GOTPCREL(%rip), %r11</text:p>
            <text:p text:style-name="P141"><text:tab/>movq <text:s text:c="3"/>flt_6@GOTPCREL(%rip), %rcx</text:p>
            <text:p text:style-name="P141"><text:tab/><text:span text:style-name="T37">movsd<text:tab/>0(%rcx), %xmm0</text:span></text:p>
            <text:p text:style-name="P141"><text:tab/><text:span text:style-name="T37">xorpd<text:tab/>%xmm11, %xmm11</text:span></text:p>
            <text:p text:style-name="P141"><text:tab/><text:span text:style-name="T37">mulsd<text:tab/>%xmm11, %xmm0</text:span></text:p>
            <text:p text:style-name="P141"><text:tab/>movsd<text:tab/>%xmm0, 0(%r11)</text:p>
            <text:p text:style-name="P141"><text:tab/>movq <text:s text:c="3"/>flt_2@GOTPCREL(%rip), %rdx</text:p>
            <text:p text:style-name="P141"><text:tab/>movsd<text:tab/>0(%rdx), %xmm2</text:p>
            <text:p text:style-name="P141"><text:tab/>mulsd<text:tab/>%xmm1, %xmm2</text:p>
            <text:p text:style-name="P141"><text:tab/>movsd<text:tab/>%xmm2, 0(%rcx)</text:p>
          </table:table-cell>
        </table:table-row>
      </table:table>
      <text:p text:style-name="P119"/>
      <text:p text:style-name="P11">Свёртка констант выполняется. Оптимизаций арифметических тождеств есть, кроме умножения на 0.0</text:p>
      <text:p text:style-name="P9"/>
      <text:p text:style-name="P10"><text:tab/></text:p>
      <text:p text:style-name="P3"><text:span text:style-name="T48">Можно увидеть</text:span> оптимизаци<text:span text:style-name="T48">ю </text:span>излишних загрузок переменной в регистр.</text:p>
      <text:p text:style-name="P9"/>
      <table:table table:name="Таблица56" table:style-name="Таблица56">
        <table:table-column table:style-name="Таблица56.A"/>
        <table:table-column table:style-name="Таблица56.B"/>
        <table:table-row>
          <table:table-cell table:style-name="Таблица56.A1" office:value-type="string">
            <text:p text:style-name="P123"><text:tab/>movq <text:s text:c="3"/>k3@GOTPCREL(%rip), %rdi</text:p>
            <text:p text:style-name="P123"><text:tab/>movl<text:tab/>$1, %r10d</text:p>
            <text:p text:style-name="P123"><text:tab/>movl<text:tab/>%r10d, 0(%rdi)</text:p>
            <text:p text:style-name="P123"><text:tab/>movq <text:s text:c="3"/>k3@GOTPCREL(%rip), %rcx</text:p>
            <text:p text:style-name="P123"><text:tab/>movl<text:tab/>$1, %eax</text:p>
            <text:p text:style-name="P123"><text:tab/>movl<text:tab/>%eax, 0(%rcx)</text:p>
          </table:table-cell>
          <table:table-cell table:style-name="Таблица56.A1" office:value-type="string">
            <text:p text:style-name="P123"><text:tab/>movq <text:s text:c="3"/>k3@GOTPCREL(%rip), %r9</text:p>
            <text:p text:style-name="P123"><text:tab/>movl<text:tab/>$1, %esi</text:p>
            <text:p text:style-name="P123"><text:tab/>movl<text:tab/>%esi, 0(%r9)</text:p>
          </table:table-cell>
        </table:table-row>
      </table:table>
      <text:p text:style-name="P9"/>
      <text:p text:style-name="P88"><text:span text:style-name="T22">Удаление излишнего присваивания проис</text:span><text:span text:style-name="T17">ходит только с оптимизацией</text:span></text:p>
      <table:table table:name="Таблица57" table:style-name="Таблица57">
        <table:table-column table:style-name="Таблица57.A"/>
        <table:table-column table:style-name="Таблица57.B"/>
        <table:table-row table:style-name="Таблица57.1">
          <table:table-cell table:style-name="Таблица57.A1" office:value-type="string">
            <text:p text:style-name="P160"><text:tab/>movq <text:s text:c="3"/>k2@GOTPCREL(%rip), %rsi</text:p>
            <text:p text:style-name="P160"><text:tab/>movq <text:s text:c="3"/>j5@GOTPCREL(%rip), %rax</text:p>
            <text:p text:style-name="P160"><text:tab/>movl<text:tab/>0(%rax), %edi</text:p>
            <text:p text:style-name="P160"><text:tab/><text:span text:style-name="T37">leal<text:tab/>0(,%edi,4), %eax</text:span></text:p>
            <text:p text:style-name="P160"><text:tab/>movl<text:tab/>%eax, 0(%rsi)</text:p>
            <text:p text:style-name="P160"><text:tab/>movq <text:s text:c="3"/>i@GOTPCREL(%rip), %r9</text:p>
            <text:p text:style-name="P160"><text:tab/>xorl<text:tab/>%r8d, %r8d</text:p>
            <text:p text:style-name="P160"><text:tab/>movl<text:tab/>%r8d, 0(%r9)</text:p>
            <text:p text:style-name="P160">.L110:</text:p>
            <text:p text:style-name="P160"><text:tab/>movq <text:s text:c="3"/>i@GOTPCREL(%rip), %rax</text:p>
            <text:p text:style-name="P160"><text:tab/>movl<text:tab/>0(%rax), %eax</text:p>
            <text:p text:style-name="P160"><text:tab/>cmpl<text:tab/>$5, %eax</text:p>
            <text:p text:style-name="P160"><text:tab/>jg<text:tab/>.L111</text:p>
            <text:p text:style-name="P160"><text:tab/>movq <text:s text:c="3"/>ivector4@GOTPCREL(%rip), %rcx</text:p>
            <text:p text:style-name="P160"><text:tab/>movq <text:s text:c="3"/>i@GOTPCREL(%rip), %rsi</text:p>
            <text:p text:style-name="P160"><text:tab/>movl<text:tab/>0(%rsi), %r9d</text:p>
            <text:p text:style-name="P160"><text:tab/>movslq<text:tab/>%r9d, %r11</text:p>
            <text:p text:style-name="P160"><text:tab/>movq <text:s text:c="3"/>i@GOTPCREL(%rip), %r8</text:p>
            <text:p text:style-name="P160"><text:tab/>movl<text:tab/>0(%r8), %eax</text:p>
            <text:p text:style-name="P160"><text:tab/><text:span text:style-name="T37">leal<text:tab/>0(,%eax,2), %r10d</text:span></text:p>
            <text:p text:style-name="P160"><text:tab/>movswl<text:tab/>%r10w, %r9d</text:p>
            <text:p text:style-name="P160"><text:tab/>movw<text:tab/>%r9w, 0(%rcx,%r11,2)</text:p>
            <text:p text:style-name="P160"><text:tab/>movq <text:s text:c="3"/>i@GOTPCREL(%rip), %r9</text:p>
            <text:p text:style-name="P160"><text:tab/>movq <text:s text:c="3"/>i@GOTPCREL(%rip), %r8</text:p>
            <text:p text:style-name="P160"><text:tab/>movl<text:tab/>0(%r8), %eax</text:p>
            <text:p text:style-name="P160"><text:tab/>leal<text:tab/>1(%eax), %edi</text:p>
            <text:p text:style-name="P160"><text:tab/>movl<text:tab/>%edi, 0(%r9)</text:p>
            <text:p text:style-name="P160"><text:tab/>jmp<text:tab/>.L110</text:p>
            <text:p text:style-name="P160">L111:</text:p>
          </table:table-cell>
          <table:table-cell table:style-name="Таблица57.A1" office:value-type="string">
            <text:p text:style-name="P178"><text:tab/>k2 = 4 * j5;</text:p>
            <text:p text:style-name="P178"><text:tab/>for (i = 0; i &lt;= 5; i++)</text:p>
            <text:p text:style-name="P178"><text:tab/><text:tab/>ivector4[i] = i * 2;</text:p>
          </table:table-cell>
        </table:table-row>
      </table:table>
      <text:p text:style-name="P88"><text:span text:style-name="T17"/></text:p>
      <text:p text:style-name="P60"><text:span text:style-name="T17">С</text:span><text:span text:style-name="T16">нижение мощности </text:span><text:span text:style-name="T19">в отличии от остальных рассмотренных компиляторов не </text:span><text:span text:style-name="T16">происходит без флага оптимизации</text:span><text:span text:style-name="T23">, </text:span><text:span text:style-name="T29">более того даже с флагом оптимизации, умножение не заменяется на сдвиг</text:span></text:p>
      <text:p text:style-name="P60"><text:span text:style-name="T23"/></text:p>
      <table:table table:name="Таблица58" table:style-name="Таблица58">
        <table:table-column table:style-name="Таблица58.A"/>
        <table:table-column table:style-name="Таблица58.B"/>
        <table:table-row>
          <table:table-cell table:style-name="Таблица58.A1" office:value-type="string">
            <text:p text:style-name="P159"><text:tab/>movq <text:s text:c="3"/>k2@GOTPCREL(%rip), %rsi</text:p>
            <text:p text:style-name="P159"><text:tab/>movq <text:s text:c="3"/>j5@GOTPCREL(%rip), %rax</text:p>
            <text:p text:style-name="P159"><text:tab/>movl<text:tab/>0(%rax), %edi</text:p>
            <text:p text:style-name="P159"><text:tab/><text:span text:style-name="T37">leal<text:tab/>0(,%edi,4), %eax</text:span></text:p>
            <text:p text:style-name="P159"><text:tab/>movl<text:tab/>%eax, 0(%rsi)</text:p>
            <text:p text:style-name="P159"><text:tab/>movq <text:s text:c="3"/>i@GOTPCREL(%rip), %r9</text:p>
            <text:p text:style-name="P159"><text:tab/>xorl<text:tab/>%r8d, %r8d</text:p>
            <text:p text:style-name="P159"><text:tab/>movl<text:tab/>%r8d, 0(%r9)</text:p>
            <text:p text:style-name="P159">.L110:</text:p>
            <text:p text:style-name="P159"><text:tab/>movq <text:s text:c="3"/>i@GOTPCREL(%rip), %rax</text:p>
            <text:p text:style-name="P159"><text:tab/>movl<text:tab/>0(%rax), %eax</text:p>
            <text:p text:style-name="P159"><text:tab/>cmpl<text:tab/>$5, %eax</text:p>
            <text:p text:style-name="P159"><text:tab/>jg<text:tab/>.L111</text:p>
            <text:p text:style-name="P159"><text:tab/>movq <text:s text:c="3"/>ivector4@GOTPCREL(%rip), %rcx</text:p>
            <text:p text:style-name="P159"><text:tab/>movq <text:s text:c="3"/>i@GOTPCREL(%rip), %rsi</text:p>
            <text:p text:style-name="P159"><text:tab/>movl<text:tab/>0(%rsi), %r9d</text:p>
            <text:p text:style-name="P159"><text:tab/>movslq<text:tab/>%r9d, %r11</text:p>
            <text:p text:style-name="P159"><text:tab/>movq <text:s text:c="3"/>i@GOTPCREL(%rip), %r8</text:p>
            <text:p text:style-name="P159"><text:tab/>movl<text:tab/>0(%r8), %eax</text:p>
            <text:p text:style-name="P159"><text:tab/><text:span text:style-name="T37">leal<text:tab/>0(,%eax,2), %r10d</text:span></text:p>
            <text:p text:style-name="P159"><text:tab/>movswl<text:tab/>%r10w, %r9d</text:p>
            <text:p text:style-name="P159"><text:tab/>movw<text:tab/>%r9w, 0(%rcx,%r11,2)</text:p>
            <text:p text:style-name="P159"><text:tab/>movq <text:s text:c="3"/>i@GOTPCREL(%rip), %r9</text:p>
            <text:p text:style-name="P159"><text:tab/>movq <text:s text:c="3"/>i@GOTPCREL(%rip), %r8</text:p>
            <text:p text:style-name="P159"><text:tab/>movl<text:tab/>0(%r8), %eax</text:p>
            <text:p text:style-name="P159"><text:tab/>leal<text:tab/>1(%eax), %edi</text:p>
            <text:p text:style-name="P159"><text:tab/>movl<text:tab/>%edi, 0(%r9)</text:p>
            <text:p text:style-name="P159"><text:soft-page-break/><text:tab/>jmp<text:tab/>.L110</text:p>
            <text:p text:style-name="P159">L111:</text:p>
          </table:table-cell>
          <table:table-cell table:style-name="Таблица58.A1" office:value-type="string">
            <text:p text:style-name="P159"><text:tab/>movq <text:s text:c="3"/>k2@GOTPCREL(%rip), %rsi</text:p>
            <text:p text:style-name="P159"><text:tab/>movq <text:s text:c="3"/>j5@GOTPCREL(%rip), %r9</text:p>
            <text:p text:style-name="P159"><text:tab/>movl<text:tab/>0(%r9), %edi</text:p>
            <text:p text:style-name="P159"><text:tab/><text:span text:style-name="T37">leal<text:tab/>0(,%edi,4), %edx</text:span></text:p>
            <text:p text:style-name="P159"><text:tab/>movl<text:tab/>%edx, 0(%rsi)</text:p>
            <text:p text:style-name="P159"><text:tab/>movq <text:s text:c="3"/>i@GOTPCREL(%rip), %r9</text:p>
            <text:p text:style-name="P159"><text:tab/>xorl<text:tab/>%eax, %eax</text:p>
            <text:p text:style-name="P159"><text:tab/>movl<text:tab/>%eax, 0(%r9)</text:p>
            <text:p text:style-name="P159">.L105:</text:p>
            <text:p text:style-name="P159"><text:tab/>movq <text:s text:c="3"/>i@GOTPCREL(%rip), %r10</text:p>
            <text:p text:style-name="P159"><text:tab/>movl<text:tab/>0(%r10), %esi</text:p>
            <text:p text:style-name="P159"><text:tab/>cmpl<text:tab/>$5, %esi</text:p>
            <text:p text:style-name="P159"><text:tab/>jg<text:tab/>.L106</text:p>
            <text:p text:style-name="P159"><text:tab/>movq <text:s text:c="3"/>ivector4@GOTPCREL(%rip), %r8</text:p>
            <text:p text:style-name="P159"><text:tab/>movslq<text:tab/>%esi, %rcx</text:p>
            <text:p text:style-name="P159"><text:tab/><text:span text:style-name="T37">leal<text:tab/>0(,%esi,2), %eax</text:span></text:p>
            <text:p text:style-name="P159"><text:tab/>movw<text:tab/>%ax, 0(%r8,%rcx,2)</text:p>
            <text:p text:style-name="P159"><text:tab/>leal<text:tab/>1(%esi), %edi</text:p>
            <text:p text:style-name="P159"><text:tab/>movl<text:tab/>%edi, 0(%r10)</text:p>
            <text:p text:style-name="P159"><text:tab/>jmp<text:tab/>.L105</text:p>
            <text:p text:style-name="P159">L106:</text:p>
          </table:table-cell>
        </table:table-row>
      </table:table>
      <text:p text:style-name="P86"><text:span text:style-name="T23"/></text:p>
      <table:table table:name="Таблица59" table:style-name="Таблица59">
        <table:table-column table:style-name="Таблица59.A"/>
        <table:table-column table:style-name="Таблица59.B"/>
        <table:table-row table:style-name="Таблица59.1">
          <table:table-cell table:style-name="Таблица59.A1" office:value-type="string">
            <text:p text:style-name="P159"><text:tab/>movq <text:s text:c="3"/>j5@GOTPCREL(%rip), %r8</text:p>
            <text:p text:style-name="P159"><text:tab/>xorl<text:tab/>%ecx, %ecx</text:p>
            <text:p text:style-name="P159"><text:tab/>movl<text:tab/>%ecx, 0(%r8)</text:p>
            <text:p text:style-name="P159"><text:tab/>movq <text:s text:c="3"/>k5@GOTPCREL(%rip), %rax</text:p>
            <text:p text:style-name="P159"><text:tab/>movl<text:tab/>$10000, %ecx</text:p>
            <text:p text:style-name="P159"><text:tab/>movl<text:tab/>%ecx, 0(%rax)</text:p>
            <text:p text:style-name="P159">.L112:</text:p>
            <text:p text:style-name="P159"><text:tab/>movq <text:s text:c="3"/>k5@GOTPCREL(%rip), %rdi</text:p>
            <text:p text:style-name="P159"><text:tab/>movq <text:s text:c="3"/>k5@GOTPCREL(%rip), %rcx</text:p>
            <text:p text:style-name="P159"><text:tab/>movl<text:tab/>0(%rcx), %esi</text:p>
            <text:p text:style-name="P159"><text:tab/>leal<text:tab/>-1(%esi), %r10d</text:p>
            <text:p text:style-name="P159"><text:tab/>movl<text:tab/>%r10d, 0(%rdi)</text:p>
            <text:p text:style-name="P159"><text:tab/>movq <text:s text:c="3"/>j5@GOTPCREL(%rip), %rdi</text:p>
            <text:p text:style-name="P159"><text:tab/>movq <text:s text:c="3"/>j5@GOTPCREL(%rip), %r9</text:p>
            <text:p text:style-name="P159"><text:tab/>movl<text:tab/>0(%r9), %esi</text:p>
            <text:p text:style-name="P159"><text:tab/>leal<text:tab/>1(%esi), %r11d</text:p>
            <text:p text:style-name="P159"><text:tab/>movl<text:tab/>%r11d, 0(%rdi)</text:p>
            <text:p text:style-name="P159"><text:tab/>movq <text:s text:c="3"/>i5@GOTPCREL(%rip), %rsi</text:p>
            <text:p text:style-name="P159"><text:tab/>movq <text:s text:c="3"/>k5@GOTPCREL(%rip), %r8</text:p>
            <text:p text:style-name="P159"><text:tab/>movl<text:tab/>0(%r8), %r8d</text:p>
            <text:p text:style-name="P159"><text:tab/>leal<text:tab/>0(%r8d,%r8d,2), %eax</text:p>
            <text:p text:style-name="P159"><text:tab/>movq <text:s text:c="3"/>j5@GOTPCREL(%rip), %r11</text:p>
            <text:p text:style-name="P159"><text:tab/>movl<text:tab/>0(%r11), %r9d</text:p>
            <text:p text:style-name="P159"><text:tab/>leal<text:tab/>0(%r9d,%r9d,4), %ecx</text:p>
            <text:p text:style-name="P159"><text:tab/>cltd</text:p>
            <text:p text:style-name="P159"><text:tab/>idivl<text:tab/>%ecx</text:p>
            <text:p text:style-name="P159"><text:tab/>movl<text:tab/>%eax, 0(%rsi)</text:p>
            <text:p text:style-name="P159"><text:tab/>movq <text:s text:c="3"/>k5@GOTPCREL(%rip), %rax</text:p>
            <text:p text:style-name="P159"><text:tab/>movl<text:tab/>0(%rax), %eax</text:p>
            <text:p text:style-name="P159"><text:tab/>testl<text:tab/>%eax, %eax</text:p>
            <text:p text:style-name="P159"><text:tab/>jg<text:tab/>.L112</text:p>
          </table:table-cell>
          <table:table-cell table:style-name="Таблица59.A1" office:value-type="string">
            <text:p text:style-name="P103"><text:tab/>j5 = 0;</text:p>
            <text:p text:style-name="P103"><text:tab/>k5 = 10000;</text:p>
            <text:p text:style-name="P103"><text:tab/>do {</text:p>
            <text:p text:style-name="P103"><text:tab/><text:tab/>k5 = k5 - 1;</text:p>
            <text:p text:style-name="P103"><text:tab/><text:tab/>j5 = j5 + 1;</text:p>
            <text:p text:style-name="P103"><text:tab/><text:tab/>i5 = (k5 * 3) / (j5 * constant5);</text:p>
            <text:p text:style-name="P103"><text:tab/>} while (k5 &gt; 0);</text:p>
          </table:table-cell>
        </table:table-row>
      </table:table>
      <text:p text:style-name="P100"/>
      <text:p text:style-name="P91"/>
      <table:table table:name="Таблица60" table:style-name="Таблица60">
        <table:table-column table:style-name="Таблица60.A"/>
        <table:table-column table:style-name="Таблица60.B"/>
        <table:table-row table:style-name="Таблица60.1">
          <table:table-cell table:style-name="Таблица60.A1" office:value-type="string">
            <text:p text:style-name="P159"><text:tab/>movq <text:s text:c="3"/>j5@GOTPCREL(%rip), %r8</text:p>
            <text:p text:style-name="P159"><text:tab/>xorl<text:tab/>%ecx, %ecx</text:p>
            <text:p text:style-name="P159"><text:tab/>movl<text:tab/>%ecx, 0(%r8)</text:p>
            <text:p text:style-name="P159"><text:tab/>movq <text:s text:c="3"/>k5@GOTPCREL(%rip), %rax</text:p>
            <text:p text:style-name="P159"><text:tab/>movl<text:tab/>$10000, %ecx</text:p>
            <text:p text:style-name="P159"><text:tab/>movl<text:tab/>%ecx, 0(%rax)</text:p>
            <text:p text:style-name="P159">.L112:</text:p>
            <text:p text:style-name="P159"><text:tab/>movq <text:s text:c="3"/>k5@GOTPCREL(%rip), %rdi</text:p>
            <text:p text:style-name="P159"><text:tab/>movq <text:s text:c="3"/>k5@GOTPCREL(%rip), %rcx</text:p>
            <text:p text:style-name="P159"><text:tab/>movl<text:tab/>0(%rcx), %esi</text:p>
            <text:p text:style-name="P159"><text:tab/>leal<text:tab/>-1(%esi), %r10d</text:p>
            <text:p text:style-name="P159"><text:tab/>movl<text:tab/>%r10d, 0(%rdi)</text:p>
            <text:p text:style-name="P159"><text:tab/>movq <text:s text:c="3"/>j5@GOTPCREL(%rip), %rdi</text:p>
            <text:p text:style-name="P159"><text:tab/>movq <text:s text:c="3"/>j5@GOTPCREL(%rip), %r9</text:p>
            <text:p text:style-name="P159"><text:tab/>movl<text:tab/>0(%r9), %esi</text:p>
            <text:p text:style-name="P159"><text:tab/>leal<text:tab/>1(%esi), %r11d</text:p>
            <text:p text:style-name="P159"><text:tab/>movl<text:tab/>%r11d, 0(%rdi)</text:p>
            <text:p text:style-name="P159"><text:tab/>movq <text:s text:c="3"/>i5@GOTPCREL(%rip), %rsi</text:p>
            <text:p text:style-name="P159"><text:tab/>movq <text:s text:c="3"/>k5@GOTPCREL(%rip), %r8</text:p>
            <text:p text:style-name="P159"><text:tab/>movl<text:tab/>0(%r8), %r8d</text:p>
            <text:p text:style-name="P159"><text:tab/>leal<text:tab/>0(%r8d,%r8d,2), %eax</text:p>
            <text:p text:style-name="P159"><text:tab/>movq <text:s text:c="3"/>j5@GOTPCREL(%rip), %r11</text:p>
            <text:p text:style-name="P159"><text:tab/>movl<text:tab/>0(%r11), %r9d</text:p>
            <text:p text:style-name="P159"><text:tab/>leal<text:tab/>0(%r9d,%r9d,4), %ecx</text:p>
            <text:p text:style-name="P159"><text:tab/>cltd</text:p>
            <text:p text:style-name="P159"><text:tab/>idivl<text:tab/>%ecx</text:p>
            <text:p text:style-name="P159"><text:tab/>movl<text:tab/>%eax, 0(%rsi)</text:p>
            <text:p text:style-name="P159"><text:tab/>movq <text:s text:c="3"/>k5@GOTPCREL(%rip), %rax</text:p>
            <text:p text:style-name="P159"><text:tab/>movl<text:tab/>0(%rax), %eax</text:p>
            <text:p text:style-name="P159"><text:soft-page-break/><text:tab/>testl<text:tab/>%eax, %eax</text:p>
            <text:p text:style-name="P159"><text:tab/>jg<text:tab/>.L112</text:p>
          </table:table-cell>
          <table:table-cell table:style-name="Таблица60.A1" office:value-type="string">
            <text:p text:style-name="P159"><text:tab/>movl<text:tab/>$10000, j5(%rip)</text:p>
            <text:p text:style-name="P159"><text:tab/>movl<text:tab/>$0, i5(%rip)<text:tab/>movq <text:s text:c="3"/>j5@GOTPCREL(%rip), %r11</text:p>
            <text:p text:style-name="P159"><text:tab/>xorl<text:tab/>%esi, %esi</text:p>
            <text:p text:style-name="P159"><text:tab/>movl<text:tab/>%esi, 0(%r11)</text:p>
            <text:p text:style-name="P159"><text:tab/>movq <text:s text:c="3"/>k5@GOTPCREL(%rip), %r10</text:p>
            <text:p text:style-name="P159"><text:tab/>movl<text:tab/>$10000, %r11d</text:p>
            <text:p text:style-name="P159"><text:tab/>movl<text:tab/>%r11d, 0(%r10)</text:p>
            <text:p text:style-name="P159">.L107:</text:p>
            <text:p text:style-name="P159"><text:tab/>movq <text:s text:c="3"/>k5@GOTPCREL(%rip), %rdx</text:p>
            <text:p text:style-name="P159"><text:tab/>movl<text:tab/>0(%rdx), %r10d</text:p>
            <text:p text:style-name="P159"><text:tab/>leal<text:tab/>-1(%r10d), %r11d</text:p>
            <text:p text:style-name="P159"><text:tab/>movl<text:tab/>%r11d, 0(%rdx)</text:p>
            <text:p text:style-name="P159"><text:tab/>movq <text:s text:c="3"/>j5@GOTPCREL(%rip), %r8</text:p>
            <text:p text:style-name="P159"><text:tab/>movl<text:tab/>0(%r8), %r10d</text:p>
            <text:p text:style-name="P159"><text:tab/>leal<text:tab/>1(%r10d), %edi</text:p>
            <text:p text:style-name="P159"><text:tab/>movl<text:tab/>%edi, 0(%r8)</text:p>
            <text:p text:style-name="P159"><text:tab/>movq <text:s text:c="3"/>i5@GOTPCREL(%rip), %rsi</text:p>
            <text:p text:style-name="P159"><text:tab/>leal<text:tab/>0(%r11d,%r11d,2), %eax</text:p>
            <text:p text:style-name="P159"><text:tab/>leal<text:tab/>0(%edi,%edi,4), %ecx</text:p>
            <text:p text:style-name="P159"><text:tab/>cltd</text:p>
            <text:p text:style-name="P159"><text:tab/>idivl<text:tab/>%ecx</text:p>
            <text:p text:style-name="P159"><text:tab/>movl<text:tab/>%eax, 0(%rsi)</text:p>
            <text:p text:style-name="P159"><text:tab/>testl<text:tab/>%r11d, %r11d</text:p>
            <text:p text:style-name="P159"><text:tab/>jg<text:tab/>.L107</text:p>
          </table:table-cell>
        </table:table-row>
      </table:table>
      <text:p text:style-name="P91"/>
      <text:p text:style-name="P211">Ccomp смог посчитать конечное значение j5, но цикл оставил</text:p>
      <table:table table:name="Таблица61" table:style-name="Таблица61">
        <table:table-column table:style-name="Таблица61.A"/>
        <table:table-column table:style-name="Таблица61.B"/>
        <table:table-row>
          <table:table-cell table:style-name="Таблица61.A1" office:value-type="string">
            <text:p text:style-name="P159"/>
            <text:p text:style-name="P159"><text:tab/>movq <text:s text:c="3"/>j5@GOTPCREL(%rip), %r8</text:p>
            <text:p text:style-name="P159"><text:tab/>xorl<text:tab/>%ecx, %ecx</text:p>
            <text:p text:style-name="P159"><text:tab/>movl<text:tab/>%ecx, 0(%r8)</text:p>
            <text:p text:style-name="P159"><text:tab/>movq <text:s text:c="3"/>k5@GOTPCREL(%rip), %rax</text:p>
            <text:p text:style-name="P159"><text:tab/>movl<text:tab/>$10000, %ecx</text:p>
            <text:p text:style-name="P159"><text:tab/>movl<text:tab/>%ecx, 0(%rax)</text:p>
            <text:p text:style-name="P159">.L112:</text:p>
            <text:p text:style-name="P159"><text:tab/>movq <text:s text:c="3"/>k5@GOTPCREL(%rip), %rdi</text:p>
            <text:p text:style-name="P159"><text:tab/>movq <text:s text:c="3"/>k5@GOTPCREL(%rip), %rcx</text:p>
            <text:p text:style-name="P159"><text:tab/>movl<text:tab/>0(%rcx), %esi</text:p>
            <text:p text:style-name="P159"><text:tab/>leal<text:tab/>-1(%esi), %r10d</text:p>
            <text:p text:style-name="P159"><text:tab/>movl<text:tab/>%r10d, 0(%rdi)</text:p>
            <text:p text:style-name="P159"><text:tab/>movq <text:s text:c="3"/>j5@GOTPCREL(%rip), %rdi</text:p>
            <text:p text:style-name="P159"><text:tab/>movq <text:s text:c="3"/>j5@GOTPCREL(%rip), %r9</text:p>
            <text:p text:style-name="P159"><text:tab/>movl<text:tab/>0(%r9), %esi</text:p>
            <text:p text:style-name="P159"><text:tab/>leal<text:tab/>1(%esi), %r11d</text:p>
            <text:p text:style-name="P159"><text:tab/>movl<text:tab/>%r11d, 0(%rdi)</text:p>
            <text:p text:style-name="P159"><text:tab/>movq <text:s text:c="3"/>i5@GOTPCREL(%rip), %rsi</text:p>
            <text:p text:style-name="P159"><text:tab/>movq <text:s text:c="3"/>k5@GOTPCREL(%rip), %r8</text:p>
            <text:p text:style-name="P159"><text:tab/>movl<text:tab/>0(%r8), %r8d</text:p>
            <text:p text:style-name="P159"><text:tab/>leal<text:tab/>0(%r8d,%r8d,2), %eax</text:p>
            <text:p text:style-name="P159"><text:tab/>movq <text:s text:c="3"/>j5@GOTPCREL(%rip), %r11</text:p>
            <text:p text:style-name="P159"><text:tab/>movl<text:tab/>0(%r11), %r9d</text:p>
            <text:p text:style-name="P159"><text:tab/>leal<text:tab/>0(%r9d,%r9d,4), %ecx</text:p>
            <text:p text:style-name="P159"><text:tab/>cltd</text:p>
            <text:p text:style-name="P159"><text:tab/>idivl<text:tab/>%ecx</text:p>
            <text:p text:style-name="P159"><text:tab/>movl<text:tab/>%eax, 0(%rsi)</text:p>
            <text:p text:style-name="P159"><text:tab/>movq <text:s text:c="3"/>k5@GOTPCREL(%rip), %rax</text:p>
            <text:p text:style-name="P159"><text:tab/>movl<text:tab/>0(%rax), %eax</text:p>
            <text:p text:style-name="P159"><text:tab/>testl<text:tab/>%eax, %eax</text:p>
            <text:p text:style-name="P159"><text:tab/>jg<text:tab/>.L112</text:p>
          </table:table-cell>
          <table:table-cell table:style-name="Таблица61.A1" office:value-type="string">
            <text:p text:style-name="P182">for (i = 0; i &lt; 100; i++)</text:p>
            <text:p text:style-name="P182"><text:tab/><text:tab/>ivector5[i * 2 + 3] = 5;</text:p>
          </table:table-cell>
        </table:table-row>
      </table:table>
      <text:p text:style-name="P23"/>
      <text:p text:style-name="P26">Без оптимизации переменная индукции осталась<text:line-break/><text:line-break/></text:p>
      <table:table table:name="Таблица62" table:style-name="Таблица62">
        <table:table-column table:style-name="Таблица62.A"/>
        <table:table-column table:style-name="Таблица62.B"/>
        <table:table-row>
          <table:table-cell table:style-name="Таблица62.A1" office:value-type="string">
            <text:p text:style-name="P159"/>
            <text:p text:style-name="P159"><text:tab/>movq <text:s text:c="3"/>j5@GOTPCREL(%rip), %r8</text:p>
            <text:p text:style-name="P159"><text:tab/>xorl<text:tab/>%ecx, %ecx</text:p>
            <text:p text:style-name="P159"><text:tab/>movl<text:tab/>%ecx, 0(%r8)</text:p>
            <text:p text:style-name="P159"><text:tab/>movq <text:s text:c="3"/>k5@GOTPCREL(%rip), %rax</text:p>
            <text:p text:style-name="P159"><text:tab/>movl<text:tab/>$10000, %ecx</text:p>
            <text:p text:style-name="P159"><text:tab/>movl<text:tab/>%ecx, 0(%rax)</text:p>
            <text:p text:style-name="P159">.L112:</text:p>
            <text:p text:style-name="P159"><text:tab/>movq <text:s text:c="3"/>k5@GOTPCREL(%rip), %rdi</text:p>
            <text:p text:style-name="P159"><text:tab/>movq <text:s text:c="3"/>k5@GOTPCREL(%rip), %rcx</text:p>
            <text:p text:style-name="P159"><text:tab/>movl<text:tab/>0(%rcx), %esi</text:p>
            <text:p text:style-name="P159"><text:tab/>leal<text:tab/>-1(%esi), %r10d</text:p>
            <text:p text:style-name="P159"><text:tab/>movl<text:tab/>%r10d, 0(%rdi)</text:p>
            <text:p text:style-name="P159"><text:tab/>movq <text:s text:c="3"/>j5@GOTPCREL(%rip), %rdi</text:p>
            <text:p text:style-name="P159"><text:tab/>movq <text:s text:c="3"/>j5@GOTPCREL(%rip), %r9</text:p>
            <text:p text:style-name="P159"><text:tab/>movl<text:tab/>0(%r9), %esi</text:p>
            <text:p text:style-name="P159"><text:tab/>leal<text:tab/>1(%esi), %r11d</text:p>
            <text:p text:style-name="P159"><text:tab/>movl<text:tab/>%r11d, 0(%rdi)</text:p>
            <text:p text:style-name="P159"><text:tab/>movq <text:s text:c="3"/>i5@GOTPCREL(%rip), %rsi</text:p>
            <text:p text:style-name="P159"><text:tab/>movq <text:s text:c="3"/>k5@GOTPCREL(%rip), %r8</text:p>
            <text:p text:style-name="P159"><text:tab/>movl<text:tab/>0(%r8), %r8d</text:p>
            <text:p text:style-name="P159"><text:tab/>leal<text:tab/>0(%r8d,%r8d,2), %eax</text:p>
            <text:p text:style-name="P159"><text:tab/>movq <text:s text:c="3"/>j5@GOTPCREL(%rip), %r11</text:p>
            <text:p text:style-name="P159"><text:tab/>movl<text:tab/>0(%r11), %r9d</text:p>
            <text:p text:style-name="P159"><text:tab/>leal<text:tab/>0(%r9d,%r9d,4), %ecx</text:p>
            <text:p text:style-name="P159"><text:soft-page-break/><text:tab/>cltd</text:p>
            <text:p text:style-name="P159"><text:tab/>idivl<text:tab/>%ecx</text:p>
            <text:p text:style-name="P159"><text:tab/>movl<text:tab/>%eax, 0(%rsi)</text:p>
            <text:p text:style-name="P159"><text:tab/>movq <text:s text:c="3"/>k5@GOTPCREL(%rip), %rax</text:p>
            <text:p text:style-name="P159"><text:tab/>movl<text:tab/>0(%rax), %eax</text:p>
            <text:p text:style-name="P159"><text:tab/>testl<text:tab/>%eax, %eax</text:p>
            <text:p text:style-name="P159"><text:tab/>jg<text:tab/>.L112</text:p>
          </table:table-cell>
          <table:table-cell table:style-name="Таблица62.A1" office:value-type="string">
            <text:p text:style-name="P159"><text:tab/>movq <text:s text:c="3"/>i@GOTPCREL(%rip), %rdx</text:p>
            <text:p text:style-name="P159"><text:tab/>xorl<text:tab/>%r9d, %r9d</text:p>
            <text:p text:style-name="P159"><text:tab/>movl<text:tab/>%r9d, 0(%rdx)</text:p>
            <text:p text:style-name="P159">.L108:</text:p>
            <text:p text:style-name="P159"><text:tab/><text:span text:style-name="T37">movq <text:s text:c="3"/>i@GOTPCREL(%rip), %rdx</text:span></text:p>
            <text:p text:style-name="P159"><text:tab/><text:span text:style-name="T37">movl<text:tab/>0(%rdx), %r8d</text:span></text:p>
            <text:p text:style-name="P159"><text:tab/><text:span text:style-name="T37">cmpl<text:tab/>$100, %r8d</text:span></text:p>
            <text:p text:style-name="P159"><text:tab/>jge<text:tab/>.L109</text:p>
            <text:p text:style-name="P159"><text:tab/>movq <text:s text:c="3"/>ivector5@GOTPCREL(%rip), %rsi</text:p>
            <text:p text:style-name="P159"><text:tab/>leal<text:tab/>3(,%r8d,2), %edi</text:p>
            <text:p text:style-name="P159"><text:tab/>movslq<text:tab/>%edi, %rcx</text:p>
            <text:p text:style-name="P159"><text:tab/>movl<text:tab/>$5, %r9d</text:p>
            <text:p text:style-name="P159"><text:tab/>movl<text:tab/>%r9d, 0(%rsi,%rcx,4)</text:p>
            <text:p text:style-name="P159"><text:tab/>leal<text:tab/>1(%r8d), %esi</text:p>
            <text:p text:style-name="P159"><text:tab/>movl<text:tab/>%esi, 0(%rdx)</text:p>
            <text:p text:style-name="P159"><text:tab/>jmp<text:tab/>.L108</text:p>
            <text:p text:style-name="P159">.L109:</text:p>
          </table:table-cell>
        </table:table-row>
      </table:table>
      <text:p text:style-name="P26"/>
      <text:p text:style-name="P26">При оптимизации переменная индукции <text:span text:style-name="T49">всё равно осталась</text:span></text:p>
      <table:table table:name="Таблица63" table:style-name="Таблица63">
        <table:table-column table:style-name="Таблица63.A"/>
        <table:table-column table:style-name="Таблица63.B"/>
        <table:table-row>
          <table:table-cell table:style-name="Таблица63.A1" office:value-type="string">
            <text:p text:style-name="P173"><text:tab/>movq <text:s text:c="3"/>h3@GOTPCREL(%rip), %rax</text:p>
            <text:p text:style-name="P173"><text:tab/>movl<text:tab/>0(%rax), %r11d</text:p>
            <text:p text:style-name="P173"><text:tab/>movq <text:s text:c="3"/>k3@GOTPCREL(%rip), %r10</text:p>
            <text:p text:style-name="P173"><text:tab/>movl<text:tab/>0(%r10), %r9d</text:p>
            <text:p text:style-name="P173"><text:tab/><text:span text:style-name="T37">leal<text:tab/>0(%r11d,%r9d,1), %eax</text:span></text:p>
            <text:p text:style-name="P173"><text:tab/>testl<text:tab/>%eax, %eax</text:p>
            <text:p text:style-name="P173"><text:tab/>jl<text:tab/>.L117</text:p>
            <text:p text:style-name="P173"><text:tab/>movq <text:s text:c="3"/>h3@GOTPCREL(%rip), %rax</text:p>
            <text:p text:style-name="P173"><text:tab/>movl<text:tab/>0(%rax), %r8d</text:p>
            <text:p text:style-name="P173"><text:tab/>movq <text:s text:c="3"/>k3@GOTPCREL(%rip), %r11</text:p>
            <text:p text:style-name="P173"><text:tab/>movl<text:tab/>0(%r11), %r10d</text:p>
            <text:p text:style-name="P173"><text:tab/><text:span text:style-name="T37">leal<text:tab/>0(%r8d,%r10d,1), %eax</text:span></text:p>
            <text:p text:style-name="P173"><text:tab/>cmpl<text:tab/>$5, %eax</text:p>
            <text:p text:style-name="P173"><text:tab/>setg<text:tab/>%al</text:p>
            <text:p text:style-name="P173"><text:tab/>movzbl<text:tab/>%al, %eax</text:p>
            <text:p text:style-name="P173"><text:tab/>jmp<text:tab/>.L118</text:p>
            <text:p text:style-name="P173">.L117:</text:p>
            <text:p text:style-name="P173"><text:tab/>movl<text:tab/>$1, %eax</text:p>
            <text:p text:style-name="P173">.L118:</text:p>
            <text:p text:style-name="P173"><text:tab/>cmpl<text:tab/>$0, %eax</text:p>
            <text:p text:style-name="P173"><text:tab/>jne<text:tab/>.L119</text:p>
            <text:p text:style-name="P173"><text:tab/>movq <text:s text:c="3"/>m3@GOTPCREL(%rip), %r11</text:p>
            <text:p text:style-name="P173"><text:tab/>movq <text:s text:c="3"/>h3@GOTPCREL(%rip), %r8</text:p>
            <text:p text:style-name="P173"><text:tab/>movl<text:tab/>0(%r8), %r8d</text:p>
            <text:p text:style-name="P173"><text:tab/>movq <text:s text:c="3"/>k3@GOTPCREL(%rip), %rdx</text:p>
            <text:p text:style-name="P173"><text:tab/>movl<text:tab/>0(%rdx), %ecx</text:p>
            <text:p text:style-name="P173"><text:tab/><text:span text:style-name="T37">leal<text:tab/>0(%r8d,%ecx,1), %eax</text:span></text:p>
            <text:p text:style-name="P173"><text:tab/>movq <text:s text:c="3"/>i3@GOTPCREL(%rip), %rsi</text:p>
            <text:p text:style-name="P173"><text:tab/>movl<text:tab/>0(%rsi), %ecx</text:p>
            <text:p text:style-name="P173"><text:tab/>cltd</text:p>
            <text:p text:style-name="P173"><text:tab/>idivl<text:tab/>%ecx</text:p>
            <text:p text:style-name="P173"><text:tab/>movl<text:tab/>%eax, 0(%r11)</text:p>
            <text:p text:style-name="P173"><text:tab/>leaq<text:tab/>__stringlit_1(%rip), %rdi</text:p>
            <text:p text:style-name="P173"><text:tab/>movq <text:s text:c="3"/>m3@GOTPCREL(%rip), %r8</text:p>
            <text:p text:style-name="P173"><text:tab/>movl<text:tab/>0(%r8), %esi</text:p>
            <text:p text:style-name="P173"><text:tab/>movl<text:tab/>$0, %eax</text:p>
            <text:p text:style-name="P173"><text:tab/>call<text:tab/>printf@PLT</text:p>
            <text:p text:style-name="P173"><text:tab/>movq <text:s text:c="3"/>g3@GOTPCREL(%rip), %rsi</text:p>
            <text:p text:style-name="P173"><text:tab/>movq <text:s text:c="3"/>i3@GOTPCREL(%rip), %r9</text:p>
            <text:p text:style-name="P173"><text:tab/>movl<text:tab/>0(%r9), %ecx</text:p>
            <text:p text:style-name="P173"><text:tab/>movq <text:s text:c="3"/>h3@GOTPCREL(%rip), %r9</text:p>
            <text:p text:style-name="P173"><text:tab/>movl<text:tab/>0(%r9), %r10d</text:p>
            <text:p text:style-name="P173"><text:tab/>movq <text:s text:c="3"/>k3@GOTPCREL(%rip), %r11</text:p>
            <text:p text:style-name="P173"><text:tab/>movl<text:tab/>0(%r11), %r9d</text:p>
            <text:p text:style-name="P173"><text:tab/><text:span text:style-name="T37">leal<text:tab/>0(%r10d,%r9d,1), %edx</text:span></text:p>
            <text:p text:style-name="P173"><text:tab/>leal<text:tab/>0(%ecx,%edx,1), %r11d</text:p>
            <text:p text:style-name="P173"><text:tab/>movl<text:tab/>%r11d, 0(%rsi)</text:p>
            <text:p text:style-name="P173"><text:tab/>leaq<text:tab/>__stringlit_1(%rip), %rdi</text:p>
            <text:p text:style-name="P173"><text:tab/>movq <text:s text:c="3"/>g3@GOTPCREL(%rip), %rcx</text:p>
            <text:p text:style-name="P173"><text:tab/>movl<text:tab/>0(%rcx), %esi</text:p>
            <text:p text:style-name="P173"><text:tab/>movl<text:tab/>$0, %eax</text:p>
            <text:p text:style-name="P173"><text:tab/>call<text:tab/>printf@PLT</text:p>
            <text:p text:style-name="P173"><text:tab/>jmp<text:tab/>.L120</text:p>
            <text:p text:style-name="P173">.L119:</text:p>
            <text:p text:style-name="P173"><text:tab/>leaq<text:tab/>__stringlit_3(%rip), %rdi</text:p>
            <text:p text:style-name="P173"><text:tab/>movl<text:tab/>$0, %eax</text:p>
            <text:p text:style-name="P173"><text:tab/>call<text:tab/>printf@PLT</text:p>
            <text:p text:style-name="P173">.L120:</text:p>
          </table:table-cell>
          <table:table-cell table:style-name="Таблица63.A1" office:value-type="string">
            <text:p text:style-name="P56"><text:tab/>if ((h3 + k3) &lt; 0 || (h3 + k3) &gt; 5)</text:p>
            <text:p text:style-name="P56"><text:tab/><text:tab/>printf("Common subexpression elimination\n");</text:p>
            <text:p text:style-name="P56"><text:tab/>else {</text:p>
            <text:p text:style-name="P56"><text:tab/><text:tab/>m3 = (h3 + k3) / i3;</text:p>
            <text:p text:style-name="P56"><text:tab/><text:tab/>printf("%d", m3);</text:p>
            <text:p text:style-name="P56"><text:tab/><text:tab/>g3 = i3 + (h3 + k3);</text:p>
            <text:p text:style-name="P56"><text:tab/><text:tab/>printf("%d", g3);</text:p>
            <text:p text:style-name="P56"><text:tab/>}</text:p>
          </table:table-cell>
        </table:table-row>
      </table:table>
      <text:p text:style-name="P23"><text:span text:style-name="T1"/></text:p>
      <text:p text:style-name="P17">Без оптимизации вынесение общих подвыражений не наблюдается</text:p>
      <table:table table:name="Таблица64" table:style-name="Таблица64">
        <table:table-column table:style-name="Таблица64.A"/>
        <table:table-column table:style-name="Таблица64.B"/>
        <table:table-row table:style-name="Таблица64.1">
          <table:table-cell table:style-name="Таблица64.A1" office:value-type="string">
            <text:p text:style-name="P174"><text:tab/>movq <text:s text:c="3"/>h3@GOTPCREL(%rip), %rax</text:p>
            <text:p text:style-name="P174"><text:tab/>movl<text:tab/>0(%rax), %r11d</text:p>
            <text:p text:style-name="P174"><text:tab/>movq <text:s text:c="3"/>k3@GOTPCREL(%rip), %r10</text:p>
            <text:p text:style-name="P174"><text:tab/>movl<text:tab/>0(%r10), %r9d</text:p>
            <text:p text:style-name="P174"><text:tab/><text:span text:style-name="T37">leal<text:tab/>0(%r11d,%r9d,1), %eax</text:span></text:p>
            <text:p text:style-name="P174"><text:tab/>testl<text:tab/>%eax, %eax</text:p>
            <text:p text:style-name="P174"><text:tab/>jl<text:tab/>.L117</text:p>
            <text:p text:style-name="P174"><text:tab/>movq <text:s text:c="3"/>h3@GOTPCREL(%rip), %rax</text:p>
            <text:p text:style-name="P174"><text:tab/>movl<text:tab/>0(%rax), %r8d</text:p>
            <text:p text:style-name="P174"><text:tab/>movq <text:s text:c="3"/>k3@GOTPCREL(%rip), %r11</text:p>
            <text:p text:style-name="P174"><text:tab/>movl<text:tab/>0(%r11), %r10d</text:p>
            <text:p text:style-name="P174"><text:tab/><text:span text:style-name="T37">leal<text:tab/>0(%r8d,%r10d,1), %eax</text:span></text:p>
            <text:p text:style-name="P174"><text:tab/>cmpl<text:tab/>$5, %eax</text:p>
            <text:p text:style-name="P174"><text:tab/>setg<text:tab/>%al</text:p>
            <text:p text:style-name="P174"><text:tab/>movzbl<text:tab/>%al, %eax</text:p>
            <text:p text:style-name="P174"><text:tab/>jmp<text:tab/>.L118</text:p>
            <text:p text:style-name="P174">.L117:</text:p>
            <text:p text:style-name="P174"><text:tab/>movl<text:tab/>$1, %eax</text:p>
            <text:p text:style-name="P174">.L118:</text:p>
            <text:p text:style-name="P174"><text:tab/>cmpl<text:tab/>$0, %eax</text:p>
            <text:p text:style-name="P174"><text:tab/>jne<text:tab/>.L119</text:p>
            <text:p text:style-name="P174"><text:tab/>movq <text:s text:c="3"/>m3@GOTPCREL(%rip), %r11</text:p>
            <text:p text:style-name="P174"><text:tab/>movq <text:s text:c="3"/>h3@GOTPCREL(%rip), %r8</text:p>
            <text:p text:style-name="P174"><text:tab/>movl<text:tab/>0(%r8), %r8d</text:p>
            <text:p text:style-name="P174"><text:tab/>movq <text:s text:c="3"/>k3@GOTPCREL(%rip), %rdx</text:p>
            <text:p text:style-name="P174"><text:tab/>movl<text:tab/>0(%rdx), %ecx</text:p>
            <text:p text:style-name="P174"><text:tab/><text:span text:style-name="T37">leal<text:tab/>0(%r8d,%ecx,1), %eax</text:span></text:p>
            <text:p text:style-name="P174"><text:tab/>movq <text:s text:c="3"/>i3@GOTPCREL(%rip), %rsi</text:p>
            <text:p text:style-name="P174"><text:tab/>movl<text:tab/>0(%rsi), %ecx</text:p>
            <text:p text:style-name="P174"><text:tab/>cltd</text:p>
            <text:p text:style-name="P174"><text:tab/>idivl<text:tab/>%ecx</text:p>
            <text:p text:style-name="P174"><text:tab/>movl<text:tab/>%eax, 0(%r11)</text:p>
            <text:p text:style-name="P174"><text:tab/>leaq<text:tab/>__stringlit_1(%rip), %rdi</text:p>
            <text:p text:style-name="P174"><text:tab/>movq <text:s text:c="3"/>m3@GOTPCREL(%rip), %r8</text:p>
            <text:p text:style-name="P174"><text:tab/>movl<text:tab/>0(%r8), %esi</text:p>
            <text:p text:style-name="P174"><text:tab/>movl<text:tab/>$0, %eax</text:p>
            <text:p text:style-name="P174"><text:tab/>call<text:tab/>printf@PLT</text:p>
            <text:p text:style-name="P174"><text:tab/>movq <text:s text:c="3"/>g3@GOTPCREL(%rip), %rsi</text:p>
            <text:p text:style-name="P174"><text:tab/>movq <text:s text:c="3"/>i3@GOTPCREL(%rip), %r9</text:p>
            <text:p text:style-name="P174"><text:tab/>movl<text:tab/>0(%r9), %ecx</text:p>
            <text:p text:style-name="P174"><text:tab/>movq <text:s text:c="3"/>h3@GOTPCREL(%rip), %r9</text:p>
            <text:p text:style-name="P174"><text:tab/>movl<text:tab/>0(%r9), %r10d</text:p>
            <text:p text:style-name="P174"><text:tab/>movq <text:s text:c="3"/>k3@GOTPCREL(%rip), %r11</text:p>
            <text:p text:style-name="P174"><text:tab/>movl<text:tab/>0(%r11), %r9d</text:p>
            <text:p text:style-name="P174"><text:tab/><text:span text:style-name="T37">leal<text:tab/>0(%r10d,%r9d,1), %edx</text:span></text:p>
            <text:p text:style-name="P174"><text:tab/>leal<text:tab/>0(%ecx,%edx,1), %r11d</text:p>
            <text:p text:style-name="P174"><text:tab/>movl<text:tab/>%r11d, 0(%rsi)</text:p>
            <text:p text:style-name="P174"><text:tab/>leaq<text:tab/>__stringlit_1(%rip), %rdi</text:p>
            <text:p text:style-name="P174"><text:tab/>movq <text:s text:c="3"/>g3@GOTPCREL(%rip), %rcx</text:p>
            <text:p text:style-name="P174"><text:tab/>movl<text:tab/>0(%rcx), %esi</text:p>
            <text:p text:style-name="P174"><text:tab/>movl<text:tab/>$0, %eax</text:p>
            <text:p text:style-name="P174"><text:tab/>call<text:tab/>printf@PLT</text:p>
            <text:p text:style-name="P174"><text:tab/>jmp<text:tab/>.L120</text:p>
            <text:p text:style-name="P174">.L119:</text:p>
            <text:p text:style-name="P174"><text:tab/>leaq<text:tab/>__stringlit_3(%rip), %rdi</text:p>
            <text:p text:style-name="P174"><text:tab/>movl<text:tab/>$0, %eax</text:p>
            <text:p text:style-name="P174"><text:tab/>call<text:tab/>printf@PLT</text:p>
            <text:p text:style-name="P174">.L120:</text:p>
          </table:table-cell>
          <table:table-cell table:style-name="Таблица64.A1" office:value-type="string">
            <text:p text:style-name="P174"><text:tab/><text:span text:style-name="T37">movq <text:s text:c="3"/>h3@GOTPCREL(%rip), %rax</text:span></text:p>
            <text:p text:style-name="P173"><text:tab/><text:span text:style-name="T37">movl<text:tab/>0(%rax), %ecx</text:span></text:p>
            <text:p text:style-name="P173"><text:tab/><text:span text:style-name="T37">movq <text:s text:c="3"/>k3@GOTPCREL(%rip), %r11</text:span></text:p>
            <text:p text:style-name="P173"><text:tab/><text:span text:style-name="T37">movl<text:tab/>0(%r11), %edx</text:span></text:p>
            <text:p text:style-name="P173"><text:tab/><text:span text:style-name="T37">leal<text:tab/>0(%ecx,%edx,1), %eax</text:span></text:p>
            <text:p text:style-name="P173"><text:tab/>testl<text:tab/>%eax, %eax</text:p>
            <text:p text:style-name="P173"><text:tab/>jl<text:tab/>.L112</text:p>
            <text:p text:style-name="P173"><text:tab/>cmpl<text:tab/>$5, %eax</text:p>
            <text:p text:style-name="P173"><text:tab/>jg<text:tab/>.L112</text:p>
            <text:p text:style-name="P173"><text:tab/>movq <text:s text:c="3"/>m3@GOTPCREL(%rip), %rsi</text:p>
            <text:p text:style-name="P173"><text:tab/>movq <text:s text:c="3"/>i3@GOTPCREL(%rip), %rcx</text:p>
            <text:p text:style-name="P173"><text:tab/>movl<text:tab/>0(%rcx), %ecx</text:p>
            <text:p text:style-name="P173"><text:tab/>cltd</text:p>
            <text:p text:style-name="P173"><text:tab/>idivl<text:tab/>%ecx</text:p>
            <text:p text:style-name="P173"><text:tab/>movl<text:tab/>%eax, 0(%rsi)</text:p>
            <text:p text:style-name="P173"><text:tab/>leaq<text:tab/>__stringlit_1(%rip), %rdi</text:p>
            <text:p text:style-name="P173"><text:tab/>movq<text:tab/>%rax, %rsi</text:p>
            <text:p text:style-name="P173"><text:tab/>movl<text:tab/>$0, %eax</text:p>
            <text:p text:style-name="P173"><text:tab/>call<text:tab/>printf@PLT</text:p>
            <text:p text:style-name="P173"><text:tab/>movq <text:s text:c="3"/>g3@GOTPCREL(%rip), %rdi</text:p>
            <text:p text:style-name="P173"><text:tab/>movq <text:s text:c="3"/>i3@GOTPCREL(%rip), %r9</text:p>
            <text:p text:style-name="P173"><text:tab/>movl<text:tab/>0(%r9), %eax</text:p>
            <text:p text:style-name="P173"><text:tab/><text:span text:style-name="T37">movq <text:s text:c="3"/>h3@GOTPCREL(%rip), %r10</text:span></text:p>
            <text:p text:style-name="P173"><text:tab/><text:span text:style-name="T37">movl<text:tab/>0(%r10), %r11d</text:span></text:p>
            <text:p text:style-name="P173"><text:tab/><text:span text:style-name="T37">movq <text:s text:c="3"/>k3@GOTPCREL(%rip), %rdx</text:span></text:p>
            <text:p text:style-name="P173"><text:tab/><text:span text:style-name="T37">movl<text:tab/>0(%rdx), %r8d</text:span></text:p>
            <text:p text:style-name="P173"><text:tab/><text:span text:style-name="T37">leal<text:tab/>0(%r11d,%r8d,1), %esi</text:span></text:p>
            <text:p text:style-name="P173"><text:tab/>leal<text:tab/>0(%eax,%esi,1), %esi</text:p>
            <text:p text:style-name="P173"><text:tab/>movl<text:tab/>%esi, 0(%rdi)</text:p>
            <text:p text:style-name="P173"><text:tab/>leaq<text:tab/>__stringlit_1(%rip), %rdi</text:p>
            <text:p text:style-name="P173"><text:tab/>movl<text:tab/>$0, %eax</text:p>
            <text:p text:style-name="P173"><text:tab/>call<text:tab/>printf@PLT</text:p>
            <text:p text:style-name="P173"><text:tab/>jmp<text:tab/>.L113</text:p>
            <text:p text:style-name="P173">.L112:</text:p>
            <text:p text:style-name="P173"><text:tab/>leaq<text:tab/>__stringlit_3(%rip), %rdi</text:p>
            <text:p text:style-name="P173"><text:tab/>movl<text:tab/>$0, %eax</text:p>
            <text:p text:style-name="P173"><text:tab/>call<text:tab/>printf@PLT</text:p>
            <text:p text:style-name="P173">.L113:</text:p>
          </table:table-cell>
        </table:table-row>
      </table:table>
      <text:p text:style-name="P17"/>
      <text:p text:style-name="P20">Пот оптимизации <text:span text:style-name="T50">ccomp не вынес общее подвыражение</text:span></text:p>
      <text:p text:style-name="P20"><text:span text:style-name="T4"/></text:p>
      <table:table table:name="Таблица65" table:style-name="Таблица65">
        <table:table-column table:style-name="Таблица65.A"/>
        <table:table-column table:style-name="Таблица65.B"/>
        <table:table-row>
          <table:table-cell table:style-name="Таблица65.A1" office:value-type="string">
            <text:p text:style-name="P159"><text:tab/>movq <text:s text:c="3"/>i4@GOTPCREL(%rip), %rdi</text:p>
            <text:p text:style-name="P159"><text:tab/>xorl<text:tab/>%r8d, %r8d</text:p>
            <text:p text:style-name="P159"><text:tab/>movl<text:tab/>%r8d, 0(%rdi)</text:p>
            <text:p text:style-name="P159">.L121:</text:p>
            <text:p text:style-name="P159"><text:tab/>movq <text:s text:c="3"/>i4@GOTPCREL(%rip), %rax</text:p>
            <text:p text:style-name="P159"><text:tab/>movl<text:tab/>0(%rax), %eax</text:p>
            <text:p text:style-name="P159"><text:tab/>cmpl<text:tab/>$2, %eax</text:p>
            <text:p text:style-name="P159"><text:tab/>jg<text:tab/>.L122</text:p>
            <text:p text:style-name="P159"><text:tab/>movq <text:s text:c="3"/>ivector2@GOTPCREL(%rip), %rdi</text:p>
            <text:p text:style-name="P159"><text:tab/>movq <text:s text:c="3"/>i4@GOTPCREL(%rip), %rdx</text:p>
            <text:p text:style-name="P159"><text:tab/>movl<text:tab/>0(%rdx), %edx</text:p>
            <text:p text:style-name="P159"><text:tab/>movslq<text:tab/>%edx, %rsi</text:p>
            <text:p text:style-name="P159"><text:tab/>movq <text:s text:c="3"/>j@GOTPCREL(%rip), %r10</text:p>
            <text:p text:style-name="P159"><text:tab/>movl<text:tab/>0(%r10), %eax</text:p>
            <text:p text:style-name="P159"><text:tab/>movq <text:s text:c="3"/>k@GOTPCREL(%rip), %rcx</text:p>
            <text:p text:style-name="P159"><text:tab/>movl<text:tab/>0(%rcx), %r9d</text:p>
            <text:p text:style-name="P159"><text:tab/><text:span text:style-name="T37">imull<text:tab/>%r9d, %eax</text:span></text:p>
            <text:p text:style-name="P159"><text:tab/>movzbl<text:tab/>%al, %r11d</text:p>
            <text:p text:style-name="P159"><text:tab/>movb<text:tab/>%r11b, 0(%rdi,%rsi,1)</text:p>
            <text:p text:style-name="P159"><text:tab/>leaq<text:tab/>__stringlit_1(%rip), %rdi</text:p>
            <text:p text:style-name="P159"><text:tab/>movq <text:s text:c="3"/>ivector2@GOTPCREL(%rip), %rcx</text:p>
            <text:p text:style-name="P159"><text:tab/>movq <text:s text:c="3"/>i4@GOTPCREL(%rip), %r10</text:p>
            <text:p text:style-name="P159"><text:tab/>movl<text:tab/>0(%r10), %esi</text:p>
            <text:p text:style-name="P159"><text:tab/>movslq<text:tab/>%esi, %rdx</text:p>
            <text:p text:style-name="P159"><text:tab/>movzbl<text:tab/>0(%rcx,%rdx,1), %esi</text:p>
            <text:p text:style-name="P159"><text:tab/>movl<text:tab/>$0, %eax</text:p>
            <text:p text:style-name="P159"><text:tab/>call<text:tab/>printf@PLT</text:p>
            <text:p text:style-name="P159"><text:tab/>movq <text:s text:c="3"/>i4@GOTPCREL(%rip), %r9</text:p>
            <text:p text:style-name="P159"><text:tab/>movq <text:s text:c="3"/>i4@GOTPCREL(%rip), %rax</text:p>
            <text:p text:style-name="P159"><text:tab/>movl<text:tab/>0(%rax), %r8d</text:p>
            <text:p text:style-name="P159"><text:tab/>leal<text:tab/>1(%r8d), %edx</text:p>
            <text:p text:style-name="P159"><text:tab/>movl<text:tab/>%edx, 0(%r9)</text:p>
            <text:p text:style-name="P159"><text:tab/>jmp<text:tab/>.L121</text:p>
            <text:p text:style-name="P159">.L122:</text:p>
          </table:table-cell>
          <table:table-cell table:style-name="Таблица65.A1" office:value-type="string">
            <text:p text:style-name="P103"><text:tab/>for (i4 = 0; i4 &lt;= max_vector; i4++){</text:p>
            <text:p text:style-name="P103"><text:tab/><text:tab/>ivector2[i4] = j * k;</text:p>
            <text:p text:style-name="P103"><text:tab/>printf("%d", ivector2[i4]);</text:p>
            <text:p text:style-name="P103">}</text:p>
          </table:table-cell>
        </table:table-row>
      </table:table>
      <text:p text:style-name="P60"><text:span text:style-name="T23"/></text:p>
      <text:p text:style-name="P189">Видно, что умножение происходит постоянно и инвариантный код не выносится из цикла</text:p>
      <text:p text:style-name="P94"><text:span text:style-name="T23"/></text:p>
      <table:table table:name="Таблица66" table:style-name="Таблица66">
        <table:table-column table:style-name="Таблица66.A"/>
        <table:table-column table:style-name="Таблица66.B"/>
        <table:table-row table:style-name="Таблица66.1">
          <table:table-cell table:style-name="Таблица66.A1" office:value-type="string">
            <text:p text:style-name="P159"><text:tab/>movq <text:s text:c="3"/>i4@GOTPCREL(%rip), %rdi</text:p>
            <text:p text:style-name="P159"><text:tab/>xorl<text:tab/>%r8d, %r8d</text:p>
            <text:p text:style-name="P159"><text:tab/>movl<text:tab/>%r8d, 0(%rdi)</text:p>
            <text:p text:style-name="P159">.L121:</text:p>
            <text:p text:style-name="P159"><text:tab/>movq <text:s text:c="3"/>i4@GOTPCREL(%rip), %rax</text:p>
            <text:p text:style-name="P159"><text:tab/>movl<text:tab/>0(%rax), %eax</text:p>
            <text:p text:style-name="P159"><text:tab/>cmpl<text:tab/>$2, %eax</text:p>
            <text:p text:style-name="P159"><text:tab/>jg<text:tab/>.L122</text:p>
            <text:p text:style-name="P159"><text:tab/>movq <text:s text:c="3"/>ivector2@GOTPCREL(%rip), %rdi</text:p>
            <text:p text:style-name="P159"><text:tab/>movq <text:s text:c="3"/>i4@GOTPCREL(%rip), %rdx</text:p>
            <text:p text:style-name="P159"><text:tab/>movl<text:tab/>0(%rdx), %edx</text:p>
            <text:p text:style-name="P159"><text:tab/>movslq<text:tab/>%edx, %rsi</text:p>
            <text:p text:style-name="P159"><text:tab/>movq <text:s text:c="3"/>j@GOTPCREL(%rip), %r10</text:p>
            <text:p text:style-name="P159"><text:tab/>movl<text:tab/>0(%r10), %eax</text:p>
            <text:p text:style-name="P159"><text:tab/>movq <text:s text:c="3"/>k@GOTPCREL(%rip), %rcx</text:p>
            <text:p text:style-name="P159"><text:tab/>movl<text:tab/>0(%rcx), %r9d</text:p>
            <text:p text:style-name="P159"><text:tab/><text:span text:style-name="T37">imull<text:tab/>%r9d, %eax</text:span></text:p>
            <text:p text:style-name="P159"><text:tab/>movzbl<text:tab/>%al, %r11d</text:p>
            <text:p text:style-name="P159"><text:tab/>movb<text:tab/>%r11b, 0(%rdi,%rsi,1)</text:p>
            <text:p text:style-name="P159"><text:tab/>leaq<text:tab/>__stringlit_1(%rip), %rdi</text:p>
            <text:p text:style-name="P159"><text:tab/>movq <text:s text:c="3"/>ivector2@GOTPCREL(%rip), %rcx</text:p>
            <text:p text:style-name="P159"><text:tab/>movq <text:s text:c="3"/>i4@GOTPCREL(%rip), %r10</text:p>
            <text:p text:style-name="P159"><text:tab/>movl<text:tab/>0(%r10), %esi</text:p>
            <text:p text:style-name="P159"><text:soft-page-break/><text:tab/>movslq<text:tab/>%esi, %rdx</text:p>
            <text:p text:style-name="P159"><text:tab/>movzbl<text:tab/>0(%rcx,%rdx,1), %esi</text:p>
            <text:p text:style-name="P159"><text:tab/>movl<text:tab/>$0, %eax</text:p>
            <text:p text:style-name="P159"><text:tab/>call<text:tab/>printf@PLT</text:p>
            <text:p text:style-name="P159"><text:tab/>movq <text:s text:c="3"/>i4@GOTPCREL(%rip), %r9</text:p>
            <text:p text:style-name="P159"><text:tab/>movq <text:s text:c="3"/>i4@GOTPCREL(%rip), %rax</text:p>
            <text:p text:style-name="P159"><text:tab/>movl<text:tab/>0(%rax), %r8d</text:p>
            <text:p text:style-name="P159"><text:tab/>leal<text:tab/>1(%r8d), %edx</text:p>
            <text:p text:style-name="P159"><text:tab/>movl<text:tab/>%edx, 0(%r9)</text:p>
            <text:p text:style-name="P159"><text:tab/>jmp<text:tab/>.L121</text:p>
            <text:p text:style-name="P159">.L122:</text:p>
          </table:table-cell>
          <table:table-cell table:style-name="Таблица66.A1" office:value-type="string">
            <text:p text:style-name="P161"/>
            <text:p text:style-name="P161"><text:tab/>movq <text:s text:c="3"/>i4@GOTPCREL(%rip), %rdx</text:p>
            <text:p text:style-name="P161"><text:tab/>xorl<text:tab/>%ecx, %ecx</text:p>
            <text:p text:style-name="P161"><text:tab/>movl<text:tab/>%ecx, 0(%rdx)</text:p>
            <text:p text:style-name="P161">.L114:</text:p>
            <text:p text:style-name="P161"><text:tab/>movq <text:s text:c="3"/>i4@GOTPCREL(%rip), %rax</text:p>
            <text:p text:style-name="P161"><text:tab/>movl<text:tab/>0(%rax), %r11d</text:p>
            <text:p text:style-name="P161"><text:tab/>cmpl<text:tab/>$2, %r11d</text:p>
            <text:p text:style-name="P161"><text:tab/>jg<text:tab/>.L115</text:p>
            <text:p text:style-name="P161"><text:tab/>movq <text:s text:c="3"/>ivector2@GOTPCREL(%rip), %rdx</text:p>
            <text:p text:style-name="P161"><text:tab/>movslq<text:tab/>%r11d, %r8</text:p>
            <text:p text:style-name="P161"><text:tab/>movq <text:s text:c="3"/>j@GOTPCREL(%rip), %rsi</text:p>
            <text:p text:style-name="P161"><text:tab/>movl<text:tab/>0(%rsi), %ecx</text:p>
            <text:p text:style-name="P161"><text:tab/>movq <text:s text:c="3"/>k@GOTPCREL(%rip), %rsi</text:p>
            <text:p text:style-name="P161"><text:tab/>movl<text:tab/>0(%rsi), %esi</text:p>
            <text:p text:style-name="P161"><text:tab/><text:span text:style-name="T37">imull<text:tab/>%esi, %ecx</text:span></text:p>
            <text:p text:style-name="P161"><text:tab/>movzbl<text:tab/>%cl, %esi</text:p>
            <text:p text:style-name="P161"><text:tab/>movb<text:tab/>%sil, 0(%rdx,%r8,1)</text:p>
            <text:p text:style-name="P161"><text:tab/>leaq<text:tab/>__stringlit_1(%rip), %rdi</text:p>
            <text:p text:style-name="P161"><text:tab/>movl<text:tab/>$0, %eax</text:p>
            <text:p text:style-name="P161"><text:tab/>call<text:tab/>printf@PLT</text:p>
            <text:p text:style-name="P161"><text:tab/>movq <text:s text:c="3"/>i4@GOTPCREL(%rip), %r9</text:p>
            <text:p text:style-name="P161"><text:tab/>movl<text:tab/>0(%r9), %r11d</text:p>
            <text:p text:style-name="P161"><text:soft-page-break/><text:tab/>leal<text:tab/>1(%r11d), %r10d</text:p>
            <text:p text:style-name="P161"><text:tab/>movl<text:tab/>%r10d, 0(%r9)</text:p>
            <text:p text:style-name="P161"><text:tab/>jmp<text:tab/>.L114</text:p>
            <text:p text:style-name="P161">.L115:</text:p>
          </table:table-cell>
        </table:table-row>
      </table:table>
      <text:p text:style-name="P94"><text:span text:style-name="T23"/></text:p>
      <text:p text:style-name="P192">При оптимизации по скорости работы инвариантный код всё равно не выноситсяработой</text:p>
      <table:table table:name="Таблица67" table:style-name="Таблица67">
        <table:table-column table:style-name="Таблица67.A"/>
        <table:table-column table:style-name="Таблица67.B"/>
        <table:table-row>
          <table:table-cell table:style-name="Таблица67.A1" office:value-type="string">
            <text:p text:style-name="P161">dead_code:</text:p>
            <text:p text:style-name="P161"><text:tab/>.cfi_startproc</text:p>
            <text:p text:style-name="P161"><text:tab/>subq<text:tab/>$8, %rsp</text:p>
            <text:p text:style-name="P161"><text:tab/>.cfi_adjust_cfa_offset<text:tab/>8</text:p>
            <text:p text:style-name="P161"><text:tab/>leaq<text:tab/>16(%rsp), %rax</text:p>
            <text:p text:style-name="P161"><text:tab/>movq<text:tab/>%rax, 0(%rsp)</text:p>
            <text:p text:style-name="P161"><text:tab/>xorl<text:tab/>%ecx, %ecx</text:p>
            <text:p text:style-name="P161"><text:tab/>cmpl<text:tab/>$0, %ecx</text:p>
            <text:p text:style-name="P161"><text:tab/>je<text:tab/>.L123</text:p>
            <text:p text:style-name="P161"><text:tab/>leaq<text:tab/>__stringlit_5(%rip), %rdi</text:p>
            <text:p text:style-name="P161"><text:tab/>movl<text:tab/>$0, %eax</text:p>
            <text:p text:style-name="P161"><text:tab/>call<text:tab/>printf@PLT</text:p>
            <text:p text:style-name="P161">.L123:</text:p>
            <text:p text:style-name="P161"><text:tab/>addq<text:tab/>$8, %rsp</text:p>
            <text:p text:style-name="P161"><text:tab/>ret</text:p>
            <text:p text:style-name="P161"><text:tab/>.cfi_endproc</text:p>
          </table:table-cell>
          <table:table-cell table:style-name="Таблица67.A1" office:value-type="string">
            <text:p text:style-name="P103">void dead_code(int a,</text:p>
            <text:p text:style-name="P103"><text:tab/>char *b)</text:p>
            <text:p text:style-name="P103">{</text:p>
            <text:p text:style-name="P103"><text:tab/>int idead_store;</text:p>
            <text:p text:style-name="P103"/>
            <text:p text:style-name="P103"><text:tab/>idead_store = a;</text:p>
            <text:p text:style-name="P103"><text:tab/>if (0)</text:p>
            <text:p text:style-name="P103"><text:tab/><text:tab/>printf("%s\n", b);</text:p>
            <text:p text:style-name="P103">}</text:p>
          </table:table-cell>
        </table:table-row>
      </table:table>
      <text:p text:style-name="P63"><text:span text:style-name="T23"/></text:p>
      <text:p text:style-name="P63"><text:span text:style-name="T23">Без оптимизации </text:span><text:span text:style-name="T30">ccomp</text:span><text:span text:style-name="T23"> напрямую сгенерировал функцию.</text:span></text:p>
      <text:p text:style-name="P63"><text:span text:style-name="T23"/></text:p>
      <table:table table:name="Таблица76" table:style-name="Таблица76">
        <table:table-column table:style-name="Таблица76.A"/>
        <table:table-column table:style-name="Таблица76.B"/>
        <table:table-row table:style-name="Таблица76.1">
          <table:table-cell table:style-name="Таблица76.A1" office:value-type="string">
            <text:p text:style-name="P162">dead_code:</text:p>
            <text:p text:style-name="P162"><text:tab/>.cfi_startproc</text:p>
            <text:p text:style-name="P162"><text:tab/>subq<text:tab/>$8, %rsp</text:p>
            <text:p text:style-name="P162"><text:tab/>.cfi_adjust_cfa_offset<text:tab/>8</text:p>
            <text:p text:style-name="P162"><text:tab/>leaq<text:tab/>16(%rsp), %rax</text:p>
            <text:p text:style-name="P162"><text:tab/>movq<text:tab/>%rax, 0(%rsp)</text:p>
            <text:p text:style-name="P162"><text:tab/>xorl<text:tab/>%ecx, %ecx</text:p>
            <text:p text:style-name="P162"><text:tab/>cmpl<text:tab/>$0, %ecx</text:p>
            <text:p text:style-name="P162"><text:tab/>je<text:tab/>.L123</text:p>
            <text:p text:style-name="P162"><text:tab/>leaq<text:tab/>__stringlit_5(%rip), %rdi</text:p>
            <text:p text:style-name="P162"><text:tab/>movl<text:tab/>$0, %eax</text:p>
            <text:p text:style-name="P162"><text:tab/>call<text:tab/>printf@PLT</text:p>
            <text:p text:style-name="P162">.L123:</text:p>
            <text:p text:style-name="P162"><text:tab/>addq<text:tab/>$8, %rsp</text:p>
            <text:p text:style-name="P162"><text:tab/>ret</text:p>
            <text:p text:style-name="P162"><text:tab/>.cfi_endproc</text:p>
          </table:table-cell>
          <table:table-cell table:style-name="Таблица76.A1" office:value-type="string">
            <text:p text:style-name="P162">dead_code:</text:p>
            <text:p text:style-name="P162"><text:tab/>.cfi_startproc</text:p>
            <text:p text:style-name="P162"><text:tab/>subq<text:tab/>$8, %rsp</text:p>
            <text:p text:style-name="P162"><text:tab/>.cfi_adjust_cfa_offset<text:tab/>8</text:p>
            <text:p text:style-name="P162"><text:tab/>leaq<text:tab/>16(%rsp), %rax</text:p>
            <text:p text:style-name="P162"><text:tab/>movq<text:tab/>%rax, 0(%rsp)</text:p>
            <text:p text:style-name="P162"><text:tab/>addq<text:tab/>$8, %rsp</text:p>
            <text:p text:style-name="P162"><text:tab/>ret</text:p>
            <text:p text:style-name="P162"><text:tab/>.cfi_endproc</text:p>
          </table:table-cell>
        </table:table-row>
      </table:table>
      <text:p text:style-name="P63"><text:span text:style-name="T23"/></text:p>
      <text:p text:style-name="P209">При оптимизации функция ужалась, убралось ветвление, но сохранились лишние операции, более того если в случае других компиляторов они убирали вызов этой функции поскольку она не влияет на выполнение программы, ccomp оставил её.</text:p>
      <table:table table:name="Таблица68" table:style-name="Таблица68">
        <table:table-column table:style-name="Таблица68.A"/>
        <table:table-column table:style-name="Таблица68.B"/>
        <table:table-row table:style-name="Таблица68.1">
          <table:table-cell table:style-name="Таблица68.A1" office:value-type="string">
            <text:p text:style-name="P159">unnecessary_loop:</text:p>
            <text:p text:style-name="P159"><text:tab/>.cfi_startproc</text:p>
            <text:p text:style-name="P159"><text:tab/>subq<text:tab/>$8, %rsp</text:p>
            <text:p text:style-name="P159"><text:tab/>.cfi_adjust_cfa_offset<text:tab/>8</text:p>
            <text:p text:style-name="P159"><text:tab/>leaq<text:tab/>16(%rsp), %rax</text:p>
            <text:p text:style-name="P159"><text:tab/>movq<text:tab/>%rax, 0(%rsp)</text:p>
            <text:p text:style-name="P159"><text:tab/>xorl<text:tab/>%eax, %eax</text:p>
            <text:p text:style-name="P159"><text:tab/>movq <text:s text:c="3"/>i@GOTPCREL(%rip), %r8</text:p>
            <text:p text:style-name="P159"><text:tab/>xorl<text:tab/>%r10d, %r10d</text:p>
            <text:p text:style-name="P159"><text:tab/>movl<text:tab/>%r10d, 0(%r8)</text:p>
            <text:p text:style-name="P159">.L124:</text:p>
            <text:p text:style-name="P159"><text:tab/>movq <text:s text:c="3"/>i@GOTPCREL(%rip), %rcx</text:p>
            <text:p text:style-name="P159"><text:tab/>movl<text:tab/>0(%rcx), %ecx</text:p>
            <text:p text:style-name="P159"><text:tab/>cmpl<text:tab/>$5, %ecx</text:p>
            <text:p text:style-name="P159"><text:tab/>jge<text:tab/>.L125</text:p>
            <text:p text:style-name="P159"><text:tab/>movq <text:s text:c="3"/>k5@GOTPCREL(%rip), %r8</text:p>
            <text:p text:style-name="P159"><text:tab/>movq <text:s text:c="3"/>j5@GOTPCREL(%rip), %rdx</text:p>
            <text:p text:style-name="P159"><text:tab/>movl<text:tab/>0(%rdx), %ecx</text:p>
            <text:p text:style-name="P159"><text:tab/>leal<text:tab/>0(%eax,%ecx,1), %esi</text:p>
            <text:p text:style-name="P159"><text:tab/>movl<text:tab/>%esi, 0(%r8)</text:p>
            <text:p text:style-name="P159"><text:tab/>movq <text:s text:c="3"/>i@GOTPCREL(%rip), %r9</text:p>
            <text:p text:style-name="P159"><text:tab/>movq <text:s text:c="3"/>i@GOTPCREL(%rip), %rdi</text:p>
            <text:p text:style-name="P159"><text:tab/>movl<text:tab/>0(%rdi), %edx</text:p>
            <text:p text:style-name="P159"><text:tab/>leal<text:tab/>1(%edx), %r11d</text:p>
            <text:p text:style-name="P159"><text:tab/>movl<text:tab/>%r11d, 0(%r9)</text:p>
            <text:p text:style-name="P159"><text:tab/>jmp<text:tab/>.L124</text:p>
            <text:p text:style-name="P159">.L125:</text:p>
            <text:p text:style-name="P159"><text:tab/>leaq<text:tab/>__stringlit_1(%rip), %rdi</text:p>
            <text:p text:style-name="P159"><text:tab/>movq <text:s text:c="3"/>k5@GOTPCREL(%rip), %rsi</text:p>
            <text:p text:style-name="P159"><text:tab/>movl<text:tab/>0(%rsi), %esi</text:p>
            <text:p text:style-name="P159"><text:tab/>movl<text:tab/>$0, %eax</text:p>
            <text:p text:style-name="P159"><text:tab/>call<text:tab/>printf@PLT</text:p>
            <text:p text:style-name="P159"><text:tab/>addq<text:tab/>$8, %rsp</text:p>
            <text:p text:style-name="P159"><text:tab/>ret</text:p>
            <text:p text:style-name="P159"><text:tab/>.cfi_endproc</text:p>
          </table:table-cell>
          <table:table-cell table:style-name="Таблица68.A1" office:value-type="string">
            <text:p text:style-name="P103">void unnecessary_loop()</text:p>
            <text:p text:style-name="P103">{</text:p>
            <text:p text:style-name="P103"><text:tab/>int x;</text:p>
            <text:p text:style-name="P103"/>
            <text:p text:style-name="P103"><text:tab/>x = 0;</text:p>
            <text:p text:style-name="P103"><text:tab/>for (i = 0; i &lt; 5; i++)</text:p>
            <text:p text:style-name="P103"><text:tab/><text:tab/>k5 = x + j5;</text:p>
            <text:p text:style-name="P103"><text:tab/>printf("%d", k5);</text:p>
            <text:p text:style-name="P103">}</text:p>
          </table:table-cell>
        </table:table-row>
      </table:table>
      <text:p text:style-name="P67"><text:span text:style-name="T23"/></text:p>
      <text:p text:style-name="P195">Без оптимизации цикл остался</text:p>
      <text:p text:style-name="P67"><text:span text:style-name="T23"/></text:p>
      <table:table table:name="Таблица69" table:style-name="Таблица69">
        <table:table-column table:style-name="Таблица69.A"/>
        <table:table-column table:style-name="Таблица69.B"/>
        <table:table-row>
          <table:table-cell table:style-name="Таблица69.A1" office:value-type="string">
            <text:p text:style-name="P159">unnecessary_loop:</text:p>
            <text:p text:style-name="P159"><text:tab/>.cfi_startproc</text:p>
            <text:p text:style-name="P159"><text:tab/>subq<text:tab/>$8, %rsp</text:p>
            <text:p text:style-name="P159"><text:tab/>.cfi_adjust_cfa_offset<text:tab/>8</text:p>
            <text:p text:style-name="P159"><text:tab/>leaq<text:tab/>16(%rsp), %rax</text:p>
            <text:p text:style-name="P159"><text:tab/>movq<text:tab/>%rax, 0(%rsp)</text:p>
            <text:p text:style-name="P159"><text:tab/>xorl<text:tab/>%eax, %eax</text:p>
            <text:p text:style-name="P159"><text:tab/>movq <text:s text:c="3"/>i@GOTPCREL(%rip), %r8</text:p>
            <text:p text:style-name="P159"><text:tab/>xorl<text:tab/>%r10d, %r10d</text:p>
            <text:p text:style-name="P159"><text:tab/>movl<text:tab/>%r10d, 0(%r8)</text:p>
            <text:p text:style-name="P159">.L124:</text:p>
            <text:p text:style-name="P159"><text:tab/>movq <text:s text:c="3"/>i@GOTPCREL(%rip), %rcx</text:p>
            <text:p text:style-name="P159"><text:tab/>movl<text:tab/>0(%rcx), %ecx</text:p>
            <text:p text:style-name="P159"><text:tab/>cmpl<text:tab/>$5, %ecx</text:p>
            <text:p text:style-name="P159"><text:tab/>jge<text:tab/>.L125</text:p>
            <text:p text:style-name="P159"><text:tab/>movq <text:s text:c="3"/>k5@GOTPCREL(%rip), %r8</text:p>
            <text:p text:style-name="P159"><text:tab/>movq <text:s text:c="3"/>j5@GOTPCREL(%rip), %rdx</text:p>
            <text:p text:style-name="P159"><text:tab/>movl<text:tab/>0(%rdx), %ecx</text:p>
            <text:p text:style-name="P159"><text:tab/>leal<text:tab/>0(%eax,%ecx,1), %esi</text:p>
            <text:p text:style-name="P159"><text:tab/>movl<text:tab/>%esi, 0(%r8)</text:p>
            <text:p text:style-name="P159"><text:tab/>movq <text:s text:c="3"/>i@GOTPCREL(%rip), %r9</text:p>
            <text:p text:style-name="P159"><text:tab/>movq <text:s text:c="3"/>i@GOTPCREL(%rip), %rdi</text:p>
            <text:p text:style-name="P159"><text:tab/>movl<text:tab/>0(%rdi), %edx</text:p>
            <text:p text:style-name="P159"><text:soft-page-break/><text:tab/>leal<text:tab/>1(%edx), %r11d</text:p>
            <text:p text:style-name="P159"><text:tab/>movl<text:tab/>%r11d, 0(%r9)</text:p>
            <text:p text:style-name="P159"><text:tab/>jmp<text:tab/>.L124</text:p>
            <text:p text:style-name="P159">.L125:</text:p>
            <text:p text:style-name="P159"><text:tab/>leaq<text:tab/>__stringlit_1(%rip), %rdi</text:p>
            <text:p text:style-name="P159"><text:tab/>movq <text:s text:c="3"/>k5@GOTPCREL(%rip), %rsi</text:p>
            <text:p text:style-name="P159"><text:tab/>movl<text:tab/>0(%rsi), %esi</text:p>
            <text:p text:style-name="P159"><text:tab/>movl<text:tab/>$0, %eax</text:p>
            <text:p text:style-name="P159"><text:tab/>call<text:tab/>printf@PLT</text:p>
            <text:p text:style-name="P159"><text:tab/>addq<text:tab/>$8, %rsp</text:p>
            <text:p text:style-name="P159"><text:tab/>ret</text:p>
            <text:p text:style-name="P159"><text:tab/>.cfi_endproc</text:p>
          </table:table-cell>
          <table:table-cell table:style-name="Таблица69.A1" office:value-type="string">
            <text:p text:style-name="P159">unnecessary_loop:</text:p>
            <text:p text:style-name="P159"><text:tab/>.cfi_startproc</text:p>
            <text:p text:style-name="P159"><text:tab/>subq<text:tab/>$8, %rsp</text:p>
            <text:p text:style-name="P159"><text:tab/>.cfi_adjust_cfa_offset<text:tab/>8</text:p>
            <text:p text:style-name="P159"><text:tab/>leaq<text:tab/>16(%rsp), %rax</text:p>
            <text:p text:style-name="P159"><text:tab/>movq<text:tab/>%rax, 0(%rsp)</text:p>
            <text:p text:style-name="P159"><text:tab/>movq <text:s text:c="3"/>i@GOTPCREL(%rip), %r8</text:p>
            <text:p text:style-name="P159"><text:tab/>xorl<text:tab/>%r11d, %r11d</text:p>
            <text:p text:style-name="P159"><text:tab/>movl<text:tab/>%r11d, 0(%r8)</text:p>
            <text:p text:style-name="P159">.L116:</text:p>
            <text:p text:style-name="P159"><text:tab/>movq <text:s text:c="3"/>i@GOTPCREL(%rip), %rcx</text:p>
            <text:p text:style-name="P159"><text:tab/>movl<text:tab/>0(%rcx), %eax</text:p>
            <text:p text:style-name="P159"><text:tab/>cmpl<text:tab/>$5, %eax</text:p>
            <text:p text:style-name="P159"><text:tab/>jge<text:tab/>.L117</text:p>
            <text:p text:style-name="P159"><text:tab/>movq <text:s text:c="3"/>k5@GOTPCREL(%rip), %rsi</text:p>
            <text:p text:style-name="P159"><text:tab/>movq <text:s text:c="3"/>j5@GOTPCREL(%rip), %rdx</text:p>
            <text:p text:style-name="P159"><text:tab/>movl<text:tab/>0(%rdx), %edx</text:p>
            <text:p text:style-name="P159"><text:tab/>leal<text:tab/>0(%edx), %edi</text:p>
            <text:p text:style-name="P159"><text:tab/>movl<text:tab/>%edi, 0(%rsi)</text:p>
            <text:p text:style-name="P159"><text:tab/>leal<text:tab/>1(%eax), %r9d</text:p>
            <text:p text:style-name="P159"><text:tab/>movl<text:tab/>%r9d, 0(%rcx)</text:p>
            <text:p text:style-name="P159"><text:tab/>jmp<text:tab/>.L116</text:p>
            <text:p text:style-name="P159">.L117:</text:p>
            <text:p text:style-name="P159"><text:soft-page-break/><text:tab/>leaq<text:tab/>__stringlit_1(%rip), %rdi</text:p>
            <text:p text:style-name="P159"><text:tab/>movq <text:s text:c="3"/>k5@GOTPCREL(%rip), %rcx</text:p>
            <text:p text:style-name="P159"><text:tab/>movl<text:tab/>0(%rcx), %esi</text:p>
            <text:p text:style-name="P159"><text:tab/>movl<text:tab/>$0, %eax</text:p>
            <text:p text:style-name="P159"><text:tab/>call<text:tab/>printf@PLT</text:p>
            <text:p text:style-name="P159"><text:tab/>addq<text:tab/>$8, %rsp</text:p>
            <text:p text:style-name="P159"><text:tab/>ret</text:p>
            <text:p text:style-name="P159"><text:tab/>.cfi_endproc</text:p>
          </table:table-cell>
        </table:table-row>
      </table:table>
      <text:p text:style-name="P67"><text:span text:style-name="T23"/></text:p>
      <text:p text:style-name="P67"><text:span text:style-name="T23">При оптимизации цикл </text:span><text:span text:style-name="T31">остался</text:span></text:p>
      <text:p text:style-name="P67"><text:span text:style-name="T23"/></text:p>
      <text:p text:style-name="P67"><text:span text:style-name="T23"/></text:p>
      <table:table table:name="Таблица70" table:style-name="Таблица70">
        <table:table-column table:style-name="Таблица70.A"/>
        <table:table-column table:style-name="Таблица70.B"/>
        <table:table-row>
          <table:table-cell table:style-name="Таблица70.A1" office:value-type="string">
            <text:p text:style-name="P159">loop_jamming:</text:p>
            <text:p text:style-name="P159"><text:tab/>.cfi_startproc</text:p>
            <text:p text:style-name="P159"><text:tab/>subq<text:tab/>$24, %rsp</text:p>
            <text:p text:style-name="P159"><text:tab/>.cfi_adjust_cfa_offset<text:tab/>24</text:p>
            <text:p text:style-name="P159"><text:tab/>leaq<text:tab/>32(%rsp), %rax</text:p>
            <text:p text:style-name="P159"><text:tab/>movq<text:tab/>%rax, 0(%rsp)</text:p>
            <text:p text:style-name="P159"><text:tab/>movq<text:tab/>%rbx, 8(%rsp)</text:p>
            <text:p text:style-name="P159"><text:tab/>movq<text:tab/>%rdi, %rbx</text:p>
            <text:p text:style-name="P159"><text:tab/>movq <text:s text:c="3"/>i@GOTPCREL(%rip), %r11</text:p>
            <text:p text:style-name="P159"><text:tab/>xorl<text:tab/>%edi, %edi</text:p>
            <text:p text:style-name="P159"><text:tab/>movl<text:tab/>%edi, 0(%r11)</text:p>
            <text:p text:style-name="P159">.L126:</text:p>
            <text:p text:style-name="P159"><text:tab/>movq <text:s text:c="3"/>i@GOTPCREL(%rip), %rsi</text:p>
            <text:p text:style-name="P159"><text:tab/>movl<text:tab/>0(%rsi), %ecx</text:p>
            <text:p text:style-name="P159"><text:tab/>cmpl<text:tab/>$5, %ecx</text:p>
            <text:p text:style-name="P159"><text:tab/>jge<text:tab/>.L127</text:p>
            <text:p text:style-name="P159"><text:tab/>movq <text:s text:c="3"/>k5@GOTPCREL(%rip), %r11</text:p>
            <text:p text:style-name="P159"><text:tab/>movq <text:s text:c="3"/>j5@GOTPCREL(%rip), %rdx</text:p>
            <text:p text:style-name="P159"><text:tab/>movl<text:tab/>0(%rdx), %ecx</text:p>
            <text:p text:style-name="P159"><text:tab/>movq <text:s text:c="3"/>i@GOTPCREL(%rip), %rdi</text:p>
            <text:p text:style-name="P159"><text:tab/>movl<text:tab/>0(%rdi), %edx</text:p>
            <text:p text:style-name="P159"><text:tab/>imull<text:tab/>%edx, %ecx</text:p>
            <text:p text:style-name="P159"><text:tab/>leal<text:tab/>0(%ebx,%ecx,1), %r10d</text:p>
            <text:p text:style-name="P159"><text:tab/>movl<text:tab/>%r10d, 0(%r11)</text:p>
            <text:p text:style-name="P159"><text:tab/>leaq<text:tab/>__stringlit_1(%rip), %rdi</text:p>
            <text:p text:style-name="P159"><text:tab/>movq <text:s text:c="3"/>k5@GOTPCREL(%rip), %rsi</text:p>
            <text:p text:style-name="P159"><text:tab/>movl<text:tab/>0(%rsi), %esi</text:p>
            <text:p text:style-name="P159"><text:tab/>movl<text:tab/>$0, %eax</text:p>
            <text:p text:style-name="P159"><text:tab/>call<text:tab/>printf@PLT</text:p>
            <text:p text:style-name="P159"><text:tab/>movq <text:s text:c="3"/>i@GOTPCREL(%rip), %rax</text:p>
            <text:p text:style-name="P159"><text:tab/>movq <text:s text:c="3"/>i@GOTPCREL(%rip), %r9</text:p>
            <text:p text:style-name="P159"><text:tab/>movl<text:tab/>0(%r9), %esi</text:p>
            <text:p text:style-name="P159"><text:tab/>leal<text:tab/>1(%esi), %edx</text:p>
            <text:p text:style-name="P159"><text:tab/>movl<text:tab/>%edx, 0(%rax)</text:p>
            <text:p text:style-name="P159"><text:tab/>jmp<text:tab/>.L126</text:p>
            <text:p text:style-name="P159">.L127:</text:p>
            <text:p text:style-name="P159"><text:tab/>movq <text:s text:c="3"/>i@GOTPCREL(%rip), %rcx</text:p>
            <text:p text:style-name="P159"><text:tab/>xorl<text:tab/>%eax, %eax</text:p>
            <text:p text:style-name="P159"><text:tab/>movl<text:tab/>%eax, 0(%rcx)</text:p>
            <text:p text:style-name="P159">.L128:</text:p>
            <text:p text:style-name="P159"><text:tab/>movq <text:s text:c="3"/>i@GOTPCREL(%rip), %rdi</text:p>
            <text:p text:style-name="P159"><text:tab/>movl<text:tab/>0(%rdi), %edi</text:p>
            <text:p text:style-name="P159"><text:tab/>cmpl<text:tab/>$5, %edi</text:p>
            <text:p text:style-name="P159"><text:tab/>jge<text:tab/>.L129</text:p>
            <text:p text:style-name="P159"><text:tab/>movq <text:s text:c="3"/>i5@GOTPCREL(%rip), %rdx</text:p>
            <text:p text:style-name="P159"><text:tab/>movq <text:s text:c="3"/>k5@GOTPCREL(%rip), %r8</text:p>
            <text:p text:style-name="P159"><text:tab/>movl<text:tab/>0(%r8), %esi</text:p>
            <text:p text:style-name="P159"><text:tab/>movq<text:tab/>%rbx, %rax</text:p>
            <text:p text:style-name="P159"><text:tab/>imull<text:tab/>%esi, %eax</text:p>
            <text:p text:style-name="P159"><text:tab/>movq <text:s text:c="3"/>i@GOTPCREL(%rip), %r8</text:p>
            <text:p text:style-name="P159"><text:tab/>movl<text:tab/>0(%r8), %esi</text:p>
            <text:p text:style-name="P159"><text:tab/>imull<text:tab/>%esi, %eax</text:p>
            <text:p text:style-name="P159"><text:tab/>movl<text:tab/>%eax, 0(%rdx)</text:p>
            <text:p text:style-name="P159"><text:tab/>leaq<text:tab/>__stringlit_1(%rip), %rdi</text:p>
            <text:p text:style-name="P159"><text:tab/>movq <text:s text:c="3"/>k5@GOTPCREL(%rip), %rcx</text:p>
            <text:p text:style-name="P159"><text:tab/>movl<text:tab/>0(%rcx), %esi</text:p>
            <text:p text:style-name="P159"><text:tab/>movl<text:tab/>$0, %eax</text:p>
            <text:p text:style-name="P159"><text:tab/>call<text:tab/>printf@PLT</text:p>
            <text:p text:style-name="P159"><text:tab/>movq <text:s text:c="3"/>i@GOTPCREL(%rip), %r11</text:p>
            <text:p text:style-name="P159"><text:tab/>movq <text:s text:c="3"/>i@GOTPCREL(%rip), %r10</text:p>
            <text:p text:style-name="P159"><text:tab/>movl<text:tab/>0(%r10), %r10d</text:p>
            <text:p text:style-name="P159"><text:tab/>leal<text:tab/>1(%r10d), %r9d</text:p>
            <text:p text:style-name="P159"><text:tab/>movl<text:tab/>%r9d, 0(%r11)</text:p>
            <text:p text:style-name="P159"><text:soft-page-break/><text:tab/>jmp<text:tab/>.L128</text:p>
            <text:p text:style-name="P159">.L129:</text:p>
            <text:p text:style-name="P159"><text:tab/>movq<text:tab/>8(%rsp), %rbx</text:p>
            <text:p text:style-name="P159"><text:tab/>addq<text:tab/>$24, %rsp</text:p>
            <text:p text:style-name="P159"><text:tab/>ret</text:p>
            <text:p text:style-name="P159"><text:tab/>.cfi_endproc</text:p>
          </table:table-cell>
          <table:table-cell table:style-name="Таблица70.A1" office:value-type="string">
            <text:p text:style-name="P103">loop_jamming:</text:p>
            <text:p text:style-name="P103"><text:tab/>.cfi_startproc</text:p>
            <text:p text:style-name="P103"><text:tab/>subq<text:tab/>$24, %rsp</text:p>
            <text:p text:style-name="P103"><text:tab/>.cfi_adjust_cfa_offset<text:tab/>24</text:p>
            <text:p text:style-name="P103"><text:tab/>leaq<text:tab/>32(%rsp), %rax</text:p>
            <text:p text:style-name="P103"><text:tab/>movq<text:tab/>%rax, 0(%rsp)</text:p>
            <text:p text:style-name="P103"><text:tab/>movq<text:tab/>%rbx, 8(%rsp)</text:p>
            <text:p text:style-name="P103"><text:tab/>movq<text:tab/>%rdi, %rbx</text:p>
            <text:p text:style-name="P103"><text:tab/>movq <text:s text:c="3"/>i@GOTPCREL(%rip), %r10</text:p>
            <text:p text:style-name="P103"><text:tab/>xorl<text:tab/>%ecx, %ecx</text:p>
            <text:p text:style-name="P103"><text:tab/>movl<text:tab/>%ecx, 0(%r10)</text:p>
            <text:p text:style-name="P103">.L118:</text:p>
            <text:p text:style-name="P103"><text:tab/>movq <text:s text:c="3"/>i@GOTPCREL(%rip), %rdx</text:p>
            <text:p text:style-name="P103"><text:tab/>movl<text:tab/>0(%rdx), %ecx</text:p>
            <text:p text:style-name="P103"><text:tab/>cmpl<text:tab/>$5, %ecx</text:p>
            <text:p text:style-name="P103"><text:tab/>jge<text:tab/>.L119</text:p>
            <text:p text:style-name="P103"><text:tab/>movq <text:s text:c="3"/>k5@GOTPCREL(%rip), %rdx</text:p>
            <text:p text:style-name="P103"><text:tab/>movq <text:s text:c="3"/>j5@GOTPCREL(%rip), %r8</text:p>
            <text:p text:style-name="P103"><text:tab/>movl<text:tab/>0(%r8), %r8d</text:p>
            <text:p text:style-name="P103"><text:tab/>imull<text:tab/>%ecx, %r8d</text:p>
            <text:p text:style-name="P103"><text:tab/>leal<text:tab/>0(%ebx,%r8d,1), %esi</text:p>
            <text:p text:style-name="P103"><text:tab/>movl<text:tab/>%esi, 0(%rdx)</text:p>
            <text:p text:style-name="P103"><text:tab/>leaq<text:tab/>__stringlit_1(%rip), %rdi</text:p>
            <text:p text:style-name="P103"><text:tab/>movl<text:tab/>$0, %eax</text:p>
            <text:p text:style-name="P103"><text:tab/>call<text:tab/>printf@PLT</text:p>
            <text:p text:style-name="P103"><text:tab/>movq <text:s text:c="3"/>i@GOTPCREL(%rip), %r9</text:p>
            <text:p text:style-name="P103"><text:tab/>movl<text:tab/>0(%r9), %r11d</text:p>
            <text:p text:style-name="P103"><text:tab/>leal<text:tab/>1(%r11d), %edx</text:p>
            <text:p text:style-name="P103"><text:tab/>movl<text:tab/>%edx, 0(%r9)</text:p>
            <text:p text:style-name="P103"><text:tab/>jmp<text:tab/>.L118</text:p>
            <text:p text:style-name="P103">.L119:</text:p>
            <text:p text:style-name="P103"><text:tab/>xorl<text:tab/>%r10d, %r10d</text:p>
            <text:p text:style-name="P103"><text:tab/>movl<text:tab/>%r10d, 0(%rdx)</text:p>
            <text:p text:style-name="P103">.L120:</text:p>
            <text:p text:style-name="P103"><text:tab/>movq <text:s text:c="3"/>i@GOTPCREL(%rip), %rax</text:p>
            <text:p text:style-name="P103"><text:tab/>movl<text:tab/>0(%rax), %edi</text:p>
            <text:p text:style-name="P103"><text:tab/>cmpl<text:tab/>$5, %edi</text:p>
            <text:p text:style-name="P103"><text:tab/>jge<text:tab/>.L121</text:p>
            <text:p text:style-name="P103"><text:tab/>movq <text:s text:c="3"/>i5@GOTPCREL(%rip), %r11</text:p>
            <text:p text:style-name="P103"><text:tab/>movq <text:s text:c="3"/>k5@GOTPCREL(%rip), %r8</text:p>
            <text:p text:style-name="P103"><text:tab/>movl<text:tab/>0(%r8), %esi</text:p>
            <text:p text:style-name="P103"><text:tab/>movq<text:tab/>%rbx, %rax</text:p>
            <text:p text:style-name="P103"><text:tab/>imull<text:tab/>%esi, %eax</text:p>
            <text:p text:style-name="P103"><text:tab/>imull<text:tab/>%edi, %eax</text:p>
            <text:p text:style-name="P103"><text:tab/>movl<text:tab/>%eax, 0(%r11)</text:p>
            <text:p text:style-name="P103"><text:tab/>leaq<text:tab/>__stringlit_1(%rip), %rdi</text:p>
            <text:p text:style-name="P103"><text:tab/>movl<text:tab/>$0, %eax</text:p>
            <text:p text:style-name="P103"><text:tab/>call<text:tab/>printf@PLT</text:p>
            <text:p text:style-name="P103"><text:tab/>movq <text:s text:c="3"/>i@GOTPCREL(%rip), %rsi</text:p>
            <text:p text:style-name="P103"><text:tab/>movl<text:tab/>0(%rsi), %edx</text:p>
            <text:p text:style-name="P103"><text:tab/>leal<text:tab/>1(%edx), %eax</text:p>
            <text:p text:style-name="P103"><text:tab/>movl<text:tab/>%eax, 0(%rsi)</text:p>
            <text:p text:style-name="P103"><text:soft-page-break/><text:tab/>jmp<text:tab/>.L120</text:p>
            <text:p text:style-name="P103">.L121:</text:p>
            <text:p text:style-name="P103"><text:tab/>movq<text:tab/>8(%rsp), %rbx</text:p>
            <text:p text:style-name="P103"><text:tab/>addq<text:tab/>$24, %rsp</text:p>
            <text:p text:style-name="P103"><text:tab/>ret</text:p>
            <text:p text:style-name="P103"><text:tab/>.cfi_endproc</text:p>
          </table:table-cell>
        </table:table-row>
      </table:table>
      <text:p text:style-name="P67"><text:span text:style-name="T23"/></text:p>
      <text:p text:style-name="P71"><text:span text:style-name="T23"/></text:p>
      <text:p text:style-name="P198">Без оптимизации было сгенерированно 2 цикла</text:p>
      <text:p text:style-name="P71"><text:span text:style-name="T23"/></text:p>
      <table:table table:name="Таблица71" table:style-name="Таблица71">
        <table:table-column table:style-name="Таблица71.A"/>
        <table:table-column table:style-name="Таблица71.B"/>
        <table:table-row table:style-name="Таблица71.1">
          <table:table-cell table:style-name="Таблица71.A1" office:value-type="string">
            <text:p text:style-name="P159">loop_jamming:</text:p>
            <text:p text:style-name="P159"><text:tab/>.cfi_startproc</text:p>
            <text:p text:style-name="P159"><text:tab/>subq<text:tab/>$24, %rsp</text:p>
            <text:p text:style-name="P159"><text:tab/>.cfi_adjust_cfa_offset<text:tab/>24</text:p>
            <text:p text:style-name="P159"><text:tab/>leaq<text:tab/>32(%rsp), %rax</text:p>
            <text:p text:style-name="P159"><text:tab/>movq<text:tab/>%rax, 0(%rsp)</text:p>
            <text:p text:style-name="P159"><text:tab/>movq<text:tab/>%rbx, 8(%rsp)</text:p>
            <text:p text:style-name="P159"><text:tab/>movq<text:tab/>%rdi, %rbx</text:p>
            <text:p text:style-name="P159"><text:tab/>movq <text:s text:c="3"/>i@GOTPCREL(%rip), %r11</text:p>
            <text:p text:style-name="P159"><text:tab/>xorl<text:tab/>%edi, %edi</text:p>
            <text:p text:style-name="P159"><text:tab/>movl<text:tab/>%edi, 0(%r11)</text:p>
            <text:p text:style-name="P159">.L126:</text:p>
            <text:p text:style-name="P159"><text:tab/>movq <text:s text:c="3"/>i@GOTPCREL(%rip), %rsi</text:p>
            <text:p text:style-name="P159"><text:tab/>movl<text:tab/>0(%rsi), %ecx</text:p>
            <text:p text:style-name="P159"><text:tab/>cmpl<text:tab/>$5, %ecx</text:p>
            <text:p text:style-name="P159"><text:tab/>jge<text:tab/>.L127</text:p>
            <text:p text:style-name="P159"><text:tab/>movq <text:s text:c="3"/>k5@GOTPCREL(%rip), %r11</text:p>
            <text:p text:style-name="P159"><text:tab/>movq <text:s text:c="3"/>j5@GOTPCREL(%rip), %rdx</text:p>
            <text:p text:style-name="P159"><text:tab/>movl<text:tab/>0(%rdx), %ecx</text:p>
            <text:p text:style-name="P159"><text:tab/>movq <text:s text:c="3"/>i@GOTPCREL(%rip), %rdi</text:p>
            <text:p text:style-name="P159"><text:tab/>movl<text:tab/>0(%rdi), %edx</text:p>
            <text:p text:style-name="P159"><text:tab/>imull<text:tab/>%edx, %ecx</text:p>
            <text:p text:style-name="P159"><text:tab/>leal<text:tab/>0(%ebx,%ecx,1), %r10d</text:p>
            <text:p text:style-name="P159"><text:tab/>movl<text:tab/>%r10d, 0(%r11)</text:p>
            <text:p text:style-name="P159"><text:tab/>leaq<text:tab/>__stringlit_1(%rip), %rdi</text:p>
            <text:p text:style-name="P159"><text:tab/>movq <text:s text:c="3"/>k5@GOTPCREL(%rip), %rsi</text:p>
            <text:p text:style-name="P159"><text:tab/>movl<text:tab/>0(%rsi), %esi</text:p>
            <text:p text:style-name="P159"><text:tab/>movl<text:tab/>$0, %eax</text:p>
            <text:p text:style-name="P159"><text:tab/>call<text:tab/>printf@PLT</text:p>
            <text:p text:style-name="P159"><text:tab/>movq <text:s text:c="3"/>i@GOTPCREL(%rip), %rax</text:p>
            <text:p text:style-name="P159"><text:tab/>movq <text:s text:c="3"/>i@GOTPCREL(%rip), %r9</text:p>
            <text:p text:style-name="P159"><text:tab/>movl<text:tab/>0(%r9), %esi</text:p>
            <text:p text:style-name="P159"><text:tab/>leal<text:tab/>1(%esi), %edx</text:p>
            <text:p text:style-name="P159"><text:tab/>movl<text:tab/>%edx, 0(%rax)</text:p>
            <text:p text:style-name="P159"><text:tab/>jmp<text:tab/>.L126</text:p>
            <text:p text:style-name="P159">.L127:</text:p>
            <text:p text:style-name="P159"><text:tab/>movq <text:s text:c="3"/>i@GOTPCREL(%rip), %rcx</text:p>
            <text:p text:style-name="P159"><text:tab/>xorl<text:tab/>%eax, %eax</text:p>
            <text:p text:style-name="P159"><text:tab/>movl<text:tab/>%eax, 0(%rcx)</text:p>
            <text:p text:style-name="P159">.L128:</text:p>
            <text:p text:style-name="P159"><text:tab/>movq <text:s text:c="3"/>i@GOTPCREL(%rip), %rdi</text:p>
            <text:p text:style-name="P159"><text:tab/>movl<text:tab/>0(%rdi), %edi</text:p>
            <text:p text:style-name="P159"><text:tab/>cmpl<text:tab/>$5, %edi</text:p>
            <text:p text:style-name="P159"><text:tab/>jge<text:tab/>.L129</text:p>
            <text:p text:style-name="P159"><text:tab/>movq <text:s text:c="3"/>i5@GOTPCREL(%rip), %rdx</text:p>
            <text:p text:style-name="P159"><text:tab/>movq <text:s text:c="3"/>k5@GOTPCREL(%rip), %r8</text:p>
            <text:p text:style-name="P159"><text:tab/>movl<text:tab/>0(%r8), %esi</text:p>
            <text:p text:style-name="P159"><text:tab/>movq<text:tab/>%rbx, %rax</text:p>
            <text:p text:style-name="P159"><text:tab/>imull<text:tab/>%esi, %eax</text:p>
            <text:p text:style-name="P159"><text:tab/>movq <text:s text:c="3"/>i@GOTPCREL(%rip), %r8</text:p>
            <text:p text:style-name="P159"><text:tab/>movl<text:tab/>0(%r8), %esi</text:p>
            <text:p text:style-name="P159"><text:tab/>imull<text:tab/>%esi, %eax</text:p>
            <text:p text:style-name="P159"><text:tab/>movl<text:tab/>%eax, 0(%rdx)</text:p>
            <text:p text:style-name="P159"><text:tab/>leaq<text:tab/>__stringlit_1(%rip), %rdi</text:p>
            <text:p text:style-name="P159"><text:tab/>movq <text:s text:c="3"/>k5@GOTPCREL(%rip), %rcx</text:p>
            <text:p text:style-name="P159"><text:tab/>movl<text:tab/>0(%rcx), %esi</text:p>
            <text:p text:style-name="P159"><text:tab/>movl<text:tab/>$0, %eax</text:p>
            <text:p text:style-name="P159"><text:tab/>call<text:tab/>printf@PLT</text:p>
            <text:p text:style-name="P159"><text:tab/>movq <text:s text:c="3"/>i@GOTPCREL(%rip), %r11</text:p>
            <text:p text:style-name="P159"><text:tab/>movq <text:s text:c="3"/>i@GOTPCREL(%rip), %r10</text:p>
            <text:p text:style-name="P159"><text:soft-page-break/><text:tab/>movl<text:tab/>0(%r10), %r10d</text:p>
            <text:p text:style-name="P159"><text:tab/>leal<text:tab/>1(%r10d), %r9d</text:p>
            <text:p text:style-name="P159"><text:tab/>movl<text:tab/>%r9d, 0(%r11)</text:p>
            <text:p text:style-name="P159"><text:tab/>jmp<text:tab/>.L128</text:p>
            <text:p text:style-name="P159">.L129:</text:p>
            <text:p text:style-name="P159"><text:tab/>movq<text:tab/>8(%rsp), %rbx</text:p>
            <text:p text:style-name="P159"><text:tab/>addq<text:tab/>$24, %rsp</text:p>
            <text:p text:style-name="P159"><text:tab/>ret</text:p>
            <text:p text:style-name="P159"><text:tab/>.cfi_endproc</text:p>
          </table:table-cell>
          <table:table-cell table:style-name="Таблица71.A1" office:value-type="string">
            <text:p text:style-name="P159">loop_jamming:</text:p>
            <text:p text:style-name="P159"><text:tab/>.cfi_startproc</text:p>
            <text:p text:style-name="P159"><text:tab/>subq<text:tab/>$24, %rsp</text:p>
            <text:p text:style-name="P159"><text:tab/>.cfi_adjust_cfa_offset<text:tab/>24</text:p>
            <text:p text:style-name="P159"><text:tab/>leaq<text:tab/>32(%rsp), %rax</text:p>
            <text:p text:style-name="P159"><text:tab/>movq<text:tab/>%rax, 0(%rsp)</text:p>
            <text:p text:style-name="P159"><text:tab/>movq<text:tab/>%rbx, 8(%rsp)</text:p>
            <text:p text:style-name="P159"><text:tab/>movq<text:tab/>%rdi, %rbx</text:p>
            <text:p text:style-name="P159"><text:tab/>movq <text:s text:c="3"/>i@GOTPCREL(%rip), %r10</text:p>
            <text:p text:style-name="P159"><text:tab/>xorl<text:tab/>%ecx, %ecx</text:p>
            <text:p text:style-name="P159"><text:tab/>movl<text:tab/>%ecx, 0(%r10)</text:p>
            <text:p text:style-name="P159">.L118:</text:p>
            <text:p text:style-name="P159"><text:tab/>movq <text:s text:c="3"/>i@GOTPCREL(%rip), %rdx</text:p>
            <text:p text:style-name="P159"><text:tab/>movl<text:tab/>0(%rdx), %ecx</text:p>
            <text:p text:style-name="P159"><text:tab/>cmpl<text:tab/>$5, %ecx</text:p>
            <text:p text:style-name="P159"><text:tab/>jge<text:tab/>.L119</text:p>
            <text:p text:style-name="P159"><text:tab/>movq <text:s text:c="3"/>k5@GOTPCREL(%rip), %rdx</text:p>
            <text:p text:style-name="P159"><text:tab/>movq <text:s text:c="3"/>j5@GOTPCREL(%rip), %r8</text:p>
            <text:p text:style-name="P159"><text:tab/>movl<text:tab/>0(%r8), %r8d</text:p>
            <text:p text:style-name="P159"><text:tab/>imull<text:tab/>%ecx, %r8d</text:p>
            <text:p text:style-name="P159"><text:tab/>leal<text:tab/>0(%ebx,%r8d,1), %esi</text:p>
            <text:p text:style-name="P159"><text:tab/>movl<text:tab/>%esi, 0(%rdx)</text:p>
            <text:p text:style-name="P159"><text:tab/>leaq<text:tab/>__stringlit_1(%rip), %rdi</text:p>
            <text:p text:style-name="P159"><text:tab/>movl<text:tab/>$0, %eax</text:p>
            <text:p text:style-name="P159"><text:tab/>call<text:tab/>printf@PLT</text:p>
            <text:p text:style-name="P159"><text:tab/>movq <text:s text:c="3"/>i@GOTPCREL(%rip), %r9</text:p>
            <text:p text:style-name="P159"><text:tab/>movl<text:tab/>0(%r9), %r11d</text:p>
            <text:p text:style-name="P159"><text:tab/>leal<text:tab/>1(%r11d), %edx</text:p>
            <text:p text:style-name="P159"><text:tab/>movl<text:tab/>%edx, 0(%r9)</text:p>
            <text:p text:style-name="P159"><text:tab/>jmp<text:tab/>.L118</text:p>
            <text:p text:style-name="P159">.L119:</text:p>
            <text:p text:style-name="P159"><text:tab/>xorl<text:tab/>%r10d, %r10d</text:p>
            <text:p text:style-name="P159"><text:tab/>movl<text:tab/>%r10d, 0(%rdx)</text:p>
            <text:p text:style-name="P159">.L120:</text:p>
            <text:p text:style-name="P159"><text:tab/>movq <text:s text:c="3"/>i@GOTPCREL(%rip), %rax</text:p>
            <text:p text:style-name="P159"><text:tab/>movl<text:tab/>0(%rax), %edi</text:p>
            <text:p text:style-name="P159"><text:tab/>cmpl<text:tab/>$5, %edi</text:p>
            <text:p text:style-name="P159"><text:tab/>jge<text:tab/>.L121</text:p>
            <text:p text:style-name="P159"><text:tab/>movq <text:s text:c="3"/>i5@GOTPCREL(%rip), %r11</text:p>
            <text:p text:style-name="P159"><text:tab/>movq <text:s text:c="3"/>k5@GOTPCREL(%rip), %r8</text:p>
            <text:p text:style-name="P159"><text:tab/>movl<text:tab/>0(%r8), %esi</text:p>
            <text:p text:style-name="P159"><text:tab/>movq<text:tab/>%rbx, %rax</text:p>
            <text:p text:style-name="P159"><text:tab/>imull<text:tab/>%esi, %eax</text:p>
            <text:p text:style-name="P159"><text:tab/>imull<text:tab/>%edi, %eax</text:p>
            <text:p text:style-name="P159"><text:tab/>movl<text:tab/>%eax, 0(%r11)</text:p>
            <text:p text:style-name="P159"><text:tab/>leaq<text:tab/>__stringlit_1(%rip), %rdi</text:p>
            <text:p text:style-name="P159"><text:tab/>movl<text:tab/>$0, %eax</text:p>
            <text:p text:style-name="P159"><text:tab/>call<text:tab/>printf@PLT</text:p>
            <text:p text:style-name="P159"><text:tab/>movq <text:s text:c="3"/>i@GOTPCREL(%rip), %rsi</text:p>
            <text:p text:style-name="P159"><text:tab/>movl<text:tab/>0(%rsi), %edx</text:p>
            <text:p text:style-name="P159"><text:tab/>leal<text:tab/>1(%edx), %eax</text:p>
            <text:p text:style-name="P159"><text:tab/>movl<text:tab/>%eax, 0(%rsi)</text:p>
            <text:p text:style-name="P159"><text:tab/>jmp<text:tab/>.L120</text:p>
            <text:p text:style-name="P159">.L121:</text:p>
            <text:p text:style-name="P159"><text:tab/>movq<text:tab/>8(%rsp), %rbx</text:p>
            <text:p text:style-name="P159"><text:tab/>addq<text:tab/>$24, %rsp</text:p>
            <text:p text:style-name="P159"><text:tab/>ret</text:p>
            <text:p text:style-name="P159"><text:tab/>.cfi_endproc</text:p>
          </table:table-cell>
        </table:table-row>
      </table:table>
      <text:p text:style-name="P71"><text:span text:style-name="T23"/></text:p>
      <text:p text:style-name="P210">Оптимизация не смогла объединить циклы, их 2: L118 и L120</text:p>
      <table:table table:name="Таблица72" table:style-name="Таблица72">
        <table:table-column table:style-name="Таблица72.A"/>
        <table:table-column table:style-name="Таблица72.B"/>
        <table:table-row>
          <table:table-cell table:style-name="Таблица72.A1" office:value-type="string">
            <text:p text:style-name="P159">loop_unrolling:</text:p>
            <text:p text:style-name="P159"><text:tab/>.cfi_startproc</text:p>
            <text:p text:style-name="P159"><text:tab/>subq<text:tab/>$8, %rsp</text:p>
            <text:p text:style-name="P159"><text:tab/>.cfi_adjust_cfa_offset<text:tab/>8</text:p>
            <text:p text:style-name="P159"><text:tab/>leaq<text:tab/>16(%rsp), %rax</text:p>
            <text:p text:style-name="P159"><text:tab/>movq<text:tab/>%rax, 0(%rsp)</text:p>
            <text:p text:style-name="P159"><text:tab/>movq <text:s text:c="3"/>i@GOTPCREL(%rip), %rdi</text:p>
            <text:p text:style-name="P159"><text:tab/>xorl<text:tab/>%eax, %eax</text:p>
            <text:p text:style-name="P159"><text:tab/>movl<text:tab/>%eax, 0(%rdi)</text:p>
            <text:p text:style-name="P159">.L130:</text:p>
            <text:p text:style-name="P159"><text:tab/>movq <text:s text:c="3"/>i@GOTPCREL(%rip), %rax</text:p>
            <text:p text:style-name="P159"><text:tab/>movl<text:tab/>0(%rax), %eax</text:p>
            <text:p text:style-name="P159"><text:tab/>cmpl<text:tab/>$6, %eax</text:p>
            <text:p text:style-name="P159"><text:tab/>jge<text:tab/>.L131</text:p>
            <text:p text:style-name="P159"><text:tab/>movq <text:s text:c="3"/>ivector4@GOTPCREL(%rip), %r11</text:p>
            <text:p text:style-name="P159"><text:tab/>movq <text:s text:c="3"/>i@GOTPCREL(%rip), %r8</text:p>
            <text:p text:style-name="P159"><text:tab/>movl<text:tab/>0(%r8), %ecx</text:p>
            <text:p text:style-name="P159"><text:tab/>movslq<text:tab/>%ecx, %rdx</text:p>
            <text:p text:style-name="P159"><text:tab/>xorl<text:tab/>%edi, %edi</text:p>
            <text:p text:style-name="P159"><text:tab/>movw<text:tab/>%di, 0(%r11,%rdx,2)</text:p>
            <text:p text:style-name="P159"><text:tab/>leaq<text:tab/>__stringlit_1(%rip), %rdi</text:p>
            <text:p text:style-name="P159"><text:tab/>movq <text:s text:c="3"/>ivector4@GOTPCREL(%rip), %rdx</text:p>
            <text:p text:style-name="P159"><text:tab/>movq <text:s text:c="3"/>i@GOTPCREL(%rip), %r10</text:p>
            <text:p text:style-name="P159"><text:tab/>movl<text:tab/>0(%r10), %ecx</text:p>
            <text:p text:style-name="P159"><text:tab/>movslq<text:tab/>%ecx, %r9</text:p>
            <text:p text:style-name="P159"><text:tab/>movswl<text:tab/>0(%rdx,%r9,2), %esi</text:p>
            <text:p text:style-name="P159"><text:tab/>movl<text:tab/>$0, %eax</text:p>
            <text:p text:style-name="P159"><text:tab/>call<text:tab/>printf@PLT</text:p>
            <text:p text:style-name="P159"><text:tab/>movq <text:s text:c="3"/>i@GOTPCREL(%rip), %rax</text:p>
            <text:p text:style-name="P159"><text:tab/>movq <text:s text:c="3"/>i@GOTPCREL(%rip), %r9</text:p>
            <text:p text:style-name="P159"><text:tab/>movl<text:tab/>0(%r9), %esi</text:p>
            <text:p text:style-name="P159"><text:tab/>leal<text:tab/>1(%esi), %esi</text:p>
            <text:p text:style-name="P159"><text:tab/>movl<text:tab/>%esi, 0(%rax)</text:p>
            <text:p text:style-name="P159"><text:tab/>jmp<text:tab/>.L130</text:p>
            <text:p text:style-name="P159">.L131:</text:p>
            <text:p text:style-name="P159"><text:tab/>addq<text:tab/>$8, %rsp</text:p>
            <text:p text:style-name="P159"><text:tab/>ret</text:p>
            <text:p text:style-name="P159"><text:tab/>.cfi_endproc</text:p>
          </table:table-cell>
          <table:table-cell table:style-name="Таблица72.A1" office:value-type="string">
            <text:p text:style-name="P103">void loop_unrolling(int x)</text:p>
            <text:p text:style-name="P103">{</text:p>
            <text:p text:style-name="P103"><text:tab/>for (i = 0; i &lt; 6; i++) {</text:p>
            <text:p text:style-name="P103"><text:tab/><text:tab/>ivector4[i] = 0;</text:p>
            <text:p text:style-name="P103"><text:tab/><text:tab/>printf("%d", ivector4[i]);</text:p>
            <text:p text:style-name="P103"><text:tab/>}</text:p>
            <text:p text:style-name="P103">} </text:p>
          </table:table-cell>
        </table:table-row>
      </table:table>
      <text:p text:style-name="P71"><text:span text:style-name="T23"/></text:p>
      <text:p text:style-name="P201">Без оптимизации разворачивания циклов не происходит</text:p>
      <text:p text:style-name="P74"><text:span text:style-name="T23"/></text:p>
      <table:table table:name="Таблица73" table:style-name="Таблица73">
        <table:table-column table:style-name="Таблица73.A"/>
        <table:table-column table:style-name="Таблица73.B"/>
        <table:table-row table:style-name="Таблица73.1">
          <table:table-cell table:style-name="Таблица73.A1" office:value-type="string">
            <text:p text:style-name="P159">loop_unrolling:</text:p>
            <text:p text:style-name="P159"><text:tab/>.cfi_startproc</text:p>
            <text:p text:style-name="P159"><text:tab/>subq<text:tab/>$8, %rsp</text:p>
            <text:p text:style-name="P159"><text:tab/>.cfi_adjust_cfa_offset<text:tab/>8</text:p>
            <text:p text:style-name="P159"><text:tab/>leaq<text:tab/>16(%rsp), %rax</text:p>
            <text:p text:style-name="P159"><text:tab/>movq<text:tab/>%rax, 0(%rsp)</text:p>
            <text:p text:style-name="P159"><text:tab/>movq <text:s text:c="3"/>i@GOTPCREL(%rip), %rdi</text:p>
            <text:p text:style-name="P159"><text:tab/>xorl<text:tab/>%eax, %eax</text:p>
            <text:p text:style-name="P159"><text:tab/>movl<text:tab/>%eax, 0(%rdi)</text:p>
            <text:p text:style-name="P159">.L130:</text:p>
            <text:p text:style-name="P159"><text:tab/>movq <text:s text:c="3"/>i@GOTPCREL(%rip), %rax</text:p>
            <text:p text:style-name="P159"><text:tab/>movl<text:tab/>0(%rax), %eax</text:p>
            <text:p text:style-name="P159"><text:tab/>cmpl<text:tab/>$6, %eax</text:p>
            <text:p text:style-name="P159"><text:tab/>jge<text:tab/>.L131</text:p>
            <text:p text:style-name="P159"><text:tab/>movq <text:s text:c="3"/>ivector4@GOTPCREL(%rip), %r11</text:p>
            <text:p text:style-name="P159"><text:tab/>movq <text:s text:c="3"/>i@GOTPCREL(%rip), %r8</text:p>
            <text:p text:style-name="P159"><text:tab/>movl<text:tab/>0(%r8), %ecx</text:p>
            <text:p text:style-name="P159"><text:tab/>movslq<text:tab/>%ecx, %rdx</text:p>
            <text:p text:style-name="P159"><text:tab/>xorl<text:tab/>%edi, %edi</text:p>
            <text:p text:style-name="P159"><text:tab/>movw<text:tab/>%di, 0(%r11,%rdx,2)</text:p>
            <text:p text:style-name="P159"><text:tab/>leaq<text:tab/>__stringlit_1(%rip), %rdi</text:p>
            <text:p text:style-name="P159"><text:tab/>movq <text:s text:c="3"/>ivector4@GOTPCREL(%rip), %rdx</text:p>
            <text:p text:style-name="P159"><text:tab/>movq <text:s text:c="3"/>i@GOTPCREL(%rip), %r10</text:p>
            <text:p text:style-name="P159"><text:tab/>movl<text:tab/>0(%r10), %ecx</text:p>
            <text:p text:style-name="P159"><text:tab/>movslq<text:tab/>%ecx, %r9</text:p>
            <text:p text:style-name="P159"><text:tab/>movswl<text:tab/>0(%rdx,%r9,2), %esi</text:p>
            <text:p text:style-name="P159"><text:tab/>movl<text:tab/>$0, %eax</text:p>
            <text:p text:style-name="P159"><text:tab/>call<text:tab/>printf@PLT</text:p>
            <text:p text:style-name="P159"><text:tab/>movq <text:s text:c="3"/>i@GOTPCREL(%rip), %rax</text:p>
            <text:p text:style-name="P159"><text:tab/>movq <text:s text:c="3"/>i@GOTPCREL(%rip), %r9</text:p>
            <text:p text:style-name="P159"><text:tab/>movl<text:tab/>0(%r9), %esi</text:p>
            <text:p text:style-name="P159"><text:tab/>leal<text:tab/>1(%esi), %esi</text:p>
            <text:p text:style-name="P159"><text:tab/>movl<text:tab/>%esi, 0(%rax)</text:p>
            <text:p text:style-name="P159"><text:tab/>jmp<text:tab/>.L130</text:p>
            <text:p text:style-name="P159">.L131:</text:p>
            <text:p text:style-name="P159"><text:tab/>addq<text:tab/>$8, %rsp</text:p>
            <text:p text:style-name="P159"><text:tab/>ret</text:p>
            <text:p text:style-name="P159"><text:tab/>.cfi_endproc</text:p>
          </table:table-cell>
          <table:table-cell table:style-name="Таблица73.A1" office:value-type="string">
            <text:p text:style-name="P159">loop_unrolling:</text:p>
            <text:p text:style-name="P159"><text:tab/>.cfi_startproc</text:p>
            <text:p text:style-name="P159"><text:tab/>subq<text:tab/>$8, %rsp</text:p>
            <text:p text:style-name="P159"><text:tab/>.cfi_adjust_cfa_offset<text:tab/>8</text:p>
            <text:p text:style-name="P159"><text:tab/>leaq<text:tab/>16(%rsp), %rax</text:p>
            <text:p text:style-name="P159"><text:tab/>movq<text:tab/>%rax, 0(%rsp)</text:p>
            <text:p text:style-name="P159"><text:tab/>movq <text:s text:c="3"/>i@GOTPCREL(%rip), %r8</text:p>
            <text:p text:style-name="P159"><text:tab/>xorl<text:tab/>%r10d, %r10d</text:p>
            <text:p text:style-name="P159"><text:tab/>movl<text:tab/>%r10d, 0(%r8)</text:p>
            <text:p text:style-name="P159">.L122:</text:p>
            <text:p text:style-name="P159"><text:tab/>movq <text:s text:c="3"/>i@GOTPCREL(%rip), %rax</text:p>
            <text:p text:style-name="P159"><text:tab/>movl<text:tab/>0(%rax), %eax</text:p>
            <text:p text:style-name="P159"><text:tab/>cmpl<text:tab/>$6, %eax</text:p>
            <text:p text:style-name="P159"><text:tab/>jge<text:tab/>.L123</text:p>
            <text:p text:style-name="P159"><text:tab/>movq <text:s text:c="3"/>ivector4@GOTPCREL(%rip), %r9</text:p>
            <text:p text:style-name="P159"><text:tab/>movslq<text:tab/>%eax, %rdi</text:p>
            <text:p text:style-name="P159"><text:tab/>xorl<text:tab/>%esi, %esi</text:p>
            <text:p text:style-name="P159"><text:tab/>movw<text:tab/>%si, 0(%r9,%rdi,2)</text:p>
            <text:p text:style-name="P159"><text:tab/>leaq<text:tab/>__stringlit_1(%rip), %rdi</text:p>
            <text:p text:style-name="P159"><text:tab/>movl<text:tab/>$0, %eax</text:p>
            <text:p text:style-name="P159"><text:tab/>call<text:tab/>printf@PLT</text:p>
            <text:p text:style-name="P159"><text:tab/>movq <text:s text:c="3"/>i@GOTPCREL(%rip), %rcx</text:p>
            <text:p text:style-name="P159"><text:tab/>movl<text:tab/>0(%rcx), %edx</text:p>
            <text:p text:style-name="P159"><text:tab/>leal<text:tab/>1(%edx), %esi</text:p>
            <text:p text:style-name="P159"><text:tab/>movl<text:tab/>%esi, 0(%rcx)</text:p>
            <text:p text:style-name="P159"><text:tab/>jmp<text:tab/>.L122</text:p>
            <text:p text:style-name="P159">.L123:</text:p>
            <text:p text:style-name="P159"><text:tab/>addq<text:tab/>$8, %rsp</text:p>
            <text:p text:style-name="P159"><text:tab/>ret</text:p>
            <text:p text:style-name="P159"><text:tab/>.cfi_endproc</text:p>
          </table:table-cell>
        </table:table-row>
      </table:table>
      <text:p text:style-name="P74"><text:span text:style-name="T23"/></text:p>
      <text:p text:style-name="P204">Даже при оптимизации цикл остался, разворачивание цикла не произошло</text:p>
      <table:table table:name="Таблица74" table:style-name="Таблица74">
        <table:table-column table:style-name="Таблица74.A"/>
        <table:table-column table:style-name="Таблица74.B"/>
        <table:table-row>
          <table:table-cell table:style-name="Таблица74.A1" office:value-type="string">
            <text:p text:style-name="P159">jump_compression:</text:p>
            <text:p text:style-name="P159"><text:tab/>.cfi_startproc</text:p>
            <text:p text:style-name="P159"><text:tab/>subq<text:tab/>$56, %rsp</text:p>
            <text:p text:style-name="P159"><text:tab/>.cfi_adjust_cfa_offset<text:tab/>56</text:p>
            <text:p text:style-name="P159"><text:tab/>leaq<text:tab/>64(%rsp), %rax</text:p>
            <text:p text:style-name="P159"><text:tab/>movq<text:tab/>%rax, 0(%rsp)</text:p>
            <text:p text:style-name="P159"><text:tab/>movq<text:tab/>%rbx, 8(%rsp)</text:p>
            <text:p text:style-name="P159"><text:tab/>movq<text:tab/>%rbp, 16(%rsp)</text:p>
            <text:p text:style-name="P159"><text:tab/>movq<text:tab/>%r12, 24(%rsp)</text:p>
            <text:p text:style-name="P159"><text:tab/>movq<text:tab/>%r13, 32(%rsp)</text:p>
            <text:p text:style-name="P159"><text:tab/>movq<text:tab/>%r14, 40(%rsp)</text:p>
            <text:p text:style-name="P159"><text:tab/>movq<text:tab/>%r8, %rbx</text:p>
            <text:p text:style-name="P159"><text:tab/>movq<text:tab/>%rcx, %rbp</text:p>
            <text:p text:style-name="P159"><text:tab/>movq<text:tab/>%rdx, %r12</text:p>
            <text:p text:style-name="P159"><text:tab/>movq<text:tab/>%rsi, %r13</text:p>
            <text:p text:style-name="P159"><text:tab/>movq<text:tab/>%rdi, %r14</text:p>
            <text:p text:style-name="P159">.L132:</text:p>
            <text:p text:style-name="P159"><text:tab/>cmpl<text:tab/>%r13d, %r14d</text:p>
            <text:p text:style-name="P159"><text:tab/>jge<text:tab/>.L133</text:p>
            <text:p text:style-name="P159"><text:tab/>cmpl<text:tab/>%r12d, %r13d</text:p>
            <text:p text:style-name="P159"><text:tab/>jl<text:tab/>.L134</text:p>
            <text:p text:style-name="P159"><text:tab/>leal<text:tab/>0(%r13d,%r12d,1), %r13d</text:p>
            <text:p text:style-name="P159"><text:tab/>leaq<text:tab/>__stringlit_1(%rip), %rdi</text:p>
            <text:p text:style-name="P159"><text:tab/>movq<text:tab/>%r13, %rsi</text:p>
            <text:p text:style-name="P159"><text:tab/>movl<text:tab/>$0, %eax</text:p>
            <text:p text:style-name="P159"><text:tab/>call<text:tab/>printf@PLT</text:p>
            <text:p text:style-name="P159"><text:tab/>jmp<text:tab/>.L132</text:p>
            <text:p text:style-name="P159">.L134:</text:p>
            <text:p text:style-name="P159"><text:tab/>cmpl<text:tab/>%ebp, %r12d</text:p>
            <text:p text:style-name="P159"><text:tab/>jl<text:tab/>.L135</text:p>
            <text:p text:style-name="P159"><text:tab/>leal<text:tab/>0(%r12d,%ebp,1), %r12d</text:p>
            <text:p text:style-name="P159"><text:tab/>jmp<text:tab/>.L136</text:p>
            <text:p text:style-name="P159">.L135:</text:p>
            <text:p text:style-name="P159"><text:tab/>cmpl<text:tab/>%ebx, %ebp</text:p>
            <text:p text:style-name="P159"><text:tab/>jge<text:tab/>.L132</text:p>
            <text:p text:style-name="P159"><text:tab/>leal<text:tab/>0(%ebp,%ebx,1), %ebp</text:p>
            <text:p text:style-name="P159"><text:tab/>jmp<text:tab/>.L136</text:p>
            <text:p text:style-name="P159">.L133:</text:p>
            <text:p text:style-name="P159"><text:tab/>leal<text:tab/>0(%r14d,%r13d,1), %r14d</text:p>
            <text:p text:style-name="P159">.L136:</text:p>
            <text:p text:style-name="P159"><text:tab/>leal<text:tab/>0(%r14d,%r13d,1), %edx</text:p>
            <text:p text:style-name="P159"><text:tab/>leal<text:tab/>0(%edx,%r12d,1), %esi</text:p>
            <text:p text:style-name="P159"><text:tab/>leal<text:tab/>0(%esi,%ebp,1), %edi</text:p>
            <text:p text:style-name="P159"><text:tab/>leal<text:tab/>0(%edi,%ebx,1), %eax</text:p>
            <text:p text:style-name="P159"><text:tab/>movq<text:tab/>8(%rsp), %rbx</text:p>
            <text:p text:style-name="P159"><text:tab/>movq<text:tab/>16(%rsp), %rbp</text:p>
            <text:p text:style-name="P159"><text:tab/>movq<text:tab/>24(%rsp), %r12</text:p>
            <text:p text:style-name="P159"><text:tab/>movq<text:tab/>32(%rsp), %r13</text:p>
            <text:p text:style-name="P159"><text:tab/>movq<text:tab/>40(%rsp), %r14</text:p>
            <text:p text:style-name="P159"><text:tab/>addq<text:tab/>$56, %rsp</text:p>
            <text:p text:style-name="P159"><text:tab/>ret</text:p>
            <text:p text:style-name="P159"><text:tab/>.cfi_endproc</text:p>
          </table:table-cell>
          <table:table-cell table:style-name="Таблица74.A1" office:value-type="string">
            <text:p text:style-name="P103">int jump_compression(int i, int j, int k, int l, int m)</text:p>
            <text:p text:style-name="P103">{</text:p>
            <text:p text:style-name="P103">beg_1:</text:p>
            <text:p text:style-name="P103"><text:tab/>if (i &lt; j)</text:p>
            <text:p text:style-name="P103"><text:tab/><text:tab/>if (j &lt; k)</text:p>
            <text:p text:style-name="P103"><text:tab/><text:tab/><text:tab/>if (k &lt; l)</text:p>
            <text:p text:style-name="P103"><text:tab/><text:tab/><text:tab/><text:tab/>if (l &lt; m)</text:p>
            <text:p text:style-name="P103"><text:tab/><text:tab/><text:tab/><text:tab/><text:tab/>l += m;</text:p>
            <text:p text:style-name="P103"><text:tab/><text:tab/><text:tab/><text:tab/>else</text:p>
            <text:p text:style-name="P103"><text:tab/><text:tab/><text:tab/><text:tab/><text:tab/>goto end_1;</text:p>
            <text:p text:style-name="P103"><text:tab/><text:tab/><text:tab/>else</text:p>
            <text:p text:style-name="P103"><text:tab/><text:tab/><text:tab/><text:tab/>k += l;</text:p>
            <text:p text:style-name="P103"><text:tab/><text:tab/>else {</text:p>
            <text:p text:style-name="P103"><text:tab/><text:tab/><text:tab/>j += k;</text:p>
            <text:p text:style-name="P103"><text:tab/><text:tab/><text:tab/>printf("%d", j);</text:p>
            <text:p text:style-name="P103"><text:tab/><text:tab/>end_1:</text:p>
            <text:p text:style-name="P103"><text:tab/><text:tab/><text:tab/>goto beg_1;</text:p>
            <text:p text:style-name="P103"><text:tab/><text:tab/>}</text:p>
            <text:p text:style-name="P103"><text:tab/>else</text:p>
            <text:p text:style-name="P103"><text:tab/><text:tab/>i += j;</text:p>
            <text:p text:style-name="P103"><text:tab/>return(i + j + k + l + m);</text:p>
            <text:p text:style-name="P103">}<text:tab/>movq <text:s text:c="3"/>i@GOTPCREL(%rip), %rdx</text:p>
            <text:p text:style-name="P103"><text:tab/>xorl<text:tab/>%r9d, %r9d</text:p>
            <text:p text:style-name="P103"><text:tab/>movl<text:tab/>%r9d, 0(%rdx)</text:p>
            <text:p text:style-name="P103">.L108:</text:p>
            <text:p text:style-name="P103"><text:tab/>movq <text:s text:c="3"/>i@GOTPCREL(%rip), %rdx</text:p>
            <text:p text:style-name="P103"><text:tab/>movl<text:tab/>0(%rdx), %r8d</text:p>
            <text:p text:style-name="P103"><text:tab/>cmpl<text:tab/>$100, %r8d</text:p>
            <text:p text:style-name="P103"><text:tab/>jge<text:tab/>.L109</text:p>
            <text:p text:style-name="P103"><text:tab/>movq <text:s text:c="3"/>ivector5@GOTPCREL(%rip), %rsi</text:p>
            <text:p text:style-name="P103"><text:tab/>leal<text:tab/>3(,%r8d,2), %edi</text:p>
            <text:p text:style-name="P103"><text:tab/>movslq<text:tab/>%edi, %rcx</text:p>
            <text:p text:style-name="P103"><text:tab/>movl<text:tab/>$5, %r9d</text:p>
            <text:p text:style-name="P103"><text:tab/>movl<text:tab/>%r9d, 0(%rsi,%rcx,4)</text:p>
            <text:p text:style-name="P103"><text:tab/>leal<text:tab/>1(%r8d), %esi</text:p>
            <text:p text:style-name="P103"><text:tab/>movl<text:tab/>%esi, 0(%rdx)</text:p>
            <text:p text:style-name="P103"><text:tab/>jmp<text:tab/>.L108</text:p>
            <text:p text:style-name="P103">.L109:</text:p>
          </table:table-cell>
        </table:table-row>
      </table:table>
      <text:p text:style-name="P77"><text:span text:style-name="T23"/></text:p>
      <text:p text:style-name="P207">Без оптимизации компилятор <text:span text:style-name="T51">убрал лишние цепочки переходов</text:span></text:p>
      <text:p text:style-name="P81"><text:span text:style-name="T23"/></text:p>
      <table:table table:name="Таблица75" table:style-name="Таблица75">
        <table:table-column table:style-name="Таблица75.A"/>
        <table:table-column table:style-name="Таблица75.B"/>
        <table:table-row>
          <table:table-cell table:style-name="Таблица75.A1" office:value-type="string">
            <text:p text:style-name="P163">jump_compression:</text:p>
            <text:p text:style-name="P163"><text:tab/>.cfi_startproc</text:p>
            <text:p text:style-name="P163"><text:tab/>subq<text:tab/>$56, %rsp</text:p>
            <text:p text:style-name="P163"><text:tab/>.cfi_adjust_cfa_offset<text:tab/>56</text:p>
            <text:p text:style-name="P163"><text:tab/>leaq<text:tab/>64(%rsp), %rax</text:p>
            <text:p text:style-name="P163"><text:tab/>movq<text:tab/>%rax, 0(%rsp)</text:p>
            <text:p text:style-name="P163"><text:tab/>movq<text:tab/>%rbx, 8(%rsp)</text:p>
            <text:p text:style-name="P163"><text:tab/>movq<text:tab/>%rbp, 16(%rsp)</text:p>
            <text:p text:style-name="P163"><text:tab/>movq<text:tab/>%r12, 24(%rsp)</text:p>
            <text:p text:style-name="P163"><text:tab/>movq<text:tab/>%r13, 32(%rsp)</text:p>
            <text:p text:style-name="P163"><text:tab/>movq<text:tab/>%r14, 40(%rsp)</text:p>
            <text:p text:style-name="P163"><text:tab/>movq<text:tab/>%r8, %rbx</text:p>
            <text:p text:style-name="P163"><text:tab/>movq<text:tab/>%rcx, %rbp</text:p>
            <text:p text:style-name="P163"><text:tab/>movq<text:tab/>%rdx, %r12</text:p>
            <text:p text:style-name="P163"><text:tab/>movq<text:tab/>%rsi, %r13</text:p>
            <text:p text:style-name="P163"><text:tab/>movq<text:tab/>%rdi, %r14</text:p>
            <text:p text:style-name="P163">.L132:</text:p>
            <text:p text:style-name="P163"><text:tab/>cmpl<text:tab/>%r13d, %r14d</text:p>
            <text:p text:style-name="P163"><text:tab/>jge<text:tab/>.L133</text:p>
            <text:p text:style-name="P163"><text:tab/>cmpl<text:tab/>%r12d, %r13d</text:p>
            <text:p text:style-name="P163"><text:tab/>jl<text:tab/>.L134</text:p>
            <text:p text:style-name="P163"><text:tab/>leal<text:tab/>0(%r13d,%r12d,1), %r13d</text:p>
            <text:p text:style-name="P163"><text:tab/>leaq<text:tab/>__stringlit_1(%rip), %rdi</text:p>
            <text:p text:style-name="P163"><text:tab/>movq<text:tab/>%r13, %rsi</text:p>
            <text:p text:style-name="P163"><text:tab/>movl<text:tab/>$0, %eax</text:p>
            <text:p text:style-name="P163"><text:tab/>call<text:tab/>printf@PLT</text:p>
            <text:p text:style-name="P163"><text:tab/>jmp<text:tab/>.L132</text:p>
            <text:p text:style-name="P163">.L134:</text:p>
            <text:p text:style-name="P163"><text:tab/>cmpl<text:tab/>%ebp, %r12d</text:p>
            <text:p text:style-name="P163"><text:tab/>jl<text:tab/>.L135</text:p>
            <text:p text:style-name="P163"><text:tab/>leal<text:tab/>0(%r12d,%ebp,1), %r12d</text:p>
            <text:p text:style-name="P163"><text:tab/>jmp<text:tab/>.L136</text:p>
            <text:p text:style-name="P163">.L135:</text:p>
            <text:p text:style-name="P163"><text:tab/>cmpl<text:tab/>%ebx, %ebp</text:p>
            <text:p text:style-name="P163"><text:tab/>jge<text:tab/>.L132</text:p>
            <text:p text:style-name="P163"><text:tab/>leal<text:tab/>0(%ebp,%ebx,1), %ebp</text:p>
            <text:p text:style-name="P163"><text:tab/>jmp<text:tab/>.L136</text:p>
            <text:p text:style-name="P163">.L133:</text:p>
            <text:p text:style-name="P163"><text:tab/>leal<text:tab/>0(%r14d,%r13d,1), %r14d</text:p>
            <text:p text:style-name="P163">.L136:</text:p>
            <text:p text:style-name="P163"><text:tab/>leal<text:tab/>0(%r14d,%r13d,1), %edx</text:p>
            <text:p text:style-name="P163"><text:tab/>leal<text:tab/>0(%edx,%r12d,1), %esi</text:p>
            <text:p text:style-name="P163"><text:tab/>leal<text:tab/>0(%esi,%ebp,1), %edi</text:p>
            <text:p text:style-name="P163"><text:tab/>leal<text:tab/>0(%edi,%ebx,1), %eax</text:p>
            <text:p text:style-name="P163"><text:tab/>movq<text:tab/>8(%rsp), %rbx</text:p>
            <text:p text:style-name="P163"><text:tab/>movq<text:tab/>16(%rsp), %rbp</text:p>
            <text:p text:style-name="P163"><text:tab/>movq<text:tab/>24(%rsp), %r12</text:p>
            <text:p text:style-name="P163"><text:tab/>movq<text:tab/>32(%rsp), %r13</text:p>
            <text:p text:style-name="P163"><text:tab/>movq<text:tab/>40(%rsp), %r14</text:p>
            <text:p text:style-name="P163"><text:tab/>addq<text:tab/>$56, %rsp</text:p>
            <text:p text:style-name="P163"><text:tab/>ret</text:p>
            <text:p text:style-name="P163"><text:tab/>.cfi_endproc</text:p>
          </table:table-cell>
          <table:table-cell table:style-name="Таблица75.A1" office:value-type="string">
            <text:p text:style-name="P150">jump_compression:</text:p>
            <text:p text:style-name="P150"><text:tab/>.cfi_startproc</text:p>
            <text:p text:style-name="P150"><text:tab/>subq<text:tab/>$56, %rsp</text:p>
            <text:p text:style-name="P150"><text:tab/>.cfi_adjust_cfa_offset<text:tab/>56</text:p>
            <text:p text:style-name="P150"><text:tab/>leaq<text:tab/>64(%rsp), %rax</text:p>
            <text:p text:style-name="P150"><text:tab/>movq<text:tab/>%rax, 0(%rsp)</text:p>
            <text:p text:style-name="P150"><text:tab/>movq<text:tab/>%rbx, 8(%rsp)</text:p>
            <text:p text:style-name="P150"><text:tab/>movq<text:tab/>%rbp, 16(%rsp)</text:p>
            <text:p text:style-name="P150"><text:tab/>movq<text:tab/>%r12, 24(%rsp)</text:p>
            <text:p text:style-name="P150"><text:tab/>movq<text:tab/>%r13, 32(%rsp)</text:p>
            <text:p text:style-name="P150"><text:tab/>movq<text:tab/>%r14, 40(%rsp)</text:p>
            <text:p text:style-name="P150"><text:tab/>movq<text:tab/>%r8, %rbx</text:p>
            <text:p text:style-name="P150"><text:tab/>movq<text:tab/>%rcx, %rbp</text:p>
            <text:p text:style-name="P150"><text:tab/>movq<text:tab/>%rdx, %r12</text:p>
            <text:p text:style-name="P150"><text:tab/>movq<text:tab/>%rsi, %r13</text:p>
            <text:p text:style-name="P150"><text:tab/>movq<text:tab/>%rdi, %r14</text:p>
            <text:p text:style-name="P150">.L124:</text:p>
            <text:p text:style-name="P150"><text:tab/>cmpl<text:tab/>%r13d, %r14d</text:p>
            <text:p text:style-name="P150"><text:tab/>jge<text:tab/>.L125</text:p>
            <text:p text:style-name="P150"><text:tab/>cmpl<text:tab/>%r12d, %r13d</text:p>
            <text:p text:style-name="P150"><text:tab/>jl<text:tab/>.L126</text:p>
            <text:p text:style-name="P150"><text:tab/>leal<text:tab/>0(%r13d,%r12d,1), %r13d</text:p>
            <text:p text:style-name="P150"><text:tab/>leaq<text:tab/>__stringlit_1(%rip), %rdi</text:p>
            <text:p text:style-name="P150"><text:tab/>movq<text:tab/>%r13, %rsi</text:p>
            <text:p text:style-name="P150"><text:tab/>movl<text:tab/>$0, %eax</text:p>
            <text:p text:style-name="P150"><text:tab/>call<text:tab/>printf@PLT</text:p>
            <text:p text:style-name="P150"><text:tab/>jmp<text:tab/>.L124</text:p>
            <text:p text:style-name="P150">.L126:</text:p>
            <text:p text:style-name="P150"><text:tab/>cmpl<text:tab/>%ebp, %r12d</text:p>
            <text:p text:style-name="P150"><text:tab/>jl<text:tab/>.L127</text:p>
            <text:p text:style-name="P150"><text:tab/>leal<text:tab/>0(%r12d,%ebp,1), %r12d</text:p>
            <text:p text:style-name="P150"><text:tab/>jmp<text:tab/>.L128</text:p>
            <text:p text:style-name="P150">.L127:</text:p>
            <text:p text:style-name="P150"><text:tab/>cmpl<text:tab/>%ebx, %ebp</text:p>
            <text:p text:style-name="P150"><text:tab/>jge<text:tab/>.L124</text:p>
            <text:p text:style-name="P150"><text:tab/>leal<text:tab/>0(%ebp,%ebx,1), %ebp</text:p>
            <text:p text:style-name="P150"><text:tab/>jmp<text:tab/>.L128</text:p>
            <text:p text:style-name="P150">.L125:</text:p>
            <text:p text:style-name="P150"><text:tab/>leal<text:tab/>0(%r14d,%r13d,1), %r14d</text:p>
            <text:p text:style-name="P150">.L128:</text:p>
            <text:p text:style-name="P150"><text:tab/>leal<text:tab/>0(%r14d,%r13d,1), %edx</text:p>
            <text:p text:style-name="P150"><text:tab/>leal<text:tab/>0(%edx,%r12d,1), %esi</text:p>
            <text:p text:style-name="P150"><text:tab/>leal<text:tab/>0(%esi,%ebp,1), %edi</text:p>
            <text:p text:style-name="P150"><text:tab/>leal<text:tab/>0(%edi,%ebx,1), %eax</text:p>
            <text:p text:style-name="P150"><text:tab/>movq<text:tab/>8(%rsp), %rbx</text:p>
            <text:p text:style-name="P150"><text:tab/>movq<text:tab/>16(%rsp), %rbp</text:p>
            <text:p text:style-name="P150"><text:tab/>movq<text:tab/>24(%rsp), %r12</text:p>
            <text:p text:style-name="P150"><text:tab/>movq<text:tab/>32(%rsp), %r13</text:p>
            <text:p text:style-name="P150"><text:tab/>movq<text:tab/>40(%rsp), %r14</text:p>
            <text:p text:style-name="P150"><text:tab/>addq<text:tab/>$56, %rsp</text:p>
            <text:p text:style-name="P150"><text:tab/>ret</text:p>
            <text:p text:style-name="P150"><text:tab/>.cfi_endproc</text:p>
          </table:table-cell>
        </table:table-row>
      </table:table>
      <text:p text:style-name="P80"><text:span text:style-name="T23"/></text:p>
      <text:p text:style-name="P210">Код без оптимизации и с оптимизацией почти не отличаются. Ccomp убрал лишние цепочки переходов даже без флага оптимизации</text:p>
      <text:p text:style-name="P46"/>
      <table:table table:name="Таблица29" table:style-name="Таблица29">
        <table:table-column table:style-name="Таблица29.A"/>
        <table:table-column table:style-name="Таблица29.B"/>
        <table:table-column table:style-name="Таблица29.C"/>
        <table:table-column table:style-name="Таблица29.D"/>
        <table:table-row>
          <table:table-cell table:style-name="Таблица29.A1" office:value-type="string">
            <text:p text:style-name="P13"/>
          </table:table-cell>
          <table:table-cell table:style-name="Таблица29.A1" office:value-type="string">
            <text:p text:style-name="P12">clang</text:p>
          </table:table-cell>
          <table:table-cell table:style-name="Таблица29.A1" office:value-type="string">
            <text:p text:style-name="P12">gcc</text:p>
          </table:table-cell>
          <table:table-cell table:style-name="Таблица29.A1" office:value-type="string">
            <text:p text:style-name="P12">ccomp</text:p>
          </table:table-cell>
        </table:table-row>
        <table:table-row>
          <table:table-cell table:style-name="Таблица29.A1" office:value-type="string">
            <text:p text:style-name="P43">Размножение <text:span text:style-name="T7">копий</text:span></text:p>
          </table:table-cell>
          <table:table-cell table:style-name="Таблица29.A1" office:value-type="string">
            <text:p text:style-name="P12">+</text:p>
          </table:table-cell>
          <table:table-cell table:style-name="Таблица29.A1" office:value-type="string">
            <text:p text:style-name="P13">-</text:p>
          </table:table-cell>
          <table:table-cell table:style-name="Таблица29.A1" office:value-type="string">
            <text:p text:style-name="P12">+</text:p>
          </table:table-cell>
        </table:table-row>
        <table:table-row>
          <table:table-cell table:style-name="Таблица29.A1" office:value-type="string">
            <text:p text:style-name="P43">Свертка констант </text:p>
          </table:table-cell>
          <table:table-cell table:style-name="Таблица29.A1" office:value-type="string">
            <text:p text:style-name="P12">+</text:p>
          </table:table-cell>
          <table:table-cell table:style-name="Таблица29.A1" office:value-type="string">
            <text:p text:style-name="P12">+</text:p>
          </table:table-cell>
          <table:table-cell table:style-name="Таблица29.A1" office:value-type="string">
            <text:p text:style-name="P12">+</text:p>
          </table:table-cell>
        </table:table-row>
        <table:table-row>
          <table:table-cell table:style-name="Таблица29.A1" office:value-type="string">
            <text:p text:style-name="P43">Алгебраические упрощения</text:p>
          </table:table-cell>
          <table:table-cell table:style-name="Таблица29.A1" office:value-type="string">
            <text:p text:style-name="P12">+</text:p>
          </table:table-cell>
          <table:table-cell table:style-name="Таблица29.A1" office:value-type="string">
            <text:p text:style-name="P12">+</text:p>
          </table:table-cell>
          <table:table-cell table:style-name="Таблица29.A1" office:value-type="string">
            <text:p text:style-name="P12">+</text:p>
          </table:table-cell>
        </table:table-row>
        <table:table-row>
          <table:table-cell table:style-name="Таблица29.A1" office:value-type="string">
            <text:p text:style-name="P43">Удаление излишних загрузок/сохранений</text:p>
          </table:table-cell>
          <table:table-cell table:style-name="Таблица29.A1" office:value-type="string">
            <text:p text:style-name="P12">+</text:p>
          </table:table-cell>
          <table:table-cell table:style-name="Таблица29.A1" office:value-type="string">
            <text:p text:style-name="P12">+</text:p>
          </table:table-cell>
          <table:table-cell table:style-name="Таблица29.A1" office:value-type="string">
            <text:p text:style-name="P12">+</text:p>
          </table:table-cell>
        </table:table-row>
        <table:table-row>
          <table:table-cell table:style-name="Таблица29.A1" office:value-type="string">
            <text:p text:style-name="P43">Удаление излишних присваиваний</text:p>
          </table:table-cell>
          <table:table-cell table:style-name="Таблица29.A1" office:value-type="string">
            <text:p text:style-name="P12">+</text:p>
          </table:table-cell>
          <table:table-cell table:style-name="Таблица29.A1" office:value-type="string">
            <text:p text:style-name="P12">+</text:p>
          </table:table-cell>
          <table:table-cell table:style-name="Таблица29.A1" office:value-type="string">
            <text:p text:style-name="P12">+</text:p>
          </table:table-cell>
        </table:table-row>
        <table:table-row>
          <table:table-cell table:style-name="Таблица29.A1" office:value-type="string">
            <text:p text:style-name="P43">Снижение мощности</text:p>
          </table:table-cell>
          <table:table-cell table:style-name="Таблица29.A1" office:value-type="string">
            <text:p text:style-name="P12">+</text:p>
          </table:table-cell>
          <table:table-cell table:style-name="Таблица29.A1" office:value-type="string">
            <text:p text:style-name="P12">+</text:p>
          </table:table-cell>
          <table:table-cell table:style-name="Таблица29.A1" office:value-type="string">
            <text:p text:style-name="P12">-</text:p>
          </table:table-cell>
        </table:table-row>
        <table:table-row>
          <table:table-cell table:style-name="Таблица29.A1" office:value-type="string">
            <text:p text:style-name="P43">Удаление циклов</text:p>
          </table:table-cell>
          <table:table-cell table:style-name="Таблица29.A1" office:value-type="string">
            <text:p text:style-name="P12">+</text:p>
          </table:table-cell>
          <table:table-cell table:style-name="Таблица29.A1" office:value-type="string">
            <text:p text:style-name="P12">+</text:p>
          </table:table-cell>
          <table:table-cell table:style-name="Таблица29.A1" office:value-type="string">
            <text:p text:style-name="P12">-</text:p>
          </table:table-cell>
        </table:table-row>
        <table:table-row>
          <table:table-cell table:style-name="Таблица29.A1" office:value-type="string">
            <text:p text:style-name="P43">Удаление переменных индукции циклов</text:p>
          </table:table-cell>
          <table:table-cell table:style-name="Таблица29.A1" office:value-type="string">
            <text:p text:style-name="P12">+</text:p>
          </table:table-cell>
          <table:table-cell table:style-name="Таблица29.A1" office:value-type="string">
            <text:p text:style-name="P12">+</text:p>
          </table:table-cell>
          <table:table-cell table:style-name="Таблица29.A1" office:value-type="string">
            <text:p text:style-name="P12">-</text:p>
          </table:table-cell>
        </table:table-row>
        <table:table-row>
          <table:table-cell table:style-name="Таблица29.A1" office:value-type="string">
            <text:p text:style-name="P43"><text:span text:style-name="T5">Удаление</text:span> общих подвыражений</text:p>
          </table:table-cell>
          <table:table-cell table:style-name="Таблица29.A1" office:value-type="string">
            <text:p text:style-name="P12">+</text:p>
          </table:table-cell>
          <table:table-cell table:style-name="Таблица29.A1" office:value-type="string">
            <text:p text:style-name="P12">+</text:p>
          </table:table-cell>
          <table:table-cell table:style-name="Таблица29.A1" office:value-type="string">
            <text:p text:style-name="P12">-</text:p>
          </table:table-cell>
        </table:table-row>
        <table:table-row>
          <table:table-cell table:style-name="Таблица29.A1" office:value-type="string">
            <text:p text:style-name="P43">Вынесение инвариантного кода</text:p>
          </table:table-cell>
          <table:table-cell table:style-name="Таблица29.A1" office:value-type="string">
            <text:p text:style-name="P12">-</text:p>
          </table:table-cell>
          <table:table-cell table:style-name="Таблица29.A1" office:value-type="string">
            <text:p text:style-name="P13">-</text:p>
          </table:table-cell>
          <table:table-cell table:style-name="Таблица29.A1" office:value-type="string">
            <text:p text:style-name="P12">-</text:p>
          </table:table-cell>
        </table:table-row>
        <table:table-row>
          <table:table-cell table:style-name="Таблица29.A1" office:value-type="string">
            <text:p text:style-name="P43">Удаление недостижимого кода</text:p>
          </table:table-cell>
          <table:table-cell table:style-name="Таблица29.A1" office:value-type="string">
            <text:p text:style-name="P12">+</text:p>
          </table:table-cell>
          <table:table-cell table:style-name="Таблица29.A1" office:value-type="string">
            <text:p text:style-name="P12">+</text:p>
          </table:table-cell>
          <table:table-cell table:style-name="Таблица29.A1" office:value-type="string">
            <text:p text:style-name="P12">+-</text:p>
          </table:table-cell>
        </table:table-row>
        <table:table-row>
          <table:table-cell table:style-name="Таблица29.A1" office:value-type="string">
            <text:p text:style-name="P43">Удаление циклов</text:p>
          </table:table-cell>
          <table:table-cell table:style-name="Таблица29.A1" office:value-type="string">
            <text:p text:style-name="P12">+</text:p>
          </table:table-cell>
          <table:table-cell table:style-name="Таблица29.A1" office:value-type="string">
            <text:p text:style-name="P12">+</text:p>
          </table:table-cell>
          <table:table-cell table:style-name="Таблица29.A1" office:value-type="string">
            <text:p text:style-name="P13">-</text:p>
          </table:table-cell>
        </table:table-row>
        <table:table-row>
          <table:table-cell table:style-name="Таблица29.A1" office:value-type="string">
            <text:p text:style-name="P43">Разворачивание циклов</text:p>
          </table:table-cell>
          <table:table-cell table:style-name="Таблица29.A1" office:value-type="string">
            <text:p text:style-name="P12">-</text:p>
          </table:table-cell>
          <table:table-cell table:style-name="Таблица29.A1" office:value-type="string">
            <text:p text:style-name="P13">-</text:p>
          </table:table-cell>
          <table:table-cell table:style-name="Таблица29.A1" office:value-type="string">
            <text:p text:style-name="P13">-</text:p>
          </table:table-cell>
        </table:table-row>
        <table:table-row>
          <table:table-cell table:style-name="Таблица29.A1" office:value-type="string">
            <text:p text:style-name="P43">Слияние циклов</text:p>
          </table:table-cell>
          <table:table-cell table:style-name="Таблица29.A1" office:value-type="string">
            <text:p text:style-name="P12">-</text:p>
          </table:table-cell>
          <table:table-cell table:style-name="Таблица29.A1" office:value-type="string">
            <text:p text:style-name="P13">-</text:p>
          </table:table-cell>
          <table:table-cell table:style-name="Таблица29.A1" office:value-type="string">
            <text:p text:style-name="P13">-</text:p>
          </table:table-cell>
        </table:table-row>
        <table:table-row>
          <table:table-cell table:style-name="Таблица29.A1" office:value-type="string">
            <text:p text:style-name="P45">Удаление лишних цепочек перехода</text:p>
          </table:table-cell>
          <table:table-cell table:style-name="Таблица29.A1" office:value-type="string">
            <text:p text:style-name="P14">+</text:p>
          </table:table-cell>
          <table:table-cell table:style-name="Таблица29.A1" office:value-type="string">
            <text:p text:style-name="P14">+</text:p>
          </table:table-cell>
          <table:table-cell table:style-name="Таблица29.A1" office:value-type="string">
            <text:p text:style-name="P14">+</text:p>
          </table:table-cell>
        </table:table-row>
      </table:table>
      <text:p text:style-name="P47"/>
      <text:p text:style-name="P47"/>
      <text:p text:style-name="P41"><text:span text:style-name="T14">GCC и Clang поддерживают подавляющее большинство рассмотренных оптимизаци</text:span><text:span text:style-name="T15">й, CompCert заметно отстаёт от них, его применение оправдано в безопасных системах, где критична математическая корректность компиляции, а производительность вторична</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14T10:06:54.983417027</meta:creation-date>
    <dc:date>2026-06-15T19:01:24.121994439</dc:date>
    <meta:editing-duration>PT1H50M1S</meta:editing-duration>
    <meta:editing-cycles>13</meta:editing-cycles>
    <meta:generator>LibreOffice/24.2.7.2$Linux_X86_64 LibreOffice_project/420$Build-2</meta:generator>
    <meta:document-statistic meta:table-count="77" meta:image-count="0" meta:object-count="0" meta:page-count="73" meta:paragraph-count="4248" meta:word-count="11950" meta:character-count="80465" meta:non-whitespace-character-count="67458"/>
  </office:meta>
</office:document-meta>
</file>