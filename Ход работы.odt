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enlo" svg:font-family="Menlo, Monaco, Consolas, 'Cascadia Mono', 'Ubuntu Mono', 'DejaVu Sans Mono', 'Liberation Mono', 'JetBrains Mono', 'Fira Code', Cousine, 'Roboto Mono', 'Courier New', Courier, sans-serif, system-ui"/>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quote-cjk-patch" svg:font-family="quote-cjk-patch, Inter, system-ui, apple-system, BlinkMacSystemFont, 'Segoe UI', Roboto, Oxygen, Ubuntu, Cantarell, 'Open Sans', 'Helvetica Neue', sans-serif"/>
  </office:font-face-decls>
  <office:automatic-styles>
    <style:style style:name="Таблица1" style:family="table">
      <style:table-properties style:width="17cm" table:align="margins"/>
    </style:style>
    <style:style style:name="Таблица1.A" style:family="table-column">
      <style:table-column-properties style:column-width="4.494cm" style:rel-column-width="17326*"/>
    </style:style>
    <style:style style:name="Таблица1.B" style:family="table-column">
      <style:table-column-properties style:column-width="3.997cm" style:rel-column-width="15410*"/>
    </style:style>
    <style:style style:name="Таблица1.C" style:family="table-column">
      <style:table-column-properties style:column-width="4.247cm" style:rel-column-width="16375*"/>
    </style:style>
    <style:style style:name="Таблица1.D" style:family="table-column">
      <style:table-column-properties style:column-width="4.26cm" style:rel-column-width="16424*"/>
    </style:style>
    <style:style style:name="Таблица1.1" style:family="table-row">
      <style:table-row-properties style:min-row-height="0.609cm"/>
    </style:style>
    <style:style style:name="Таблица1.A1" style:family="table-cell">
      <style:table-cell-properties style:vertical-align="middle" fo:padding="0cm" fo:border="none" style:writing-mode="page"/>
    </style:style>
    <style:style style:name="Таблица1.2" style:family="table-row">
      <style:table-row-properties style:min-row-height="0.688cm"/>
    </style:style>
    <style:style style:name="Размер" style:family="table">
      <style:table-properties style:width="17cm" table:align="margins"/>
    </style:style>
    <style:style style:name="Размер.A" style:family="table-column">
      <style:table-column-properties style:column-width="4.494cm" style:rel-column-width="17326*"/>
    </style:style>
    <style:style style:name="Размер.B" style:family="table-column">
      <style:table-column-properties style:column-width="3.997cm" style:rel-column-width="15410*"/>
    </style:style>
    <style:style style:name="Размер.C" style:family="table-column">
      <style:table-column-properties style:column-width="4.247cm" style:rel-column-width="16375*"/>
    </style:style>
    <style:style style:name="Размер.D" style:family="table-column">
      <style:table-column-properties style:column-width="4.26cm" style:rel-column-width="16424*"/>
    </style:style>
    <style:style style:name="Размер.1" style:family="table-row">
      <style:table-row-properties style:min-row-height="0.794cm"/>
    </style:style>
    <style:style style:name="Размер.A1" style:family="table-cell">
      <style:table-cell-properties style:vertical-align="middle" fo:padding="0cm" fo:border="none" style:writing-mode="page"/>
    </style:style>
    <style:style style:name="Размер.2" style:family="table-row">
      <style:table-row-properties style:min-row-height="0.609cm"/>
    </style:style>
    <style:style style:name="Таблица3" style:family="table">
      <style:table-properties style:width="17cm" table:align="margins"/>
    </style:style>
    <style:style style:name="Таблица3.A" style:family="table-column">
      <style:table-column-properties style:column-width="4.494cm" style:rel-column-width="17326*"/>
    </style:style>
    <style:style style:name="Таблица3.B" style:family="table-column">
      <style:table-column-properties style:column-width="3.997cm" style:rel-column-width="15410*"/>
    </style:style>
    <style:style style:name="Таблица3.C" style:family="table-column">
      <style:table-column-properties style:column-width="4.247cm" style:rel-column-width="16375*"/>
    </style:style>
    <style:style style:name="Таблица3.D" style:family="table-column">
      <style:table-column-properties style:column-width="4.26cm" style:rel-column-width="16424*"/>
    </style:style>
    <style:style style:name="Таблица3.1" style:family="table-row">
      <style:table-row-properties style:min-row-height="0.688cm"/>
    </style:style>
    <style:style style:name="Таблица3.A1" style:family="table-cell">
      <style:table-cell-properties style:vertical-align="middle" fo:padding="0cm" fo:border="none" style:writing-mode="page"/>
    </style:style>
    <style:style style:name="Таблица3.2" style:family="table-row">
      <style:table-row-properties style:min-row-height="0.609cm"/>
    </style:style>
    <style:style style:name="Таблица3.3" style:family="table-row">
      <style:table-row-properties style:min-row-height="0.714cm"/>
    </style:style>
    <style:style style:name="Таблица4" style:family="table">
      <style:table-properties style:width="17cm" table:align="margins"/>
    </style:style>
    <style:style style:name="Таблица4.A" style:family="table-column">
      <style:table-column-properties style:column-width="8.5cm" style:rel-column-width="32767*"/>
    </style:style>
    <style:style style:name="Таблица4.B" style:family="table-column">
      <style:table-column-properties style:column-width="8.5cm" style:rel-column-width="32768*"/>
    </style:style>
    <style:style style:name="Таблица4.1" style:family="table-row">
      <style:table-row-properties style:min-row-height="10.213cm"/>
    </style:style>
    <style:style style:name="Таблица4.A1" style:family="table-cell">
      <style:table-cell-properties style:writing-mode="page"/>
    </style:style>
    <style:style style:name="Таблица5" style:family="table">
      <style:table-properties style:width="17cm" fo:break-before="page" table:align="margins"/>
    </style:style>
    <style:style style:name="Таблица5.A" style:family="table-column">
      <style:table-column-properties style:column-width="8.5cm" style:rel-column-width="32767*"/>
    </style:style>
    <style:style style:name="Таблица5.B" style:family="table-column">
      <style:table-column-properties style:column-width="8.5cm" style:rel-column-width="32768*"/>
    </style:style>
    <style:style style:name="Таблица5.1" style:family="table-row">
      <style:table-row-properties style:min-row-height="10.213cm"/>
    </style:style>
    <style:style style:name="Таблица5.A1" style:family="table-cell">
      <style:table-cell-properties style:writing-mode="page"/>
    </style:style>
    <style:style style:name="Таблица6" style:family="table">
      <style:table-properties style:width="15.699cm" fo:break-before="page" table:align="left"/>
    </style:style>
    <style:style style:name="Таблица6.A" style:family="table-column">
      <style:table-column-properties style:column-width="8.5cm"/>
    </style:style>
    <style:style style:name="Таблица6.B" style:family="table-column">
      <style:table-column-properties style:column-width="7.198cm"/>
    </style:style>
    <style:style style:name="Таблица6.1" style:family="table-row">
      <style:table-row-properties style:min-row-height="9.79cm"/>
    </style:style>
    <style:style style:name="Таблица6.A1" style:family="table-cell">
      <style:table-cell-properties style:writing-mode="page"/>
    </style:style>
    <style:style style:name="Таблица7" style:family="table">
      <style:table-properties style:width="17.903cm" fo:margin-left="0cm" fo:break-before="page" table:align="left"/>
    </style:style>
    <style:style style:name="Таблица7.A" style:family="table-column">
      <style:table-column-properties style:column-width="8.5cm"/>
    </style:style>
    <style:style style:name="Таблица7.B" style:family="table-column">
      <style:table-column-properties style:column-width="9.403cm"/>
    </style:style>
    <style:style style:name="Таблица7.1" style:family="table-row">
      <style:table-row-properties style:min-row-height="9.79cm"/>
    </style:style>
    <style:style style:name="Таблица7.A1" style:family="table-cell">
      <style:table-cell-properties style:writing-mode="page"/>
    </style:style>
    <style:style style:name="Таблица9" style:family="table">
      <style:table-properties style:width="17cm" table:align="margins"/>
    </style:style>
    <style:style style:name="Таблица9.A" style:family="table-column">
      <style:table-column-properties style:column-width="8.5cm" style:rel-column-width="32767*"/>
    </style:style>
    <style:style style:name="Таблица9.B" style:family="table-column">
      <style:table-column-properties style:column-width="8.5cm" style:rel-column-width="32768*"/>
    </style:style>
    <style:style style:name="Таблица9.A1" style:family="table-cell">
      <style:table-cell-properties style:writing-mode="page"/>
    </style:style>
    <style:style style:name="Таблица8" style:family="table">
      <style:table-properties style:width="17.903cm" fo:margin-left="0cm" fo:break-before="page" table:align="left"/>
    </style:style>
    <style:style style:name="Таблица8.A" style:family="table-column">
      <style:table-column-properties style:column-width="8.5cm"/>
    </style:style>
    <style:style style:name="Таблица8.B" style:family="table-column">
      <style:table-column-properties style:column-width="9.403cm"/>
    </style:style>
    <style:style style:name="Таблица8.1" style:family="table-row">
      <style:table-row-properties style:min-row-height="9.79cm"/>
    </style:style>
    <style:style style:name="Таблица8.A1" style:family="table-cell">
      <style:table-cell-properties style:writing-mode="page"/>
    </style:style>
    <style:style style:name="Таблица11" style:family="table">
      <style:table-properties style:width="17.697cm" fo:margin-left="0cm" table:align="left"/>
    </style:style>
    <style:style style:name="Таблица11.A" style:family="table-column">
      <style:table-column-properties style:column-width="8.5cm"/>
    </style:style>
    <style:style style:name="Таблица11.B" style:family="table-column">
      <style:table-column-properties style:column-width="9.197cm"/>
    </style:style>
    <style:style style:name="Таблица11.A1" style:family="table-cell">
      <style:table-cell-properties style:writing-mode="page"/>
    </style:style>
    <style:style style:name="Таблица10" style:family="table">
      <style:table-properties style:width="17cm" fo:break-before="page" table:align="margins"/>
    </style:style>
    <style:style style:name="Таблица10.A" style:family="table-column">
      <style:table-column-properties style:column-width="8.5cm" style:rel-column-width="32767*"/>
    </style:style>
    <style:style style:name="Таблица10.B" style:family="table-column">
      <style:table-column-properties style:column-width="8.5cm" style:rel-column-width="32768*"/>
    </style:style>
    <style:style style:name="Таблица10.1" style:family="table-row">
      <style:table-row-properties style:min-row-height="6.997cm"/>
    </style:style>
    <style:style style:name="Таблица10.A1" style:family="table-cell">
      <style:table-cell-properties style:writing-mode="page"/>
    </style:style>
    <style:style style:name="Таблица12" style:family="table">
      <style:table-properties style:width="17cm" table:align="margins"/>
    </style:style>
    <style:style style:name="Таблица12.A" style:family="table-column">
      <style:table-column-properties style:column-width="8.5cm" style:rel-column-width="32767*"/>
    </style:style>
    <style:style style:name="Таблица12.B" style:family="table-column">
      <style:table-column-properties style:column-width="8.5cm" style:rel-column-width="32768*"/>
    </style:style>
    <style:style style:name="Таблица12.1" style:family="table-row">
      <style:table-row-properties style:min-row-height="0.411cm"/>
    </style:style>
    <style:style style:name="Таблица12.A1" style:family="table-cell">
      <style:table-cell-properties style:writing-mode="page"/>
    </style:style>
    <style:style style:name="Таблица14" style:family="table">
      <style:table-properties style:width="17cm" fo:break-before="page" table:align="margins"/>
    </style:style>
    <style:style style:name="Таблица14.A" style:family="table-column">
      <style:table-column-properties style:column-width="8.5cm" style:rel-column-width="32767*"/>
    </style:style>
    <style:style style:name="Таблица14.B" style:family="table-column">
      <style:table-column-properties style:column-width="8.5cm" style:rel-column-width="32768*"/>
    </style:style>
    <style:style style:name="Таблица14.A1" style:family="table-cell">
      <style:table-cell-properties style:writing-mode="page"/>
    </style:style>
    <style:style style:name="Таблица15" style:family="table">
      <style:table-properties style:width="17cm" fo:break-before="page" table:align="margins"/>
    </style:style>
    <style:style style:name="Таблица15.A" style:family="table-column">
      <style:table-column-properties style:column-width="8.5cm" style:rel-column-width="32767*"/>
    </style:style>
    <style:style style:name="Таблица15.B" style:family="table-column">
      <style:table-column-properties style:column-width="8.5cm" style:rel-column-width="32768*"/>
    </style:style>
    <style:style style:name="Таблица15.1" style:family="table-row">
      <style:table-row-properties style:min-row-height="13.788cm"/>
    </style:style>
    <style:style style:name="Таблица15.A1" style:family="table-cell">
      <style:table-cell-properties style:writing-mode="page"/>
    </style:style>
    <style:style style:name="Таблица13" style:family="table">
      <style:table-properties style:width="17cm" fo:break-before="page" table:align="margins"/>
    </style:style>
    <style:style style:name="Таблица13.A" style:family="table-column">
      <style:table-column-properties style:column-width="8.5cm" style:rel-column-width="32767*"/>
    </style:style>
    <style:style style:name="Таблица13.A1" style:family="table-cell">
      <style:table-cell-properties style:writing-mode="page"/>
    </style:style>
    <style:style style:name="Таблица16" style:family="table">
      <style:table-properties style:width="17cm" table:align="margins"/>
    </style:style>
    <style:style style:name="Таблица16.A" style:family="table-column">
      <style:table-column-properties style:column-width="8.5cm" style:rel-column-width="32767*"/>
    </style:style>
    <style:style style:name="Таблица16.1" style:family="table-row">
      <style:table-row-properties style:min-row-height="0.411cm"/>
    </style:style>
    <style:style style:name="Таблица16.A1" style:family="table-cell">
      <style:table-cell-properties style:writing-mode="page"/>
    </style:style>
    <style:style style:name="Таблица17" style:family="table">
      <style:table-properties style:width="17cm" fo:break-before="page" table:align="margins"/>
    </style:style>
    <style:style style:name="Таблица17.A" style:family="table-column">
      <style:table-column-properties style:column-width="8.5cm" style:rel-column-width="32767*"/>
    </style:style>
    <style:style style:name="Таблица17.A1" style:family="table-cell">
      <style:table-cell-properties style:writing-mode="page"/>
    </style:style>
    <style:style style:name="Таблица18" style:family="table">
      <style:table-properties style:width="17cm" fo:break-before="page" table:align="margins"/>
    </style:style>
    <style:style style:name="Таблица18.A" style:family="table-column">
      <style:table-column-properties style:column-width="8.5cm" style:rel-column-width="32767*"/>
    </style:style>
    <style:style style:name="Таблица18.1" style:family="table-row">
      <style:table-row-properties style:min-row-height="0.411cm"/>
    </style:style>
    <style:style style:name="Таблица18.A1" style:family="table-cell">
      <style:table-cell-properties style:writing-mode="page"/>
    </style:style>
    <style:style style:name="Таблица19" style:family="table">
      <style:table-properties style:width="17cm" table:align="margins"/>
    </style:style>
    <style:style style:name="Таблица19.A" style:family="table-column">
      <style:table-column-properties style:column-width="8.5cm" style:rel-column-width="32767*"/>
    </style:style>
    <style:style style:name="Таблица19.A1" style:family="table-cell">
      <style:table-cell-properties style:writing-mode="page"/>
    </style:style>
    <style:style style:name="Таблица20" style:family="table">
      <style:table-properties style:width="17cm" fo:break-before="page" table:align="margins"/>
    </style:style>
    <style:style style:name="Таблица20.A" style:family="table-column">
      <style:table-column-properties style:column-width="8.5cm" style:rel-column-width="32767*"/>
    </style:style>
    <style:style style:name="Таблица20.A1" style:family="table-cell">
      <style:table-cell-properties style:writing-mode="page"/>
    </style:style>
    <style:style style:name="Таблица21" style:family="table">
      <style:table-properties style:width="17cm" table:align="margins"/>
    </style:style>
    <style:style style:name="Таблица21.A" style:family="table-column">
      <style:table-column-properties style:column-width="8.5cm" style:rel-column-width="32767*"/>
    </style:style>
    <style:style style:name="Таблица21.1" style:family="table-row">
      <style:table-row-properties style:min-row-height="0.411cm"/>
    </style:style>
    <style:style style:name="Таблица21.A1" style:family="table-cell">
      <style:table-cell-properties style:writing-mode="page"/>
    </style:style>
    <style:style style:name="Таблица22" style:family="table">
      <style:table-properties style:width="17cm" fo:break-before="page" table:align="margins"/>
    </style:style>
    <style:style style:name="Таблица22.A" style:family="table-column">
      <style:table-column-properties style:column-width="8.5cm" style:rel-column-width="32767*"/>
    </style:style>
    <style:style style:name="Таблица22.A1" style:family="table-cell">
      <style:table-cell-properties style:writing-mode="page"/>
    </style:style>
    <style:style style:name="Таблица23" style:family="table">
      <style:table-properties style:width="17cm" fo:break-before="page" table:align="margins"/>
    </style:style>
    <style:style style:name="Таблица23.A" style:family="table-column">
      <style:table-column-properties style:column-width="8.5cm" style:rel-column-width="32767*"/>
    </style:style>
    <style:style style:name="Таблица23.1" style:family="table-row">
      <style:table-row-properties style:min-row-height="0.411cm"/>
    </style:style>
    <style:style style:name="Таблица23.A1" style:family="table-cell">
      <style:table-cell-properties style:writing-mode="page"/>
    </style:style>
    <style:style style:name="Таблица24" style:family="table">
      <style:table-properties style:width="17cm" fo:break-before="page" table:align="margins"/>
    </style:style>
    <style:style style:name="Таблица24.A" style:family="table-column">
      <style:table-column-properties style:column-width="8.5cm" style:rel-column-width="32767*"/>
    </style:style>
    <style:style style:name="Таблица24.A1" style:family="table-cell">
      <style:table-cell-properties style:writing-mode="page"/>
    </style:style>
    <style:style style:name="Таблица25" style:family="table">
      <style:table-properties style:width="17cm" table:align="margins"/>
    </style:style>
    <style:style style:name="Таблица25.A" style:family="table-column">
      <style:table-column-properties style:column-width="8.5cm" style:rel-column-width="32767*"/>
    </style:style>
    <style:style style:name="Таблица25.A1" style:family="table-cell">
      <style:table-cell-properties style:writing-mode="page"/>
    </style:style>
    <style:style style:name="Таблица26" style:family="table">
      <style:table-properties style:width="17cm" fo:break-before="page" table:align="margins"/>
    </style:style>
    <style:style style:name="Таблица26.A" style:family="table-column">
      <style:table-column-properties style:column-width="8.5cm" style:rel-column-width="32767*"/>
    </style:style>
    <style:style style:name="Таблица26.A1" style:family="table-cell">
      <style:table-cell-properties style:writing-mode="page"/>
    </style:style>
    <style:style style:name="Таблица27" style:family="table">
      <style:table-properties style:width="17cm" table:align="margins"/>
    </style:style>
    <style:style style:name="Таблица27.A" style:family="table-column">
      <style:table-column-properties style:column-width="8.5cm" style:rel-column-width="32767*"/>
    </style:style>
    <style:style style:name="Таблица27.A1" style:family="table-cell">
      <style:table-cell-properties style:writing-mode="page"/>
    </style:style>
    <style:style style:name="Таблица28" style:family="table">
      <style:table-properties style:width="17cm" table:align="margins"/>
    </style:style>
    <style:style style:name="Таблица28.A" style:family="table-column">
      <style:table-column-properties style:column-width="8.5cm" style:rel-column-width="32767*"/>
    </style:style>
    <style:style style:name="Таблица28.A1" style:family="table-cell">
      <style:table-cell-properties style:writing-mode="page"/>
    </style:style>
    <style:style style:name="Таблица30" style:family="table">
      <style:table-properties style:width="17.101cm" fo:margin-left="0cm" fo:break-before="page" table:align="left"/>
    </style:style>
    <style:style style:name="Таблица30.A" style:family="table-column">
      <style:table-column-properties style:column-width="8.498cm"/>
    </style:style>
    <style:style style:name="Таблица30.B" style:family="table-column">
      <style:table-column-properties style:column-width="8.602cm"/>
    </style:style>
    <style:style style:name="Таблица30.1" style:family="table-row">
      <style:table-row-properties style:min-row-height="10.213cm"/>
    </style:style>
    <style:style style:name="Таблица30.A1" style:family="table-cell">
      <style:table-cell-properties style:writing-mode="page"/>
    </style:style>
    <style:style style:name="Таблица31" style:family="table">
      <style:table-properties style:width="15.699cm" fo:break-before="page" table:align="left"/>
    </style:style>
    <style:style style:name="Таблица31.A" style:family="table-column">
      <style:table-column-properties style:column-width="8.5cm"/>
    </style:style>
    <style:style style:name="Таблица31.B" style:family="table-column">
      <style:table-column-properties style:column-width="7.198cm"/>
    </style:style>
    <style:style style:name="Таблица31.1" style:family="table-row">
      <style:table-row-properties style:min-row-height="9.79cm"/>
    </style:style>
    <style:style style:name="Таблица31.A1" style:family="table-cell">
      <style:table-cell-properties style:writing-mode="page"/>
    </style:style>
    <style:style style:name="Таблица33" style:family="table">
      <style:table-properties style:width="17cm" table:align="margins"/>
    </style:style>
    <style:style style:name="Таблица33.A" style:family="table-column">
      <style:table-column-properties style:column-width="8.5cm" style:rel-column-width="32767*"/>
    </style:style>
    <style:style style:name="Таблица33.B" style:family="table-column">
      <style:table-column-properties style:column-width="8.5cm" style:rel-column-width="32768*"/>
    </style:style>
    <style:style style:name="Таблица33.A1" style:family="table-cell">
      <style:table-cell-properties style:writing-mode="page"/>
    </style:style>
    <style:style style:name="Таблица34" style:family="table">
      <style:table-properties style:width="17.903cm" fo:margin-left="0cm" fo:break-before="page" table:align="left"/>
    </style:style>
    <style:style style:name="Таблица34.A" style:family="table-column">
      <style:table-column-properties style:column-width="8.5cm"/>
    </style:style>
    <style:style style:name="Таблица34.B" style:family="table-column">
      <style:table-column-properties style:column-width="9.403cm"/>
    </style:style>
    <style:style style:name="Таблица34.1" style:family="table-row">
      <style:table-row-properties style:min-row-height="9.79cm"/>
    </style:style>
    <style:style style:name="Таблица34.A1" style:family="table-cell">
      <style:table-cell-properties style:writing-mode="page"/>
    </style:style>
    <style:style style:name="Таблица35" style:family="table">
      <style:table-properties style:width="17.697cm" fo:margin-left="0cm" table:align="left"/>
    </style:style>
    <style:style style:name="Таблица35.A" style:family="table-column">
      <style:table-column-properties style:column-width="8.5cm"/>
    </style:style>
    <style:style style:name="Таблица35.B" style:family="table-column">
      <style:table-column-properties style:column-width="9.197cm"/>
    </style:style>
    <style:style style:name="Таблица35.A1" style:family="table-cell">
      <style:table-cell-properties style:writing-mode="page"/>
    </style:style>
    <style:style style:name="Таблица36" style:family="table">
      <style:table-properties style:width="17cm" fo:break-before="page" table:align="margins"/>
    </style:style>
    <style:style style:name="Таблица36.A" style:family="table-column">
      <style:table-column-properties style:column-width="8.5cm" style:rel-column-width="32767*"/>
    </style:style>
    <style:style style:name="Таблица36.B" style:family="table-column">
      <style:table-column-properties style:column-width="8.5cm" style:rel-column-width="32768*"/>
    </style:style>
    <style:style style:name="Таблица36.1" style:family="table-row">
      <style:table-row-properties style:min-row-height="6.997cm"/>
    </style:style>
    <style:style style:name="Таблица36.A1" style:family="table-cell">
      <style:table-cell-properties style:writing-mode="page"/>
    </style:style>
    <style:style style:name="Таблица37" style:family="table">
      <style:table-properties style:width="17cm" table:align="margins"/>
    </style:style>
    <style:style style:name="Таблица37.A" style:family="table-column">
      <style:table-column-properties style:column-width="8.5cm" style:rel-column-width="32767*"/>
    </style:style>
    <style:style style:name="Таблица37.B" style:family="table-column">
      <style:table-column-properties style:column-width="8.5cm" style:rel-column-width="32768*"/>
    </style:style>
    <style:style style:name="Таблица37.1" style:family="table-row">
      <style:table-row-properties style:min-row-height="0.411cm"/>
    </style:style>
    <style:style style:name="Таблица37.A1" style:family="table-cell">
      <style:table-cell-properties style:writing-mode="page"/>
    </style:style>
    <style:style style:name="Таблица38" style:family="table">
      <style:table-properties style:width="17cm" fo:break-before="page" table:align="margins"/>
    </style:style>
    <style:style style:name="Таблица38.A" style:family="table-column">
      <style:table-column-properties style:column-width="8.5cm" style:rel-column-width="32767*"/>
    </style:style>
    <style:style style:name="Таблица38.A1" style:family="table-cell">
      <style:table-cell-properties style:writing-mode="page"/>
    </style:style>
    <style:style style:name="Таблица39" style:family="table">
      <style:table-properties style:width="17cm" table:align="margins"/>
    </style:style>
    <style:style style:name="Таблица39.A" style:family="table-column">
      <style:table-column-properties style:column-width="8.5cm" style:rel-column-width="32767*"/>
    </style:style>
    <style:style style:name="Таблица39.A1" style:family="table-cell">
      <style:table-cell-properties style:writing-mode="page"/>
    </style:style>
    <style:style style:name="Таблица40" style:family="table">
      <style:table-properties style:width="17cm" fo:break-before="page" table:align="margins"/>
    </style:style>
    <style:style style:name="Таблица40.A" style:family="table-column">
      <style:table-column-properties style:column-width="8.5cm" style:rel-column-width="32767*"/>
    </style:style>
    <style:style style:name="Таблица40.B" style:family="table-column">
      <style:table-column-properties style:column-width="8.5cm" style:rel-column-width="32768*"/>
    </style:style>
    <style:style style:name="Таблица40.A1" style:family="table-cell">
      <style:table-cell-properties style:writing-mode="page"/>
    </style:style>
    <style:style style:name="Таблица41" style:family="table">
      <style:table-properties style:width="17cm" fo:break-before="page" table:align="margins"/>
    </style:style>
    <style:style style:name="Таблица41.A" style:family="table-column">
      <style:table-column-properties style:column-width="8.5cm" style:rel-column-width="32767*"/>
    </style:style>
    <style:style style:name="Таблица41.B" style:family="table-column">
      <style:table-column-properties style:column-width="8.5cm" style:rel-column-width="32768*"/>
    </style:style>
    <style:style style:name="Таблица41.1" style:family="table-row">
      <style:table-row-properties style:min-row-height="13.788cm"/>
    </style:style>
    <style:style style:name="Таблица41.A1" style:family="table-cell">
      <style:table-cell-properties style:writing-mode="page"/>
    </style:style>
    <style:style style:name="Таблица42" style:family="table">
      <style:table-properties style:width="17cm" fo:break-before="page" table:align="margins"/>
    </style:style>
    <style:style style:name="Таблица42.A" style:family="table-column">
      <style:table-column-properties style:column-width="8.5cm" style:rel-column-width="32767*"/>
    </style:style>
    <style:style style:name="Таблица42.A1" style:family="table-cell">
      <style:table-cell-properties style:writing-mode="page"/>
    </style:style>
    <style:style style:name="Таблица43" style:family="table">
      <style:table-properties style:width="17cm" fo:break-before="page" table:align="margins"/>
    </style:style>
    <style:style style:name="Таблица43.A" style:family="table-column">
      <style:table-column-properties style:column-width="8.5cm" style:rel-column-width="32767*"/>
    </style:style>
    <style:style style:name="Таблица43.1" style:family="table-row">
      <style:table-row-properties style:min-row-height="0.411cm"/>
    </style:style>
    <style:style style:name="Таблица43.A1" style:family="table-cell">
      <style:table-cell-properties style:writing-mode="page"/>
    </style:style>
    <style:style style:name="Таблица44" style:family="table">
      <style:table-properties style:width="17cm" fo:break-before="page" table:align="margins"/>
    </style:style>
    <style:style style:name="Таблица44.A" style:family="table-column">
      <style:table-column-properties style:column-width="8.5cm" style:rel-column-width="32767*"/>
    </style:style>
    <style:style style:name="Таблица44.A1" style:family="table-cell">
      <style:table-cell-properties style:writing-mode="page"/>
    </style:style>
    <style:style style:name="Таблица45" style:family="table">
      <style:table-properties style:width="17cm" fo:break-before="page" table:align="margins"/>
    </style:style>
    <style:style style:name="Таблица45.A" style:family="table-column">
      <style:table-column-properties style:column-width="8.5cm" style:rel-column-width="32767*"/>
    </style:style>
    <style:style style:name="Таблица45.1" style:family="table-row">
      <style:table-row-properties style:min-row-height="14.19cm"/>
    </style:style>
    <style:style style:name="Таблица45.A1" style:family="table-cell">
      <style:table-cell-properties style:writing-mode="page"/>
    </style:style>
    <style:style style:name="Таблица46" style:family="table">
      <style:table-properties style:width="17cm" table:align="margins"/>
    </style:style>
    <style:style style:name="Таблица46.A" style:family="table-column">
      <style:table-column-properties style:column-width="8.5cm" style:rel-column-width="32767*"/>
    </style:style>
    <style:style style:name="Таблица46.A1" style:family="table-cell">
      <style:table-cell-properties style:writing-mode="page"/>
    </style:style>
    <style:style style:name="Таблица47" style:family="table">
      <style:table-properties style:width="17cm" fo:break-before="page" table:align="margins"/>
    </style:style>
    <style:style style:name="Таблица47.A" style:family="table-column">
      <style:table-column-properties style:column-width="8.5cm" style:rel-column-width="32767*"/>
    </style:style>
    <style:style style:name="Таблица47.A1" style:family="table-cell">
      <style:table-cell-properties style:writing-mode="page"/>
    </style:style>
    <style:style style:name="Таблица48" style:family="table">
      <style:table-properties style:width="17cm" table:align="margins"/>
    </style:style>
    <style:style style:name="Таблица48.A" style:family="table-column">
      <style:table-column-properties style:column-width="8.5cm" style:rel-column-width="32767*"/>
    </style:style>
    <style:style style:name="Таблица48.1" style:family="table-row">
      <style:table-row-properties style:min-row-height="0.411cm"/>
    </style:style>
    <style:style style:name="Таблица48.A1" style:family="table-cell">
      <style:table-cell-properties style:writing-mode="page"/>
    </style:style>
    <style:style style:name="Таблица49" style:family="table">
      <style:table-properties style:width="17cm" fo:break-before="page" table:align="margins"/>
    </style:style>
    <style:style style:name="Таблица49.A" style:family="table-column">
      <style:table-column-properties style:column-width="8.5cm" style:rel-column-width="32767*"/>
    </style:style>
    <style:style style:name="Таблица49.A1" style:family="table-cell">
      <style:table-cell-properties style:writing-mode="page"/>
    </style:style>
    <style:style style:name="Таблица50" style:family="table">
      <style:table-properties style:width="17cm" fo:break-before="page" table:align="margins"/>
    </style:style>
    <style:style style:name="Таблица50.A" style:family="table-column">
      <style:table-column-properties style:column-width="8.5cm" style:rel-column-width="32767*"/>
    </style:style>
    <style:style style:name="Таблица50.1" style:family="table-row">
      <style:table-row-properties style:min-row-height="0.411cm"/>
    </style:style>
    <style:style style:name="Таблица50.A1" style:family="table-cell">
      <style:table-cell-properties style:writing-mode="page"/>
    </style:style>
    <style:style style:name="Таблица51" style:family="table">
      <style:table-properties style:width="17cm" fo:break-before="page" table:align="margins"/>
    </style:style>
    <style:style style:name="Таблица51.A" style:family="table-column">
      <style:table-column-properties style:column-width="8.5cm" style:rel-column-width="32767*"/>
    </style:style>
    <style:style style:name="Таблица51.A1" style:family="table-cell">
      <style:table-cell-properties style:writing-mode="page"/>
    </style:style>
    <style:style style:name="Таблица52" style:family="table">
      <style:table-properties style:width="17cm" table:align="margins"/>
    </style:style>
    <style:style style:name="Таблица52.A" style:family="table-column">
      <style:table-column-properties style:column-width="8.5cm" style:rel-column-width="32767*"/>
    </style:style>
    <style:style style:name="Таблица52.A1" style:family="table-cell">
      <style:table-cell-properties style:writing-mode="page"/>
    </style:style>
    <style:style style:name="Таблица32" style:family="table">
      <style:table-properties style:width="17.903cm" fo:margin-left="0cm" fo:break-before="page" table:align="left"/>
    </style:style>
    <style:style style:name="Таблица32.A" style:family="table-column">
      <style:table-column-properties style:column-width="8.5cm"/>
    </style:style>
    <style:style style:name="Таблица32.B" style:family="table-column">
      <style:table-column-properties style:column-width="9.403cm"/>
    </style:style>
    <style:style style:name="Таблица32.1" style:family="table-row">
      <style:table-row-properties style:min-row-height="9.79cm"/>
    </style:style>
    <style:style style:name="Таблица32.A1" style:family="table-cell">
      <style:table-cell-properties style:writing-mode="page"/>
    </style:style>
    <style:style style:name="Таблица29" style:family="table">
      <style:table-properties style:width="17.702cm" fo:margin-left="-0.605cm" table:align="left"/>
    </style:style>
    <style:style style:name="Таблица29.A" style:family="table-column">
      <style:table-column-properties style:column-width="4.86cm"/>
    </style:style>
    <style:style style:name="Таблица29.B" style:family="table-column">
      <style:table-column-properties style:column-width="4.233cm"/>
    </style:style>
    <style:style style:name="Таблица29.C" style:family="table-column">
      <style:table-column-properties style:column-width="4.256cm"/>
    </style:style>
    <style:style style:name="Таблица29.D" style:family="table-column">
      <style:table-column-properties style:column-width="4.353cm"/>
    </style:style>
    <style:style style:name="Таблица29.A1" style:family="table-cell">
      <style:table-cell-properties style:vertical-align="middle" fo:padding="0cm" fo:border="none" style:writing-mode="page"/>
    </style:style>
    <style:style style:name="Таблица2" style:family="table">
      <style:table-properties style:width="17cm" table:align="margins"/>
    </style:style>
    <style:style style:name="Таблица2.A" style:family="table-column">
      <style:table-column-properties style:column-width="8.5cm" style:rel-column-width="32767*"/>
    </style:style>
    <style:style style:name="Таблица2.B" style:family="table-column">
      <style:table-column-properties style:column-width="8.5cm" style:rel-column-width="32768*"/>
    </style:style>
    <style:style style:name="Таблица2.1" style:family="table-row">
      <style:table-row-properties style:min-row-height="10.213cm"/>
    </style:style>
    <style:style style:name="Таблица2.A1" style:family="table-cell">
      <style:table-cell-properties style:writing-mode="page"/>
    </style:style>
    <style:style style:name="Таблица53" style:family="table">
      <style:table-properties style:width="17cm" fo:break-before="page" table:align="margins"/>
    </style:style>
    <style:style style:name="Таблица53.A" style:family="table-column">
      <style:table-column-properties style:column-width="8.5cm" style:rel-column-width="32767*"/>
    </style:style>
    <style:style style:name="Таблица53.B" style:family="table-column">
      <style:table-column-properties style:column-width="8.5cm" style:rel-column-width="32768*"/>
    </style:style>
    <style:style style:name="Таблица53.1" style:family="table-row">
      <style:table-row-properties style:min-row-height="10.213cm"/>
    </style:style>
    <style:style style:name="Таблица53.A1" style:family="table-cell">
      <style:table-cell-properties style:writing-mode="page"/>
    </style:style>
    <style:style style:name="Таблица54" style:family="table">
      <style:table-properties style:width="15.699cm" fo:break-before="page" table:align="left"/>
    </style:style>
    <style:style style:name="Таблица54.A" style:family="table-column">
      <style:table-column-properties style:column-width="8.5cm"/>
    </style:style>
    <style:style style:name="Таблица54.B" style:family="table-column">
      <style:table-column-properties style:column-width="7.198cm"/>
    </style:style>
    <style:style style:name="Таблица54.1" style:family="table-row">
      <style:table-row-properties style:min-row-height="9.79cm"/>
    </style:style>
    <style:style style:name="Таблица54.A1" style:family="table-cell">
      <style:table-cell-properties style:writing-mode="page"/>
    </style:style>
    <style:style style:name="Таблица55" style:family="table">
      <style:table-properties style:width="17.903cm" fo:margin-left="0cm" fo:break-before="page" table:align="left"/>
    </style:style>
    <style:style style:name="Таблица55.A" style:family="table-column">
      <style:table-column-properties style:column-width="8.5cm"/>
    </style:style>
    <style:style style:name="Таблица55.B" style:family="table-column">
      <style:table-column-properties style:column-width="9.403cm"/>
    </style:style>
    <style:style style:name="Таблица55.1" style:family="table-row">
      <style:table-row-properties style:min-row-height="8.202cm"/>
    </style:style>
    <style:style style:name="Таблица55.A1" style:family="table-cell">
      <style:table-cell-properties style:writing-mode="page"/>
    </style:style>
    <style:style style:name="Таблица56" style:family="table">
      <style:table-properties style:width="17cm" table:align="margins"/>
    </style:style>
    <style:style style:name="Таблица56.A" style:family="table-column">
      <style:table-column-properties style:column-width="8.5cm" style:rel-column-width="32767*"/>
    </style:style>
    <style:style style:name="Таблица56.B" style:family="table-column">
      <style:table-column-properties style:column-width="8.5cm" style:rel-column-width="32768*"/>
    </style:style>
    <style:style style:name="Таблица56.A1" style:family="table-cell">
      <style:table-cell-properties style:writing-mode="page"/>
    </style:style>
    <style:style style:name="Таблица57" style:family="table">
      <style:table-properties style:width="17.903cm" fo:margin-left="0cm" fo:break-before="page" table:align="left"/>
    </style:style>
    <style:style style:name="Таблица57.A" style:family="table-column">
      <style:table-column-properties style:column-width="8.5cm"/>
    </style:style>
    <style:style style:name="Таблица57.B" style:family="table-column">
      <style:table-column-properties style:column-width="9.403cm"/>
    </style:style>
    <style:style style:name="Таблица57.1" style:family="table-row">
      <style:table-row-properties style:min-row-height="9.79cm"/>
    </style:style>
    <style:style style:name="Таблица57.A1" style:family="table-cell">
      <style:table-cell-properties style:writing-mode="page"/>
    </style:style>
    <style:style style:name="Таблица58" style:family="table">
      <style:table-properties style:width="17.697cm" fo:margin-left="0cm" table:align="left"/>
    </style:style>
    <style:style style:name="Таблица58.A" style:family="table-column">
      <style:table-column-properties style:column-width="8.5cm"/>
    </style:style>
    <style:style style:name="Таблица58.B" style:family="table-column">
      <style:table-column-properties style:column-width="9.197cm"/>
    </style:style>
    <style:style style:name="Таблица58.A1" style:family="table-cell">
      <style:table-cell-properties style:writing-mode="page"/>
    </style:style>
    <style:style style:name="Таблица59" style:family="table">
      <style:table-properties style:width="17cm" fo:break-before="page" table:align="margins"/>
    </style:style>
    <style:style style:name="Таблица59.A" style:family="table-column">
      <style:table-column-properties style:column-width="8.5cm" style:rel-column-width="32767*"/>
    </style:style>
    <style:style style:name="Таблица59.B" style:family="table-column">
      <style:table-column-properties style:column-width="8.5cm" style:rel-column-width="32768*"/>
    </style:style>
    <style:style style:name="Таблица59.1" style:family="table-row">
      <style:table-row-properties style:min-row-height="6.997cm"/>
    </style:style>
    <style:style style:name="Таблица59.A1" style:family="table-cell">
      <style:table-cell-properties style:writing-mode="page"/>
    </style:style>
    <style:style style:name="Таблица60" style:family="table">
      <style:table-properties style:width="17cm" table:align="margins"/>
    </style:style>
    <style:style style:name="Таблица60.A" style:family="table-column">
      <style:table-column-properties style:column-width="8.5cm" style:rel-column-width="32767*"/>
    </style:style>
    <style:style style:name="Таблица60.B" style:family="table-column">
      <style:table-column-properties style:column-width="8.5cm" style:rel-column-width="32768*"/>
    </style:style>
    <style:style style:name="Таблица60.1" style:family="table-row">
      <style:table-row-properties style:min-row-height="0.411cm"/>
    </style:style>
    <style:style style:name="Таблица60.A1" style:family="table-cell">
      <style:table-cell-properties style:writing-mode="page"/>
    </style:style>
    <style:style style:name="Таблица61" style:family="table">
      <style:table-properties style:width="17cm" fo:break-before="page" table:align="margins"/>
    </style:style>
    <style:style style:name="Таблица61.A" style:family="table-column">
      <style:table-column-properties style:column-width="8.5cm" style:rel-column-width="32767*"/>
    </style:style>
    <style:style style:name="Таблица61.A1" style:family="table-cell">
      <style:table-cell-properties style:writing-mode="page"/>
    </style:style>
    <style:style style:name="Таблица62" style:family="table">
      <style:table-properties style:width="17cm" table:align="margins"/>
    </style:style>
    <style:style style:name="Таблица62.A" style:family="table-column">
      <style:table-column-properties style:column-width="8.5cm" style:rel-column-width="32767*"/>
    </style:style>
    <style:style style:name="Таблица62.A1" style:family="table-cell">
      <style:table-cell-properties style:writing-mode="page"/>
    </style:style>
    <style:style style:name="Таблица63" style:family="table">
      <style:table-properties style:width="17cm" fo:break-before="page" table:align="margins"/>
    </style:style>
    <style:style style:name="Таблица63.A" style:family="table-column">
      <style:table-column-properties style:column-width="8.5cm" style:rel-column-width="32767*"/>
    </style:style>
    <style:style style:name="Таблица63.B" style:family="table-column">
      <style:table-column-properties style:column-width="8.5cm" style:rel-column-width="32768*"/>
    </style:style>
    <style:style style:name="Таблица63.A1" style:family="table-cell">
      <style:table-cell-properties style:writing-mode="page"/>
    </style:style>
    <style:style style:name="Таблица64" style:family="table">
      <style:table-properties style:width="17cm" fo:break-before="page" table:align="margins"/>
    </style:style>
    <style:style style:name="Таблица64.A" style:family="table-column">
      <style:table-column-properties style:column-width="8.5cm" style:rel-column-width="32767*"/>
    </style:style>
    <style:style style:name="Таблица64.B" style:family="table-column">
      <style:table-column-properties style:column-width="8.5cm" style:rel-column-width="32768*"/>
    </style:style>
    <style:style style:name="Таблица64.1" style:family="table-row">
      <style:table-row-properties style:min-row-height="8.611cm"/>
    </style:style>
    <style:style style:name="Таблица64.A1" style:family="table-cell">
      <style:table-cell-properties style:writing-mode="page"/>
    </style:style>
    <style:style style:name="Таблица65" style:family="table">
      <style:table-properties style:width="17cm" fo:break-before="page" table:align="margins"/>
    </style:style>
    <style:style style:name="Таблица65.A" style:family="table-column">
      <style:table-column-properties style:column-width="8.5cm" style:rel-column-width="32767*"/>
    </style:style>
    <style:style style:name="Таблица65.A1" style:family="table-cell">
      <style:table-cell-properties style:writing-mode="page"/>
    </style:style>
    <style:style style:name="Таблица66" style:family="table">
      <style:table-properties style:width="17cm" table:align="margins"/>
    </style:style>
    <style:style style:name="Таблица66.A" style:family="table-column">
      <style:table-column-properties style:column-width="8.5cm" style:rel-column-width="32767*"/>
    </style:style>
    <style:style style:name="Таблица66.1" style:family="table-row">
      <style:table-row-properties style:min-row-height="0.411cm"/>
    </style:style>
    <style:style style:name="Таблица66.A1" style:family="table-cell">
      <style:table-cell-properties style:writing-mode="page"/>
    </style:style>
    <style:style style:name="Таблица67" style:family="table">
      <style:table-properties style:width="17cm" fo:break-before="page" table:align="margins"/>
    </style:style>
    <style:style style:name="Таблица67.A" style:family="table-column">
      <style:table-column-properties style:column-width="8.5cm" style:rel-column-width="32767*"/>
    </style:style>
    <style:style style:name="Таблица67.A1" style:family="table-cell">
      <style:table-cell-properties style:writing-mode="page"/>
    </style:style>
    <style:style style:name="Таблица68" style:family="table">
      <style:table-properties style:width="17cm" fo:break-before="page" table:align="margins"/>
    </style:style>
    <style:style style:name="Таблица68.A" style:family="table-column">
      <style:table-column-properties style:column-width="8.5cm" style:rel-column-width="32767*"/>
    </style:style>
    <style:style style:name="Таблица68.1" style:family="table-row">
      <style:table-row-properties style:min-row-height="0.411cm"/>
    </style:style>
    <style:style style:name="Таблица68.A1" style:family="table-cell">
      <style:table-cell-properties style:writing-mode="page"/>
    </style:style>
    <style:style style:name="Таблица69" style:family="table">
      <style:table-properties style:width="17cm" table:align="margins"/>
    </style:style>
    <style:style style:name="Таблица69.A" style:family="table-column">
      <style:table-column-properties style:column-width="8.5cm" style:rel-column-width="32767*"/>
    </style:style>
    <style:style style:name="Таблица69.A1" style:family="table-cell">
      <style:table-cell-properties style:writing-mode="page"/>
    </style:style>
    <style:style style:name="Таблица70" style:family="table">
      <style:table-properties style:width="17cm" fo:break-before="page" table:align="margins"/>
    </style:style>
    <style:style style:name="Таблица70.A" style:family="table-column">
      <style:table-column-properties style:column-width="8.5cm" style:rel-column-width="32767*"/>
    </style:style>
    <style:style style:name="Таблица70.A1" style:family="table-cell">
      <style:table-cell-properties style:writing-mode="page"/>
    </style:style>
    <style:style style:name="Таблица71" style:family="table">
      <style:table-properties style:width="17cm" table:align="margins"/>
    </style:style>
    <style:style style:name="Таблица71.A" style:family="table-column">
      <style:table-column-properties style:column-width="8.5cm" style:rel-column-width="32767*"/>
    </style:style>
    <style:style style:name="Таблица71.1" style:family="table-row">
      <style:table-row-properties style:min-row-height="0.411cm"/>
    </style:style>
    <style:style style:name="Таблица71.A1" style:family="table-cell">
      <style:table-cell-properties style:writing-mode="page"/>
    </style:style>
    <style:style style:name="Таблица72" style:family="table">
      <style:table-properties style:width="17cm" fo:break-before="page" table:align="margins"/>
    </style:style>
    <style:style style:name="Таблица72.A" style:family="table-column">
      <style:table-column-properties style:column-width="8.5cm" style:rel-column-width="32767*"/>
    </style:style>
    <style:style style:name="Таблица72.A1" style:family="table-cell">
      <style:table-cell-properties style:writing-mode="page"/>
    </style:style>
    <style:style style:name="Таблица73" style:family="table">
      <style:table-properties style:width="17cm" fo:break-before="page" table:align="margins"/>
    </style:style>
    <style:style style:name="Таблица73.A" style:family="table-column">
      <style:table-column-properties style:column-width="8.5cm" style:rel-column-width="32767*"/>
    </style:style>
    <style:style style:name="Таблица73.1" style:family="table-row">
      <style:table-row-properties style:min-row-height="0.411cm"/>
    </style:style>
    <style:style style:name="Таблица73.A1" style:family="table-cell">
      <style:table-cell-properties style:writing-mode="page"/>
    </style:style>
    <style:style style:name="Таблица74" style:family="table">
      <style:table-properties style:width="17cm" fo:break-before="page" table:align="margins"/>
    </style:style>
    <style:style style:name="Таблица74.A" style:family="table-column">
      <style:table-column-properties style:column-width="8.5cm" style:rel-column-width="32767*"/>
    </style:style>
    <style:style style:name="Таблица74.A1" style:family="table-cell">
      <style:table-cell-properties style:writing-mode="page"/>
    </style:style>
    <style:style style:name="Таблица75" style:family="table">
      <style:table-properties style:width="17cm" table:align="margins"/>
    </style:style>
    <style:style style:name="Таблица75.A" style:family="table-column">
      <style:table-column-properties style:column-width="8.5cm" style:rel-column-width="32767*"/>
    </style:style>
    <style:style style:name="Таблица75.A1" style:family="table-cell">
      <style:table-cell-properties style:writing-mode="page"/>
    </style:style>
    <style:style style:name="Таблица76" style:family="table">
      <style:table-properties style:width="17cm" table:align="margins"/>
    </style:style>
    <style:style style:name="Таблица76.A" style:family="table-column">
      <style:table-column-properties style:column-width="8.5cm" style:rel-column-width="32767*"/>
    </style:style>
    <style:style style:name="Таблица76.1" style:family="table-row">
      <style:table-row-properties style:min-row-height="5.796cm"/>
    </style:style>
    <style:style style:name="Таблица76.A1" style:family="table-cell">
      <style:table-cell-properties style:writing-mode="page"/>
    </style:style>
    <style:style style:name="P1" style:family="paragraph" style:parent-style-name="Standard">
      <style:text-properties fo:font-size="14pt" officeooo:rsid="002dbf5b" officeooo:paragraph-rsid="002e175e" style:font-size-asian="14pt" style:font-size-complex="14pt"/>
    </style:style>
    <style:style style:name="P2" style:family="paragraph" style:parent-style-name="Standard">
      <style:text-properties fo:font-size="14pt" officeooo:rsid="002dbf5b" officeooo:paragraph-rsid="00438696" style:font-size-asian="14pt" style:font-size-complex="14pt"/>
    </style:style>
    <style:style style:name="P3" style:family="paragraph" style:parent-style-name="Standard">
      <style:text-properties fo:font-size="14pt" officeooo:rsid="002dbf5b" officeooo:paragraph-rsid="004b0ef6" style:font-size-asian="14pt" style:font-size-complex="14pt"/>
    </style:style>
    <style:style style:name="P4" style:family="paragraph" style:parent-style-name="Standard">
      <style:text-properties fo:font-size="14pt" officeooo:rsid="002d240f" officeooo:paragraph-rsid="002d240f" style:font-size-asian="14pt" style:font-size-complex="14pt"/>
    </style:style>
    <style:style style:name="P5" style:family="paragraph" style:parent-style-name="Standard">
      <style:text-properties fo:font-size="14pt" officeooo:paragraph-rsid="002e175e" style:font-size-asian="14pt" style:font-size-complex="14pt"/>
    </style:style>
    <style:style style:name="P6" style:family="paragraph" style:parent-style-name="Standard">
      <style:text-properties fo:font-size="14pt" style:font-size-asian="14pt" style:font-size-complex="14pt"/>
    </style:style>
    <style:style style:name="P7" style:family="paragraph" style:parent-style-name="Standard">
      <style:text-properties fo:font-size="14pt" officeooo:paragraph-rsid="00438696" style:font-size-asian="14pt" style:font-size-complex="14pt"/>
    </style:style>
    <style:style style:name="P8" style:family="paragraph" style:parent-style-name="Standard">
      <style:text-properties fo:font-size="14pt" officeooo:rsid="00462626" officeooo:paragraph-rsid="00462626" style:font-size-asian="14pt" style:font-size-complex="14pt"/>
    </style:style>
    <style:style style:name="P9" style:family="paragraph" style:parent-style-name="Standard">
      <style:text-properties fo:font-size="14pt" officeooo:paragraph-rsid="004b0ef6" style:font-size-asian="14pt" style:font-size-complex="14pt"/>
    </style:style>
    <style:style style:name="P10" style:family="paragraph" style:parent-style-name="Standard">
      <style:paragraph-properties fo:break-before="page"/>
      <style:text-properties fo:font-size="14pt" officeooo:paragraph-rsid="004b0ef6" style:font-size-asian="14pt" style:font-size-complex="14pt"/>
    </style:style>
    <style:style style:name="P11" style:family="paragraph" style:parent-style-name="Standard">
      <style:text-properties fo:font-size="14pt" officeooo:rsid="004f1265" officeooo:paragraph-rsid="004f1265" style:font-size-asian="14pt" style:font-size-complex="14pt"/>
    </style:style>
    <style:style style:name="P12" style:family="paragraph" style:parent-style-name="Standard">
      <style:text-properties fo:font-size="14pt" fo:language="ru" fo:country="RU" officeooo:rsid="00339d5a" officeooo:paragraph-rsid="00339d5a" style:font-size-asian="14pt" style:font-size-complex="14pt"/>
    </style:style>
    <style:style style:name="P13" style:family="paragraph" style:parent-style-name="Standard">
      <style:text-properties fo:font-size="14pt" fo:language="ru" fo:country="RU" officeooo:rsid="00339d5a" officeooo:paragraph-rsid="00438696" style:font-size-asian="14pt" style:font-size-complex="14pt"/>
    </style:style>
    <style:style style:name="P14" style:family="paragraph" style:parent-style-name="Standard">
      <style:text-properties fo:font-size="14pt" fo:language="ru" fo:country="RU" officeooo:rsid="00339d5a" officeooo:paragraph-rsid="004b0ef6" style:font-size-asian="14pt" style:font-size-complex="14pt"/>
    </style:style>
    <style:style style:name="P15" style:family="paragraph" style:parent-style-name="Standard">
      <style:text-properties fo:font-size="14pt" fo:language="ru" fo:country="RU" officeooo:rsid="0033bf58" officeooo:paragraph-rsid="0033bf58" style:font-size-asian="14pt" style:font-size-complex="14pt"/>
    </style:style>
    <style:style style:name="P16" style:family="paragraph" style:parent-style-name="Standard">
      <style:text-properties fo:font-size="14pt" fo:language="ru" fo:country="RU" officeooo:rsid="0033bf58" officeooo:paragraph-rsid="00438696" style:font-size-asian="14pt" style:font-size-complex="14pt"/>
    </style:style>
    <style:style style:name="P17" style:family="paragraph" style:parent-style-name="Standard">
      <style:text-properties fo:font-size="14pt" fo:language="ru" fo:country="RU" officeooo:rsid="0033bf58" officeooo:paragraph-rsid="004b0ef6" style:font-size-asian="14pt" style:font-size-complex="14pt"/>
    </style:style>
    <style:style style:name="P18" style:family="paragraph" style:parent-style-name="Standard">
      <style:text-properties fo:font-size="14pt" fo:language="ru" fo:country="RU" officeooo:rsid="0030d524" officeooo:paragraph-rsid="0030d524" style:font-size-asian="14pt" style:font-size-complex="14pt"/>
    </style:style>
    <style:style style:name="P19" style:family="paragraph" style:parent-style-name="Standard">
      <style:text-properties fo:font-size="14pt" fo:language="ru" fo:country="RU" officeooo:rsid="0030d524" officeooo:paragraph-rsid="00438696" style:font-size-asian="14pt" style:font-size-complex="14pt"/>
    </style:style>
    <style:style style:name="P20" style:family="paragraph" style:parent-style-name="Standard">
      <style:text-properties fo:font-size="14pt" fo:language="ru" fo:country="RU" officeooo:rsid="0030d524" officeooo:paragraph-rsid="004b0ef6" style:font-size-asian="14pt" style:font-size-complex="14pt"/>
    </style:style>
    <style:style style:name="P21" style:family="paragraph" style:parent-style-name="Standard">
      <style:text-properties fo:font-size="14pt" fo:language="ru" fo:country="RU" officeooo:rsid="00407b15" officeooo:paragraph-rsid="00407b15" style:font-size-asian="14pt" style:font-size-complex="14pt"/>
    </style:style>
    <style:style style:name="P22" style:family="paragraph" style:parent-style-name="Standard">
      <style:text-properties fo:font-size="14pt" fo:language="ru" fo:country="RU" officeooo:rsid="00407b15" officeooo:paragraph-rsid="00438696" style:font-size-asian="14pt" style:font-size-complex="14pt"/>
    </style:style>
    <style:style style:name="P23" style:family="paragraph" style:parent-style-name="Standard">
      <style:text-properties fo:font-size="14pt" fo:language="ru" fo:country="RU" officeooo:rsid="00407b15" officeooo:paragraph-rsid="004b0ef6" style:font-size-asian="14pt" style:font-size-complex="14pt"/>
    </style:style>
    <style:style style:name="P24" style:family="paragraph" style:parent-style-name="Standard">
      <style:text-properties fo:font-size="14pt" fo:language="ru" fo:country="RU" officeooo:rsid="0010cc42" officeooo:paragraph-rsid="0010cc42" style:font-size-asian="14pt" style:font-size-complex="14pt"/>
    </style:style>
    <style:style style:name="P25" style:family="paragraph" style:parent-style-name="Standard">
      <style:text-properties fo:font-size="14pt" fo:language="ru" fo:country="RU" officeooo:rsid="00123a8f" officeooo:paragraph-rsid="00226100" style:font-size-asian="14pt" style:font-size-complex="14pt"/>
    </style:style>
    <style:style style:name="P26" style:family="paragraph" style:parent-style-name="Standard">
      <style:text-properties fo:font-size="14pt" fo:language="ru" fo:country="RU" officeooo:rsid="00123a8f" officeooo:paragraph-rsid="00123a8f" style:font-size-asian="14pt" style:font-size-complex="14pt"/>
    </style:style>
    <style:style style:name="P27" style:family="paragraph" style:parent-style-name="Standard">
      <style:paragraph-properties fo:break-before="page"/>
      <style:text-properties fo:font-size="14pt" fo:language="ru" fo:country="RU" officeooo:rsid="00123a8f" officeooo:paragraph-rsid="00214e76" style:font-size-asian="14pt" style:font-size-complex="14pt"/>
    </style:style>
    <style:style style:name="P28" style:family="paragraph" style:parent-style-name="Standard">
      <style:text-properties fo:font-size="14pt" fo:language="ru" fo:country="RU" officeooo:rsid="00123a8f" officeooo:paragraph-rsid="00214e76" style:font-size-asian="14pt" style:font-size-complex="14pt"/>
    </style:style>
    <style:style style:name="P29" style:family="paragraph" style:parent-style-name="Standard">
      <style:text-properties fo:font-size="14pt" fo:language="ru" fo:country="RU" officeooo:rsid="00214e76" officeooo:paragraph-rsid="00226100" style:font-size-asian="14pt" style:font-size-complex="14pt"/>
    </style:style>
    <style:style style:name="P30" style:family="paragraph" style:parent-style-name="Standard">
      <style:text-properties fo:font-size="14pt" fo:language="ru" fo:country="RU" officeooo:rsid="00214e76" officeooo:paragraph-rsid="00214e76" style:font-size-asian="14pt" style:font-size-complex="14pt"/>
    </style:style>
    <style:style style:name="P31" style:family="paragraph" style:parent-style-name="Standard">
      <style:text-properties fo:font-size="14pt" fo:language="ru" fo:country="RU" officeooo:rsid="00255cb5" officeooo:paragraph-rsid="00255cb5" style:font-size-asian="14pt" style:font-size-complex="14pt"/>
    </style:style>
    <style:style style:name="P32" style:family="paragraph" style:parent-style-name="Standard">
      <style:text-properties fo:font-size="14pt" fo:language="ru" fo:country="RU" officeooo:rsid="00255cb5" officeooo:paragraph-rsid="002c401f" style:font-size-asian="14pt" style:font-size-complex="14pt"/>
    </style:style>
    <style:style style:name="P33" style:family="paragraph" style:parent-style-name="Standard">
      <style:text-properties fo:font-size="14pt" fo:language="ru" fo:country="RU" officeooo:rsid="00155f1d" officeooo:paragraph-rsid="00214e76" style:font-size-asian="14pt" style:font-size-complex="14pt"/>
    </style:style>
    <style:style style:name="P34" style:family="paragraph" style:parent-style-name="Standard">
      <style:text-properties fo:font-size="14pt" fo:language="ru" fo:country="RU" officeooo:paragraph-rsid="00155f1d" style:font-size-asian="14pt" style:font-size-complex="14pt"/>
    </style:style>
    <style:style style:name="P35" style:family="paragraph" style:parent-style-name="Standard">
      <style:text-properties fo:font-size="14pt" fo:language="ru" fo:country="RU" officeooo:rsid="00438696" officeooo:paragraph-rsid="00438696" style:font-size-asian="14pt" style:font-size-complex="14pt"/>
    </style:style>
    <style:style style:name="P36" style:family="paragraph" style:parent-style-name="Standard">
      <style:paragraph-properties fo:break-before="page"/>
      <style:text-properties fo:font-size="14pt" fo:language="ru" fo:country="RU" officeooo:rsid="00155f1d" officeooo:paragraph-rsid="00214e76" fo:background-color="#ffff00" style:font-size-asian="14pt" style:font-size-complex="14pt"/>
    </style:style>
    <style:style style:name="P37" style:family="paragraph" style:parent-style-name="Standard">
      <style:text-properties fo:font-size="14pt" fo:language="ru" fo:country="RU" officeooo:rsid="00155f1d" officeooo:paragraph-rsid="00155f1d" fo:background-color="#ffff00" style:font-size-asian="14pt" style:font-size-complex="14pt"/>
    </style:style>
    <style:style style:name="P38" style:family="paragraph" style:parent-style-name="Standard">
      <style:text-properties fo:language="ru" fo:country="RU" officeooo:rsid="002f2fe7" officeooo:paragraph-rsid="002f958f"/>
    </style:style>
    <style:style style:name="P39" style:family="paragraph" style:parent-style-name="Standard">
      <style:text-properties fo:language="ru" fo:country="RU" officeooo:rsid="002f2fe7" officeooo:paragraph-rsid="002f2fe7"/>
    </style:style>
    <style:style style:name="P40" style:family="paragraph" style:parent-style-name="Standard">
      <style:text-properties fo:language="ru" fo:country="RU" officeooo:rsid="002f2fe7" officeooo:paragraph-rsid="00438696"/>
    </style:style>
    <style:style style:name="P41" style:family="paragraph" style:parent-style-name="Standard">
      <style:text-properties fo:language="ru" fo:country="RU" officeooo:rsid="002f2fe7" officeooo:paragraph-rsid="004b0ef6"/>
    </style:style>
    <style:style style:name="P42" style:family="paragraph" style:parent-style-name="Standard">
      <style:text-properties fo:language="ru" fo:country="RU" officeooo:rsid="00383b71" officeooo:paragraph-rsid="00383b71"/>
    </style:style>
    <style:style style:name="P43" style:family="paragraph" style:parent-style-name="Standard">
      <style:text-properties fo:language="ru" fo:country="RU" officeooo:rsid="00383b71" officeooo:paragraph-rsid="00438696"/>
    </style:style>
    <style:style style:name="P44" style:family="paragraph" style:parent-style-name="Standard">
      <style:text-properties fo:language="ru" fo:country="RU" officeooo:rsid="00383b71" officeooo:paragraph-rsid="004b0ef6"/>
    </style:style>
    <style:style style:name="P45" style:family="paragraph" style:parent-style-name="Standard">
      <style:text-properties fo:language="ru" fo:country="RU" officeooo:rsid="00385f0c" officeooo:paragraph-rsid="00385f0c"/>
    </style:style>
    <style:style style:name="P46" style:family="paragraph" style:parent-style-name="Standard">
      <style:text-properties fo:language="ru" fo:country="RU" officeooo:rsid="00385f0c" officeooo:paragraph-rsid="00438696"/>
    </style:style>
    <style:style style:name="P47" style:family="paragraph" style:parent-style-name="Standard">
      <style:text-properties fo:language="ru" fo:country="RU" officeooo:rsid="00385f0c" officeooo:paragraph-rsid="004b0ef6"/>
    </style:style>
    <style:style style:name="P48" style:family="paragraph" style:parent-style-name="Standard">
      <style:text-properties fo:language="ru" fo:country="RU" officeooo:rsid="003a14e5" officeooo:paragraph-rsid="00385f0c"/>
    </style:style>
    <style:style style:name="P49" style:family="paragraph" style:parent-style-name="Standard">
      <style:text-properties fo:language="ru" fo:country="RU" officeooo:rsid="003a14e5" officeooo:paragraph-rsid="003a14e5"/>
    </style:style>
    <style:style style:name="P50" style:family="paragraph" style:parent-style-name="Standard">
      <style:text-properties fo:language="ru" fo:country="RU" officeooo:rsid="003a14e5" officeooo:paragraph-rsid="00438696"/>
    </style:style>
    <style:style style:name="P51" style:family="paragraph" style:parent-style-name="Standard">
      <style:text-properties fo:language="ru" fo:country="RU" officeooo:rsid="003a14e5" officeooo:paragraph-rsid="004b0ef6"/>
    </style:style>
    <style:style style:name="P52" style:family="paragraph" style:parent-style-name="Standard">
      <style:text-properties fo:language="ru" fo:country="RU" officeooo:rsid="003be776" officeooo:paragraph-rsid="003be776"/>
    </style:style>
    <style:style style:name="P53" style:family="paragraph" style:parent-style-name="Standard">
      <style:paragraph-properties fo:break-before="page"/>
      <style:text-properties fo:language="ru" fo:country="RU" officeooo:rsid="003be776" officeooo:paragraph-rsid="003be776"/>
    </style:style>
    <style:style style:name="P54" style:family="paragraph" style:parent-style-name="Standard">
      <style:text-properties fo:language="ru" fo:country="RU" officeooo:rsid="003be776" officeooo:paragraph-rsid="00438696"/>
    </style:style>
    <style:style style:name="P55" style:family="paragraph" style:parent-style-name="Standard">
      <style:paragraph-properties fo:break-before="page"/>
      <style:text-properties fo:language="ru" fo:country="RU" officeooo:rsid="003be776" officeooo:paragraph-rsid="00438696"/>
    </style:style>
    <style:style style:name="P56" style:family="paragraph" style:parent-style-name="Standard">
      <style:text-properties fo:language="ru" fo:country="RU" officeooo:rsid="003be776" officeooo:paragraph-rsid="004b0ef6"/>
    </style:style>
    <style:style style:name="P57" style:family="paragraph" style:parent-style-name="Standard">
      <style:paragraph-properties fo:break-before="page"/>
      <style:text-properties fo:language="ru" fo:country="RU" officeooo:rsid="003be776" officeooo:paragraph-rsid="004b0ef6"/>
    </style:style>
    <style:style style:name="P58" style:family="paragraph" style:parent-style-name="Standard">
      <style:text-properties fo:language="ru" fo:country="RU" officeooo:rsid="003cf3bb" officeooo:paragraph-rsid="003cf3bb"/>
    </style:style>
    <style:style style:name="P59" style:family="paragraph" style:parent-style-name="Standard">
      <style:text-properties fo:language="ru" fo:country="RU" officeooo:rsid="003cf3bb" officeooo:paragraph-rsid="00438696"/>
    </style:style>
    <style:style style:name="P60" style:family="paragraph" style:parent-style-name="Standard">
      <style:text-properties fo:language="ru" fo:country="RU" officeooo:rsid="003cf3bb" officeooo:paragraph-rsid="004b0ef6"/>
    </style:style>
    <style:style style:name="P61" style:family="paragraph" style:parent-style-name="Standard">
      <style:text-properties fo:language="ru" fo:country="RU" officeooo:rsid="003d3ddb" officeooo:paragraph-rsid="003d3ddb"/>
    </style:style>
    <style:style style:name="P62" style:family="paragraph" style:parent-style-name="Standard">
      <style:text-properties fo:language="ru" fo:country="RU" officeooo:rsid="003d3ddb" officeooo:paragraph-rsid="00438696"/>
    </style:style>
    <style:style style:name="P63" style:family="paragraph" style:parent-style-name="Standard">
      <style:text-properties fo:language="ru" fo:country="RU" officeooo:rsid="003d3ddb" officeooo:paragraph-rsid="004b0ef6"/>
    </style:style>
    <style:style style:name="P64" style:family="paragraph" style:parent-style-name="Standard">
      <style:text-properties fo:language="ru" fo:country="RU" officeooo:rsid="003f2ec9" officeooo:paragraph-rsid="003f2ec9"/>
    </style:style>
    <style:style style:name="P65" style:family="paragraph" style:parent-style-name="Standard">
      <style:text-properties fo:language="ru" fo:country="RU" officeooo:rsid="003f2ec9" officeooo:paragraph-rsid="00438696"/>
    </style:style>
    <style:style style:name="P66" style:family="paragraph" style:parent-style-name="Standard">
      <style:text-properties fo:language="ru" fo:country="RU" officeooo:rsid="003f2ec9" officeooo:paragraph-rsid="004b0ef6"/>
    </style:style>
    <style:style style:name="P67" style:family="paragraph" style:parent-style-name="Standard">
      <style:paragraph-properties fo:break-before="page"/>
      <style:text-properties fo:language="ru" fo:country="RU" officeooo:rsid="003f2ec9" officeooo:paragraph-rsid="004b0ef6"/>
    </style:style>
    <style:style style:name="P68" style:family="paragraph" style:parent-style-name="Standard">
      <style:text-properties fo:language="ru" fo:country="RU" officeooo:paragraph-rsid="002e175e"/>
    </style:style>
    <style:style style:name="P69" style:family="paragraph" style:parent-style-name="Standard">
      <style:text-properties fo:language="ru" fo:country="RU" officeooo:paragraph-rsid="002f2fe7"/>
    </style:style>
    <style:style style:name="P70" style:family="paragraph" style:parent-style-name="Standard">
      <style:text-properties fo:language="ru" fo:country="RU" officeooo:rsid="002f958f" officeooo:paragraph-rsid="002f958f"/>
    </style:style>
    <style:style style:name="P71" style:family="paragraph" style:parent-style-name="Standard">
      <style:text-properties fo:language="ru" fo:country="RU" officeooo:rsid="002f958f" officeooo:paragraph-rsid="00438696"/>
    </style:style>
    <style:style style:name="P72" style:family="paragraph" style:parent-style-name="Standard">
      <style:text-properties fo:language="ru" fo:country="RU" officeooo:rsid="002f958f" officeooo:paragraph-rsid="004b0ef6"/>
    </style:style>
    <style:style style:name="P73" style:family="paragraph" style:parent-style-name="Standard">
      <style:text-properties fo:language="ru" fo:country="RU" officeooo:paragraph-rsid="00438696"/>
    </style:style>
    <style:style style:name="P74" style:family="paragraph" style:parent-style-name="Standard">
      <style:text-properties fo:language="ru" fo:country="RU" officeooo:paragraph-rsid="004b0ef6"/>
    </style:style>
    <style:style style:name="P75" style:family="paragraph" style:parent-style-name="Standard">
      <style:text-properties fo:language="ru" fo:country="RU" officeooo:rsid="00533fd5" officeooo:paragraph-rsid="00533fd5"/>
    </style:style>
    <style:style style:name="P76" style:family="paragraph" style:parent-style-name="Standard">
      <style:text-properties fo:language="ru" fo:country="RU" officeooo:rsid="005409bc" officeooo:paragraph-rsid="005409bc"/>
    </style:style>
    <style:style style:name="P77" style:family="paragraph" style:parent-style-name="Standard">
      <style:text-properties fo:language="en" fo:country="US" officeooo:rsid="002f2fe7" officeooo:paragraph-rsid="002f2fe7"/>
    </style:style>
    <style:style style:name="P78" style:family="paragraph" style:parent-style-name="Standard">
      <style:text-properties fo:language="en" fo:country="US" officeooo:rsid="002f2fe7" officeooo:paragraph-rsid="00438696"/>
    </style:style>
    <style:style style:name="P79" style:family="paragraph" style:parent-style-name="Standard">
      <style:text-properties fo:language="en" fo:country="US" officeooo:rsid="002f2fe7" officeooo:paragraph-rsid="004b0ef6"/>
    </style:style>
    <style:style style:name="P80" style:family="paragraph" style:parent-style-name="Standard">
      <style:text-properties fo:language="en" fo:country="US" officeooo:rsid="00383b71" officeooo:paragraph-rsid="00383b71"/>
    </style:style>
    <style:style style:name="P81" style:family="paragraph" style:parent-style-name="Standard">
      <style:text-properties fo:language="en" fo:country="US" officeooo:rsid="00383b71" officeooo:paragraph-rsid="00438696"/>
    </style:style>
    <style:style style:name="P82" style:family="paragraph" style:parent-style-name="Standard">
      <style:text-properties fo:language="en" fo:country="US" officeooo:rsid="00383b71" officeooo:paragraph-rsid="004b0ef6"/>
    </style:style>
    <style:style style:name="P83" style:family="paragraph" style:parent-style-name="Standard">
      <style:text-properties fo:language="en" fo:country="US" officeooo:rsid="002d240f" officeooo:paragraph-rsid="002d240f"/>
    </style:style>
    <style:style style:name="P84" style:family="paragraph" style:parent-style-name="Standard">
      <style:text-properties fo:language="en" fo:country="US" officeooo:rsid="002d240f" officeooo:paragraph-rsid="00438696"/>
    </style:style>
    <style:style style:name="P85" style:family="paragraph" style:parent-style-name="Standard">
      <style:text-properties fo:language="en" fo:country="US" officeooo:rsid="002d240f" officeooo:paragraph-rsid="004b0ef6"/>
    </style:style>
    <style:style style:name="P86" style:family="paragraph" style:parent-style-name="Standard">
      <style:text-properties fo:language="en" fo:country="US"/>
    </style:style>
    <style:style style:name="P87" style:family="paragraph" style:parent-style-name="Standard">
      <style:text-properties fo:language="en" fo:country="US" officeooo:paragraph-rsid="00438696"/>
    </style:style>
    <style:style style:name="P88" style:family="paragraph" style:parent-style-name="Standard">
      <style:text-properties fo:language="en" fo:country="US" officeooo:paragraph-rsid="004b0ef6"/>
    </style:style>
    <style:style style:name="P89" style:family="paragraph" style:parent-style-name="Standard">
      <style:text-properties fo:language="zxx" fo:country="none" style:language-asian="zxx" style:country-asian="none" style:language-complex="zxx" style:country-complex="none"/>
    </style:style>
    <style:style style:name="P90" style:family="paragraph" style:parent-style-name="Standard">
      <style:text-properties fo:language="zxx" fo:country="none" officeooo:paragraph-rsid="004b0ef6" style:language-asian="zxx" style:country-asian="none" style:language-complex="zxx" style:country-complex="none"/>
    </style:style>
    <style:style style:name="P91" style:family="paragraph" style:parent-style-name="Standard">
      <style:text-properties officeooo:paragraph-rsid="002c7052"/>
    </style:style>
    <style:style style:name="P92" style:family="paragraph" style:parent-style-name="Standard">
      <style:text-properties officeooo:rsid="002ca7c3" officeooo:paragraph-rsid="002ca7c3"/>
    </style:style>
    <style:style style:name="P93" style:family="paragraph" style:parent-style-name="Standard">
      <style:text-properties officeooo:rsid="002ca7c3" officeooo:paragraph-rsid="00438696"/>
    </style:style>
    <style:style style:name="P94" style:family="paragraph" style:parent-style-name="Standard">
      <style:text-properties officeooo:rsid="002ca7c3" officeooo:paragraph-rsid="004b0ef6"/>
    </style:style>
    <style:style style:name="P95" style:family="paragraph" style:parent-style-name="Standard">
      <style:text-properties officeooo:paragraph-rsid="002d240f"/>
    </style:style>
    <style:style style:name="P96" style:family="paragraph" style:parent-style-name="Standard">
      <style:text-properties officeooo:paragraph-rsid="00438696"/>
    </style:style>
    <style:style style:name="P97" style:family="paragraph" style:parent-style-name="Standard">
      <style:text-properties officeooo:paragraph-rsid="004b0ef6"/>
    </style:style>
    <style:style style:name="P98" style:family="paragraph" style:parent-style-name="Table_20_Contents">
      <style:paragraph-properties fo:text-align="center" style:justify-single-word="false"/>
      <style:text-properties fo:font-size="14pt" officeooo:rsid="004ab73d" officeooo:paragraph-rsid="004ab73d" style:font-size-asian="14pt" style:font-size-complex="14pt"/>
    </style:style>
    <style:style style:name="P99" style:family="paragraph" style:parent-style-name="Table_20_Contents">
      <style:paragraph-properties fo:text-align="center" style:justify-single-word="false"/>
      <style:text-properties fo:font-size="14pt" style:font-size-asian="14pt" style:font-size-complex="14pt"/>
    </style:style>
    <style:style style:name="P100" style:family="paragraph" style:parent-style-name="Table_20_Contents">
      <style:paragraph-properties fo:text-align="center" style:justify-single-word="false"/>
      <style:text-properties fo:font-size="14pt" officeooo:rsid="005409bc" officeooo:paragraph-rsid="005409bc" style:font-size-asian="14pt" style:font-size-complex="14pt"/>
    </style:style>
    <style:style style:name="P101" style:family="paragraph" style:parent-style-name="Table_20_Contents">
      <style:text-properties fo:font-size="14pt" fo:language="zxx" fo:country="none" officeooo:rsid="00356e59" officeooo:paragraph-rsid="00356e59" style:font-size-asian="14pt" style:language-asian="zxx" style:country-asian="none" style:font-size-complex="14pt" style:language-complex="zxx" style:country-complex="none"/>
    </style:style>
    <style:style style:name="P102" style:family="paragraph" style:parent-style-name="Table_20_Contents">
      <style:text-properties fo:font-size="14pt" fo:language="zxx" fo:country="none" officeooo:rsid="00356e59" officeooo:paragraph-rsid="00438696" style:font-size-asian="14pt" style:language-asian="zxx" style:country-asian="none" style:font-size-complex="14pt" style:language-complex="zxx" style:country-complex="none"/>
    </style:style>
    <style:style style:name="P103" style:family="paragraph" style:parent-style-name="Table_20_Contents">
      <style:text-properties fo:font-size="14pt" fo:language="zxx" fo:country="none" officeooo:rsid="00356e59" officeooo:paragraph-rsid="004b0ef6" style:font-size-asian="14pt" style:language-asian="zxx" style:country-asian="none" style:font-size-complex="14pt" style:language-complex="zxx" style:country-complex="none"/>
    </style:style>
    <style:style style:name="P104" style:family="paragraph" style:parent-style-name="Table_20_Contents">
      <style:paragraph-properties fo:text-align="center" style:justify-single-word="false"/>
      <style:text-properties fo:font-size="14pt" fo:language="ru" fo:country="RU" officeooo:paragraph-rsid="004ab73d" style:font-size-asian="14pt" style:font-size-complex="14pt"/>
    </style:style>
    <style:style style:name="P105" style:family="paragraph" style:parent-style-name="Table_20_Contents">
      <style:text-properties fo:font-size="14pt" fo:language="ru" fo:country="RU" officeooo:rsid="00214e76" officeooo:paragraph-rsid="00226100" style:font-size-asian="14pt" style:font-size-complex="14pt"/>
    </style:style>
    <style:style style:name="P106" style:family="paragraph" style:parent-style-name="Table_20_Contents">
      <style:text-properties fo:font-size="14pt" fo:language="ru" fo:country="RU" officeooo:rsid="00214e76" officeooo:paragraph-rsid="00214e76" style:font-size-asian="14pt" style:font-size-complex="14pt"/>
    </style:style>
    <style:style style:name="P107" style:family="paragraph" style:parent-style-name="Table_20_Contents">
      <style:text-properties fo:font-size="14pt" fo:language="ru" fo:country="RU" officeooo:rsid="00123a8f" officeooo:paragraph-rsid="00226100" style:font-size-asian="14pt" style:font-size-complex="14pt"/>
    </style:style>
    <style:style style:name="P108" style:family="paragraph" style:parent-style-name="Table_20_Contents">
      <style:text-properties fo:font-size="14pt" fo:language="ru" fo:country="RU" officeooo:rsid="00123a8f" officeooo:paragraph-rsid="00123a8f" style:font-size-asian="14pt" style:font-size-complex="14pt"/>
    </style:style>
    <style:style style:name="P109" style:family="paragraph" style:parent-style-name="Table_20_Contents">
      <style:text-properties fo:font-size="14pt" fo:language="ru" fo:country="RU" officeooo:rsid="001bed3a" officeooo:paragraph-rsid="001bed3a" style:font-size-asian="14pt" style:font-size-complex="14pt"/>
    </style:style>
    <style:style style:name="P110" style:family="paragraph" style:parent-style-name="Table_20_Contents">
      <style:paragraph-properties fo:text-align="center" style:justify-single-word="false"/>
      <style:text-properties fo:font-size="14pt" fo:language="ru" fo:country="RU" officeooo:rsid="005409bc" officeooo:paragraph-rsid="005409bc" style:font-size-asian="14pt" style:font-size-complex="14pt"/>
    </style:style>
    <style:style style:name="P111" style:family="paragraph" style:parent-style-name="Table_20_Contents">
      <style:text-properties fo:font-size="14pt" fo:language="ru" fo:country="RU" fo:font-style="normal" officeooo:rsid="00123a8f" officeooo:paragraph-rsid="00226100" style:font-size-asian="14pt" style:font-style-asian="normal" style:font-size-complex="14pt" style:font-style-complex="normal"/>
    </style:style>
    <style:style style:name="P112" style:family="paragraph" style:parent-style-name="Table_20_Contents">
      <style:text-properties fo:font-size="14pt" fo:language="ru" fo:country="RU" fo:font-style="normal" officeooo:rsid="00123a8f" officeooo:paragraph-rsid="00214e76" style:font-size-asian="14pt" style:font-style-asian="normal" style:font-size-complex="14pt" style:font-style-complex="normal"/>
    </style:style>
    <style:style style:name="P113" style:family="paragraph" style:parent-style-name="Table_20_Contents">
      <style:text-properties fo:font-size="14pt" fo:language="ru" fo:country="RU" fo:font-style="normal" officeooo:rsid="00155f1d" officeooo:paragraph-rsid="00226100" style:font-size-asian="14pt" style:font-style-asian="normal" style:font-size-complex="14pt" style:font-style-complex="normal"/>
    </style:style>
    <style:style style:name="P114" style:family="paragraph" style:parent-style-name="Table_20_Contents">
      <style:text-properties fo:font-size="14pt" fo:language="ru" fo:country="RU" fo:font-style="normal" officeooo:rsid="00155f1d" officeooo:paragraph-rsid="00214e76" style:font-size-asian="14pt" style:font-style-asian="normal" style:font-size-complex="14pt" style:font-style-complex="normal"/>
    </style:style>
    <style:style style:name="P115" style:family="paragraph" style:parent-style-name="Table_20_Contents">
      <style:text-properties fo:font-size="14pt" fo:language="ru" fo:country="RU" fo:font-style="normal" officeooo:rsid="00226100" officeooo:paragraph-rsid="00226100" style:font-size-asian="14pt" style:font-style-asian="normal" style:font-size-complex="14pt" style:font-style-complex="normal"/>
    </style:style>
    <style:style style:name="P116" style:family="paragraph" style:parent-style-name="Table_20_Contents">
      <style:text-properties fo:font-size="14pt" fo:language="ru" fo:country="RU" fo:font-style="normal" officeooo:rsid="00214e76" officeooo:paragraph-rsid="00214e76" style:font-size-asian="14pt" style:font-style-asian="normal" style:font-size-complex="14pt" style:font-style-complex="normal"/>
    </style:style>
    <style:style style:name="P117" style:family="paragraph" style:parent-style-name="Table_20_Contents">
      <style:text-properties fo:font-size="10pt" officeooo:paragraph-rsid="003a14e5" style:font-size-asian="10pt" style:font-size-complex="10pt"/>
    </style:style>
    <style:style style:name="P118" style:family="paragraph" style:parent-style-name="Table_20_Contents">
      <style:text-properties fo:font-size="10pt" officeooo:paragraph-rsid="002e175e" style:font-size-asian="10pt" style:font-size-complex="10pt"/>
    </style:style>
    <style:style style:name="P119" style:family="paragraph" style:parent-style-name="Table_20_Contents">
      <style:text-properties fo:font-size="10pt" officeooo:paragraph-rsid="00438696" style:font-size-asian="10pt" style:font-size-complex="10pt"/>
    </style:style>
    <style:style style:name="P120" style:family="paragraph" style:parent-style-name="Table_20_Contents">
      <style:text-properties fo:font-size="10pt" officeooo:paragraph-rsid="004b0ef6" style:font-size-asian="10pt" style:font-size-complex="10pt"/>
    </style:style>
    <style:style style:name="P121" style:family="paragraph" style:parent-style-name="Table_20_Contents">
      <style:text-properties fo:font-size="10pt" fo:language="zxx" fo:country="none" style:font-size-asian="10pt" style:language-asian="zxx" style:country-asian="none" style:font-size-complex="10pt" style:language-complex="zxx" style:country-complex="none"/>
    </style:style>
    <style:style style:name="P122" style:family="paragraph" style:parent-style-name="Table_20_Contents">
      <style:text-properties fo:font-size="10pt" fo:language="zxx" fo:country="none" officeooo:rsid="00385f0c" officeooo:paragraph-rsid="00385f0c" style:font-size-asian="10pt" style:language-asian="zxx" style:country-asian="none" style:font-size-complex="10pt" style:language-complex="zxx" style:country-complex="none"/>
    </style:style>
    <style:style style:name="P123" style:family="paragraph" style:parent-style-name="Table_20_Contents">
      <style:text-properties fo:font-size="10pt" fo:language="zxx" fo:country="none" officeooo:paragraph-rsid="00383b71" style:font-size-asian="10pt" style:language-asian="zxx" style:country-asian="none" style:font-size-complex="10pt" style:language-complex="zxx" style:country-complex="none"/>
    </style:style>
    <style:style style:name="P124" style:family="paragraph" style:parent-style-name="Table_20_Contents">
      <style:text-properties fo:font-size="10pt" fo:language="zxx" fo:country="none" officeooo:rsid="00339d5a" officeooo:paragraph-rsid="00375c06" style:font-size-asian="10pt" style:language-asian="zxx" style:country-asian="none" style:font-size-complex="10pt" style:language-complex="zxx" style:country-complex="none"/>
    </style:style>
    <style:style style:name="P125" style:family="paragraph" style:parent-style-name="Table_20_Contents">
      <style:text-properties fo:font-size="10pt" fo:language="zxx" fo:country="none" officeooo:rsid="00339d5a" officeooo:paragraph-rsid="00339d5a" style:font-size-asian="10pt" style:language-asian="zxx" style:country-asian="none" style:font-size-complex="10pt" style:language-complex="zxx" style:country-complex="none"/>
    </style:style>
    <style:style style:name="P126" style:family="paragraph" style:parent-style-name="Table_20_Contents">
      <style:text-properties fo:font-size="10pt" fo:language="zxx" fo:country="none" officeooo:rsid="00339d5a" officeooo:paragraph-rsid="00438696" style:font-size-asian="10pt" style:language-asian="zxx" style:country-asian="none" style:font-size-complex="10pt" style:language-complex="zxx" style:country-complex="none"/>
    </style:style>
    <style:style style:name="P127" style:family="paragraph" style:parent-style-name="Table_20_Contents">
      <style:text-properties fo:font-size="10pt" fo:language="zxx" fo:country="none" officeooo:paragraph-rsid="0030d524" style:font-size-asian="10pt" style:language-asian="zxx" style:country-asian="none" style:font-size-complex="10pt" style:language-complex="zxx" style:country-complex="none"/>
    </style:style>
    <style:style style:name="P128" style:family="paragraph" style:parent-style-name="Table_20_Contents">
      <style:text-properties fo:font-size="10pt" fo:language="zxx" fo:country="none" officeooo:paragraph-rsid="002f958f" style:font-size-asian="10pt" style:language-asian="zxx" style:country-asian="none" style:font-size-complex="10pt" style:language-complex="zxx" style:country-complex="none"/>
    </style:style>
    <style:style style:name="P129" style:family="paragraph" style:parent-style-name="Table_20_Contents">
      <style:text-properties fo:font-size="10pt" fo:language="zxx" fo:country="none" officeooo:paragraph-rsid="002f2fe7" style:font-size-asian="10pt" style:language-asian="zxx" style:country-asian="none" style:font-size-complex="10pt" style:language-complex="zxx" style:country-complex="none"/>
    </style:style>
    <style:style style:name="P130" style:family="paragraph" style:parent-style-name="Table_20_Contents">
      <style:text-properties fo:font-size="10pt" fo:language="zxx" fo:country="none" officeooo:paragraph-rsid="002d240f" style:font-size-asian="10pt" style:language-asian="zxx" style:country-asian="none" style:font-size-complex="10pt" style:language-complex="zxx" style:country-complex="none"/>
    </style:style>
    <style:style style:name="P131" style:family="paragraph" style:parent-style-name="Table_20_Contents">
      <style:text-properties fo:font-size="10pt" fo:language="zxx" fo:country="none" officeooo:paragraph-rsid="002dbf5b" style:font-size-asian="10pt" style:language-asian="zxx" style:country-asian="none" style:font-size-complex="10pt" style:language-complex="zxx" style:country-complex="none"/>
    </style:style>
    <style:style style:name="P132" style:family="paragraph" style:parent-style-name="Table_20_Contents">
      <style:text-properties fo:font-size="10pt" fo:language="zxx" fo:country="none" officeooo:rsid="002c401f" officeooo:paragraph-rsid="002d240f" style:font-size-asian="10pt" style:language-asian="zxx" style:country-asian="none" style:font-size-complex="10pt" style:language-complex="zxx" style:country-complex="none"/>
    </style:style>
    <style:style style:name="P133" style:family="paragraph" style:parent-style-name="Table_20_Contents">
      <style:text-properties fo:font-size="10pt" fo:language="zxx" fo:country="none" officeooo:rsid="002c401f" officeooo:paragraph-rsid="002dbf5b" style:font-size-asian="10pt" style:language-asian="zxx" style:country-asian="none" style:font-size-complex="10pt" style:language-complex="zxx" style:country-complex="none"/>
    </style:style>
    <style:style style:name="P134" style:family="paragraph" style:parent-style-name="Table_20_Contents">
      <style:text-properties fo:font-size="10pt" fo:language="zxx" fo:country="none" officeooo:rsid="002c401f" officeooo:paragraph-rsid="002c7052" style:font-size-asian="10pt" style:language-asian="zxx" style:country-asian="none" style:font-size-complex="10pt" style:language-complex="zxx" style:country-complex="none"/>
    </style:style>
    <style:style style:name="P135" style:family="paragraph" style:parent-style-name="Table_20_Contents">
      <style:text-properties fo:font-size="10pt" fo:language="zxx" fo:country="none" officeooo:rsid="002c401f" officeooo:paragraph-rsid="00438696" style:font-size-asian="10pt" style:language-asian="zxx" style:country-asian="none" style:font-size-complex="10pt" style:language-complex="zxx" style:country-complex="none"/>
    </style:style>
    <style:style style:name="P136" style:family="paragraph" style:parent-style-name="Table_20_Contents">
      <style:text-properties fo:font-size="10pt" fo:language="zxx" fo:country="none" officeooo:rsid="002c401f" officeooo:paragraph-rsid="00453608" style:font-size-asian="10pt" style:language-asian="zxx" style:country-asian="none" style:font-size-complex="10pt" style:language-complex="zxx" style:country-complex="none"/>
    </style:style>
    <style:style style:name="P137" style:family="paragraph" style:parent-style-name="Table_20_Contents">
      <style:text-properties fo:font-size="10pt" fo:language="zxx" fo:country="none" officeooo:rsid="002c401f" officeooo:paragraph-rsid="00462626" style:font-size-asian="10pt" style:language-asian="zxx" style:country-asian="none" style:font-size-complex="10pt" style:language-complex="zxx" style:country-complex="none"/>
    </style:style>
    <style:style style:name="P138" style:family="paragraph" style:parent-style-name="Table_20_Contents">
      <style:text-properties fo:font-size="10pt" fo:language="zxx" fo:country="none" officeooo:rsid="002c401f" officeooo:paragraph-rsid="004b0ef6" style:font-size-asian="10pt" style:language-asian="zxx" style:country-asian="none" style:font-size-complex="10pt" style:language-complex="zxx" style:country-complex="none"/>
    </style:style>
    <style:style style:name="P139" style:family="paragraph" style:parent-style-name="Table_20_Contents">
      <style:text-properties fo:font-size="10pt" fo:language="zxx" fo:country="none" officeooo:rsid="002c401f" officeooo:paragraph-rsid="004f1265" style:font-size-asian="10pt" style:language-asian="zxx" style:country-asian="none" style:font-size-complex="10pt" style:language-complex="zxx" style:country-complex="none"/>
    </style:style>
    <style:style style:name="P140" style:family="paragraph" style:parent-style-name="Table_20_Contents">
      <style:text-properties fo:font-size="10pt" fo:language="zxx" fo:country="none" officeooo:paragraph-rsid="002c7052" style:font-size-asian="10pt" style:language-asian="zxx" style:country-asian="none" style:font-size-complex="10pt" style:language-complex="zxx" style:country-complex="none"/>
    </style:style>
    <style:style style:name="P141" style:family="paragraph" style:parent-style-name="Table_20_Contents">
      <style:text-properties fo:font-size="10pt" fo:language="zxx" fo:country="none" officeooo:paragraph-rsid="003a14e5" style:font-size-asian="10pt" style:language-asian="zxx" style:country-asian="none" style:font-size-complex="10pt" style:language-complex="zxx" style:country-complex="none"/>
    </style:style>
    <style:style style:name="P142" style:family="paragraph" style:parent-style-name="Table_20_Contents">
      <style:text-properties fo:font-size="10pt" fo:language="zxx" fo:country="none" officeooo:paragraph-rsid="003be776" style:font-size-asian="10pt" style:language-asian="zxx" style:country-asian="none" style:font-size-complex="10pt" style:language-complex="zxx" style:country-complex="none"/>
    </style:style>
    <style:style style:name="P143" style:family="paragraph" style:parent-style-name="Table_20_Contents">
      <style:text-properties fo:font-size="10pt" fo:language="zxx" fo:country="none" officeooo:paragraph-rsid="003cf3bb" style:font-size-asian="10pt" style:language-asian="zxx" style:country-asian="none" style:font-size-complex="10pt" style:language-complex="zxx" style:country-complex="none"/>
    </style:style>
    <style:style style:name="P144" style:family="paragraph" style:parent-style-name="Table_20_Contents">
      <style:text-properties fo:font-size="10pt" fo:language="zxx" fo:country="none" officeooo:paragraph-rsid="003f2ec9" style:font-size-asian="10pt" style:language-asian="zxx" style:country-asian="none" style:font-size-complex="10pt" style:language-complex="zxx" style:country-complex="none"/>
    </style:style>
    <style:style style:name="P145" style:family="paragraph" style:parent-style-name="Table_20_Contents">
      <style:text-properties fo:font-size="10pt" fo:language="zxx" fo:country="none" officeooo:rsid="003f2ec9" officeooo:paragraph-rsid="003f2ec9" style:font-size-asian="10pt" style:language-asian="zxx" style:country-asian="none" style:font-size-complex="10pt" style:language-complex="zxx" style:country-complex="none"/>
    </style:style>
    <style:style style:name="P146" style:family="paragraph" style:parent-style-name="Table_20_Contents">
      <style:text-properties fo:font-size="10pt" fo:language="zxx" fo:country="none" officeooo:rsid="003f2ec9" officeooo:paragraph-rsid="00438696" style:font-size-asian="10pt" style:language-asian="zxx" style:country-asian="none" style:font-size-complex="10pt" style:language-complex="zxx" style:country-complex="none"/>
    </style:style>
    <style:style style:name="P147" style:family="paragraph" style:parent-style-name="Table_20_Contents">
      <style:text-properties fo:font-size="10pt" fo:language="zxx" fo:country="none" officeooo:rsid="003f2ec9" officeooo:paragraph-rsid="004b0ef6" style:font-size-asian="10pt" style:language-asian="zxx" style:country-asian="none" style:font-size-complex="10pt" style:language-complex="zxx" style:country-complex="none"/>
    </style:style>
    <style:style style:name="P148" style:family="paragraph" style:parent-style-name="Table_20_Contents">
      <style:text-properties fo:font-size="10pt" fo:language="zxx" fo:country="none" officeooo:paragraph-rsid="00407b15" style:font-size-asian="10pt" style:language-asian="zxx" style:country-asian="none" style:font-size-complex="10pt" style:language-complex="zxx" style:country-complex="none"/>
    </style:style>
    <style:style style:name="P149" style:family="paragraph" style:parent-style-name="Table_20_Contents">
      <style:paragraph-properties fo:text-align="start" style:justify-single-word="false"/>
      <style:text-properties fo:font-size="10pt" fo:language="zxx" fo:country="none" style:font-size-asian="10pt" style:language-asian="zxx" style:country-asian="none" style:font-size-complex="10pt" style:language-complex="zxx" style:country-complex="none"/>
    </style:style>
    <style:style style:name="P150" style:family="paragraph" style:parent-style-name="Table_20_Contents">
      <style:paragraph-properties fo:text-align="start" style:justify-single-word="false"/>
      <style:text-properties fo:font-size="10pt" fo:language="zxx" fo:country="none" officeooo:paragraph-rsid="00438696" style:font-size-asian="10pt" style:language-asian="zxx" style:country-asian="none" style:font-size-complex="10pt" style:language-complex="zxx" style:country-complex="none"/>
    </style:style>
    <style:style style:name="P151" style:family="paragraph" style:parent-style-name="Table_20_Contents">
      <style:text-properties fo:font-size="10pt" fo:language="zxx" fo:country="none" officeooo:paragraph-rsid="00438696" style:font-size-asian="10pt" style:language-asian="zxx" style:country-asian="none" style:font-size-complex="10pt" style:language-complex="zxx" style:country-complex="none"/>
    </style:style>
    <style:style style:name="P152" style:family="paragraph" style:parent-style-name="Table_20_Contents">
      <style:text-properties fo:font-size="10pt" fo:language="zxx" fo:country="none" officeooo:rsid="00438696" officeooo:paragraph-rsid="00438696" style:font-size-asian="10pt" style:language-asian="zxx" style:country-asian="none" style:font-size-complex="10pt" style:language-complex="zxx" style:country-complex="none"/>
    </style:style>
    <style:style style:name="P153" style:family="paragraph" style:parent-style-name="Table_20_Contents">
      <style:text-properties fo:font-size="10pt" fo:language="zxx" fo:country="none" officeooo:rsid="00462626" officeooo:paragraph-rsid="00462626" style:font-size-asian="10pt" style:language-asian="zxx" style:country-asian="none" style:font-size-complex="10pt" style:language-complex="zxx" style:country-complex="none"/>
    </style:style>
    <style:style style:name="P154" style:family="paragraph" style:parent-style-name="Table_20_Contents">
      <style:text-properties fo:font-size="10pt" fo:language="zxx" fo:country="none" officeooo:paragraph-rsid="00473e9b" style:font-size-asian="10pt" style:language-asian="zxx" style:country-asian="none" style:font-size-complex="10pt" style:language-complex="zxx" style:country-complex="none"/>
    </style:style>
    <style:style style:name="P155" style:family="paragraph" style:parent-style-name="Table_20_Contents">
      <style:text-properties fo:font-size="10pt" fo:language="zxx" fo:country="none" officeooo:paragraph-rsid="004925b7" style:font-size-asian="10pt" style:language-asian="zxx" style:country-asian="none" style:font-size-complex="10pt" style:language-complex="zxx" style:country-complex="none"/>
    </style:style>
    <style:style style:name="P156" style:family="paragraph" style:parent-style-name="Table_20_Contents">
      <style:text-properties fo:font-size="10pt" fo:language="zxx" fo:country="none" officeooo:paragraph-rsid="004b0ef6" style:font-size-asian="10pt" style:language-asian="zxx" style:country-asian="none" style:font-size-complex="10pt" style:language-complex="zxx" style:country-complex="none"/>
    </style:style>
    <style:style style:name="P157" style:family="paragraph" style:parent-style-name="Table_20_Contents">
      <style:text-properties fo:font-size="10pt" fo:language="zxx" fo:country="none" officeooo:paragraph-rsid="00503d6e" style:font-size-asian="10pt" style:language-asian="zxx" style:country-asian="none" style:font-size-complex="10pt" style:language-complex="zxx" style:country-complex="none"/>
    </style:style>
    <style:style style:name="P158" style:family="paragraph" style:parent-style-name="Table_20_Contents">
      <style:text-properties fo:font-size="10pt" fo:language="zxx" fo:country="none" officeooo:rsid="00533fd5" officeooo:paragraph-rsid="00533fd5" style:font-size-asian="10pt" style:language-asian="zxx" style:country-asian="none" style:font-size-complex="10pt" style:language-complex="zxx" style:country-complex="none"/>
    </style:style>
    <style:style style:name="P159" style:family="paragraph" style:parent-style-name="Table_20_Contents">
      <style:text-properties fo:font-size="10pt" fo:language="zxx" fo:country="none" officeooo:paragraph-rsid="00533fd5" style:font-size-asian="10pt" style:language-asian="zxx" style:country-asian="none" style:font-size-complex="10pt" style:language-complex="zxx" style:country-complex="none"/>
    </style:style>
    <style:style style:name="P160" style:family="paragraph" style:parent-style-name="Table_20_Contents">
      <style:text-properties fo:font-size="10pt" fo:language="zxx" fo:country="none" officeooo:paragraph-rsid="005409bc" style:font-size-asian="10pt" style:language-asian="zxx" style:country-asian="none" style:font-size-complex="10pt" style:language-complex="zxx" style:country-complex="none"/>
    </style:style>
    <style:style style:name="P161" style:family="paragraph" style:parent-style-name="Table_20_Contents">
      <style:text-properties fo:font-size="10pt" fo:language="zxx" fo:country="none" fo:background-color="#ffff00" style:font-size-asian="10pt" style:language-asian="zxx" style:country-asian="none" style:font-size-complex="10pt" style:language-complex="zxx" style:country-complex="none"/>
    </style:style>
    <style:style style:name="P162" style:family="paragraph" style:parent-style-name="Table_20_Contents">
      <style:text-properties fo:font-size="10pt" fo:language="zxx" fo:country="none" officeooo:paragraph-rsid="003f2ec9" fo:background-color="#ffff00" style:font-size-asian="10pt" style:language-asian="zxx" style:country-asian="none" style:font-size-complex="10pt" style:language-complex="zxx" style:country-complex="none"/>
    </style:style>
    <style:style style:name="P163" style:family="paragraph" style:parent-style-name="Table_20_Contents">
      <style:text-properties fo:font-size="10pt" fo:language="zxx" fo:country="none" officeooo:paragraph-rsid="004b0ef6" fo:background-color="#ffff00" style:font-size-asian="10pt" style:language-asian="zxx" style:country-asian="none" style:font-size-complex="10pt" style:language-complex="zxx" style:country-complex="none"/>
    </style:style>
    <style:style style:name="P164" style:family="paragraph" style:parent-style-name="Table_20_Contents">
      <style:paragraph-properties fo:text-align="start" style:justify-single-word="false"/>
      <style:text-properties fo:font-size="10pt" fo:language="zxx" fo:country="none" officeooo:paragraph-rsid="00438696" fo:background-color="transparent" style:font-size-asian="10pt" style:language-asian="zxx" style:country-asian="none" style:font-size-complex="10pt" style:language-complex="zxx" style:country-complex="none"/>
    </style:style>
    <style:style style:name="P165" style:family="paragraph" style:parent-style-name="Table_20_Contents">
      <style:text-properties fo:font-size="10pt" fo:language="zxx" fo:country="none" officeooo:paragraph-rsid="00453608" fo:background-color="transparent" style:font-size-asian="10pt" style:language-asian="zxx" style:country-asian="none" style:font-size-complex="10pt" style:language-complex="zxx" style:country-complex="none"/>
    </style:style>
    <style:style style:name="P166" style:family="paragraph" style:parent-style-name="Table_20_Contents">
      <style:text-properties fo:font-size="10pt" fo:language="zxx" fo:country="none" officeooo:paragraph-rsid="00473e9b" fo:background-color="transparent" style:font-size-asian="10pt" style:language-asian="zxx" style:country-asian="none" style:font-size-complex="10pt" style:language-complex="zxx" style:country-complex="none"/>
    </style:style>
    <style:style style:name="P167" style:family="paragraph" style:parent-style-name="Table_20_Contents">
      <style:text-properties fo:font-size="10pt" fo:language="zxx" fo:country="none" officeooo:paragraph-rsid="004b0ef6" fo:background-color="transparent" style:font-size-asian="10pt" style:language-asian="zxx" style:country-asian="none" style:font-size-complex="10pt" style:language-complex="zxx" style:country-complex="none"/>
    </style:style>
    <style:style style:name="P168" style:family="paragraph" style:parent-style-name="Table_20_Contents">
      <style:text-properties fo:font-size="10pt" fo:language="zxx" fo:country="none" officeooo:paragraph-rsid="004f1265" fo:background-color="transparent" style:font-size-asian="10pt" style:language-asian="zxx" style:country-asian="none" style:font-size-complex="10pt" style:language-complex="zxx" style:country-complex="none"/>
    </style:style>
    <style:style style:name="P169" style:family="paragraph" style:parent-style-name="Table_20_Contents">
      <style:text-properties fo:font-size="10pt" fo:language="zxx" fo:country="none" officeooo:rsid="00339d5a" officeooo:paragraph-rsid="00438696" fo:background-color="transparent" style:font-size-asian="10pt" style:language-asian="zxx" style:country-asian="none" style:font-size-complex="10pt" style:language-complex="zxx" style:country-complex="none"/>
    </style:style>
    <style:style style:name="P170" style:family="paragraph" style:parent-style-name="Table_20_Contents">
      <style:text-properties fo:font-size="10pt" fo:language="zxx" fo:country="none" officeooo:rsid="00339d5a" officeooo:paragraph-rsid="00479fd9" fo:background-color="transparent" style:font-size-asian="10pt" style:language-asian="zxx" style:country-asian="none" style:font-size-complex="10pt" style:language-complex="zxx" style:country-complex="none"/>
    </style:style>
    <style:style style:name="P171" style:family="paragraph" style:parent-style-name="Table_20_Contents">
      <style:text-properties fo:font-size="10pt" fo:language="zxx" fo:country="none" officeooo:rsid="00339d5a" officeooo:paragraph-rsid="004b0ef6" fo:background-color="transparent" style:font-size-asian="10pt" style:language-asian="zxx" style:country-asian="none" style:font-size-complex="10pt" style:language-complex="zxx" style:country-complex="none"/>
    </style:style>
    <style:style style:name="P172" style:family="paragraph" style:parent-style-name="Table_20_Contents">
      <style:text-properties fo:font-size="10pt" fo:language="zxx" fo:country="none" officeooo:rsid="00339d5a" officeooo:paragraph-rsid="00530357" fo:background-color="transparent" style:font-size-asian="10pt" style:language-asian="zxx" style:country-asian="none" style:font-size-complex="10pt" style:language-complex="zxx" style:country-complex="none"/>
    </style:style>
    <style:style style:name="P173" style:family="paragraph" style:parent-style-name="Table_20_Contents">
      <style:text-properties fo:language="zxx" fo:country="none" style:language-asian="zxx" style:country-asian="none" style:language-complex="zxx" style:country-complex="none"/>
    </style:style>
    <style:style style:name="P174" style:family="paragraph" style:parent-style-name="Table_20_Contents">
      <style:text-properties fo:language="zxx" fo:country="none" officeooo:paragraph-rsid="00383b71" style:language-asian="zxx" style:country-asian="none" style:language-complex="zxx" style:country-complex="none"/>
    </style:style>
    <style:style style:name="P175" style:family="paragraph" style:parent-style-name="Table_20_Contents">
      <style:text-properties fo:language="zxx" fo:country="none" officeooo:rsid="002c401f" officeooo:paragraph-rsid="002c7052" style:language-asian="zxx" style:country-asian="none" style:language-complex="zxx" style:country-complex="none"/>
    </style:style>
    <style:style style:name="P176" style:family="paragraph" style:parent-style-name="Table_20_Contents">
      <style:text-properties fo:language="zxx" fo:country="none" officeooo:rsid="002c401f" officeooo:paragraph-rsid="002c401f" style:language-asian="zxx" style:country-asian="none" style:language-complex="zxx" style:country-complex="none"/>
    </style:style>
    <style:style style:name="P177" style:family="paragraph" style:parent-style-name="Table_20_Contents">
      <style:text-properties fo:language="zxx" fo:country="none" officeooo:rsid="002c401f" officeooo:paragraph-rsid="004b0ef6" style:language-asian="zxx" style:country-asian="none" style:language-complex="zxx" style:country-complex="none"/>
    </style:style>
    <style:style style:name="P178" style:family="paragraph" style:parent-style-name="Table_20_Contents">
      <style:paragraph-properties fo:text-align="start" style:justify-single-word="false"/>
      <style:text-properties fo:language="zxx" fo:country="none" officeooo:paragraph-rsid="00426951" style:language-asian="zxx" style:country-asian="none" style:language-complex="zxx" style:country-complex="none"/>
    </style:style>
    <style:style style:name="P179" style:family="paragraph" style:parent-style-name="Table_20_Contents">
      <style:paragraph-properties fo:text-align="start" style:justify-single-word="false"/>
      <style:text-properties fo:language="zxx" fo:country="none" style:language-asian="zxx" style:country-asian="none" style:language-complex="zxx" style:country-complex="none"/>
    </style:style>
    <style:style style:name="P180" style:family="paragraph" style:parent-style-name="Table_20_Contents">
      <style:text-properties fo:language="zxx" fo:country="none" officeooo:paragraph-rsid="00438696" style:language-asian="zxx" style:country-asian="none" style:language-complex="zxx" style:country-complex="none"/>
    </style:style>
    <style:style style:name="P181" style:family="paragraph" style:parent-style-name="Table_20_Contents">
      <style:text-properties fo:language="zxx" fo:country="none" officeooo:paragraph-rsid="004b0ef6" style:language-asian="zxx" style:country-asian="none" style:language-complex="zxx" style:country-complex="none"/>
    </style:style>
    <style:style style:name="P182" style:family="paragraph" style:parent-style-name="Table_20_Contents">
      <style:text-properties fo:font-size="12pt" fo:language="zxx" fo:country="none" officeooo:rsid="002c401f" officeooo:paragraph-rsid="002f2fe7" style:font-size-asian="12pt" style:language-asian="zxx" style:country-asian="none" style:font-size-complex="12pt" style:language-complex="zxx" style:country-complex="none"/>
    </style:style>
    <style:style style:name="P183" style:family="paragraph" style:parent-style-name="Table_20_Contents">
      <style:text-properties fo:font-size="12pt" fo:language="zxx" fo:country="none" officeooo:rsid="002c401f" officeooo:paragraph-rsid="00438696" style:font-size-asian="12pt" style:language-asian="zxx" style:country-asian="none" style:font-size-complex="12pt" style:language-complex="zxx" style:country-complex="none"/>
    </style:style>
    <style:style style:name="P184" style:family="paragraph" style:parent-style-name="Table_20_Contents">
      <style:text-properties fo:font-size="12pt" fo:language="zxx" fo:country="none" officeooo:rsid="002c401f" officeooo:paragraph-rsid="00453608" style:font-size-asian="12pt" style:language-asian="zxx" style:country-asian="none" style:font-size-complex="12pt" style:language-complex="zxx" style:country-complex="none"/>
    </style:style>
    <style:style style:name="P185" style:family="paragraph" style:parent-style-name="Table_20_Contents">
      <style:text-properties fo:font-size="12pt" fo:language="zxx" fo:country="none" officeooo:rsid="002c401f" officeooo:paragraph-rsid="004b0ef6" style:font-size-asian="12pt" style:language-asian="zxx" style:country-asian="none" style:font-size-complex="12pt" style:language-complex="zxx" style:country-complex="none"/>
    </style:style>
    <style:style style:name="P186" style:family="paragraph" style:parent-style-name="Table_20_Contents">
      <style:text-properties fo:font-size="12pt" fo:language="zxx" fo:country="none" style:font-size-asian="12pt" style:language-asian="zxx" style:country-asian="none" style:font-size-complex="12pt" style:language-complex="zxx" style:country-complex="none"/>
    </style:style>
    <style:style style:name="P187" style:family="paragraph" style:parent-style-name="Table_20_Contents">
      <style:text-properties fo:font-size="12pt" fo:language="zxx" fo:country="none" officeooo:paragraph-rsid="00438696" style:font-size-asian="12pt" style:language-asian="zxx" style:country-asian="none" style:font-size-complex="12pt" style:language-complex="zxx" style:country-complex="none"/>
    </style:style>
    <style:style style:name="P188" style:family="paragraph" style:parent-style-name="Table_20_Contents">
      <style:text-properties fo:font-size="12pt" fo:language="zxx" fo:country="none" officeooo:paragraph-rsid="00474f03" style:font-size-asian="12pt" style:language-asian="zxx" style:country-asian="none" style:font-size-complex="12pt" style:language-complex="zxx" style:country-complex="none"/>
    </style:style>
    <style:style style:name="P189" style:family="paragraph" style:parent-style-name="Table_20_Contents">
      <style:text-properties fo:font-size="12pt" fo:language="zxx" fo:country="none" officeooo:paragraph-rsid="004b0ef6" style:font-size-asian="12pt" style:language-asian="zxx" style:country-asian="none" style:font-size-complex="12pt" style:language-complex="zxx" style:country-complex="none"/>
    </style:style>
    <style:style style:name="P190" style:family="paragraph" style:parent-style-name="Table_20_Contents">
      <style:text-properties officeooo:paragraph-rsid="002c7052"/>
    </style:style>
    <style:style style:name="P191" style:family="paragraph" style:parent-style-name="Text_20_body">
      <style:paragraph-properties fo:text-align="start" style:justify-single-word="false"/>
    </style:style>
    <style:style style:name="P192" style:family="paragraph" style:parent-style-name="Text_20_body">
      <style:paragraph-properties fo:text-align="start" style:justify-single-word="false"/>
      <style:text-properties officeooo:paragraph-rsid="00426951"/>
    </style:style>
    <style:style style:name="P193" style:family="paragraph" style:parent-style-name="Title">
      <style:paragraph-properties fo:break-before="page"/>
      <style:text-properties officeooo:rsid="002c401f" officeooo:paragraph-rsid="002c401f"/>
    </style:style>
    <style:style style:name="P194" style:family="paragraph" style:parent-style-name="Title">
      <style:paragraph-properties fo:break-before="page"/>
    </style:style>
    <style:style style:name="P195" style:family="paragraph" style:parent-style-name="Title">
      <style:paragraph-properties fo:break-before="page"/>
      <style:text-properties officeooo:rsid="004b0ef6" officeooo:paragraph-rsid="004b0ef6"/>
    </style:style>
    <style:style style:name="T1" style:family="text">
      <style:text-properties fo:language="en" fo:country="US"/>
    </style:style>
    <style:style style:name="T2" style:family="text">
      <style:text-properties fo:language="en" fo:country="US" officeooo:rsid="001a7c31"/>
    </style:style>
    <style:style style:name="T3" style:family="text">
      <style:text-properties fo:language="en" fo:country="US" officeooo:rsid="002e175e"/>
    </style:style>
    <style:style style:name="T4" style:family="text">
      <style:text-properties fo:language="en" fo:country="US" officeooo:rsid="00375c06"/>
    </style:style>
    <style:style style:name="T5" style:family="text">
      <style:text-properties fo:language="en" fo:country="US" officeooo:rsid="00383b71"/>
    </style:style>
    <style:style style:name="T6" style:family="text">
      <style:text-properties officeooo:rsid="0012ae3d"/>
    </style:style>
    <style:style style:name="T7" style:family="text">
      <style:text-properties officeooo:rsid="0016efa9"/>
    </style:style>
    <style:style style:name="T8" style:family="text">
      <style:text-properties officeooo:rsid="001a7c31"/>
    </style:style>
    <style:style style:name="T9" style:family="text">
      <style:text-properties officeooo:rsid="00214e76"/>
    </style:style>
    <style:style style:name="T10" style:family="text">
      <style:text-properties officeooo:rsid="00226100"/>
    </style:style>
    <style:style style:name="T11" style:family="text">
      <style:text-properties officeooo:rsid="00255cb5"/>
    </style:style>
    <style:style style:name="T12" style:family="text">
      <style:text-properties officeooo:rsid="0026c071"/>
    </style:style>
    <style:style style:name="T13" style:family="text">
      <style:text-properties officeooo:rsid="00155f1d" fo:background-color="transparent" loext:char-shading-value="0"/>
    </style:style>
    <style:style style:name="T14" style:family="text">
      <style:text-properties officeooo:rsid="002897e7" fo:background-color="transparent" loext:char-shading-value="0"/>
    </style:style>
    <style:style style:name="T15" style:family="text">
      <style:text-properties fo:background-color="transparent" loext:char-shading-value="0"/>
    </style:style>
    <style:style style:name="T16" style:family="text">
      <style:text-properties fo:font-size="14pt" style:font-size-asian="12.25pt" style:font-size-complex="14pt"/>
    </style:style>
    <style:style style:name="T17" style:family="text">
      <style:text-properties fo:font-size="14pt" officeooo:rsid="002e175e" style:font-size-asian="12.25pt" style:font-size-complex="14pt"/>
    </style:style>
    <style:style style:name="T18" style:family="text">
      <style:text-properties fo:font-size="14pt" officeooo:rsid="00462626" style:font-size-asian="12.25pt" style:font-size-complex="14pt"/>
    </style:style>
    <style:style style:name="T19" style:family="text">
      <style:text-properties fo:font-size="14pt" officeooo:rsid="00503d6e" style:font-size-asian="12.25pt" style:font-size-complex="14pt"/>
    </style:style>
    <style:style style:name="T20" style:family="text">
      <style:text-properties fo:font-size="14pt" fo:language="en" fo:country="US" officeooo:rsid="002c401f" style:font-size-asian="12.25pt" style:font-size-complex="14pt"/>
    </style:style>
    <style:style style:name="T21" style:family="text">
      <style:text-properties fo:font-size="14pt" fo:language="en" fo:country="US" officeooo:rsid="003a14e5" fo:background-color="transparent" loext:char-shading-value="0" style:font-size-asian="12.25pt" style:font-size-complex="14pt"/>
    </style:style>
    <style:style style:name="T22" style:family="text">
      <style:text-properties fo:font-size="14pt" officeooo:rsid="002e175e" style:font-size-asian="14pt" style:font-size-complex="14pt"/>
    </style:style>
    <style:style style:name="T23" style:family="text">
      <style:text-properties fo:font-size="14pt" fo:background-color="transparent" loext:char-shading-value="0" style:font-size-asian="12.25pt" style:font-size-complex="14pt"/>
    </style:style>
    <style:style style:name="T24" style:family="text">
      <style:text-properties fo:font-size="14pt" officeooo:rsid="003a14e5" fo:background-color="transparent" loext:char-shading-value="0" style:font-size-asian="12.25pt" style:font-size-complex="14pt"/>
    </style:style>
    <style:style style:name="T25" style:family="text">
      <style:text-properties fo:font-size="14pt" officeooo:rsid="003d3ddb" fo:background-color="transparent" loext:char-shading-value="0" style:font-size-asian="12.25pt" style:font-size-complex="14pt"/>
    </style:style>
    <style:style style:name="T26" style:family="text">
      <style:text-properties fo:font-size="14pt" officeooo:rsid="00473e9b" fo:background-color="transparent" loext:char-shading-value="0" style:font-size-asian="12.25pt" style:font-size-complex="14pt"/>
    </style:style>
    <style:style style:name="T27" style:family="text">
      <style:text-properties fo:font-size="14pt" officeooo:rsid="0048fe35" fo:background-color="transparent" loext:char-shading-value="0" style:font-size-asian="12.25pt" style:font-size-complex="14pt"/>
    </style:style>
    <style:style style:name="T28" style:family="text">
      <style:text-properties fo:font-size="14pt" officeooo:rsid="00497e63" fo:background-color="transparent" loext:char-shading-value="0" style:font-size-asian="12.25pt" style:font-size-complex="14pt"/>
    </style:style>
    <style:style style:name="T29" style:family="text">
      <style:text-properties fo:font-size="14pt" officeooo:rsid="00503d6e" fo:background-color="transparent" loext:char-shading-value="0" style:font-size-asian="12.25pt" style:font-size-complex="14pt"/>
    </style:style>
    <style:style style:name="T30" style:family="text">
      <style:text-properties fo:font-size="14pt" officeooo:rsid="00533fd5" fo:background-color="transparent" loext:char-shading-value="0" style:font-size-asian="12.25pt" style:font-size-complex="14pt"/>
    </style:style>
    <style:style style:name="T31" style:family="text">
      <style:text-properties fo:font-size="14pt" officeooo:rsid="005409bc" fo:background-color="transparent" loext:char-shading-value="0" style:font-size-asian="12.25pt" style:font-size-complex="14pt"/>
    </style:style>
    <style:style style:name="T32" style:family="text">
      <style:text-properties fo:font-size="14pt" fo:language="ru" fo:country="RU" officeooo:rsid="002c401f" style:font-size-asian="12.25pt" style:font-size-complex="14pt"/>
    </style:style>
    <style:style style:name="T33" style:family="text">
      <style:text-properties fo:font-size="14pt" fo:language="ru" fo:country="RU" officeooo:rsid="002e175e" style:font-size-asian="12.25pt" style:font-size-complex="14pt"/>
    </style:style>
    <style:style style:name="T34" style:family="text">
      <style:text-properties fo:font-size="10pt" style:font-size-asian="10pt" style:font-size-complex="10pt"/>
    </style:style>
    <style:style style:name="T35" style:family="text">
      <style:text-properties fo:font-size="10pt" fo:language="zxx" fo:country="none" style:font-size-asian="10pt" style:language-asian="zxx" style:country-asian="none" style:font-size-complex="10pt" style:language-complex="zxx" style:country-complex="none"/>
    </style:style>
    <style:style style:name="T36" style:family="text">
      <style:text-properties fo:color="#000000" loext:opacity="100%" fo:font-size="10pt" fo:language="zxx" fo:country="none" style:text-underline-style="none" style:font-size-asian="10pt" style:language-asian="zxx" style:country-asian="none" style:font-size-complex="10pt" style:language-complex="zxx" style:country-complex="none"/>
    </style:style>
    <style:style style:name="T37" style:family="text">
      <style:text-properties fo:background-color="#ffff00" loext:char-shading-value="0"/>
    </style:style>
    <style:style style:name="T38" style:family="text">
      <style:text-properties fo:background-color="#ffff00" loext:char-shading-value="0"/>
    </style:style>
    <style:style style:name="T39" style:family="text">
      <style:text-properties officeooo:rsid="002dbf5b"/>
    </style:style>
    <style:style style:name="T40" style:family="text">
      <style:text-properties fo:background-color="#81d41a" loext:char-shading-value="0"/>
    </style:style>
    <style:style style:name="T41" style:family="text">
      <style:text-properties fo:background-color="#81d41a" loext:char-shading-value="0"/>
    </style:style>
    <style:style style:name="T42" style:family="text">
      <style:text-properties officeooo:rsid="00375c06"/>
    </style:style>
    <style:style style:name="T43" style:family="text">
      <style:text-properties officeooo:rsid="00407b15"/>
    </style:style>
    <style:style style:name="T44" style:family="text">
      <style:text-properties officeooo:rsid="00426951"/>
    </style:style>
    <style:style style:name="T45" style:family="text">
      <style:text-properties officeooo:rsid="00438696"/>
    </style:style>
    <style:style style:name="T46" style:family="text">
      <style:text-properties officeooo:rsid="00453608"/>
    </style:style>
    <style:style style:name="T47" style:family="text">
      <style:text-properties officeooo:rsid="00479fd9"/>
    </style:style>
    <style:style style:name="T48" style:family="text">
      <style:text-properties officeooo:rsid="004925b7"/>
    </style:style>
    <style:style style:name="T49" style:family="text">
      <style:text-properties officeooo:rsid="004bcd73"/>
    </style:style>
    <style:style style:name="T50" style:family="text">
      <style:text-properties officeooo:rsid="004d6450"/>
    </style:style>
    <style:style style:name="T51" style:family="text">
      <style:text-properties officeooo:rsid="004eb3c8"/>
    </style:style>
    <style:style style:name="T52" style:family="text">
      <style:text-properties officeooo:rsid="00503d6e"/>
    </style:style>
    <style:style style:name="T53" style:family="text">
      <style:text-properties officeooo:rsid="0051f562"/>
    </style:style>
    <style:style style:name="T54" style:family="text">
      <style:text-properties officeooo:rsid="00533fd5"/>
    </style:style>
    <text:list-style style:name="L1">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Операционная система: "Ubuntu 24.04.4 LTS"</text:p>
      <text:p text:style-name="P24">Архитектура: x86-64</text:p>
      <text:p text:style-name="P24">Процессор: AMD Ryzen 5 7530U with Radeon Graphics<text:line-break/><text:line-break/><text:span text:style-name="T9">Версии</text:span> компилятор<text:span text:style-name="T9">ов</text:span>:</text:p>
      <text:p text:style-name="P24">gcc (Ubuntu 13.3.0-6ubuntu2~24.04.1) 13.3.0</text:p>
      <text:p text:style-name="P24">clang Ubuntu version 18.1.3 (1ubuntu1)</text:p>
      <text:p text:style-name="P24">compcert 3.17</text:p>
      <text:p text:style-name="P25"><text:line-break/><text:span text:style-name="T8">Были обнаружены 2 проблемы при компиляции: деление на ноль и выход за границы массива invector5. В коде из статьи присутствует проверка на то, как компиляторы оптимизируют деление на ноль. При попытке генерации компиляторы выдают предупреждение, но деление на ноль не убирают, это позволяет убрать им некоторую часть кода как недостижимую. Блок с делением на ноль мешает замерам времени и проверке оптимизаций, поэтому он был убран встроенным флагом при компиляции. В случае же с invector5, в статье проверяется в первую очередь удаление переменной индукции, поэтому выход за рамки массива является второстепенным, однако в рамках моей работы предполагается ещё и замер времени, компиляторы предупреждают о undefind behavior при компиляции этого фрагмента, массив был расширен для поддержания чистоты проверки, выход за пределы массива не относится к проверки оптимизации по удалению переменной индукции, он лишь создаёт помехи </text:span><text:span text:style-name="T2">неопределённостью</text:span><text:span text:style-name="T8"> компиляции и проблемами с замером времени.</text:span></text:p>
      <text:p text:style-name="P25"/>
      <text:p text:style-name="P29">Без оптимизации (-O0)</text:p>
      <table:table table:name="Таблица1" table:style-name="Таблица1">
        <table:table-column table:style-name="Таблица1.A"/>
        <table:table-column table:style-name="Таблица1.B"/>
        <table:table-column table:style-name="Таблица1.C"/>
        <table:table-column table:style-name="Таблица1.D"/>
        <table:table-row table:style-name="Таблица1.1">
          <table:table-cell table:style-name="Таблица1.A1" office:value-type="string">
            <text:p text:style-name="P105">Компилятор</text:p>
          </table:table-cell>
          <table:table-cell table:style-name="Таблица1.A1" office:value-type="string">
            <text:p text:style-name="P107">ccomp</text:p>
          </table:table-cell>
          <table:table-cell table:style-name="Таблица1.A1" office:value-type="string">
            <text:p text:style-name="P107">gcc</text:p>
          </table:table-cell>
          <table:table-cell table:style-name="Таблица1.A1" office:value-type="string">
            <text:p text:style-name="P107">clang</text:p>
          </table:table-cell>
        </table:table-row>
        <table:table-row table:style-name="Таблица1.2">
          <table:table-cell table:style-name="Таблица1.A1" office:value-type="string">
            <text:p text:style-name="P25"><text:span text:style-name="T10">В</text:span><text:span text:style-name="T6">ремя работы </text:span><text:span text:style-name="T11">(сек)</text:span></text:p>
          </table:table-cell>
          <table:table-cell table:style-name="Таблица1.A1" office:value-type="string">
            <text:p text:style-name="P111">0,0011<text:span text:style-name="T9">3</text:span></text:p>
          </table:table-cell>
          <table:table-cell table:style-name="Таблица1.A1" office:value-type="string">
            <text:p text:style-name="P111">0,00114</text:p>
          </table:table-cell>
          <table:table-cell table:style-name="Таблица1.A1" office:value-type="string">
            <text:p text:style-name="P113">0,0011<text:span text:style-name="T9">5</text:span></text:p>
          </table:table-cell>
        </table:table-row>
        <table:table-row table:style-name="Таблица1.2">
          <table:table-cell table:style-name="Таблица1.A1" office:value-type="string">
            <text:p text:style-name="P31">Размер файла (бит)</text:p>
          </table:table-cell>
          <table:table-cell table:style-name="Таблица1.A1" office:value-type="string">
            <text:p text:style-name="P115">17072</text:p>
          </table:table-cell>
          <table:table-cell table:style-name="Таблица1.A1" office:value-type="string">
            <text:p text:style-name="P115">16992</text:p>
          </table:table-cell>
          <table:table-cell table:style-name="Таблица1.A1" office:value-type="string">
            <text:p text:style-name="P115">16992</text:p>
          </table:table-cell>
        </table:table-row>
      </table:table>
      <text:p text:style-name="P25"/>
      <text:p text:style-name="P26"><text:span text:style-name="T9">О</text:span>птимизаци<text:span text:style-name="T9">я</text:span> по объёму <text:span text:style-name="T9">(-Os)</text:span>:</text:p>
      <table:table table:name="Размер" table:style-name="Размер">
        <table:table-column table:style-name="Размер.A"/>
        <table:table-column table:style-name="Размер.B"/>
        <table:table-column table:style-name="Размер.C"/>
        <table:table-column table:style-name="Размер.D"/>
        <table:table-row table:style-name="Размер.1">
          <table:table-cell table:style-name="Размер.A1" office:value-type="string">
            <text:p text:style-name="P106">Компилятор</text:p>
          </table:table-cell>
          <table:table-cell table:style-name="Размер.A1" office:value-type="string">
            <text:p text:style-name="P108">ccomp</text:p>
          </table:table-cell>
          <table:table-cell table:style-name="Размер.A1" office:value-type="string">
            <text:p text:style-name="P108">gcc</text:p>
          </table:table-cell>
          <table:table-cell table:style-name="Размер.A1" office:value-type="string">
            <text:p text:style-name="P108">clang</text:p>
          </table:table-cell>
        </table:table-row>
        <table:table-row table:style-name="Размер.2">
          <table:table-cell table:style-name="Размер.A1" office:value-type="string">
            <text:p text:style-name="P25"><text:span text:style-name="T10">В</text:span><text:span text:style-name="T6">ремя работы </text:span><text:span text:style-name="T11">(сек)</text:span></text:p>
          </table:table-cell>
          <table:table-cell table:style-name="Размер.A1" office:value-type="string">
            <text:p text:style-name="P109">0,00112</text:p>
          </table:table-cell>
          <table:table-cell table:style-name="Размер.A1" office:value-type="string">
            <text:p text:style-name="P109">0,00115</text:p>
          </table:table-cell>
          <table:table-cell table:style-name="Размер.A1" office:value-type="string">
            <text:p text:style-name="P108">0,00113</text:p>
          </table:table-cell>
        </table:table-row>
        <table:table-row table:style-name="Размер.1">
          <table:table-cell table:style-name="Размер.A1" office:value-type="string">
            <text:p text:style-name="P31">Размер файла (бит)</text:p>
          </table:table-cell>
          <table:table-cell table:style-name="Размер.A1" office:value-type="string">
            <text:p text:style-name="P109">17032</text:p>
          </table:table-cell>
          <table:table-cell table:style-name="Размер.A1" office:value-type="string">
            <text:p text:style-name="P109">16992</text:p>
          </table:table-cell>
          <table:table-cell table:style-name="Размер.A1" office:value-type="string">
            <text:p text:style-name="P108">17048</text:p>
          </table:table-cell>
        </table:table-row>
      </table:table>
      <text:p text:style-name="P26"/>
      <text:p text:style-name="P30">Оптимизация по скорости (-O3)</text:p>
      <table:table table:name="Таблица3" table:style-name="Таблица3">
        <table:table-column table:style-name="Таблица3.A"/>
        <table:table-column table:style-name="Таблица3.B"/>
        <table:table-column table:style-name="Таблица3.C"/>
        <table:table-column table:style-name="Таблица3.D"/>
        <table:table-row table:style-name="Таблица3.1">
          <table:table-cell table:style-name="Таблица3.A1" office:value-type="string">
            <text:p text:style-name="P116">Компилятор</text:p>
          </table:table-cell>
          <table:table-cell table:style-name="Таблица3.A1" office:value-type="string">
            <text:p text:style-name="P112">ccomp</text:p>
          </table:table-cell>
          <table:table-cell table:style-name="Таблица3.A1" office:value-type="string">
            <text:p text:style-name="P112">gcc</text:p>
          </table:table-cell>
          <table:table-cell table:style-name="Таблица3.A1" office:value-type="string">
            <text:p text:style-name="P112">clang</text:p>
          </table:table-cell>
        </table:table-row>
        <table:table-row table:style-name="Таблица3.2">
          <table:table-cell table:style-name="Таблица3.A1" office:value-type="string">
            <text:p text:style-name="P25"><text:span text:style-name="T10">В</text:span><text:span text:style-name="T6">ремя работы </text:span><text:span text:style-name="T11">(сек)</text:span></text:p>
          </table:table-cell>
          <table:table-cell table:style-name="Таблица3.A1" office:value-type="string">
            <text:p text:style-name="P112">0,0011<text:span text:style-name="T9">2</text:span></text:p>
          </table:table-cell>
          <table:table-cell table:style-name="Таблица3.A1" office:value-type="string">
            <text:p text:style-name="P112">0,00112</text:p>
          </table:table-cell>
          <table:table-cell table:style-name="Таблица3.A1" office:value-type="string">
            <text:p text:style-name="P114">0,0011</text:p>
          </table:table-cell>
        </table:table-row>
        <table:table-row table:style-name="Таблица3.3">
          <table:table-cell table:style-name="Таблица3.A1" office:value-type="string">
            <text:p text:style-name="P31">Размер файла (бит)</text:p>
          </table:table-cell>
          <table:table-cell table:style-name="Таблица3.A1" office:value-type="string">
            <text:p text:style-name="P109">17032</text:p>
          </table:table-cell>
          <table:table-cell table:style-name="Таблица3.A1" office:value-type="string">
            <text:p text:style-name="P109">16992</text:p>
          </table:table-cell>
          <table:table-cell table:style-name="Таблица3.A1" office:value-type="string">
            <text:p text:style-name="P108">17048</text:p>
          </table:table-cell>
        </table:table-row>
      </table:table>
      <text:p text:style-name="P33"/>
      <text:p text:style-name="P28"/>
      <text:p text:style-name="P27"><text:span text:style-name="T10">В</text:span><text:span text:style-name="T6">ремя работы –</text:span><text:span text:style-name="T9"> усреднённое значение </text:span><text:span text:style-name="T10">времени работы </text:span><text:span text:style-name="T6">100 запусков </text:span><text:span text:style-name="T9">(фикс. Поток)</text:span></text:p>
      <text:p text:style-name="P31">Хоть размер файла при оптимизации по скорости и по объёму совпадает, файлы получаются разные. <text:span text:style-name="T12">Можно заметить, что при оптимизации по объёму clang выдал файл большего размера чем без этой оптимизации. Так произошло потому что при оптимизации по объёму компилятор сначала применяет оптимизации по скорости, которые могут как в данном случае и увеличить объём программы.</text:span></text:p>
      <text:p text:style-name="P31"/>
      <text:p text:style-name="P32">Все три компилятора показывают практически одинаковое время выполнения, <text:span text:style-name="T12">из-за малого времени выполнения программы отследить разницу очень сложно. Так происходит из-за отсутствия вычислительно сложных фрагментов, что приводит к очень близким результатам</text:span></text:p>
      <text:p text:style-name="P193">Clang</text:p>
      <text:p text:style-name="Standard"><text:line-break/><text:span text:style-name="T32">Размножение </text:span><text:span text:style-name="T33">копий</text:span><text:span text:style-name="T32"> не оптимизируется с -o0</text:span></text:p>
      <text:p text:style-name="Standard"><text:span text:style-name="T20"/></text:p>
      <table:table table:name="Таблица4" table:style-name="Таблица4">
        <table:table-column table:style-name="Таблица4.A"/>
        <table:table-column table:style-name="Таблица4.B"/>
        <table:table-row table:style-name="Таблица4.1">
          <table:table-cell table:style-name="Таблица4.A1" office:value-type="string">
            <text:p text:style-name="P140"><text:tab/>movl<text:tab/>$2, j4(%rip)</text:p>
            <text:p text:style-name="P121"/>
            <text:p text:style-name="P121"><text:tab/>movl<text:tab/>j4(%rip), %esi</text:p>
            <text:p text:style-name="P121"><text:tab/>leaq<text:tab/>.L.str(%rip), %rdi</text:p>
            <text:p text:style-name="P121"><text:tab/>movb<text:tab/>$0, %al</text:p>
            <text:p text:style-name="Table_20_Contents"><text:span text:style-name="T35"><text:tab/>callq<text:tab/></text:span><text:a xlink:type="simple" xlink:href="mailto:printf@PLT" text:style-name="Internet_20_link" text:visited-style-name="Visited_20_Internet_20_Link"><text:span text:style-name="T36">printf@PLT</text:span></text:a></text:p>
            <text:p text:style-name="P121"/>
            <text:p text:style-name="P121"><text:tab/>movl<text:tab/>i2(%rip), %eax</text:p>
            <text:p text:style-name="P121"><text:tab/>cmpl<text:tab/>j4(%rip), %eax</text:p>
            <text:p text:style-name="P121"><text:tab/>jge<text:tab/>.LBB0_3</text:p>
            <text:p text:style-name="P121"># %bb.1:</text:p>
            <text:p text:style-name="P121"><text:tab/>movl<text:tab/>i4(%rip), %eax</text:p>
            <text:p text:style-name="P121"><text:tab/>cmpl<text:tab/>j4(%rip), %eax</text:p>
            <text:p text:style-name="P121"><text:tab/>jge<text:tab/>.LBB0_3</text:p>
            <text:p text:style-name="P121"># %bb.2:</text:p>
            <text:p text:style-name="P121"/>
            <text:p text:style-name="P121"><text:tab/>movl<text:tab/>$2, i2(%rip)</text:p>
            <text:p text:style-name="P121"/>
            <text:p text:style-name="P121"><text:tab/>movl<text:tab/>i2(%rip), %esi</text:p>
            <text:p text:style-name="P121"><text:tab/>leaq<text:tab/>.L.str(%rip), %rdi</text:p>
            <text:p text:style-name="P121"><text:tab/>movb<text:tab/>$0, %al</text:p>
            <text:p text:style-name="Table_20_Contents"><text:span text:style-name="T35"><text:tab/>callq<text:tab/></text:span><text:a xlink:type="simple" xlink:href="mailto:printf@PLT" text:style-name="Internet_20_link" text:visited-style-name="Visited_20_Internet_20_Link"><text:span text:style-name="T36">printf@PLT</text:span></text:a></text:p>
            <text:p text:style-name="P121"/>
            <text:p text:style-name="P121">.LBB0_3:</text:p>
            <text:p text:style-name="P121"><text:tab/>movl<text:tab/>k5(%rip), %eax</text:p>
            <text:p text:style-name="P121"><text:tab/>movl<text:tab/>%eax, j4(%rip)</text:p>
            <text:p text:style-name="P121"/>
            <text:p text:style-name="P121"><text:tab/>movl<text:tab/>j4(%rip), %esi</text:p>
            <text:p text:style-name="P121"><text:tab/>leaq<text:tab/>.L.str(%rip), %rdi</text:p>
            <text:p text:style-name="P121"><text:tab/>movb<text:tab/>$0, %al</text:p>
            <text:p text:style-name="Table_20_Contents"><text:span text:style-name="T35"><text:tab/>callq<text:tab/></text:span><text:a xlink:type="simple" xlink:href="mailto:printf@PLT" text:style-name="Internet_20_link" text:visited-style-name="Visited_20_Internet_20_Link"><text:span text:style-name="T36">printf@PLT</text:span></text:a></text:p>
            <text:p text:style-name="P121"/>
            <text:p text:style-name="P121"><text:tab/>movl<text:tab/>i2(%rip), %eax</text:p>
            <text:p text:style-name="P121"><text:tab/>cmpl<text:tab/>j4(%rip), %eax</text:p>
            <text:p text:style-name="P121"><text:tab/>jge<text:tab/>.LBB0_6</text:p>
            <text:p text:style-name="P121"># %bb.4:</text:p>
            <text:p text:style-name="P121"><text:tab/>movl<text:tab/>i4(%rip), %eax</text:p>
            <text:p text:style-name="P121"><text:tab/>cmpl<text:tab/>j4(%rip), %eax</text:p>
            <text:p text:style-name="P121"><text:tab/>jge<text:tab/>.LBB0_6</text:p>
            <text:p text:style-name="P121"># %bb.5:</text:p>
            <text:p text:style-name="P121"/>
            <text:p text:style-name="P121"><text:tab/>movl<text:tab/>$3, i5(%rip)</text:p>
            <text:p text:style-name="P121"/>
            <text:p text:style-name="P121"><text:tab/>movl<text:tab/>i5(%rip), %esi</text:p>
            <text:p text:style-name="P121"><text:tab/>leaq<text:tab/>.L.str(%rip), %rdi</text:p>
            <text:p text:style-name="P121"><text:tab/>movb<text:tab/>$0, %al</text:p>
            <text:p text:style-name="P121"><text:tab/>callq<text:tab/>printf@PLT</text:p>
            <text:p text:style-name="P121">.LBB0_6:</text:p>
          </table:table-cell>
          <table:table-cell table:style-name="Таблица4.A1" office:value-type="string">
            <text:p text:style-name="P175"><text:span text:style-name="T34"><text:tab/></text:span>j4 = 2;</text:p>
            <text:p text:style-name="P176"><text:tab/>printf("%d", j4);</text:p>
            <text:p text:style-name="P176"><text:tab/>if (i2 &lt; j4 &amp;&amp; i4 &lt; j4) {</text:p>
            <text:p text:style-name="P176"><text:tab/><text:tab/>i2 = 2;</text:p>
            <text:p text:style-name="P176"><text:tab/><text:tab/>printf("%d", i2);</text:p>
            <text:p text:style-name="P176"><text:tab/>}</text:p>
            <text:p text:style-name="P176"><text:tab/>j4 = k5;</text:p>
            <text:p text:style-name="P176"><text:tab/>printf("%d", j4);</text:p>
            <text:p text:style-name="P176"><text:tab/>if (i2 &lt; j4 &amp;&amp; i4 &lt; j4) {</text:p>
            <text:p text:style-name="P176"><text:tab/><text:tab/>i5 = 3;</text:p>
            <text:p text:style-name="P176"><text:tab/><text:tab/>printf("%d", i5);</text:p>
            <text:p text:style-name="P89"><text:tab/>}</text:p>
          </table:table-cell>
        </table:table-row>
      </table:table>
      <text:p text:style-name="P91"><text:span text:style-name="T20"/></text:p>
      <table:table table:name="Таблица5" table:style-name="Таблица5">
        <table:table-column table:style-name="Таблица5.A"/>
        <table:table-column table:style-name="Таблица5.B"/>
        <table:table-row table:style-name="Таблица5.1">
          <table:table-cell table:style-name="Таблица5.A1" office:value-type="string">
            <text:p text:style-name="P140"><text:tab/>movl<text:tab/>$2, j4(%rip)</text:p>
            <text:p text:style-name="P140"/>
            <text:p text:style-name="P140"><text:tab/>movl<text:tab/><text:span text:style-name="T37">j4(%rip), %esi</text:span></text:p>
            <text:p text:style-name="P140"><text:tab/>leaq<text:tab/>.L.str(%rip), %rdi</text:p>
            <text:p text:style-name="P140"><text:tab/>movb<text:tab/>$0, %al</text:p>
            <text:p text:style-name="P190"><text:span text:style-name="T35"><text:tab/>callq<text:tab/></text:span><text:a xlink:type="simple" xlink:href="mailto:printf@PLT" text:style-name="Internet_20_link" text:visited-style-name="Visited_20_Internet_20_Link"><text:span text:style-name="T36">printf@PLT</text:span></text:a></text:p>
            <text:p text:style-name="P140"/>
            <text:p text:style-name="P140"><text:tab/>movl<text:tab/>i2(%rip), %eax</text:p>
            <text:p text:style-name="P140"><text:tab/>cmpl<text:tab/>j4(%rip), %eax</text:p>
            <text:p text:style-name="P140"><text:tab/>jge<text:tab/>.LBB0_3</text:p>
            <text:p text:style-name="P140"># %bb.1:</text:p>
            <text:p text:style-name="P140"><text:tab/>movl<text:tab/>i4(%rip), %eax</text:p>
            <text:p text:style-name="P140"><text:tab/>cmpl<text:tab/>j4(%rip), %eax</text:p>
            <text:p text:style-name="P140"><text:tab/>jge<text:tab/>.LBB0_3</text:p>
            <text:p text:style-name="P140"># %bb.2:</text:p>
            <text:p text:style-name="P140"/>
            <text:p text:style-name="P140"><text:tab/>movl<text:tab/>$2, i2(%rip)</text:p>
            <text:p text:style-name="P140"/>
            <text:p text:style-name="P140"><text:tab/>movl<text:tab/><text:span text:style-name="T37">i2(%rip), %esi</text:span></text:p>
            <text:p text:style-name="P140"><text:tab/>leaq<text:tab/>.L.str(%rip), %rdi</text:p>
            <text:p text:style-name="P140"><text:tab/>movb<text:tab/>$0, %al</text:p>
            <text:p text:style-name="P190"><text:span text:style-name="T35"><text:tab/>callq<text:tab/></text:span><text:a xlink:type="simple" xlink:href="mailto:printf@PLT" text:style-name="Internet_20_link" text:visited-style-name="Visited_20_Internet_20_Link"><text:span text:style-name="T36">printf@PLT</text:span></text:a></text:p>
            <text:p text:style-name="P140"/>
            <text:p text:style-name="P140">.LBB0_3:</text:p>
            <text:p text:style-name="P140"><text:tab/>movl<text:tab/>k5(%rip), %eax</text:p>
            <text:p text:style-name="P140"><text:tab/>movl<text:tab/>%eax, j4(%rip)</text:p>
            <text:p text:style-name="P140"/>
            <text:p text:style-name="P140"><text:tab/>movl<text:tab/>j4(%rip), %esi</text:p>
            <text:p text:style-name="P140"><text:tab/>leaq<text:tab/>.L.str(%rip), %rdi</text:p>
            <text:p text:style-name="P140"><text:tab/>movb<text:tab/>$0, %al</text:p>
            <text:p text:style-name="P190"><text:span text:style-name="T35"><text:tab/>callq<text:tab/></text:span><text:a xlink:type="simple" xlink:href="mailto:printf@PLT" text:style-name="Internet_20_link" text:visited-style-name="Visited_20_Internet_20_Link"><text:span text:style-name="T36">printf@PLT</text:span></text:a></text:p>
            <text:p text:style-name="P140"/>
            <text:p text:style-name="P140"><text:tab/>movl<text:tab/>i2(%rip), %eax</text:p>
            <text:p text:style-name="P140"><text:tab/>cmpl<text:tab/>j4(%rip), %eax</text:p>
            <text:p text:style-name="P140"><text:tab/>jge<text:tab/>.LBB0_6</text:p>
            <text:p text:style-name="P140"># %bb.4:</text:p>
            <text:p text:style-name="P140"><text:tab/>movl<text:tab/>i4(%rip), %eax</text:p>
            <text:p text:style-name="P140"><text:tab/>cmpl<text:tab/>j4(%rip), %eax</text:p>
            <text:p text:style-name="P140"><text:tab/>jge<text:tab/>.LBB0_6</text:p>
            <text:p text:style-name="P140"># %bb.5:</text:p>
            <text:p text:style-name="P140"/>
            <text:p text:style-name="P140"><text:tab/>movl<text:tab/>$3, i5(%rip)</text:p>
            <text:p text:style-name="P140"/>
            <text:p text:style-name="P140"><text:tab/>movl<text:tab/><text:span text:style-name="T37">i5(%rip), %esi</text:span></text:p>
            <text:p text:style-name="P140"><text:tab/>leaq<text:tab/>.L.str(%rip), %rdi</text:p>
            <text:p text:style-name="P140"><text:tab/>movb<text:tab/>$0, %al</text:p>
            <text:p text:style-name="P140"><text:tab/>callq<text:tab/>printf@PLT</text:p>
            <text:p text:style-name="P140">.LBB0_6:</text:p>
          </table:table-cell>
          <table:table-cell table:style-name="Таблица5.A1" office:value-type="string">
            <text:p text:style-name="P134"><text:tab/>movl<text:tab/>$2, j4(%rip)</text:p>
            <text:p text:style-name="P134"><text:tab/></text:p>
            <text:p text:style-name="P134"><text:tab/>leaq<text:tab/>.L.str(%rip), %rdi</text:p>
            <text:p text:style-name="P134"><text:tab/>movl<text:tab/><text:span text:style-name="T37">$2, %esi</text:span></text:p>
            <text:p text:style-name="P134"><text:tab/>xorl<text:tab/>%eax, %eax</text:p>
            <text:p text:style-name="P134"><text:tab/>callq<text:tab/>printf@PLT</text:p>
            <text:p text:style-name="P134"><text:tab/></text:p>
            <text:p text:style-name="P134"><text:tab/>movl<text:tab/>j4(%rip), %eax</text:p>
            <text:p text:style-name="P134"><text:tab/>cmpl<text:tab/>%eax, i2(%rip)</text:p>
            <text:p text:style-name="P134"><text:tab/>jge<text:tab/>.LBB0_3</text:p>
            <text:p text:style-name="P134"># %bb.1:</text:p>
            <text:p text:style-name="P134"><text:tab/>cmpl<text:tab/>%eax, i4(%rip)</text:p>
            <text:p text:style-name="P134"><text:tab/>jge<text:tab/>.LBB0_3</text:p>
            <text:p text:style-name="P134"># %bb.2:</text:p>
            <text:p text:style-name="P134"/>
            <text:p text:style-name="P134"/>
            <text:p text:style-name="P134"><text:tab/>movl<text:tab/>$2, i2(%rip)</text:p>
            <text:p text:style-name="P134"/>
            <text:p text:style-name="P134"><text:tab/>leaq<text:tab/>.L.str(%rip), %rdi</text:p>
            <text:p text:style-name="P134"><text:tab/>movl<text:tab/><text:span text:style-name="T37">$2, %esi</text:span></text:p>
            <text:p text:style-name="P134"><text:tab/>xorl<text:tab/>%eax, %eax</text:p>
            <text:p text:style-name="P134"><text:tab/>callq<text:tab/>printf@PLT</text:p>
            <text:p text:style-name="P134"/>
            <text:p text:style-name="P134">.LBB0_3:</text:p>
            <text:p text:style-name="P134"><text:tab/>movl<text:tab/>k5(%rip), %esi</text:p>
            <text:p text:style-name="P134"><text:tab/>movl<text:tab/>%esi, j4(%rip)</text:p>
            <text:p text:style-name="P134"/>
            <text:p text:style-name="P134"><text:tab/>leaq<text:tab/>.L.str(%rip), %rdi</text:p>
            <text:p text:style-name="P134"><text:tab/>xorl<text:tab/>%eax, %eax</text:p>
            <text:p text:style-name="P134"><text:tab/>callq<text:tab/>printf@PLT</text:p>
            <text:p text:style-name="P134"/>
            <text:p text:style-name="P134"/>
            <text:p text:style-name="P134"><text:tab/>movl<text:tab/>j4(%rip), %eax</text:p>
            <text:p text:style-name="P134"><text:tab/>cmpl<text:tab/>%eax, i2(%rip)</text:p>
            <text:p text:style-name="P134"><text:tab/>jge<text:tab/>.LBB0_6</text:p>
            <text:p text:style-name="P134"># %bb.4:</text:p>
            <text:p text:style-name="P134"><text:tab/>cmpl<text:tab/>%eax, i4(%rip)</text:p>
            <text:p text:style-name="P134"><text:tab/>jge<text:tab/>.LBB0_6</text:p>
            <text:p text:style-name="P134"># %bb.5:</text:p>
            <text:p text:style-name="P134"/>
            <text:p text:style-name="P134"/>
            <text:p text:style-name="P134"><text:tab/>movl<text:tab/>$3, i5(%rip)</text:p>
            <text:p text:style-name="P134"/>
            <text:p text:style-name="P134"><text:tab/>leaq<text:tab/>.L.str(%rip), %rdi</text:p>
            <text:p text:style-name="P134"><text:tab/>movl<text:tab/><text:span text:style-name="T37">$3, %esi</text:span></text:p>
            <text:p text:style-name="P134"><text:tab/>xorl<text:tab/>%eax, %eax</text:p>
            <text:p text:style-name="P134"><text:tab/>callq<text:tab/>printf@PLT</text:p>
          </table:table-cell>
        </table:table-row>
      </table:table>
      <text:p text:style-name="P92"><text:span text:style-name="T20"/></text:p>
      <text:p text:style-name="P6">При оптимизации по скорости мы видим оптимизацию размножения <text:span text:style-name="T3">копий</text:span></text:p>
      <table:table table:name="Таблица6" table:style-name="Таблица6">
        <table:table-column table:style-name="Таблица6.A"/>
        <table:table-column table:style-name="Таблица6.B"/>
        <table:table-row table:style-name="Таблица6.1">
          <table:table-cell table:style-name="Таблица6.A1" office:value-type="string">
            <text:p text:style-name="P165"><text:tab/>movl<text:tab/>$3, i3(%rip)</text:p>
            <text:p text:style-name="P165"/>
            <text:p text:style-name="P165"><text:tab/>movsd<text:tab/>.LCPI0_2(%rip), %xmm0</text:p>
            <text:p text:style-name="P165"><text:tab/>movsd<text:tab/>%xmm0, flt_1(%rip)</text:p>
            <text:p text:style-name="P165"/>
            <text:p text:style-name="P165"><text:tab/>movl<text:tab/>$5, i2(%rip)</text:p>
            <text:p text:style-name="P165"/>
            <text:p text:style-name="P165"><text:tab/>movl<text:tab/>i(%rip), %eax</text:p>
            <text:p text:style-name="P165"><text:tab/>addl<text:tab/>$0, %eax</text:p>
            <text:p text:style-name="P165"><text:tab/>movl<text:tab/>%eax, j2(%rip)</text:p>
            <text:p text:style-name="P165"/>
            <text:p text:style-name="P165"><text:tab/>movl<text:tab/>i(%rip), %eax</text:p>
            <text:p text:style-name="P165"><text:tab/>movl<text:tab/>$1, %ecx</text:p>
            <text:p text:style-name="P165"><text:tab/>cltd</text:p>
            <text:p text:style-name="P165"><text:tab/>idivl<text:tab/>%ecx</text:p>
            <text:p text:style-name="P165"><text:tab/>movl<text:tab/>%eax, k2(%rip)</text:p>
            <text:p text:style-name="P165"/>
            <text:p text:style-name="P165"><text:tab/>movl<text:tab/>i(%rip), %eax</text:p>
            <text:p text:style-name="P165"><text:tab/>shll<text:tab/>$0, %eax</text:p>
            <text:p text:style-name="P165"><text:tab/>movl<text:tab/>%eax, i4(%rip)</text:p>
            <text:p text:style-name="P165"/>
            <text:p text:style-name="P165"><text:tab/>imull<text:tab/>$0, i(%rip), %eax</text:p>
            <text:p text:style-name="P165"><text:tab/>movl<text:tab/>%eax, i5(%rip)</text:p>
            <text:p text:style-name="P165"/>
            <text:p text:style-name="P165"><text:tab/>movsd<text:tab/>.LCPI0_1(%rip), %xmm0</text:p>
            <text:p text:style-name="P165"><text:tab/>movsd<text:tab/>%xmm0, flt_3(%rip)</text:p>
            <text:p text:style-name="P165"/>
            <text:p text:style-name="P165"><text:tab/>movsd<text:tab/>.LCPI0_0(%rip), %xmm0</text:p>
            <text:p text:style-name="P165"><text:tab/>movsd<text:tab/>%xmm0, flt_4(%rip)</text:p>
            <text:p text:style-name="P165"/>
            <text:p text:style-name="P165"><text:tab/>xorps<text:tab/>%xmm0, %xmm0</text:p>
            <text:p text:style-name="P165"><text:tab/>mulsd<text:tab/>flt_6(%rip), %xmm0</text:p>
            <text:p text:style-name="P165"><text:tab/>movsd<text:tab/>%xmm0, flt_5(%rip)</text:p>
            <text:p text:style-name="P165"/>
            <text:p text:style-name="P165"><text:tab/>movsd<text:tab/>flt_2(%rip), %xmm0</text:p>
            <text:p text:style-name="P165"><text:tab/>mulsd<text:tab/>flt_3(%rip), %xmm0</text:p>
            <text:p text:style-name="P165"><text:tab/>movsd<text:tab/>%xmm0, flt_6(%rip)</text:p>
          </table:table-cell>
          <table:table-cell table:style-name="Таблица6.A1" office:value-type="string">
            <text:p text:style-name="P184"><text:tab/>I3 = 1 + 2;</text:p>
            <text:p text:style-name="P184"><text:tab/>flt_1 = 2.4 + 6.3;</text:p>
            <text:p text:style-name="P184"><text:tab/>i2 = 5;</text:p>
            <text:p text:style-name="P184"><text:tab/>j2 = i + 0;</text:p>
            <text:p text:style-name="P184"><text:tab/>k2 = i / 1;</text:p>
            <text:p text:style-name="P184"><text:tab/>i4 = i * 1;</text:p>
            <text:p text:style-name="P184"><text:tab/>i5 = i * 0;</text:p>
            <text:p text:style-name="P184"><text:tab/>printf("This compiler handles divide-by-zero as \</text:p>
            <text:p text:style-name="P184"><text:s text:c="20"/>an error\n");</text:p>
            <text:p text:style-name="P184"><text:tab/>flt_3 = 2.4 / 1.0;</text:p>
            <text:p text:style-name="P184"><text:tab/>flt_4 = 1.0 + 0.0000001;</text:p>
            <text:p text:style-name="P184"><text:tab/>flt_5 = flt_6 * 0.0;</text:p>
            <text:p text:style-name="P184"><text:tab/>flt_6 = flt_2 * flt_3;</text:p>
          </table:table-cell>
        </table:table-row>
      </table:table>
      <text:p text:style-name="P83"/>
      <text:p text:style-name="P6">Без оптимизации происходит свёртка констант, но арифметические тождества не оптимизируются</text:p>
      <table:table table:name="Таблица7" table:style-name="Таблица7">
        <table:table-column table:style-name="Таблица7.A"/>
        <table:table-column table:style-name="Таблица7.B"/>
        <table:table-row table:style-name="Таблица7.1">
          <table:table-cell table:style-name="Таблица7.A1" office:value-type="string">
            <text:p text:style-name="P130"><text:tab/>movl<text:tab/>$3, i3(%rip)</text:p>
            <text:p text:style-name="P130"/>
            <text:p text:style-name="P130"><text:tab/>movsd<text:tab/>.LCPI0_2(%rip), %xmm0</text:p>
            <text:p text:style-name="P130"><text:tab/>movsd<text:tab/>%xmm0, flt_1(%rip)</text:p>
            <text:p text:style-name="P130"/>
            <text:p text:style-name="P130"><text:tab/>movl<text:tab/>$5, i2(%rip)</text:p>
            <text:p text:style-name="P130"/>
            <text:p text:style-name="P130"><text:tab/><text:span text:style-name="T40">movl<text:tab/>i(%rip), %eax</text:span></text:p>
            <text:p text:style-name="P130"><text:tab/>addl<text:tab/>$0, %eax</text:p>
            <text:p text:style-name="P130"><text:tab/>movl<text:tab/>%eax, j2(%rip)</text:p>
            <text:p text:style-name="P130"/>
            <text:p text:style-name="P130"><text:tab/><text:span text:style-name="T40">movl<text:tab/>i(%rip), %eax</text:span></text:p>
            <text:p text:style-name="P130"><text:tab/>movl<text:tab/>$1, %ecx</text:p>
            <text:p text:style-name="P130"><text:tab/>cltd</text:p>
            <text:p text:style-name="P130"><text:tab/>idivl<text:tab/>%ecx</text:p>
            <text:p text:style-name="P130"><text:tab/>movl<text:tab/>%eax, k2(%rip)</text:p>
            <text:p text:style-name="P130"/>
            <text:p text:style-name="P130"><text:tab/><text:span text:style-name="T40">movl<text:tab/>i(%rip), %eax</text:span></text:p>
            <text:p text:style-name="P130"><text:tab/>shll<text:tab/>$0, %eax</text:p>
            <text:p text:style-name="P130"><text:tab/>movl<text:tab/>%eax, i4(%rip)</text:p>
            <text:p text:style-name="P130"/>
            <text:p text:style-name="P130"><text:tab/>imull<text:tab/>$0, i(%rip), %eax</text:p>
            <text:p text:style-name="P130"><text:tab/>movl<text:tab/>%eax, i5(%rip)</text:p>
            <text:p text:style-name="P130"/>
            <text:p text:style-name="P131"><text:tab/>movsd<text:tab/>.LCPI0_1(%rip), %xmm0</text:p>
            <text:p text:style-name="P130"><text:tab/>movsd<text:tab/>%xmm0, flt_3(%rip)</text:p>
            <text:p text:style-name="P130"/>
            <text:p text:style-name="P130"><text:tab/>movsd<text:tab/>.LCPI0_0(%rip), %xmm0</text:p>
            <text:p text:style-name="P130"><text:tab/>movsd<text:tab/>%xmm0, flt_4(%rip)</text:p>
            <text:p text:style-name="P130"/>
            <text:p text:style-name="P130"><text:tab/>xorps<text:tab/>%xmm0, %xmm0</text:p>
            <text:p text:style-name="P130"><text:tab/>mulsd<text:tab/>flt_6(%rip), %xmm0</text:p>
            <text:p text:style-name="P130"><text:tab/>movsd<text:tab/>%xmm0, flt_5(%rip)</text:p>
            <text:p text:style-name="P130"/>
            <text:p text:style-name="P130"><text:tab/>movsd<text:tab/>flt_2(%rip), %xmm0</text:p>
            <text:p text:style-name="P130"><text:tab/>mulsd<text:tab/>flt_3(%rip), %xmm0</text:p>
            <text:p text:style-name="P130"><text:tab/>movsd<text:tab/>%xmm0, flt_6(%rip)</text:p>
          </table:table-cell>
          <table:table-cell table:style-name="Таблица7.A1" office:value-type="string">
            <text:p text:style-name="P132"><text:tab/>movl<text:tab/>$3, i3(%rip)</text:p>
            <text:p text:style-name="P132"/>
            <text:p text:style-name="P132"><text:tab/>movabsq<text:tab/>$4621087282649523814, %rax</text:p>
            <text:p text:style-name="P132"><text:tab/>movq<text:tab/>%rax, flt_1(%rip)</text:p>
            <text:p text:style-name="P132"/>
            <text:p text:style-name="P132"><text:tab/>movl<text:tab/>$5, i2(%rip)</text:p>
            <text:p text:style-name="P132"/>
            <text:p text:style-name="P132"><text:tab/>movl<text:tab/>i(%rip), %eax</text:p>
            <text:p text:style-name="P132"><text:tab/>movl<text:tab/>%eax, j2(%rip)</text:p>
            <text:p text:style-name="P132"/>
            <text:p text:style-name="P132"/>
            <text:p text:style-name="P132"/>
            <text:p text:style-name="P132"/>
            <text:p text:style-name="P132"/>
            <text:p text:style-name="P132"/>
            <text:p text:style-name="P132"><text:tab/>movl<text:tab/>%eax, k2(%rip)</text:p>
            <text:p text:style-name="P132"/>
            <text:p text:style-name="P132"/>
            <text:p text:style-name="P132"/>
            <text:p text:style-name="P132"><text:tab/>movl<text:tab/>%eax, i4(%rip)</text:p>
            <text:p text:style-name="P132"/>
            <text:p text:style-name="P132"/>
            <text:p text:style-name="P132"><text:tab/>movl<text:tab/>$0, i5(%rip)</text:p>
            <text:p text:style-name="P132"/>
            <text:p text:style-name="P133"><text:tab/>movabsq<text:tab/>$4612586738352862003, %rax</text:p>
            <text:p text:style-name="P132"><text:tab/>movq<text:tab/>%rax, flt_3(%rip)</text:p>
            <text:p text:style-name="P132"/>
            <text:p text:style-name="P132"><text:tab/>movabsq<text:tab/>$4607182419250377371, %rax</text:p>
            <text:p text:style-name="P132"><text:tab/>movq<text:tab/>%rax, flt_4(%rip)</text:p>
            <text:p text:style-name="P132"/>
            <text:p text:style-name="P132"><text:tab/><text:span text:style-name="T37">xorpd<text:tab/>%xmm0, %xmm0</text:span></text:p>
            <text:p text:style-name="P132"><text:tab/><text:span text:style-name="T37">mulsd<text:tab/>flt_6(%rip), %xmm0</text:span></text:p>
            <text:p text:style-name="P132"><text:tab/><text:span text:style-name="T37">movsd<text:tab/>%xmm0, flt_5(%rip)</text:span></text:p>
            <text:p text:style-name="P132"/>
            <text:p text:style-name="P132"><text:tab/>movsd<text:tab/>flt_2(%rip), %xmm0</text:p>
            <text:p text:style-name="P132"><text:tab/>mulsd<text:tab/>.LCPI0_0(%rip), %xmm0</text:p>
            <text:p text:style-name="P132"><text:tab/>movsd<text:tab/>%xmm0, flt_6(%rip)</text:p>
          </table:table-cell>
        </table:table-row>
      </table:table>
      <text:p text:style-name="P95"/>
      <text:p text:style-name="P4">При оптимизации свёртка констант всё также происходит, но убирается ещё и вычисление арифметических тождеств, <text:span text:style-name="T39">кроме умножения на 0.0</text:span></text:p>
      <text:p text:style-name="P5"/>
      <text:p text:style-name="P1">Хорошо видна оптимизация излишних загрузок переменной в регистр.</text:p>
      <text:p text:style-name="P5"/>
      <table:table table:name="Таблица9" table:style-name="Таблица9">
        <table:table-column table:style-name="Таблица9.A"/>
        <table:table-column table:style-name="Таблица9.B"/>
        <table:table-row>
          <table:table-cell table:style-name="Таблица9.A1" office:value-type="string">
            <text:p text:style-name="P118">movl<text:tab/>$1, k3(%rip)</text:p>
            <text:p text:style-name="P118">movl<text:tab/>$1, k3(%rip)</text:p>
          </table:table-cell>
          <table:table-cell table:style-name="Таблица9.A1" office:value-type="string">
            <text:p text:style-name="P118">movl<text:tab/>$1, k3(%rip)</text:p>
          </table:table-cell>
        </table:table-row>
      </table:table>
      <text:p text:style-name="P5"/>
      <text:p text:style-name="P68"><text:span text:style-name="T22">Удаление излишнего присваивания проис</text:span><text:span text:style-name="T17">ходит только с оптимизацией</text:span></text:p>
      <table:table table:name="Таблица8" table:style-name="Таблица8">
        <table:table-column table:style-name="Таблица8.A"/>
        <table:table-column table:style-name="Таблица8.B"/>
        <table:table-row table:style-name="Таблица8.1">
          <table:table-cell table:style-name="Таблица8.A1" office:value-type="string">
            <text:p text:style-name="P129"><text:tab/>movl<text:tab/>j5(%rip), %eax</text:p>
            <text:p text:style-name="P129"><text:tab/><text:span text:style-name="T37">shll<text:tab/>$2, %eax</text:span></text:p>
            <text:p text:style-name="P129"><text:tab/>movl<text:tab/>%eax, k2(%rip)</text:p>
            <text:p text:style-name="P129"><text:tab/>movl<text:tab/>$0, i(%rip)</text:p>
            <text:p text:style-name="P129"/>
            <text:p text:style-name="P129">.LBB0_7:</text:p>
            <text:p text:style-name="P129"><text:tab/>cmpl<text:tab/>$5, i(%rip)</text:p>
            <text:p text:style-name="P129"><text:tab/>jg<text:tab/>.LBB0_10</text:p>
            <text:p text:style-name="P129"># %bb.8:</text:p>
            <text:p text:style-name="P129"><text:tab/>movl<text:tab/>i(%rip), %eax</text:p>
            <text:p text:style-name="P129"><text:tab/><text:span text:style-name="T37">shll<text:tab/>%eax</text:span></text:p>
            <text:p text:style-name="P129"><text:tab/>movw<text:tab/>%ax, %dx</text:p>
            <text:p text:style-name="P129"><text:tab/>movslq<text:tab/>i(%rip), %rcx</text:p>
            <text:p text:style-name="P129"><text:tab/>leaq<text:tab/>ivector4(%rip), %rax</text:p>
            <text:p text:style-name="P129"><text:tab/>movw<text:tab/>%dx, (%rax,%rcx,2)</text:p>
            <text:p text:style-name="P129"># %bb.9:</text:p>
            <text:p text:style-name="P129"><text:tab/>movl<text:tab/>i(%rip), %eax</text:p>
            <text:p text:style-name="P129"><text:tab/>addl<text:tab/>$1, %eax</text:p>
            <text:p text:style-name="P129"><text:tab/>movl<text:tab/>%eax, i(%rip)</text:p>
            <text:p text:style-name="P129"><text:tab/>jmp<text:tab/>.LBB0_7</text:p>
            <text:p text:style-name="P129">.LBB0_10:</text:p>
          </table:table-cell>
          <table:table-cell table:style-name="Таблица8.A1" office:value-type="string">
            <text:p text:style-name="P182"><text:tab/>k2 = 4 * j5;</text:p>
            <text:p text:style-name="P182"><text:tab/>for (i = 0; i &lt;= 5; i++)</text:p>
            <text:p text:style-name="P182"><text:tab/><text:tab/>ivector4[i] = i * 2;</text:p>
          </table:table-cell>
        </table:table-row>
      </table:table>
      <text:p text:style-name="P69"><text:span text:style-name="T17"/></text:p>
      <text:p text:style-name="P39"><text:span text:style-name="T17">С</text:span><text:span text:style-name="T16">нижение мощности происходит и без флага оптимизации. </text:span><text:span text:style-name="T23">Умножение на </text:span><text:span text:style-name="T26">2^n </text:span><text:span text:style-name="T23">заменяется битовым сдвигом.</text:span></text:p>
      <text:p text:style-name="P39"><text:span text:style-name="T23"/></text:p>
      <table:table table:name="Таблица11" table:style-name="Таблица11">
        <table:table-column table:style-name="Таблица11.A"/>
        <table:table-column table:style-name="Таблица11.B"/>
        <table:table-row>
          <table:table-cell table:style-name="Таблица11.A1" office:value-type="string">
            <text:p text:style-name="P128"><text:tab/>movl<text:tab/>j5(%rip), %eax</text:p>
            <text:p text:style-name="P128"><text:tab/>shll<text:tab/>$2, %eax</text:p>
            <text:p text:style-name="P128"><text:tab/>movl<text:tab/>%eax, k2(%rip)</text:p>
            <text:p text:style-name="P128"/>
            <text:p text:style-name="P128"><text:tab/>movl<text:tab/>$0, i(%rip)</text:p>
            <text:p text:style-name="P128">.LBB0_7: </text:p>
            <text:p text:style-name="P128"><text:tab/>cmpl<text:tab/>$5, i(%rip)</text:p>
            <text:p text:style-name="P128"><text:tab/>jg<text:tab/>.LBB0_10</text:p>
            <text:p text:style-name="P128"># %bb.8: <text:s text:c="2"/></text:p>
            <text:p text:style-name="P128"><text:tab/>movl<text:tab/>i(%rip), %eax</text:p>
            <text:p text:style-name="P128"><text:tab/>shll<text:tab/>%eax</text:p>
            <text:p text:style-name="P128"><text:tab/>movw<text:tab/>%ax, %dx</text:p>
            <text:p text:style-name="P128"><text:tab/>movslq<text:tab/>i(%rip), %rcx</text:p>
            <text:p text:style-name="P128"><text:tab/>leaq<text:tab/>ivector4(%rip), %rax</text:p>
            <text:p text:style-name="P128"><text:tab/>movw<text:tab/>%dx, (%rax,%rcx,2)</text:p>
            <text:p text:style-name="P128"># %bb.9: <text:s/></text:p>
            <text:p text:style-name="P128"><text:tab/>movl<text:tab/>i(%rip), %eax</text:p>
            <text:p text:style-name="P128"><text:tab/>addl<text:tab/>$1, %eax</text:p>
            <text:p text:style-name="P128"><text:tab/>movl<text:tab/>%eax, i(%rip)</text:p>
            <text:p text:style-name="P128"><text:tab/>jmp<text:tab/>.LBB0_7</text:p>
            <text:p text:style-name="P128">.LBB0_10:</text:p>
          </table:table-cell>
          <table:table-cell table:style-name="Таблица11.A1" office:value-type="string">
            <text:p text:style-name="P121"><text:tab/>movl<text:tab/>j5(%rip), %eax</text:p>
            <text:p text:style-name="P121"><text:tab/><text:span text:style-name="T37">shll<text:tab/>$2, %eax</text:span></text:p>
            <text:p text:style-name="P121"><text:tab/>movl<text:tab/>%eax, k2(%rip)</text:p>
            <text:p text:style-name="P121"/>
            <text:p text:style-name="P121"><text:tab/>movabsq<text:tab/>$1688867040264192, %rax</text:p>
            <text:p text:style-name="P121"><text:tab/>movq<text:tab/>%rax, ivector4(%rip)</text:p>
            <text:p text:style-name="P121"><text:tab/>movl<text:tab/>$655368, ivector4+8(%rip) </text:p>
          </table:table-cell>
        </table:table-row>
      </table:table>
      <text:p text:style-name="P39"><text:span text:style-name="T23"/></text:p>
      <text:p text:style-name="P70"><text:span text:style-name="T23">Снижение мощности видно и при оптимизации по скорости, </text:span><text:span text:style-name="T25">при этом</text:span><text:span text:style-name="T23"> цикл был убран.</text:span></text:p>
      <table:table table:name="Таблица10" table:style-name="Таблица10">
        <table:table-column table:style-name="Таблица10.A"/>
        <table:table-column table:style-name="Таблица10.B"/>
        <table:table-row table:style-name="Таблица10.1">
          <table:table-cell table:style-name="Таблица10.A1" office:value-type="string">
            <text:p text:style-name="P121"><text:tab/>movl<text:tab/>$0, j5(%rip)</text:p>
            <text:p text:style-name="P121"/>
            <text:p text:style-name="P121"><text:tab/>movl<text:tab/>$10000, k5(%rip)</text:p>
            <text:p text:style-name="P121"/>
            <text:p text:style-name="P121">.LBB0_11: </text:p>
            <text:p text:style-name="P121"/>
            <text:p text:style-name="P121"><text:tab/>movl<text:tab/>k5(%rip), %eax</text:p>
            <text:p text:style-name="P121"><text:tab/>subl<text:tab/>$1, %eax</text:p>
            <text:p text:style-name="P121"><text:tab/>movl<text:tab/>%eax, k5(%rip)</text:p>
            <text:p text:style-name="P121"/>
            <text:p text:style-name="P121"><text:tab/>movl<text:tab/>j5(%rip), %eax</text:p>
            <text:p text:style-name="P121"><text:tab/>addl<text:tab/>$1, %eax</text:p>
            <text:p text:style-name="P121"><text:tab/>movl<text:tab/>%eax, j5(%rip)</text:p>
            <text:p text:style-name="P121"/>
            <text:p text:style-name="P121"><text:tab/>imull<text:tab/>$3, k5(%rip), %eax</text:p>
            <text:p text:style-name="P121"><text:tab/>imull<text:tab/>$5, j5(%rip), %ecx</text:p>
            <text:p text:style-name="P121"><text:tab/>cltd</text:p>
            <text:p text:style-name="P121"><text:tab/>idivl<text:tab/>%ecx</text:p>
            <text:p text:style-name="P121"><text:tab/>movl<text:tab/>%eax, i5(%rip)</text:p>
            <text:p text:style-name="P121"/>
            <text:p text:style-name="P121"># %bb.12:</text:p>
            <text:p text:style-name="P121"><text:tab/>cmpl<text:tab/>$0, k5(%rip)</text:p>
            <text:p text:style-name="P121"><text:tab/>jg<text:tab/>.LBB0_11</text:p>
          </table:table-cell>
          <table:table-cell table:style-name="Таблица10.A1" office:value-type="string">
            <text:p text:style-name="P173"><text:tab/>j5 = 0;</text:p>
            <text:p text:style-name="P173"><text:tab/>k5 = 10000;</text:p>
            <text:p text:style-name="P173"><text:tab/>do {</text:p>
            <text:p text:style-name="P173"><text:tab/><text:tab/>k5 = k5 - 1;</text:p>
            <text:p text:style-name="P173"><text:tab/><text:tab/>j5 = j5 + 1;</text:p>
            <text:p text:style-name="P173"><text:tab/><text:tab/>i5 = (k5 * 3) / (j5 * constant5);</text:p>
            <text:p text:style-name="P173"><text:tab/>} while (k5 &gt; 0);</text:p>
          </table:table-cell>
        </table:table-row>
      </table:table>
      <text:p text:style-name="P86"/>
      <text:p text:style-name="P77"/>
      <table:table table:name="Таблица12" table:style-name="Таблица12">
        <table:table-column table:style-name="Таблица12.A"/>
        <table:table-column table:style-name="Таблица12.B"/>
        <table:table-row table:style-name="Таблица12.1">
          <table:table-cell table:style-name="Таблица12.A1" office:value-type="string">
            <text:p text:style-name="P127"><text:tab/>movl<text:tab/>$0, j5(%rip)</text:p>
            <text:p text:style-name="P127"/>
            <text:p text:style-name="P127"><text:tab/>movl<text:tab/>$10000, k5(%rip)</text:p>
            <text:p text:style-name="P127"/>
            <text:p text:style-name="P127">.LBB0_11: </text:p>
            <text:p text:style-name="P127"/>
            <text:p text:style-name="P127"><text:tab/>movl<text:tab/>k5(%rip), %eax</text:p>
            <text:p text:style-name="P127"><text:tab/>subl<text:tab/>$1, %eax</text:p>
            <text:p text:style-name="P127"><text:tab/>movl<text:tab/>%eax, k5(%rip)</text:p>
            <text:p text:style-name="P127"/>
            <text:p text:style-name="P127"><text:tab/>movl<text:tab/>j5(%rip), %eax</text:p>
            <text:p text:style-name="P127"><text:tab/>addl<text:tab/>$1, %eax</text:p>
            <text:p text:style-name="P127"><text:tab/>movl<text:tab/>%eax, j5(%rip)</text:p>
            <text:p text:style-name="P127"/>
            <text:p text:style-name="P127"><text:tab/>imull<text:tab/>$3, k5(%rip), %eax</text:p>
            <text:p text:style-name="P127"><text:tab/>imull<text:tab/>$5, j5(%rip), %ecx</text:p>
            <text:p text:style-name="P127"><text:tab/>cltd</text:p>
            <text:p text:style-name="P127"><text:tab/>idivl<text:tab/>%ecx</text:p>
            <text:p text:style-name="P127"><text:tab/>movl<text:tab/>%eax, i5(%rip)</text:p>
            <text:p text:style-name="P127"/>
            <text:p text:style-name="P127"># %bb.12:</text:p>
            <text:p text:style-name="P127"><text:tab/>cmpl<text:tab/>$0, k5(%rip)</text:p>
            <text:p text:style-name="P127"><text:tab/>jg<text:tab/>.LBB0_11</text:p>
          </table:table-cell>
          <table:table-cell table:style-name="Таблица12.A1" office:value-type="string">
            <text:p text:style-name="P148"><text:tab/>movl<text:tab/>$10000, j5(%rip)</text:p>
            <text:p text:style-name="P121"><text:tab/>movl<text:tab/>$0, i5(%rip)</text:p>
          </table:table-cell>
        </table:table-row>
      </table:table>
      <text:p text:style-name="P77"/>
      <text:p text:style-name="P18"><text:span text:style-name="T43">При оптимизации ц</text:span>икл был <text:span text:style-name="T43">удалён</text:span></text:p>
      <table:table table:name="Таблица26" table:style-name="Таблица26">
        <table:table-column table:style-name="Таблица26.A" table:number-columns-repeated="2"/>
        <table:table-row>
          <table:table-cell table:style-name="Таблица26.A1" office:value-type="string">
            <text:p text:style-name="P121"><text:tab/>cmpl<text:tab/>$100, i(%rip)</text:p>
            <text:p text:style-name="P121"><text:tab/>jge<text:tab/>.LBB0_17</text:p>
            <text:p text:style-name="P121"># %bb.15: </text:p>
            <text:p text:style-name="P121"><text:tab/>movl<text:tab/>i(%rip), %eax</text:p>
            <text:p text:style-name="P121"><text:tab/>shll<text:tab/>%eax</text:p>
            <text:p text:style-name="P121"><text:tab/>addl<text:tab/>$3, %eax</text:p>
            <text:p text:style-name="P121"><text:tab/>movslq<text:tab/>%eax, %rcx</text:p>
            <text:p text:style-name="P121"><text:tab/>leaq<text:tab/>ivector5(%rip), %rax</text:p>
            <text:p text:style-name="P121"><text:tab/>movl<text:tab/>$5, (%rax,%rcx,4)</text:p>
            <text:p text:style-name="P121"># %bb.16: </text:p>
            <text:p text:style-name="P121"><text:tab/>movl<text:tab/>i(%rip), %eax</text:p>
            <text:p text:style-name="P121"><text:tab/>addl<text:tab/>$1, %eax</text:p>
            <text:p text:style-name="P121"><text:tab/>movl<text:tab/>%eax, i(%rip)</text:p>
            <text:p text:style-name="P121"><text:tab/>jmp<text:tab/>.LBB0_14<text:tab/></text:p>
            <text:p text:style-name="P121">.LBB0_17:</text:p>
          </table:table-cell>
          <table:table-cell table:style-name="Таблица26.A1" office:value-type="string">
            <text:p text:style-name="P186">for (i = 0; i &lt; 100; i++)</text:p>
            <text:p text:style-name="P186"><text:tab/><text:tab/>ivector5[i * 2 + 3] = 5;</text:p>
          </table:table-cell>
        </table:table-row>
      </table:table>
      <text:p text:style-name="P18"/>
      <text:p text:style-name="P21">Без оптимизации переменная индукции осталась<text:line-break/><text:line-break/></text:p>
      <table:table table:name="Таблица27" table:style-name="Таблица27">
        <table:table-column table:style-name="Таблица27.A" table:number-columns-repeated="2"/>
        <table:table-row>
          <table:table-cell table:style-name="Таблица27.A1" office:value-type="string">
            <text:p text:style-name="P148"><text:tab/>cmpl<text:tab/>$100, i(%rip)</text:p>
            <text:p text:style-name="P148"><text:tab/>jge<text:tab/>.LBB0_17</text:p>
            <text:p text:style-name="P148"># %bb.15: </text:p>
            <text:p text:style-name="P148"><text:tab/>movl<text:tab/>i(%rip), %eax</text:p>
            <text:p text:style-name="P148"><text:tab/>shll<text:tab/>%eax</text:p>
            <text:p text:style-name="P148"><text:tab/>addl<text:tab/>$3, %eax</text:p>
            <text:p text:style-name="P148"><text:tab/>movslq<text:tab/>%eax, %rcx</text:p>
            <text:p text:style-name="P148"><text:tab/>leaq<text:tab/>ivector5(%rip), %rax</text:p>
            <text:p text:style-name="P148"><text:tab/>movl<text:tab/>$5, (%rax,%rcx,4)</text:p>
            <text:p text:style-name="P148"># %bb.16: </text:p>
            <text:p text:style-name="P148"><text:tab/>movl<text:tab/>i(%rip), %eax</text:p>
            <text:p text:style-name="P148"><text:tab/>addl<text:tab/>$1, %eax</text:p>
            <text:p text:style-name="P148"><text:tab/>movl<text:tab/>%eax, i(%rip)</text:p>
            <text:p text:style-name="P148"><text:tab/>jmp<text:tab/>.LBB0_14<text:tab/></text:p>
            <text:p text:style-name="P148">.LBB0_17:</text:p>
          </table:table-cell>
          <table:table-cell table:style-name="Таблица27.A1" office:value-type="string">
            <text:p text:style-name="P148"><text:tab/>xorl<text:tab/>%eax, %eax</text:p>
            <text:p text:style-name="P121"><text:tab/>leaq<text:tab/>ivector5(%rip), %rcx</text:p>
            <text:p text:style-name="P121"><text:tab/>.p2align<text:tab/>4, 0x90</text:p>
            <text:p text:style-name="P121"><text:tab/>.LBB0_7: <text:s text:c="2"/></text:p>
            <text:p text:style-name="P121"><text:tab/>movl<text:tab/>$5, 12(%rcx,%rax,8)</text:p>
            <text:p text:style-name="P121"><text:tab/>movl<text:tab/>$5, 20(%rcx,%rax,8)</text:p>
            <text:p text:style-name="P121"><text:tab/>movl<text:tab/>$5, 28(%rcx,%rax,8)</text:p>
            <text:p text:style-name="P121"><text:tab/>movl<text:tab/>$5, 36(%rcx,%rax,8)</text:p>
            <text:p text:style-name="P121"><text:tab/>addq<text:tab/>$4, %rax</text:p>
            <text:p text:style-name="P121"><text:tab/>cmpq<text:tab/>$100, %rax</text:p>
            <text:p text:style-name="P121"><text:tab/>jne<text:tab/>.LBB0_7</text:p>
          </table:table-cell>
        </table:table-row>
      </table:table>
      <text:p text:style-name="P21"/>
      <text:p text:style-name="P21">При оптимизации переменная индукции была убрана</text:p>
      <table:table table:name="Таблица14" table:style-name="Таблица14">
        <table:table-column table:style-name="Таблица14.A"/>
        <table:table-column table:style-name="Таблица14.B"/>
        <table:table-row>
          <table:table-cell table:style-name="Таблица14.A1" office:value-type="string">
            <text:p text:style-name="P125"><text:tab/><text:span text:style-name="T38">movl<text:tab/>h3(%rip), %eax</text:span></text:p>
            <text:p text:style-name="P125"><text:tab/><text:span text:style-name="T38">addl<text:tab/>k3(%rip), %eax</text:span></text:p>
            <text:p text:style-name="P125"><text:tab/>cmpl<text:tab/>$0, %eax</text:p>
            <text:p text:style-name="P125"><text:tab/>jl<text:tab/>.LBB0_22</text:p>
            <text:p text:style-name="P125"># %bb.21:</text:p>
            <text:p text:style-name="P125"><text:tab/><text:span text:style-name="T38">movl<text:tab/>h3(%rip), %eax</text:span></text:p>
            <text:p text:style-name="P125"><text:tab/><text:span text:style-name="T38">addl<text:tab/>k3(%rip), %eax</text:span></text:p>
            <text:p text:style-name="P125"><text:tab/>cmpl<text:tab/>$5, %eax</text:p>
            <text:p text:style-name="P125"><text:tab/>jle<text:tab/>.LBB0_23</text:p>
            <text:p text:style-name="P125">.LBB0_22:</text:p>
            <text:p text:style-name="P125"/>
            <text:p text:style-name="P125"><text:tab/>leaq<text:tab/>.L.str.2(%rip), %rdi</text:p>
            <text:p text:style-name="P125"><text:tab/>movb<text:tab/>$0, %al</text:p>
            <text:p text:style-name="P125"><text:tab/>callq<text:tab/>printf@PLT</text:p>
            <text:p text:style-name="P125"><text:tab/>mp<text:tab/>.LBB0_24</text:p>
            <text:p text:style-name="P125">.LBB0_23:</text:p>
            <text:p text:style-name="P125"/>
            <text:p text:style-name="P125"><text:tab/><text:span text:style-name="T38">movl<text:tab/>h3(%rip), %eax</text:span></text:p>
            <text:p text:style-name="P125"><text:tab/><text:span text:style-name="T38">addl<text:tab/>k3(%rip), %eax</text:span></text:p>
            <text:p text:style-name="P125"><text:tab/>cltd</text:p>
            <text:p text:style-name="P125"><text:tab/>idivl<text:tab/>i3(%rip)</text:p>
            <text:p text:style-name="P125"/>
            <text:p text:style-name="P125"><text:tab/>movl<text:tab/>%eax, m3(%rip)</text:p>
            <text:p text:style-name="P125"><text:tab/>movl<text:tab/>m3(%rip), %esi</text:p>
            <text:p text:style-name="P125"><text:tab/>leaq<text:tab/>.L.str(%rip), %rdi</text:p>
            <text:p text:style-name="P125"><text:tab/>movb<text:tab/>$0, %al</text:p>
            <text:p text:style-name="P125"><text:tab/>callq<text:tab/>printf@PLT</text:p>
            <text:p text:style-name="P125"/>
            <text:p text:style-name="P125"><text:tab/>movl<text:tab/>i3(%rip), %eax</text:p>
            <text:p text:style-name="P125"><text:tab/><text:span text:style-name="T38">movl<text:tab/>h3(%rip), %ecx</text:span></text:p>
            <text:p text:style-name="P125"><text:tab/><text:span text:style-name="T38">addl<text:tab/>k3(%rip), %ecx</text:span></text:p>
            <text:p text:style-name="P125"><text:tab/>addl<text:tab/>%ecx, %eax</text:p>
            <text:p text:style-name="P125"><text:tab/>movl<text:tab/>%eax, g3(%rip)</text:p>
            <text:p text:style-name="P125"/>
            <text:p text:style-name="P125"><text:tab/>movl<text:tab/>g3(%rip), %esi</text:p>
            <text:p text:style-name="P125"><text:tab/>leaq<text:tab/>.L.str(%rip), %rdi</text:p>
            <text:p text:style-name="P125"><text:tab/>movb<text:tab/>$0, %al</text:p>
            <text:p text:style-name="P125"><text:tab/>callq<text:tab/>printf@PLT</text:p>
            <text:p text:style-name="P125">.LBB0_24:</text:p>
          </table:table-cell>
          <table:table-cell table:style-name="Таблица14.A1" office:value-type="string">
            <text:p text:style-name="P101"><text:tab/>if ((h3 + k3) &lt; 0 || (h3 + k3) &gt; 5)</text:p>
            <text:p text:style-name="P101"><text:tab/><text:tab/>printf("Common subexpression elimination\n");</text:p>
            <text:p text:style-name="P101"><text:tab/>else {</text:p>
            <text:p text:style-name="P101"><text:tab/><text:tab/>m3 = (h3 + k3) / i3;</text:p>
            <text:p text:style-name="P101"><text:tab/><text:tab/>printf("%d", m3);</text:p>
            <text:p text:style-name="P101"><text:tab/><text:tab/>g3 = i3 + (h3 + k3);</text:p>
            <text:p text:style-name="P101"><text:tab/><text:tab/>printf("%d", g3);</text:p>
            <text:p text:style-name="P101"><text:tab/>}</text:p>
          </table:table-cell>
        </table:table-row>
      </table:table>
      <text:p text:style-name="P18"><text:span text:style-name="T1"/></text:p>
      <text:p text:style-name="P12">Без оптимизации вынесение общих подвыражений не наблюдается</text:p>
      <table:table table:name="Таблица15" table:style-name="Таблица15">
        <table:table-column table:style-name="Таблица15.A"/>
        <table:table-column table:style-name="Таблица15.B"/>
        <table:table-row table:style-name="Таблица15.1">
          <table:table-cell table:style-name="Таблица15.A1" office:value-type="string">
            <text:p text:style-name="P124"><text:tab/><text:span text:style-name="T38">movl<text:tab/>h3(%rip), %eax</text:span></text:p>
            <text:p text:style-name="P124"><text:tab/><text:span text:style-name="T38">addl<text:tab/>k3(%rip), %eax</text:span></text:p>
            <text:p text:style-name="P124"><text:tab/>cmpl<text:tab/>$0, %eax</text:p>
            <text:p text:style-name="P124"><text:tab/>jl<text:tab/>.LBB0_22</text:p>
            <text:p text:style-name="P124"># %bb.21:</text:p>
            <text:p text:style-name="P124"><text:tab/><text:span text:style-name="T38">movl<text:tab/>h3(%rip), %eax</text:span></text:p>
            <text:p text:style-name="P124"><text:tab/><text:span text:style-name="T38">addl<text:tab/>k3(%rip), %eax</text:span></text:p>
            <text:p text:style-name="P124"><text:tab/>cmpl<text:tab/>$5, %eax</text:p>
            <text:p text:style-name="P124"><text:tab/>jle<text:tab/>.LBB0_23</text:p>
            <text:p text:style-name="P124">.LBB0_22:</text:p>
            <text:p text:style-name="P124"/>
            <text:p text:style-name="P124"><text:tab/>leaq<text:tab/>.L.str.2(%rip), %rdi</text:p>
            <text:p text:style-name="P124"><text:tab/>movb<text:tab/>$0, %al</text:p>
            <text:p text:style-name="P124"><text:tab/>callq<text:tab/>printf@PLT</text:p>
            <text:p text:style-name="P124"><text:tab/>mp<text:tab/>.LBB0_24</text:p>
            <text:p text:style-name="P124">.LBB0_23:</text:p>
            <text:p text:style-name="P124"/>
            <text:p text:style-name="P124"><text:tab/><text:span text:style-name="T38">movl<text:tab/>h3(%rip), %eax</text:span></text:p>
            <text:p text:style-name="P124"><text:tab/><text:span text:style-name="T38">addl<text:tab/>k3(%rip), %eax</text:span></text:p>
            <text:p text:style-name="P124"><text:tab/>cltd</text:p>
            <text:p text:style-name="P124"><text:tab/>idivl<text:tab/>i3(%rip)</text:p>
            <text:p text:style-name="P124"/>
            <text:p text:style-name="P124"><text:tab/>movl<text:tab/>%eax, m3(%rip)</text:p>
            <text:p text:style-name="P124"><text:tab/>movl<text:tab/>m3(%rip), %esi</text:p>
            <text:p text:style-name="P124"><text:tab/>leaq<text:tab/>.L.str(%rip), %rdi</text:p>
            <text:p text:style-name="P124"><text:tab/>movb<text:tab/>$0, %al</text:p>
            <text:p text:style-name="P124"><text:tab/>callq<text:tab/>printf@PLT</text:p>
            <text:p text:style-name="P124"/>
            <text:p text:style-name="P124"><text:tab/>movl<text:tab/>i3(%rip), %eax</text:p>
            <text:p text:style-name="P124"><text:tab/><text:span text:style-name="T38">movl<text:tab/>h3(%rip), %ecx</text:span></text:p>
            <text:p text:style-name="P124"><text:tab/><text:span text:style-name="T38">addl<text:tab/>k3(%rip), %ecx</text:span></text:p>
            <text:p text:style-name="P124"><text:tab/>addl<text:tab/>%ecx, %eax</text:p>
            <text:p text:style-name="P124"><text:tab/>movl<text:tab/>%eax, g3(%rip)</text:p>
            <text:p text:style-name="P124"/>
            <text:p text:style-name="P124"><text:tab/>movl<text:tab/>g3(%rip), %esi</text:p>
            <text:p text:style-name="P124"><text:tab/>leaq<text:tab/>.L.str(%rip), %rdi</text:p>
            <text:p text:style-name="P124"><text:tab/>movb<text:tab/>$0, %al</text:p>
            <text:p text:style-name="P124"><text:tab/>callq<text:tab/>printf@PLT</text:p>
            <text:p text:style-name="P124">.LBB0_24:</text:p>
          </table:table-cell>
          <table:table-cell table:style-name="Таблица15.A1" office:value-type="string">
            <text:p text:style-name="P125"><text:tab/><text:span text:style-name="T38">movl<text:tab/>k3(%rip), %eax</text:span></text:p>
            <text:p text:style-name="P125"><text:tab/><text:span text:style-name="T38">addl<text:tab/>h3(%rip), %eax</text:span></text:p>
            <text:p text:style-name="P125"><text:tab/>cmpl<text:tab/>$6, <text:span text:style-name="T38">%eax</text:span></text:p>
            <text:p text:style-name="P125"><text:tab/>jb<text:tab/>.LBB0_10</text:p>
            <text:p text:style-name="P125"># %bb.9:</text:p>
            <text:p text:style-name="P125"><text:tab/>leaq<text:tab/>.Lstr.4(%rip), %rdi</text:p>
            <text:p text:style-name="P125"><text:tab/>callq<text:tab/>puts@PLT</text:p>
            <text:p text:style-name="P125"><text:tab/>jmp<text:tab/>.LBB0_11</text:p>
            <text:p text:style-name="P125">.LBB0_10:</text:p>
            <text:p text:style-name="P125"><text:tab/>cltd</text:p>
            <text:p text:style-name="P125"><text:tab/>idivl<text:tab/>i3(%rip)</text:p>
            <text:p text:style-name="P125"><text:tab/>movl<text:tab/><text:span text:style-name="T38">%eax</text:span>, m3(%rip)</text:p>
            <text:p text:style-name="P125"><text:tab/>leaq<text:tab/>.L.str(%rip), %rbx</text:p>
            <text:p text:style-name="P125"><text:tab/>movq<text:tab/>%rbx, %rdi</text:p>
            <text:p text:style-name="P125"><text:tab/><text:span text:style-name="T15">movl<text:tab/>%eax, %esi</text:span></text:p>
            <text:p text:style-name="P125"><text:tab/>xorl<text:tab/>%eax, %eax</text:p>
            <text:p text:style-name="P125"><text:tab/>callq<text:tab/>printf@PLT</text:p>
            <text:p text:style-name="P125"><text:tab/>movl<text:tab/>h3(%rip), %esi</text:p>
            <text:p text:style-name="P125"><text:tab/>addl<text:tab/>i3(%rip), %esi</text:p>
            <text:p text:style-name="P125"><text:tab/>addl<text:tab/>k3(%rip), %esi</text:p>
            <text:p text:style-name="P125"><text:tab/>movl<text:tab/>%esi, g3(%rip)</text:p>
            <text:p text:style-name="P125"><text:tab/>movq<text:tab/>%rbx, %rdi</text:p>
            <text:p text:style-name="P125"><text:tab/>xorl<text:tab/>%eax, %eax</text:p>
            <text:p text:style-name="P125"><text:tab/>callq<text:tab/>printf@PLT</text:p>
            <text:p text:style-name="P125">.LBB0_11:</text:p>
          </table:table-cell>
        </table:table-row>
      </table:table>
      <text:p text:style-name="P12"/>
      <text:p text:style-name="P15">Пот оптимизации clang вынес общее подвыражение <text:span text:style-name="T42">в регистр</text:span></text:p>
      <text:p text:style-name="P15"><text:span text:style-name="T4"/></text:p>
      <table:table table:name="Таблица13" table:style-name="Таблица13">
        <table:table-column table:style-name="Таблица13.A" table:number-columns-repeated="2"/>
        <table:table-row>
          <table:table-cell table:style-name="Таблица13.A1" office:value-type="string">
            <text:p text:style-name="P121"><text:tab/>movl<text:tab/>$0, i4(%rip)</text:p>
            <text:p text:style-name="P121">.LBB0_25:</text:p>
            <text:p text:style-name="P121"><text:tab/>cmpl<text:tab/>$2, i4(%rip)</text:p>
            <text:p text:style-name="P121"><text:tab/>jg<text:tab/>.LBB0_28</text:p>
            <text:p text:style-name="P121"># %bb.26: </text:p>
            <text:p text:style-name="P121"><text:tab/><text:span text:style-name="T38">movl<text:tab/>j(%rip), %eax</text:span></text:p>
            <text:p text:style-name="P121"><text:tab/><text:span text:style-name="T38">imull<text:tab/>k(%rip), %eax</text:span></text:p>
            <text:p text:style-name="P121"><text:tab/>movb<text:tab/>%al, %dl</text:p>
            <text:p text:style-name="P121"><text:tab/>movslq<text:tab/>i4(%rip), %rcx</text:p>
            <text:p text:style-name="P121"><text:tab/>leaq<text:tab/>ivector2(%rip), %rax</text:p>
            <text:p text:style-name="P121"><text:tab/>movb<text:tab/>%dl, (%rax,%rcx)</text:p>
            <text:p text:style-name="P121"><text:tab/>movslq<text:tab/>i4(%rip), %rcx</text:p>
            <text:p text:style-name="P121"><text:tab/>leaq<text:tab/>ivector2(%rip), %rax</text:p>
            <text:p text:style-name="P121"><text:tab/>movzbl<text:tab/>(%rax,%rcx), %esi</text:p>
            <text:p text:style-name="P121"><text:tab/>leaq<text:tab/>.L.str(%rip), %rdi</text:p>
            <text:p text:style-name="P121"><text:tab/>movb<text:tab/>$0, %al</text:p>
            <text:p text:style-name="P121"><text:tab/>callq<text:tab/>printf@PLT</text:p>
            <text:p text:style-name="P121"># %bb.27:</text:p>
            <text:p text:style-name="P121"><text:tab/>movl<text:tab/>i4(%rip), %eax</text:p>
            <text:p text:style-name="P121"><text:tab/>addl<text:tab/>$1, %eax</text:p>
            <text:p text:style-name="P121"><text:tab/>movl<text:tab/>%eax, i4(%rip)</text:p>
            <text:p text:style-name="P121"><text:tab/>jmp<text:tab/>.LBB0_25</text:p>
            <text:p text:style-name="P121">.LBB0_28:</text:p>
          </table:table-cell>
          <table:table-cell table:style-name="Таблица13.A1" office:value-type="string">
            <text:p text:style-name="P174"><text:tab/>for (i4 = 0; i4 &lt;= max_vector; i4++){</text:p>
            <text:p text:style-name="P173"><text:tab/><text:tab/>ivector2[i4] = j * k;</text:p>
            <text:p text:style-name="P173"><text:tab/>printf("%d", ivector2[i4]);</text:p>
            <text:p text:style-name="P173">}</text:p>
          </table:table-cell>
        </table:table-row>
      </table:table>
      <text:p text:style-name="P38"><text:span text:style-name="T23"/></text:p>
      <text:p text:style-name="P42"><text:span text:style-name="T23">Видно, что умножение происходит постоянно и инвариантный код не выносится из цикла</text:span></text:p>
      <text:p text:style-name="P80"><text:span text:style-name="T23"/></text:p>
      <table:table table:name="Таблица16" table:style-name="Таблица16">
        <table:table-column table:style-name="Таблица16.A" table:number-columns-repeated="2"/>
        <table:table-row table:style-name="Таблица16.1">
          <table:table-cell table:style-name="Таблица16.A1" office:value-type="string">
            <text:p text:style-name="P123"><text:tab/>movl<text:tab/>$0, i4(%rip)</text:p>
            <text:p text:style-name="P123">.LBB0_25:</text:p>
            <text:p text:style-name="P123"><text:tab/>cmpl<text:tab/>$2, i4(%rip)</text:p>
            <text:p text:style-name="P123"><text:tab/>jg<text:tab/>.LBB0_28</text:p>
            <text:p text:style-name="P123"># %bb.26: </text:p>
            <text:p text:style-name="P123"><text:tab/><text:span text:style-name="T38">movl<text:tab/>j(%rip), %eax</text:span></text:p>
            <text:p text:style-name="P123"><text:tab/><text:span text:style-name="T38">imull<text:tab/>k(%rip), %eax</text:span></text:p>
            <text:p text:style-name="P123"><text:tab/>movb<text:tab/>%al, %dl</text:p>
            <text:p text:style-name="P123"><text:tab/>movslq<text:tab/>i4(%rip), %rcx</text:p>
            <text:p text:style-name="P123"><text:tab/>leaq<text:tab/>ivector2(%rip), %rax</text:p>
            <text:p text:style-name="P123"><text:tab/>movb<text:tab/>%dl, (%rax,%rcx)</text:p>
            <text:p text:style-name="P123"><text:tab/>movslq<text:tab/>i4(%rip), %rcx</text:p>
            <text:p text:style-name="P123"><text:tab/>leaq<text:tab/>ivector2(%rip), %rax</text:p>
            <text:p text:style-name="P123"><text:tab/>movzbl<text:tab/>(%rax,%rcx), %esi</text:p>
            <text:p text:style-name="P123"><text:tab/>leaq<text:tab/>.L.str(%rip), %rdi</text:p>
            <text:p text:style-name="P123"><text:tab/>movb<text:tab/>$0, %al</text:p>
            <text:p text:style-name="P123"><text:tab/>callq<text:tab/>printf@PLT</text:p>
            <text:p text:style-name="P123"># %bb.27:</text:p>
            <text:p text:style-name="P123"><text:tab/>movl<text:tab/>i4(%rip), %eax</text:p>
            <text:p text:style-name="P123"><text:tab/>addl<text:tab/>$1, %eax</text:p>
            <text:p text:style-name="P123"><text:tab/>movl<text:tab/>%eax, i4(%rip)</text:p>
            <text:p text:style-name="P123"><text:tab/>jmp<text:tab/>.LBB0_25</text:p>
            <text:p text:style-name="P123">.LBB0_28:</text:p>
          </table:table-cell>
          <table:table-cell table:style-name="Таблица16.A1" office:value-type="string">
            <text:p text:style-name="P121"><text:tab/>movl<text:tab/>$0, i4(%rip)</text:p>
            <text:p text:style-name="P121"><text:tab/>leaq<text:tab/>ivector2(%rip), %r14</text:p>
            <text:p text:style-name="P121"><text:tab/>leaq<text:tab/>.L.str(%rip), %rbx</text:p>
            <text:p text:style-name="P121"><text:tab/>xorl<text:tab/>%eax, %eax</text:p>
            <text:p text:style-name="P121"><text:tab/>.p2align<text:tab/>4, 0x90</text:p>
            <text:p text:style-name="P121">.LBB0_12:</text:p>
            <text:p text:style-name="P121"><text:tab/><text:span text:style-name="T38">movl<text:tab/>k(%rip), %ecx</text:span></text:p>
            <text:p text:style-name="P121"><text:tab/><text:span text:style-name="T38">imull<text:tab/>j(%rip), %ecx</text:span></text:p>
            <text:p text:style-name="P121"><text:tab/>cltq</text:p>
            <text:p text:style-name="P121"><text:tab/>movb<text:tab/>%cl, (%rax,%r14)</text:p>
            <text:p text:style-name="P121"><text:tab/>movzbl<text:tab/>%cl, %esi</text:p>
            <text:p text:style-name="P121"><text:tab/>movq<text:tab/>%rbx, %rdi</text:p>
            <text:p text:style-name="P121"><text:tab/>xorl<text:tab/>%eax, %eax</text:p>
            <text:p text:style-name="P121"><text:tab/>callq<text:tab/>printf@PLT</text:p>
            <text:p text:style-name="P122"><text:tab/>movl<text:tab/>i4(%rip), %ecx</text:p>
            <text:p text:style-name="P121"><text:tab/>leal<text:tab/>1(%rcx), %eax</text:p>
            <text:p text:style-name="P121"><text:tab/>movl<text:tab/>%eax, i4(%rip)</text:p>
            <text:p text:style-name="P121"><text:tab/>cmpl<text:tab/>$2, %ecx</text:p>
            <text:p text:style-name="P121"><text:tab/>jl<text:tab/>.LBB0_12</text:p>
          </table:table-cell>
        </table:table-row>
      </table:table>
      <text:p text:style-name="P80"><text:span text:style-name="T23"/></text:p>
      <text:p text:style-name="P45"><text:span text:style-name="T23">При оптимизации по скорости работы инвариантный код всё равно не выносится</text:span></text:p>
      <table:table table:name="Таблица17" table:style-name="Таблица17">
        <table:table-column table:style-name="Таблица17.A" table:number-columns-repeated="2"/>
        <table:table-row>
          <table:table-cell table:style-name="Таблица17.A1" office:value-type="string">
            <text:p text:style-name="P121">dead_code: <text:s text:c="29"/># @dead_code</text:p>
            <text:p text:style-name="P121"><text:tab/>.cfi_startproc</text:p>
            <text:p text:style-name="P121"># %bb.0:</text:p>
            <text:p text:style-name="P121"><text:tab/>pushq<text:tab/>%rbp</text:p>
            <text:p text:style-name="P121"><text:tab/>.cfi_def_cfa_offset 16</text:p>
            <text:p text:style-name="P121"><text:tab/>.cfi_offset %rbp, -16</text:p>
            <text:p text:style-name="P121"><text:tab/>movq<text:tab/>%rsp, %rbp</text:p>
            <text:p text:style-name="P121"><text:tab/>.cfi_def_cfa_register %rbp</text:p>
            <text:p text:style-name="P121"><text:tab/>movl<text:tab/>%edi, -4(%rbp)</text:p>
            <text:p text:style-name="P121"><text:tab/>movq<text:tab/>%rsi, -16(%rbp)</text:p>
            <text:p text:style-name="P121"><text:tab/>movl<text:tab/>-4(%rbp), %eax</text:p>
            <text:p text:style-name="P121"><text:tab/>movl<text:tab/>%eax, -20(%rbp)</text:p>
            <text:p text:style-name="P121"><text:tab/>popq<text:tab/>%rbp</text:p>
            <text:p text:style-name="P121"><text:tab/>.cfi_def_cfa %rsp, 8</text:p>
            <text:p text:style-name="P121"><text:tab/>retq</text:p>
          </table:table-cell>
          <table:table-cell table:style-name="Таблица17.A1" office:value-type="string">
            <text:p text:style-name="P173">void dead_code(int a,</text:p>
            <text:p text:style-name="P173"><text:tab/>char *b)</text:p>
            <text:p text:style-name="P173">{</text:p>
            <text:p text:style-name="P173"><text:tab/>int idead_store;</text:p>
            <text:p text:style-name="P173"/>
            <text:p text:style-name="P173"><text:tab/>idead_store = a;</text:p>
            <text:p text:style-name="P173"><text:tab/>if (0)</text:p>
            <text:p text:style-name="P173"><text:tab/><text:tab/>printf("%s\n", b);</text:p>
            <text:p text:style-name="P173">}</text:p>
          </table:table-cell>
        </table:table-row>
      </table:table>
      <text:p text:style-name="P45"><text:span text:style-name="T23"/></text:p>
      <text:p text:style-name="P45"><text:span text:style-name="T23">Без оптимизации компилятор напрямую сгенерировал функцию, с оптимизацией же функция сгенерировалась пустой, </text:span><text:span text:style-name="T24">без</text:span><text:span text:style-name="T21"> </text:span><text:span text:style-name="T23">недостижим</text:span><text:span text:style-name="T21">ого</text:span><text:span text:style-name="T23"> код</text:span><text:span text:style-name="T21">а</text:span><text:span text:style-name="T23"> и лишни</text:span><text:span text:style-name="T21">х</text:span><text:span text:style-name="T23"> присваивания</text:span></text:p>
      <table:table table:name="Таблица18" table:style-name="Таблица18">
        <table:table-column table:style-name="Таблица18.A" table:number-columns-repeated="2"/>
        <table:table-row table:style-name="Таблица18.1">
          <table:table-cell table:style-name="Таблица18.A1" office:value-type="string">
            <text:p text:style-name="P121">unnecessary_loop: </text:p>
            <text:p text:style-name="P121"><text:tab/>.cfi_startproc</text:p>
            <text:p text:style-name="P121"># %bb.0:</text:p>
            <text:p text:style-name="P121"><text:tab/>pushq<text:tab/>%rbp</text:p>
            <text:p text:style-name="P121"><text:tab/>.cfi_def_cfa_offset 16</text:p>
            <text:p text:style-name="P121"><text:tab/>.cfi_offset %rbp, -16</text:p>
            <text:p text:style-name="P121"><text:tab/>movq<text:tab/>%rsp, %rbp</text:p>
            <text:p text:style-name="P121"><text:tab/>.cfi_def_cfa_register %rbp</text:p>
            <text:p text:style-name="P121"><text:tab/>subq<text:tab/>$16, %rsp</text:p>
            <text:p text:style-name="P121"><text:tab/>movl<text:tab/>$0, -4(%rbp)</text:p>
            <text:p text:style-name="P121"><text:tab/>movl<text:tab/>$0, i(%rip)</text:p>
            <text:p text:style-name="P121">.LBB2_1: <text:s/></text:p>
            <text:p text:style-name="P121"><text:tab/>cmpl<text:tab/>$5, i(%rip)</text:p>
            <text:p text:style-name="P121"><text:tab/>jge<text:tab/>.LBB2_4</text:p>
            <text:p text:style-name="P121"># %bb.2: <text:s text:c="2"/></text:p>
            <text:p text:style-name="P121"><text:tab/>movl<text:tab/>-4(%rbp), %eax</text:p>
            <text:p text:style-name="P121"><text:tab/>addl<text:tab/>j5(%rip), %eax</text:p>
            <text:p text:style-name="P121"><text:tab/>movl<text:tab/>%eax, k5(%rip)</text:p>
            <text:p text:style-name="P121"># %bb.3: <text:s/></text:p>
            <text:p text:style-name="P121"><text:tab/>movl<text:tab/>i(%rip), %eax</text:p>
            <text:p text:style-name="P121"><text:tab/>addl<text:tab/>$1, %eax</text:p>
            <text:p text:style-name="P121"><text:tab/>movl<text:tab/>%eax, i(%rip)</text:p>
            <text:p text:style-name="P121"><text:tab/>jmp<text:tab/>.LBB2_1</text:p>
            <text:p text:style-name="P121">.LBB2_4:</text:p>
            <text:p text:style-name="P121"><text:tab/>movl<text:tab/>k5(%rip), %esi</text:p>
            <text:p text:style-name="P121"><text:tab/>leaq<text:tab/>.L.str(%rip), %rdi</text:p>
            <text:p text:style-name="P121"><text:tab/>movb<text:tab/>$0, %al</text:p>
            <text:p text:style-name="P121"><text:tab/>callq<text:tab/>printf@PLT</text:p>
            <text:p text:style-name="P121"><text:tab/>addq<text:tab/>$16, %rsp</text:p>
            <text:p text:style-name="P121"><text:tab/>popq<text:tab/>%rbp</text:p>
            <text:p text:style-name="P121"><text:tab/>.cfi_def_cfa %rsp, 8</text:p>
            <text:p text:style-name="P121"><text:tab/>retq</text:p>
          </table:table-cell>
          <table:table-cell table:style-name="Таблица18.A1" office:value-type="string">
            <text:p text:style-name="P173">void unnecessary_loop()</text:p>
            <text:p text:style-name="P173">{</text:p>
            <text:p text:style-name="P173"><text:tab/>int x;</text:p>
            <text:p text:style-name="P173"/>
            <text:p text:style-name="P173"><text:tab/>x = 0;</text:p>
            <text:p text:style-name="P173"><text:tab/>for (i = 0; i &lt; 5; i++)</text:p>
            <text:p text:style-name="P173"><text:tab/><text:tab/>k5 = x + j5;</text:p>
            <text:p text:style-name="P173"><text:tab/>printf("%d", k5);</text:p>
            <text:p text:style-name="P173">}</text:p>
          </table:table-cell>
        </table:table-row>
      </table:table>
      <text:p text:style-name="P48"><text:span text:style-name="T23"/></text:p>
      <text:p text:style-name="P49"><text:span text:style-name="T23">Без оптимизации цикл остался</text:span></text:p>
      <text:p text:style-name="P49"><text:span text:style-name="T23"/></text:p>
      <table:table table:name="Таблица19" table:style-name="Таблица19">
        <table:table-column table:style-name="Таблица19.A" table:number-columns-repeated="2"/>
        <table:table-row>
          <table:table-cell table:style-name="Таблица19.A1" office:value-type="string">
            <text:p text:style-name="P141">unnecessary_loop: </text:p>
            <text:p text:style-name="P141"><text:tab/>.cfi_startproc</text:p>
            <text:p text:style-name="P141"># %bb.0:</text:p>
            <text:p text:style-name="P141"><text:tab/>pushq<text:tab/>%rbp</text:p>
            <text:p text:style-name="P141"><text:tab/>.cfi_def_cfa_offset 16</text:p>
            <text:p text:style-name="P141"><text:tab/>.cfi_offset %rbp, -16</text:p>
            <text:p text:style-name="P141"><text:tab/>movq<text:tab/>%rsp, %rbp</text:p>
            <text:p text:style-name="P141"><text:tab/>.cfi_def_cfa_register %rbp</text:p>
            <text:p text:style-name="P141"><text:tab/>subq<text:tab/>$16, %rsp</text:p>
            <text:p text:style-name="P141"><text:tab/>movl<text:tab/>$0, -4(%rbp)</text:p>
            <text:p text:style-name="P141"><text:tab/>movl<text:tab/>$0, i(%rip)</text:p>
            <text:p text:style-name="P141">.LBB2_1: <text:s/></text:p>
            <text:p text:style-name="P141"><text:tab/>cmpl<text:tab/>$5, i(%rip)</text:p>
            <text:p text:style-name="P141"><text:tab/>jge<text:tab/>.LBB2_4</text:p>
            <text:p text:style-name="P141"># %bb.2: <text:s text:c="2"/></text:p>
            <text:p text:style-name="P141"><text:tab/>movl<text:tab/>-4(%rbp), %eax</text:p>
            <text:p text:style-name="P141"><text:tab/>addl<text:tab/>j5(%rip), %eax</text:p>
            <text:p text:style-name="P141"><text:tab/>movl<text:tab/>%eax, k5(%rip)</text:p>
            <text:p text:style-name="P141"># %bb.3: <text:s/></text:p>
            <text:p text:style-name="P141"><text:tab/>movl<text:tab/>i(%rip), %eax</text:p>
            <text:p text:style-name="P141"><text:tab/>addl<text:tab/>$1, %eax</text:p>
            <text:p text:style-name="P141"><text:tab/>movl<text:tab/>%eax, i(%rip)</text:p>
            <text:p text:style-name="P141"><text:tab/>jmp<text:tab/>.LBB2_1</text:p>
            <text:p text:style-name="P141">.LBB2_4:</text:p>
            <text:p text:style-name="P141"><text:tab/>movl<text:tab/>k5(%rip), %esi</text:p>
            <text:p text:style-name="P141"><text:tab/>leaq<text:tab/>.L.str(%rip), %rdi</text:p>
            <text:p text:style-name="P141"><text:soft-page-break/><text:tab/>movb<text:tab/>$0, %al</text:p>
            <text:p text:style-name="P141"><text:tab/>callq<text:tab/>printf@PLT</text:p>
            <text:p text:style-name="P141"><text:tab/>addq<text:tab/>$16, %rsp</text:p>
            <text:p text:style-name="P141"><text:tab/>popq<text:tab/>%rbp</text:p>
            <text:p text:style-name="P141"><text:tab/>.cfi_def_cfa %rsp, 8</text:p>
            <text:p text:style-name="P141"><text:tab/>retq</text:p>
          </table:table-cell>
          <table:table-cell table:style-name="Таблица19.A1" office:value-type="string">
            <text:p text:style-name="P117">unnecessary_loop</text:p>
            <text:p text:style-name="P117"><text:tab/>.cfi_startproc</text:p>
            <text:p text:style-name="P117"># %bb.0:</text:p>
            <text:p text:style-name="P117"><text:tab/>movl<text:tab/>j5(%rip), %esi</text:p>
            <text:p text:style-name="P117"><text:tab/>movl<text:tab/>%esi, k5(%rip)</text:p>
            <text:p text:style-name="P117"><text:tab/>movl<text:tab/>$5, i(%rip)</text:p>
            <text:p text:style-name="P117"><text:tab/>leaq<text:tab/>.L.str(%rip), %rdi</text:p>
            <text:p text:style-name="P117"><text:tab/>xorl<text:tab/>%eax, %eax</text:p>
            <text:p text:style-name="P117"><text:tab/>jmp<text:tab/>printf@PLT <text:s text:c="5"/></text:p>
          </table:table-cell>
        </table:table-row>
      </table:table>
      <text:p text:style-name="P49"><text:span text:style-name="T23"/></text:p>
      <text:p text:style-name="P49"><text:span text:style-name="T23">При оптимизации цикл был удалён</text:span></text:p>
      <text:p text:style-name="P49"><text:span text:style-name="T23"/></text:p>
      <text:p text:style-name="P49"><text:span text:style-name="T23"/></text:p>
      <table:table table:name="Таблица20" table:style-name="Таблица20">
        <table:table-column table:style-name="Таблица20.A" table:number-columns-repeated="2"/>
        <table:table-row>
          <table:table-cell table:style-name="Таблица20.A1" office:value-type="string">
            <text:p text:style-name="P121">loop_jamming: <text:s text:c="26"/># @loop_jamming</text:p>
            <text:p text:style-name="P121"><text:tab/>.cfi_startproc</text:p>
            <text:p text:style-name="P121"># %bb.0:</text:p>
            <text:p text:style-name="P121"><text:tab/>pushq<text:tab/>%rbp</text:p>
            <text:p text:style-name="P121"><text:tab/>.cfi_def_cfa_offset 16</text:p>
            <text:p text:style-name="P121"><text:tab/>.cfi_offset %rbp, -16</text:p>
            <text:p text:style-name="P121"><text:tab/>movq<text:tab/>%rsp, %rbp</text:p>
            <text:p text:style-name="P121"><text:tab/>.cfi_def_cfa_register %rbp</text:p>
            <text:p text:style-name="P121"><text:tab/>subq<text:tab/>$16, %rsp</text:p>
            <text:p text:style-name="P121"><text:tab/>movl<text:tab/>%edi, -4(%rbp)</text:p>
            <text:p text:style-name="P121"><text:tab/>movl<text:tab/>$0, i(%rip)</text:p>
            <text:p text:style-name="P121">.LBB3_1: </text:p>
            <text:p text:style-name="P121"><text:tab/>cmpl<text:tab/>$5, i(%rip)</text:p>
            <text:p text:style-name="P121"><text:tab/>jge<text:tab/>.LBB3_4</text:p>
            <text:p text:style-name="P121"># %bb.2: <text:s text:c="2"/></text:p>
            <text:p text:style-name="P121"><text:tab/>movl<text:tab/>-4(%rbp), %eax</text:p>
            <text:p text:style-name="P121"><text:tab/>movl<text:tab/>j5(%rip), %ecx</text:p>
            <text:p text:style-name="P121"><text:tab/>imull<text:tab/>i(%rip), %ecx</text:p>
            <text:p text:style-name="P121"><text:tab/>addl<text:tab/>%ecx, %eax</text:p>
            <text:p text:style-name="P121"><text:tab/>movl<text:tab/>%eax, k5(%rip)</text:p>
            <text:p text:style-name="P121"><text:tab/>movl<text:tab/>k5(%rip), %esi</text:p>
            <text:p text:style-name="P121"><text:tab/>leaq<text:tab/>.L.str(%rip), %rdi</text:p>
            <text:p text:style-name="P121"><text:tab/>movb<text:tab/>$0, %al</text:p>
            <text:p text:style-name="P121"><text:tab/>callq<text:tab/>printf@PLT</text:p>
            <text:p text:style-name="P121"># %bb.3:</text:p>
            <text:p text:style-name="P121"><text:tab/>movl<text:tab/>i(%rip), %eax</text:p>
            <text:p text:style-name="P121"><text:tab/>addl<text:tab/>$1, %eax</text:p>
            <text:p text:style-name="P121"><text:tab/>movl<text:tab/>%eax, i(%rip)</text:p>
            <text:p text:style-name="P121"><text:tab/>jmp<text:tab/>.LBB3_1</text:p>
            <text:p text:style-name="P121">.LBB3_4:</text:p>
            <text:p text:style-name="P121"><text:tab/>movl<text:tab/>$0, i(%rip)</text:p>
            <text:p text:style-name="P121">.LBB3_5: <text:s text:c="9"/></text:p>
            <text:p text:style-name="P121"><text:tab/>cmpl<text:tab/>$5, i(%rip)</text:p>
            <text:p text:style-name="P121"><text:tab/>jge<text:tab/>.LBB3_8</text:p>
            <text:p text:style-name="P121"># %bb.6: <text:s text:c="6"/></text:p>
            <text:p text:style-name="P121"><text:tab/>movl<text:tab/>-4(%rbp), %eax</text:p>
            <text:p text:style-name="P121"><text:tab/>imull<text:tab/>k5(%rip), %eax</text:p>
            <text:p text:style-name="P121"><text:tab/>imull<text:tab/>i(%rip), %eax</text:p>
            <text:p text:style-name="P121"><text:tab/>movl<text:tab/>%eax, i5(%rip)</text:p>
            <text:p text:style-name="P121"><text:tab/>movl<text:tab/>k5(%rip), %esi</text:p>
            <text:p text:style-name="P121"><text:tab/>leaq<text:tab/>.L.str(%rip), %rdi</text:p>
            <text:p text:style-name="P121"><text:tab/>movb<text:tab/>$0, %al</text:p>
            <text:p text:style-name="P121"><text:tab/>callq<text:tab/>printf@PLT</text:p>
            <text:p text:style-name="P142"># %bb.7: <text:s text:c="2"/></text:p>
            <text:p text:style-name="P142"><text:tab/>movl<text:tab/>i(%rip), %eax</text:p>
            <text:p text:style-name="P121"><text:tab/>addl<text:tab/>$1, %eax</text:p>
            <text:p text:style-name="P121"><text:tab/>movl<text:tab/>%eax, i(%rip)</text:p>
            <text:p text:style-name="P121"><text:tab/>jmp<text:tab/>.LBB3_5</text:p>
            <text:p text:style-name="P121">.LBB3_8:</text:p>
            <text:p text:style-name="P121"><text:tab/>addq<text:tab/>$16, %rsp</text:p>
            <text:p text:style-name="P121"><text:tab/>popq<text:tab/>%rbp</text:p>
            <text:p text:style-name="P121"><text:tab/>.cfi_def_cfa %rsp, 8</text:p>
            <text:p text:style-name="P121"><text:tab/>retq</text:p>
          </table:table-cell>
          <table:table-cell table:style-name="Таблица20.A1" office:value-type="string">
            <text:p text:style-name="P173">void loop_jamming(int x)</text:p>
            <text:p text:style-name="P173">{</text:p>
            <text:p text:style-name="P173"><text:tab/>for (i = 0; i &lt; 5; i++) {</text:p>
            <text:p text:style-name="P173"><text:tab/><text:tab/>k5 = x + j5 * i;</text:p>
            <text:p text:style-name="P173"/>
            <text:p text:style-name="P173"><text:tab/><text:tab/>printf("%d", k5);</text:p>
            <text:p text:style-name="P173"><text:tab/>}</text:p>
            <text:p text:style-name="P173"><text:tab/>for (i = 0; i &lt; 5; i++) {</text:p>
            <text:p text:style-name="P173"><text:tab/><text:tab/>i5 = x * k5 * i;</text:p>
            <text:p text:style-name="P173"><text:tab/><text:tab/>printf("%d", k5);</text:p>
            <text:p text:style-name="P173"><text:tab/>}</text:p>
            <text:p text:style-name="P173">}</text:p>
          </table:table-cell>
        </table:table-row>
      </table:table>
      <text:p text:style-name="P49"><text:span text:style-name="T23"/></text:p>
      <text:p text:style-name="P52"><text:span text:style-name="T23"/></text:p>
      <text:p text:style-name="P53"><text:span text:style-name="T23">Без оптимизации было сгенерированно 2 цикла</text:span></text:p>
      <text:p text:style-name="P52"><text:span text:style-name="T23"/></text:p>
      <table:table table:name="Таблица21" table:style-name="Таблица21">
        <table:table-column table:style-name="Таблица21.A" table:number-columns-repeated="2"/>
        <table:table-row table:style-name="Таблица21.1">
          <table:table-cell table:style-name="Таблица21.A1" office:value-type="string">
            <text:p text:style-name="P142">loop_jamming: <text:s text:c="26"/># @loop_jamming</text:p>
            <text:p text:style-name="P142"><text:tab/>.cfi_startproc</text:p>
            <text:p text:style-name="P142"># %bb.0:</text:p>
            <text:p text:style-name="P142"><text:tab/>pushq<text:tab/>%rbp</text:p>
            <text:p text:style-name="P142"><text:tab/>.cfi_def_cfa_offset 16</text:p>
            <text:p text:style-name="P142"><text:tab/>.cfi_offset %rbp, -16</text:p>
            <text:p text:style-name="P142"><text:tab/>movq<text:tab/>%rsp, %rbp</text:p>
            <text:p text:style-name="P142"><text:tab/>.cfi_def_cfa_register %rbp</text:p>
            <text:p text:style-name="P142"><text:tab/>subq<text:tab/>$16, %rsp</text:p>
            <text:p text:style-name="P142"><text:tab/>movl<text:tab/>%edi, -4(%rbp)</text:p>
            <text:p text:style-name="P142"><text:tab/>movl<text:tab/>$0, i(%rip)</text:p>
            <text:p text:style-name="P142">.LBB3_1: </text:p>
            <text:p text:style-name="P142"><text:tab/>cmpl<text:tab/>$5, i(%rip)</text:p>
            <text:p text:style-name="P142"><text:tab/>jge<text:tab/>.LBB3_4</text:p>
            <text:p text:style-name="P142"># %bb.2: <text:s text:c="2"/></text:p>
            <text:p text:style-name="P142"><text:tab/>movl<text:tab/>-4(%rbp), %eax</text:p>
            <text:p text:style-name="P142"><text:tab/>movl<text:tab/>j5(%rip), %ecx</text:p>
            <text:p text:style-name="P142"><text:tab/>imull<text:tab/>i(%rip), %ecx</text:p>
            <text:p text:style-name="P142"><text:tab/>addl<text:tab/>%ecx, %eax</text:p>
            <text:p text:style-name="P142"><text:tab/>movl<text:tab/>%eax, k5(%rip)</text:p>
            <text:p text:style-name="P142"><text:tab/>movl<text:tab/>k5(%rip), %esi</text:p>
            <text:p text:style-name="P142"><text:tab/>leaq<text:tab/>.L.str(%rip), %rdi</text:p>
            <text:p text:style-name="P142"><text:tab/>movb<text:tab/>$0, %al</text:p>
            <text:p text:style-name="P142"><text:tab/>callq<text:tab/>printf@PLT</text:p>
            <text:p text:style-name="P142"># %bb.3:</text:p>
            <text:p text:style-name="P142"><text:tab/>movl<text:tab/>i(%rip), %eax</text:p>
            <text:p text:style-name="P142"><text:tab/>addl<text:tab/>$1, %eax</text:p>
            <text:p text:style-name="P142"><text:tab/>movl<text:tab/>%eax, i(%rip)</text:p>
            <text:p text:style-name="P142"><text:tab/>jmp<text:tab/>.LBB3_1</text:p>
            <text:p text:style-name="P142">.LBB3_4:</text:p>
            <text:p text:style-name="P142"><text:tab/>movl<text:tab/>$0, i(%rip)</text:p>
            <text:p text:style-name="P142">.LBB3_5: <text:s text:c="9"/></text:p>
            <text:p text:style-name="P142"><text:tab/>cmpl<text:tab/>$5, i(%rip)</text:p>
            <text:p text:style-name="P142"><text:tab/>jge<text:tab/>.LBB3_8</text:p>
            <text:p text:style-name="P142"># %bb.6: <text:s text:c="6"/></text:p>
            <text:p text:style-name="P142"><text:tab/>movl<text:tab/>-4(%rbp), %eax</text:p>
            <text:p text:style-name="P142"><text:tab/>imull<text:tab/>k5(%rip), %eax</text:p>
            <text:p text:style-name="P142"><text:tab/>imull<text:tab/>i(%rip), %eax</text:p>
            <text:p text:style-name="P142"><text:tab/>movl<text:tab/>%eax, i5(%rip)</text:p>
            <text:p text:style-name="P142"><text:tab/>movl<text:tab/>k5(%rip), %esi</text:p>
            <text:p text:style-name="P142"><text:tab/>leaq<text:tab/>.L.str(%rip), %rdi</text:p>
            <text:p text:style-name="P142"><text:tab/>movb<text:tab/>$0, %al</text:p>
            <text:p text:style-name="P142"><text:tab/>callq<text:tab/>printf@PLT</text:p>
            <text:p text:style-name="P142"># %bb.7: <text:s text:c="2"/></text:p>
            <text:p text:style-name="P142"><text:tab/>movl<text:tab/>i(%rip), %eax</text:p>
            <text:p text:style-name="P142"><text:tab/>addl<text:tab/>$1, %eax</text:p>
            <text:p text:style-name="P142"><text:tab/>movl<text:tab/>%eax, i(%rip)</text:p>
            <text:p text:style-name="P142"><text:tab/>jmp<text:tab/>.LBB3_5</text:p>
            <text:p text:style-name="P142">.LBB3_8:</text:p>
            <text:p text:style-name="P142"><text:tab/>addq<text:tab/>$16, %rsp</text:p>
            <text:p text:style-name="P142"><text:tab/>popq<text:tab/>%rbp</text:p>
            <text:p text:style-name="P142"><text:tab/>.cfi_def_cfa %rsp, 8</text:p>
            <text:p text:style-name="P142"><text:tab/>retq</text:p>
          </table:table-cell>
          <table:table-cell table:style-name="Таблица21.A1" office:value-type="string">
            <text:p text:style-name="P121">loop_jamming: <text:s text:c="26"/># @loop_jamming</text:p>
            <text:p text:style-name="P121"><text:tab/>.cfi_startproc</text:p>
            <text:p text:style-name="P121"># %bb.0:</text:p>
            <text:p text:style-name="P121"><text:tab/>pushq<text:tab/>%r14</text:p>
            <text:p text:style-name="P121"><text:tab/>.cfi_def_cfa_offset 16</text:p>
            <text:p text:style-name="P121"><text:tab/>pushq<text:tab/>%rbx</text:p>
            <text:p text:style-name="P121"><text:tab/>.cfi_def_cfa_offset 24</text:p>
            <text:p text:style-name="P121"><text:tab/>pushq<text:tab/>%rax</text:p>
            <text:p text:style-name="P121"><text:tab/>.cfi_def_cfa_offset 32</text:p>
            <text:p text:style-name="P121"><text:tab/>.cfi_offset %rbx, -24</text:p>
            <text:p text:style-name="P121"><text:tab/>.cfi_offset %r14, -16</text:p>
            <text:p text:style-name="P121"><text:tab/>movl<text:tab/>%edi, %ebx</text:p>
            <text:p text:style-name="P121"><text:tab/>movl<text:tab/>$0, i(%rip)</text:p>
            <text:p text:style-name="P121"><text:tab/>leaq<text:tab/>.L.str(%rip), %r14</text:p>
            <text:p text:style-name="P121"><text:tab/>xorl<text:tab/>%esi, %esi</text:p>
            <text:p text:style-name="P121"><text:tab/>.p2align<text:tab/>4, 0x90</text:p>
            <text:p text:style-name="P121">.LBB3_1: <text:s text:c="2"/></text:p>
            <text:p text:style-name="P121"><text:tab/>imull<text:tab/>j5(%rip), %esi</text:p>
            <text:p text:style-name="P121"><text:tab/>addl<text:tab/>%ebx, %esi</text:p>
            <text:p text:style-name="P121"><text:tab/>movl<text:tab/>%esi, k5(%rip)</text:p>
            <text:p text:style-name="P121"><text:tab/>movq<text:tab/>%r14, %rdi</text:p>
            <text:p text:style-name="P121"><text:tab/>xorl<text:tab/>%eax, %eax</text:p>
            <text:p text:style-name="P121"><text:tab/>callq<text:tab/>printf@PLT</text:p>
            <text:p text:style-name="P121"><text:tab/>movl<text:tab/>i(%rip), %eax</text:p>
            <text:p text:style-name="P121"><text:tab/>leal<text:tab/>1(%rax), %esi</text:p>
            <text:p text:style-name="P121"><text:tab/>movl<text:tab/>%esi, i(%rip)</text:p>
            <text:p text:style-name="P121"><text:tab/>cmpl<text:tab/>$4, %eax</text:p>
            <text:p text:style-name="P121"><text:tab/>jl<text:tab/>.LBB3_1</text:p>
            <text:p text:style-name="P121"># %bb.2:</text:p>
            <text:p text:style-name="P121"><text:tab/>movl<text:tab/>$0, i(%rip)</text:p>
            <text:p text:style-name="P121"><text:tab/>leaq<text:tab/>.L.str(%rip), %r14</text:p>
            <text:p text:style-name="P121"><text:tab/>xorl<text:tab/>%eax, %eax</text:p>
            <text:p text:style-name="P121"><text:tab/>.p2align<text:tab/>4, 0x90</text:p>
            <text:p text:style-name="P121">.LBB3_3: <text:s text:c="5"/></text:p>
            <text:p text:style-name="P121"><text:tab/>movl<text:tab/>k5(%rip), %esi</text:p>
            <text:p text:style-name="P121"><text:tab/>imull<text:tab/>%ebx, %eax</text:p>
            <text:p text:style-name="P121"><text:tab/>imull<text:tab/>%esi, %eax</text:p>
            <text:p text:style-name="P121"><text:tab/>movl<text:tab/>%eax, i5(%rip)</text:p>
            <text:p text:style-name="P121"><text:tab/>movq<text:tab/>%r14, %rdi</text:p>
            <text:p text:style-name="P121"><text:tab/>xorl<text:tab/>%eax, %eax</text:p>
            <text:p text:style-name="P121"><text:tab/>callq<text:tab/>printf@PLT</text:p>
            <text:p text:style-name="P121"><text:tab/>movl<text:tab/>i(%rip), %ecx</text:p>
            <text:p text:style-name="P121"><text:tab/>leal<text:tab/>1(%rcx), %eax</text:p>
            <text:p text:style-name="P121"><text:tab/>movl<text:tab/>%eax, i(%rip)</text:p>
            <text:p text:style-name="P121"><text:tab/>cmpl<text:tab/>$4, %ecx</text:p>
            <text:p text:style-name="P121"><text:tab/>jl<text:tab/>.LBB3_3</text:p>
            <text:p text:style-name="P121"># %bb.4:</text:p>
            <text:p text:style-name="P121"><text:tab/>addq<text:tab/>$8, %rsp</text:p>
            <text:p text:style-name="P121"><text:tab/>.cfi_def_cfa_offset 24</text:p>
            <text:p text:style-name="P121"><text:tab/>popq<text:tab/>%rbx</text:p>
            <text:p text:style-name="P121"><text:tab/>.cfi_def_cfa_offset 16</text:p>
            <text:p text:style-name="P121"><text:tab/>popq<text:tab/>%r14</text:p>
            <text:p text:style-name="P121"><text:tab/>.cfi_def_cfa_offset 8</text:p>
            <text:p text:style-name="P121"><text:tab/>retq</text:p>
          </table:table-cell>
        </table:table-row>
      </table:table>
      <text:p text:style-name="P52"><text:span text:style-name="T23"/></text:p>
      <text:p text:style-name="P52"><text:span text:style-name="T23">При оптимизации слияния циклов не произошло. Явно видны два цикла .LBB3_1 и .LBB3_3</text:span></text:p>
      <table:table table:name="Таблица22" table:style-name="Таблица22">
        <table:table-column table:style-name="Таблица22.A" table:number-columns-repeated="2"/>
        <table:table-row>
          <table:table-cell table:style-name="Таблица22.A1" office:value-type="string">
            <text:p text:style-name="P121">loop_unrolling: <text:s text:c="24"/># @loop_unrolling</text:p>
            <text:p text:style-name="P121"><text:tab/>.cfi_startproc</text:p>
            <text:p text:style-name="P121"># %bb.0:</text:p>
            <text:p text:style-name="P121"><text:tab/>pushq<text:tab/>%rbp</text:p>
            <text:p text:style-name="P121"><text:tab/>.cfi_def_cfa_offset 16</text:p>
            <text:p text:style-name="P121"><text:tab/>.cfi_offset %rbp, -16</text:p>
            <text:p text:style-name="P121"><text:tab/>movq<text:tab/>%rsp, %rbp</text:p>
            <text:p text:style-name="P121"><text:tab/>.cfi_def_cfa_register %rbp</text:p>
            <text:p text:style-name="P121"><text:tab/>subq<text:tab/>$16, %rsp</text:p>
            <text:p text:style-name="P121"><text:tab/>movl<text:tab/>%edi, -4(%rbp)</text:p>
            <text:p text:style-name="P121"><text:tab/>movl<text:tab/>$0, i(%rip)</text:p>
            <text:p text:style-name="P121">.LBB4_1: <text:s text:c="4"/></text:p>
            <text:p text:style-name="P121"><text:tab/>cmpl<text:tab/>$6, i(%rip)</text:p>
            <text:p text:style-name="P121"><text:tab/>jge<text:tab/>.LBB4_4</text:p>
            <text:p text:style-name="P121"># %bb.2: <text:s text:c="3"/></text:p>
            <text:p text:style-name="P121"><text:tab/>movslq<text:tab/>i(%rip), %rcx</text:p>
            <text:p text:style-name="P121"><text:tab/>leaq<text:tab/>ivector4(%rip), %rax</text:p>
            <text:p text:style-name="P121"><text:tab/>movw<text:tab/>$0, (%rax,%rcx,2)</text:p>
            <text:p text:style-name="P121"><text:tab/>movslq<text:tab/>i(%rip), %rcx</text:p>
            <text:p text:style-name="P121"><text:tab/>leaq<text:tab/>ivector4(%rip), %rax</text:p>
            <text:p text:style-name="P121"><text:tab/>movswl<text:tab/>(%rax,%rcx,2), %esi</text:p>
            <text:p text:style-name="P121"><text:tab/>leaq<text:tab/>.L.str(%rip), %rdi</text:p>
            <text:p text:style-name="P121"><text:tab/>movb<text:tab/>$0, %al</text:p>
            <text:p text:style-name="P121"><text:tab/>callq<text:tab/>printf@PLT</text:p>
            <text:p text:style-name="P121"># %bb.3: <text:s text:c="5"/></text:p>
            <text:p text:style-name="P121"><text:tab/>movl<text:tab/>i(%rip), %eax</text:p>
            <text:p text:style-name="P121"><text:tab/>addl<text:tab/>$1, %eax</text:p>
            <text:p text:style-name="P121"><text:tab/>movl<text:tab/>%eax, i(%rip)</text:p>
            <text:p text:style-name="P121"><text:tab/>jmp<text:tab/>.LBB4_1</text:p>
            <text:p text:style-name="P121">.LBB4_4:</text:p>
            <text:p text:style-name="P121"><text:tab/>addq<text:tab/>$16, %rsp</text:p>
            <text:p text:style-name="P121"><text:tab/>popq<text:tab/>%rbp</text:p>
            <text:p text:style-name="P121"><text:tab/>.cfi_def_cfa %rsp, 8</text:p>
            <text:p text:style-name="P121"><text:tab/>retq</text:p>
          </table:table-cell>
          <table:table-cell table:style-name="Таблица22.A1" office:value-type="string">
            <text:p text:style-name="P173">void loop_unrolling(int x)</text:p>
            <text:p text:style-name="P173">{</text:p>
            <text:p text:style-name="P173"><text:tab/>for (i = 0; i &lt; 6; i++) {</text:p>
            <text:p text:style-name="P173"><text:tab/><text:tab/>ivector4[i] = 0;</text:p>
            <text:p text:style-name="P173"><text:tab/><text:tab/>printf("%d", ivector4[i]);</text:p>
            <text:p text:style-name="P173"><text:tab/>}</text:p>
            <text:p text:style-name="P173">} </text:p>
          </table:table-cell>
        </table:table-row>
      </table:table>
      <text:p text:style-name="P52"><text:span text:style-name="T23"/></text:p>
      <text:p text:style-name="P58"><text:span text:style-name="T23">Без оптимизации разворачивания циклов не происходит</text:span></text:p>
      <text:p text:style-name="P58"><text:span text:style-name="T23"/></text:p>
      <table:table table:name="Таблица23" table:style-name="Таблица23">
        <table:table-column table:style-name="Таблица23.A" table:number-columns-repeated="2"/>
        <table:table-row table:style-name="Таблица23.1">
          <table:table-cell table:style-name="Таблица23.A1" office:value-type="string">
            <text:p text:style-name="P143">loop_unrolling: <text:s text:c="24"/># @loop_unrolling</text:p>
            <text:p text:style-name="P143"><text:tab/>.cfi_startproc</text:p>
            <text:p text:style-name="P143"># %bb.0:</text:p>
            <text:p text:style-name="P143"><text:tab/>pushq<text:tab/>%rbp</text:p>
            <text:p text:style-name="P143"><text:tab/>.cfi_def_cfa_offset 16</text:p>
            <text:p text:style-name="P143"><text:tab/>.cfi_offset %rbp, -16</text:p>
            <text:p text:style-name="P143"><text:tab/>movq<text:tab/>%rsp, %rbp</text:p>
            <text:p text:style-name="P143"><text:tab/>.cfi_def_cfa_register %rbp</text:p>
            <text:p text:style-name="P143"><text:tab/>subq<text:tab/>$16, %rsp</text:p>
            <text:p text:style-name="P143"><text:tab/>movl<text:tab/>%edi, -4(%rbp)</text:p>
            <text:p text:style-name="P143"><text:tab/>movl<text:tab/>$0, i(%rip)</text:p>
            <text:p text:style-name="P143">.LBB4_1: <text:s text:c="4"/></text:p>
            <text:p text:style-name="P143"><text:tab/>cmpl<text:tab/>$6, i(%rip)</text:p>
            <text:p text:style-name="P143"><text:tab/>jge<text:tab/>.LBB4_4</text:p>
            <text:p text:style-name="P143"># %bb.2: <text:s text:c="3"/></text:p>
            <text:p text:style-name="P143"><text:tab/>movslq<text:tab/>i(%rip), %rcx</text:p>
            <text:p text:style-name="P143"><text:tab/>leaq<text:tab/>ivector4(%rip), %rax</text:p>
            <text:p text:style-name="P143"><text:tab/>movw<text:tab/>$0, (%rax,%rcx,2)</text:p>
            <text:p text:style-name="P143"><text:tab/>movslq<text:tab/>i(%rip), %rcx</text:p>
            <text:p text:style-name="P143"><text:tab/>leaq<text:tab/>ivector4(%rip), %rax</text:p>
            <text:p text:style-name="P143"><text:tab/>movswl<text:tab/>(%rax,%rcx,2), %esi</text:p>
            <text:p text:style-name="P143"><text:tab/>leaq<text:tab/>.L.str(%rip), %rdi</text:p>
            <text:p text:style-name="P143"><text:tab/>movb<text:tab/>$0, %al</text:p>
            <text:p text:style-name="P143"><text:tab/>callq<text:tab/>printf@PLT</text:p>
            <text:p text:style-name="P143"># %bb.3: <text:s text:c="5"/></text:p>
            <text:p text:style-name="P143"><text:tab/>movl<text:tab/>i(%rip), %eax</text:p>
            <text:p text:style-name="P143"><text:tab/>addl<text:tab/>$1, %eax</text:p>
            <text:p text:style-name="P143"><text:tab/>movl<text:tab/>%eax, i(%rip)</text:p>
            <text:p text:style-name="P143"><text:tab/>jmp<text:tab/>.LBB4_1</text:p>
            <text:p text:style-name="P143">.LBB4_4:</text:p>
            <text:p text:style-name="P143"><text:tab/>addq<text:tab/>$16, %rsp</text:p>
            <text:p text:style-name="P143"><text:tab/>popq<text:tab/>%rbp</text:p>
            <text:p text:style-name="P143"><text:tab/>.cfi_def_cfa %rsp, 8</text:p>
            <text:p text:style-name="P143"><text:tab/>retq</text:p>
          </table:table-cell>
          <table:table-cell table:style-name="Таблица23.A1" office:value-type="string">
            <text:p text:style-name="P121">loop_unrolling: <text:s text:c="24"/># @loop_unrolling</text:p>
            <text:p text:style-name="P121"><text:tab/>.cfi_startproc</text:p>
            <text:p text:style-name="P121"># %bb.0:</text:p>
            <text:p text:style-name="P121"><text:tab/>pushq<text:tab/>%r14</text:p>
            <text:p text:style-name="P121"><text:tab/>.cfi_def_cfa_offset 16</text:p>
            <text:p text:style-name="P121"><text:tab/>pushq<text:tab/>%rbx</text:p>
            <text:p text:style-name="P121"><text:tab/>.cfi_def_cfa_offset 24</text:p>
            <text:p text:style-name="P121"><text:tab/>pushq<text:tab/>%rax</text:p>
            <text:p text:style-name="P121"><text:tab/>.cfi_def_cfa_offset 32</text:p>
            <text:p text:style-name="P121"><text:tab/>.cfi_offset %rbx, -24</text:p>
            <text:p text:style-name="P121"><text:tab/>.cfi_offset %r14, -16</text:p>
            <text:p text:style-name="P121"><text:tab/>movl<text:tab/>$0, i(%rip)</text:p>
            <text:p text:style-name="P121"><text:tab/>leaq<text:tab/>ivector4(%rip), %r14</text:p>
            <text:p text:style-name="P121"><text:tab/>leaq<text:tab/>.L.str(%rip), %rbx</text:p>
            <text:p text:style-name="P121"><text:tab/>xorl<text:tab/>%eax, %eax</text:p>
            <text:p text:style-name="P121"><text:tab/>.p2align<text:tab/>4, 0x90</text:p>
            <text:p text:style-name="P121">.LBB4_1: </text:p>
            <text:p text:style-name="P121"><text:tab/>cltq</text:p>
            <text:p text:style-name="P121"><text:tab/>movw<text:tab/>$0, (%r14,%rax,2)</text:p>
            <text:p text:style-name="P121"><text:tab/>movq<text:tab/>%rbx, %rdi</text:p>
            <text:p text:style-name="P121"><text:tab/>xorl<text:tab/>%esi, %esi</text:p>
            <text:p text:style-name="P121"><text:tab/>xorl<text:tab/>%eax, %eax</text:p>
            <text:p text:style-name="P121"><text:tab/>callq<text:tab/>printf@PLT</text:p>
            <text:p text:style-name="P121"><text:tab/>movl<text:tab/>i(%rip), %ecx</text:p>
            <text:p text:style-name="P121"><text:tab/>leal<text:tab/>1(%rcx), %eax</text:p>
            <text:p text:style-name="P121"><text:tab/>movl<text:tab/>%eax, i(%rip)</text:p>
            <text:p text:style-name="P121"><text:tab/>cmpl<text:tab/>$5, %ecx</text:p>
            <text:p text:style-name="P121"><text:tab/>jl<text:tab/>.LBB4_1</text:p>
            <text:p text:style-name="P121"># %bb.2:</text:p>
            <text:p text:style-name="P121"><text:tab/>addq<text:tab/>$8, %rsp</text:p>
            <text:p text:style-name="P121"><text:tab/>.cfi_def_cfa_offset 24</text:p>
            <text:p text:style-name="P121"><text:tab/>popq<text:tab/>%rbx</text:p>
            <text:p text:style-name="P121"><text:tab/>.cfi_def_cfa_offset 16</text:p>
            <text:p text:style-name="P121"><text:tab/>popq<text:tab/>%r14</text:p>
            <text:p text:style-name="P121"><text:tab/>.cfi_def_cfa_offset 8</text:p>
            <text:p text:style-name="P121"><text:tab/>retq</text:p>
          </table:table-cell>
        </table:table-row>
      </table:table>
      <text:p text:style-name="P58"><text:span text:style-name="T23"/></text:p>
      <text:p text:style-name="P61"><text:span text:style-name="T23">Даже при оптимизации цикл остался, разворачивание цикла не произошло, что странно</text:span></text:p>
      <table:table table:name="Таблица24" table:style-name="Таблица24">
        <table:table-column table:style-name="Таблица24.A" table:number-columns-repeated="2"/>
        <table:table-row>
          <table:table-cell table:style-name="Таблица24.A1" office:value-type="string">
            <text:p text:style-name="P121">jump_compression: <text:s text:c="22"/># @jump_compression</text:p>
            <text:p text:style-name="P121"><text:tab/>.cfi_startproc</text:p>
            <text:p text:style-name="P121"># %bb.0:</text:p>
            <text:p text:style-name="P121"><text:tab/>pushq<text:tab/>%rbp</text:p>
            <text:p text:style-name="P121"><text:tab/>.cfi_def_cfa_offset 16</text:p>
            <text:p text:style-name="P121"><text:tab/>.cfi_offset %rbp, -16</text:p>
            <text:p text:style-name="P121"><text:tab/>movq<text:tab/>%rsp, %rbp</text:p>
            <text:p text:style-name="P121"><text:tab/>.cfi_def_cfa_register %rbp</text:p>
            <text:p text:style-name="P121"><text:tab/>subq<text:tab/>$32, %rsp</text:p>
            <text:p text:style-name="P121"><text:tab/>movl<text:tab/>%edi, -4(%rbp)</text:p>
            <text:p text:style-name="P121"><text:tab/>movl<text:tab/>%esi, -8(%rbp)</text:p>
            <text:p text:style-name="P121"><text:tab/>movl<text:tab/>%edx, -12(%rbp)</text:p>
            <text:p text:style-name="P121"><text:tab/>movl<text:tab/>%ecx, -16(%rbp)</text:p>
            <text:p text:style-name="P121"><text:tab/>movl<text:tab/>%r8d, -20(%rbp)</text:p>
            <text:p text:style-name="P121">.LBB5_1: <text:s/></text:p>
            <text:p text:style-name="P121"><text:tab/>movl<text:tab/>-4(%rbp), %eax</text:p>
            <text:p text:style-name="P121"><text:tab/>cmpl<text:tab/>-8(%rbp), %eax</text:p>
            <text:p text:style-name="P121"><text:tab/>jge<text:tab/>.LBB5_13</text:p>
            <text:p text:style-name="P121"># %bb.2: <text:s/></text:p>
            <text:p text:style-name="P121"><text:tab/>movl<text:tab/>-8(%rbp), %eax</text:p>
            <text:p text:style-name="P121"><text:tab/>cmpl<text:tab/>-12(%rbp), %eax</text:p>
            <text:p text:style-name="P121"><text:tab/>jge<text:tab/>.LBB5_10</text:p>
            <text:p text:style-name="P121"># %bb.3: </text:p>
            <text:p text:style-name="P121"><text:tab/>movl<text:tab/>-12(%rbp), %eax</text:p>
            <text:p text:style-name="P121"><text:tab/>cmpl<text:tab/>-16(%rbp), %eax</text:p>
            <text:p text:style-name="P121"><text:tab/>jge<text:tab/>.LBB5_8</text:p>
            <text:p text:style-name="P121"># %bb.4: <text:s/></text:p>
            <text:p text:style-name="P121"><text:tab/>movl<text:tab/>-16(%rbp), %eax</text:p>
            <text:p text:style-name="P121"><text:tab/>cmpl<text:tab/>-20(%rbp), %eax</text:p>
            <text:p text:style-name="P121"><text:tab/>jge<text:tab/>.LBB5_6</text:p>
            <text:p text:style-name="P121"># %bb.5:</text:p>
            <text:p text:style-name="P121"><text:tab/>movl<text:tab/>-20(%rbp), %eax</text:p>
            <text:p text:style-name="P121"><text:tab/>addl<text:tab/>-16(%rbp), %eax</text:p>
            <text:p text:style-name="P121"><text:tab/>movl<text:tab/>%eax, -16(%rbp)</text:p>
            <text:p text:style-name="P121"><text:tab/>jmp<text:tab/>.LBB5_7</text:p>
            <text:p text:style-name="P161">.LBB5_6: </text:p>
            <text:p text:style-name="P161"><text:tab/>jmp<text:tab/>.LBB5_11</text:p>
            <text:p text:style-name="P121">.LBB5_7:</text:p>
            <text:p text:style-name="P121"><text:tab/>jmp<text:tab/>.LBB5_9</text:p>
            <text:p text:style-name="P121">.LBB5_8:</text:p>
            <text:p text:style-name="P121"><text:tab/>movl<text:tab/>-16(%rbp), %eax</text:p>
            <text:p text:style-name="P121"><text:tab/>addl<text:tab/>-12(%rbp), %eax</text:p>
            <text:p text:style-name="P121"><text:tab/>movl<text:tab/>%eax, -12(%rbp)</text:p>
            <text:p text:style-name="P161">.LBB5_9:</text:p>
            <text:p text:style-name="P161"><text:tab/>jmp<text:tab/>.LBB5_12</text:p>
            <text:p text:style-name="P121">.LBB5_10: <text:s/></text:p>
            <text:p text:style-name="P121"><text:tab/>movl<text:tab/>-12(%rbp), %eax</text:p>
            <text:p text:style-name="P121"><text:tab/>addl<text:tab/>-8(%rbp), %eax</text:p>
            <text:p text:style-name="P121"><text:tab/>movl<text:tab/>%eax, -8(%rbp)</text:p>
            <text:p text:style-name="P121"><text:tab/>movl<text:tab/>-8(%rbp), %esi</text:p>
            <text:p text:style-name="P121"><text:tab/>leaq<text:tab/>.L.str(%rip), %rdi</text:p>
            <text:p text:style-name="P121"><text:tab/>movb<text:tab/>$0, %al</text:p>
            <text:p text:style-name="P121"><text:tab/>callq<text:tab/>printf@PLT</text:p>
            <text:p text:style-name="P161">.LBB5_11: </text:p>
            <text:p text:style-name="P161"><text:tab/>jmp<text:tab/>.LBB5_1</text:p>
            <text:p text:style-name="P121">.LBB5_12:</text:p>
            <text:p text:style-name="P121"><text:tab/>jmp<text:tab/>.LBB5_14</text:p>
            <text:p text:style-name="P121">.LBB5_13:</text:p>
            <text:p text:style-name="P121"><text:tab/>movl<text:tab/>-8(%rbp), %eax</text:p>
            <text:p text:style-name="P121"><text:tab/>addl<text:tab/>-4(%rbp), %eax</text:p>
            <text:p text:style-name="P121"><text:tab/>movl<text:tab/>%eax, -4(%rbp)</text:p>
            <text:p text:style-name="P121">.LBB5_14:</text:p>
            <text:p text:style-name="P121"><text:tab/>movl<text:tab/>-4(%rbp), %eax</text:p>
            <text:p text:style-name="P121"><text:soft-page-break/><text:tab/>addl<text:tab/>-8(%rbp), %eax</text:p>
            <text:p text:style-name="P121"><text:tab/>addl<text:tab/>-12(%rbp), %eax</text:p>
            <text:p text:style-name="P121"><text:tab/>addl<text:tab/>-16(%rbp), %eax</text:p>
            <text:p text:style-name="P121"><text:tab/>addl<text:tab/>-20(%rbp), %eax</text:p>
            <text:p text:style-name="P121"><text:tab/>addq<text:tab/>$32, %rsp</text:p>
            <text:p text:style-name="P121"><text:tab/>popq<text:tab/>%rbp</text:p>
            <text:p text:style-name="P121"><text:tab/>.cfi_def_cfa %rsp, 8</text:p>
            <text:p text:style-name="P121"><text:tab/>retq</text:p>
          </table:table-cell>
          <table:table-cell table:style-name="Таблица24.A1" office:value-type="string">
            <text:p text:style-name="P173">int jump_compression(int i, int j, int k, int l, int m)</text:p>
            <text:p text:style-name="P173">{</text:p>
            <text:p text:style-name="P173">beg_1:</text:p>
            <text:p text:style-name="P173"><text:tab/>if (i &lt; j)</text:p>
            <text:p text:style-name="P173"><text:tab/><text:tab/>if (j &lt; k)</text:p>
            <text:p text:style-name="P173"><text:tab/><text:tab/><text:tab/>if (k &lt; l)</text:p>
            <text:p text:style-name="P173"><text:tab/><text:tab/><text:tab/><text:tab/>if (l &lt; m)</text:p>
            <text:p text:style-name="P173"><text:tab/><text:tab/><text:tab/><text:tab/><text:tab/>l += m;</text:p>
            <text:p text:style-name="P173"><text:tab/><text:tab/><text:tab/><text:tab/>else</text:p>
            <text:p text:style-name="P173"><text:tab/><text:tab/><text:tab/><text:tab/><text:tab/>goto end_1;</text:p>
            <text:p text:style-name="P173"><text:tab/><text:tab/><text:tab/>else</text:p>
            <text:p text:style-name="P173"><text:tab/><text:tab/><text:tab/><text:tab/>k += l;</text:p>
            <text:p text:style-name="P173"><text:tab/><text:tab/>else {</text:p>
            <text:p text:style-name="P173"><text:tab/><text:tab/><text:tab/>j += k;</text:p>
            <text:p text:style-name="P173"><text:tab/><text:tab/><text:tab/>printf("%d", j);</text:p>
            <text:p text:style-name="P173"><text:tab/><text:tab/>end_1:</text:p>
            <text:p text:style-name="P173"><text:tab/><text:tab/><text:tab/>goto beg_1;</text:p>
            <text:p text:style-name="P173"><text:tab/><text:tab/>}</text:p>
            <text:p text:style-name="P173"><text:tab/>else</text:p>
            <text:p text:style-name="P173"><text:tab/><text:tab/>i += j;</text:p>
            <text:p text:style-name="P173"><text:tab/>return(i + j + k + l + m);</text:p>
            <text:p text:style-name="P173">}</text:p>
          </table:table-cell>
        </table:table-row>
      </table:table>
      <text:p text:style-name="P61"><text:span text:style-name="T23"/></text:p>
      <text:p text:style-name="P64"><text:span text:style-name="T23">Без оптимизации компилятор оставляет лишние цепочки переходов, оптимизация позволяет избежать этого</text:span></text:p>
      <text:p text:style-name="P64"><text:span text:style-name="T23"/></text:p>
      <table:table table:name="Таблица25" table:style-name="Таблица25">
        <table:table-column table:style-name="Таблица25.A" table:number-columns-repeated="2"/>
        <table:table-row>
          <table:table-cell table:style-name="Таблица25.A1" office:value-type="string">
            <text:p text:style-name="P144">jump_compression: <text:s text:c="22"/># @jump_compression</text:p>
            <text:p text:style-name="P144"><text:tab/>.cfi_startproc</text:p>
            <text:p text:style-name="P144"># %bb.0:</text:p>
            <text:p text:style-name="P144"><text:tab/>pushq<text:tab/>%rbp</text:p>
            <text:p text:style-name="P144"><text:tab/>.cfi_def_cfa_offset 16</text:p>
            <text:p text:style-name="P144"><text:tab/>.cfi_offset %rbp, -16</text:p>
            <text:p text:style-name="P144"><text:tab/>movq<text:tab/>%rsp, %rbp</text:p>
            <text:p text:style-name="P144"><text:tab/>.cfi_def_cfa_register %rbp</text:p>
            <text:p text:style-name="P144"><text:tab/>subq<text:tab/>$32, %rsp</text:p>
            <text:p text:style-name="P144"><text:tab/>movl<text:tab/>%edi, -4(%rbp)</text:p>
            <text:p text:style-name="P144"><text:tab/>movl<text:tab/>%esi, -8(%rbp)</text:p>
            <text:p text:style-name="P144"><text:tab/>movl<text:tab/>%edx, -12(%rbp)</text:p>
            <text:p text:style-name="P144"><text:tab/>movl<text:tab/>%ecx, -16(%rbp)</text:p>
            <text:p text:style-name="P144"><text:tab/>movl<text:tab/>%r8d, -20(%rbp)</text:p>
            <text:p text:style-name="P144">.LBB5_1: <text:s/></text:p>
            <text:p text:style-name="P144"><text:tab/>movl<text:tab/>-4(%rbp), %eax</text:p>
            <text:p text:style-name="P144"><text:tab/>cmpl<text:tab/>-8(%rbp), %eax</text:p>
            <text:p text:style-name="P144"><text:tab/>jge<text:tab/>.LBB5_13</text:p>
            <text:p text:style-name="P144"># %bb.2: <text:s/></text:p>
            <text:p text:style-name="P144"><text:tab/>movl<text:tab/>-8(%rbp), %eax</text:p>
            <text:p text:style-name="P144"><text:tab/>cmpl<text:tab/>-12(%rbp), %eax</text:p>
            <text:p text:style-name="P144"><text:tab/>jge<text:tab/>.LBB5_10</text:p>
            <text:p text:style-name="P144"># %bb.3: </text:p>
            <text:p text:style-name="P144"><text:tab/>movl<text:tab/>-12(%rbp), %eax</text:p>
            <text:p text:style-name="P144"><text:tab/>cmpl<text:tab/>-16(%rbp), %eax</text:p>
            <text:p text:style-name="P144"><text:tab/>jge<text:tab/>.LBB5_8</text:p>
            <text:p text:style-name="P144"># %bb.4: <text:s/></text:p>
            <text:p text:style-name="P144"><text:tab/>movl<text:tab/>-16(%rbp), %eax</text:p>
            <text:p text:style-name="P144"><text:tab/>cmpl<text:tab/>-20(%rbp), %eax</text:p>
            <text:p text:style-name="P144"><text:tab/>jge<text:tab/>.LBB5_6</text:p>
            <text:p text:style-name="P144"># %bb.5:</text:p>
            <text:p text:style-name="P144"><text:tab/>movl<text:tab/>-20(%rbp), %eax</text:p>
            <text:p text:style-name="P144"><text:tab/>addl<text:tab/>-16(%rbp), %eax</text:p>
            <text:p text:style-name="P144"><text:tab/>movl<text:tab/>%eax, -16(%rbp)</text:p>
            <text:p text:style-name="P144"><text:tab/>jmp<text:tab/>.LBB5_7</text:p>
            <text:p text:style-name="P162">.LBB5_6: </text:p>
            <text:p text:style-name="P162"><text:tab/>jmp<text:tab/>.LBB5_11</text:p>
            <text:p text:style-name="P144">.LBB5_7:</text:p>
            <text:p text:style-name="P144"><text:tab/>jmp<text:tab/>.LBB5_9</text:p>
            <text:p text:style-name="P144">.LBB5_8:</text:p>
            <text:p text:style-name="P144"><text:tab/>movl<text:tab/>-16(%rbp), %eax</text:p>
            <text:p text:style-name="P144"><text:tab/>addl<text:tab/>-12(%rbp), %eax</text:p>
            <text:p text:style-name="P144"><text:tab/>movl<text:tab/>%eax, -12(%rbp)</text:p>
            <text:p text:style-name="P162">.LBB5_9:</text:p>
            <text:p text:style-name="P162"><text:tab/>jmp<text:tab/>.LBB5_12</text:p>
            <text:p text:style-name="P144">.LBB5_10: <text:s/></text:p>
            <text:p text:style-name="P144"><text:tab/>movl<text:tab/>-12(%rbp), %eax</text:p>
            <text:p text:style-name="P144"><text:tab/>addl<text:tab/>-8(%rbp), %eax</text:p>
            <text:p text:style-name="P144"><text:tab/>movl<text:tab/>%eax, -8(%rbp)</text:p>
            <text:p text:style-name="P144"><text:soft-page-break/><text:tab/>movl<text:tab/>-8(%rbp), %esi</text:p>
            <text:p text:style-name="P144"><text:tab/>leaq<text:tab/>.L.str(%rip), %rdi</text:p>
            <text:p text:style-name="P144"><text:tab/>movb<text:tab/>$0, %al</text:p>
            <text:p text:style-name="P144"><text:tab/>callq<text:tab/>printf@PLT</text:p>
            <text:p text:style-name="P162">.LBB5_11: </text:p>
            <text:p text:style-name="P162"><text:tab/>jmp<text:tab/>.LBB5_1</text:p>
            <text:p text:style-name="P144">.LBB5_12:</text:p>
            <text:p text:style-name="P144"><text:tab/>jmp<text:tab/>.LBB5_14</text:p>
            <text:p text:style-name="P144">.LBB5_13:</text:p>
            <text:p text:style-name="P144"><text:tab/>movl<text:tab/>-8(%rbp), %eax</text:p>
            <text:p text:style-name="P144"><text:tab/>addl<text:tab/>-4(%rbp), %eax</text:p>
            <text:p text:style-name="P144"><text:tab/>movl<text:tab/>%eax, -4(%rbp)</text:p>
            <text:p text:style-name="P144">.LBB5_14:</text:p>
            <text:p text:style-name="P144"><text:tab/>movl<text:tab/>-4(%rbp), %eax</text:p>
            <text:p text:style-name="P144"><text:tab/>addl<text:tab/>-8(%rbp), %eax</text:p>
            <text:p text:style-name="P144"><text:tab/>addl<text:tab/>-12(%rbp), %eax</text:p>
            <text:p text:style-name="P144"><text:tab/>addl<text:tab/>-16(%rbp), %eax</text:p>
            <text:p text:style-name="P144"><text:tab/>addl<text:tab/>-20(%rbp), %eax</text:p>
            <text:p text:style-name="P144"><text:tab/>addq<text:tab/>$32, %rsp</text:p>
            <text:p text:style-name="P144"><text:tab/>popq<text:tab/>%rbp</text:p>
            <text:p text:style-name="P144"><text:tab/>.cfi_def_cfa %rsp, 8</text:p>
            <text:p text:style-name="P144"><text:tab/>retq</text:p>
          </table:table-cell>
          <table:table-cell table:style-name="Таблица25.A1" office:value-type="string">
            <text:p text:style-name="P145">jump_compression: <text:s text:c="22"/># @jump_compression</text:p>
            <text:p text:style-name="P145"><text:tab/>.cfi_startproc</text:p>
            <text:p text:style-name="P145"># %bb.0:</text:p>
            <text:p text:style-name="P145"><text:tab/>pushq<text:tab/>%rbp</text:p>
            <text:p text:style-name="P145"><text:tab/>.cfi_def_cfa_offset 16</text:p>
            <text:p text:style-name="P145"><text:tab/>pushq<text:tab/>%r15</text:p>
            <text:p text:style-name="P145"><text:tab/>.cfi_def_cfa_offset 24</text:p>
            <text:p text:style-name="P145"><text:tab/>pushq<text:tab/>%r14</text:p>
            <text:p text:style-name="P145"><text:tab/>.cfi_def_cfa_offset 32</text:p>
            <text:p text:style-name="P145"><text:tab/>pushq<text:tab/>%r13</text:p>
            <text:p text:style-name="P145"><text:tab/>.cfi_def_cfa_offset 40</text:p>
            <text:p text:style-name="P145"><text:tab/>pushq<text:tab/>%r12</text:p>
            <text:p text:style-name="P145"><text:tab/>.cfi_def_cfa_offset 48</text:p>
            <text:p text:style-name="P145"><text:tab/>pushq<text:tab/>%rbx</text:p>
            <text:p text:style-name="P145"><text:tab/>.cfi_def_cfa_offset 56</text:p>
            <text:p text:style-name="P145"><text:tab/>pushq<text:tab/>%rax</text:p>
            <text:p text:style-name="P145"><text:tab/>.cfi_def_cfa_offset 64</text:p>
            <text:p text:style-name="P145"><text:tab/>.cfi_offset %rbx, -56</text:p>
            <text:p text:style-name="P145"><text:tab/>.cfi_offset %r12, -48</text:p>
            <text:p text:style-name="P145"><text:tab/>.cfi_offset %r13, -40</text:p>
            <text:p text:style-name="P145"><text:tab/>.cfi_offset %r14, -32</text:p>
            <text:p text:style-name="P145"><text:tab/>.cfi_offset %r15, -24</text:p>
            <text:p text:style-name="P145"><text:tab/>.cfi_offset %rbp, -16</text:p>
            <text:p text:style-name="P145"><text:tab/>movl<text:tab/>%r8d, %r14d</text:p>
            <text:p text:style-name="P145"><text:tab/>movl<text:tab/>%ecx, %r12d</text:p>
            <text:p text:style-name="P145"><text:tab/>movl<text:tab/>%edx, %ebp</text:p>
            <text:p text:style-name="P145"><text:tab/>movl<text:tab/>%esi, %ebx</text:p>
            <text:p text:style-name="P145"><text:tab/>movl<text:tab/>%edi, %r15d</text:p>
            <text:p text:style-name="P145"><text:tab/>cmpl<text:tab/>%edi, %esi</text:p>
            <text:p text:style-name="P145"><text:tab/>jle<text:tab/>.LBB5_12</text:p>
            <text:p text:style-name="P145"># %bb.1:</text:p>
            <text:p text:style-name="P145"><text:tab/>leaq<text:tab/>.L.str(%rip), %r13</text:p>
            <text:p text:style-name="P145"><text:tab/>cmpl<text:tab/>%r12d, %ebp</text:p>
            <text:p text:style-name="P145"><text:tab/>jge<text:tab/>.LBB5_2</text:p>
            <text:p text:style-name="P145"># %bb.4:</text:p>
            <text:p text:style-name="P145"><text:tab/>cmpl<text:tab/>%r14d, %r12d</text:p>
            <text:p text:style-name="P145"><text:tab/>jge<text:tab/>.LBB5_5</text:p>
            <text:p text:style-name="P145"><text:tab/>.p2align<text:tab/>4, 0x90</text:p>
            <text:p text:style-name="P145">.LBB5_8: <text:s text:c="3"/></text:p>
            <text:p text:style-name="P145"><text:tab/>cmpl<text:tab/>%ebp, %ebx</text:p>
            <text:p text:style-name="P145"><text:tab/>jl<text:tab/>.LBB5_10</text:p>
            <text:p text:style-name="P145"># %bb.9: <text:s text:c="4"/></text:p>
            <text:p text:style-name="P145"><text:tab/>addl<text:tab/>%ebp, %ebx</text:p>
            <text:p text:style-name="P145"><text:tab/>movq<text:tab/>%r13, %rdi</text:p>
            <text:p text:style-name="P145"><text:tab/>movl<text:tab/>%ebx, %esi</text:p>
            <text:p text:style-name="P145"><text:tab/>xorl<text:tab/>%eax, %eax</text:p>
            <text:p text:style-name="P145"><text:tab/>callq<text:tab/>printf@PLT</text:p>
            <text:p text:style-name="P145"><text:tab/>cmpl<text:tab/>%r15d, %ebx</text:p>
            <text:p text:style-name="P145"><text:tab/>jg<text:tab/>.LBB5_8</text:p>
            <text:p text:style-name="P145"><text:soft-page-break/><text:tab/>jmp<text:tab/>.LBB5_12</text:p>
            <text:p text:style-name="P145"><text:tab/>.p2align<text:tab/>4, 0x90</text:p>
            <text:p text:style-name="P145">.LBB5_2: <text:s text:c="4"/></text:p>
            <text:p text:style-name="P145"><text:tab/>cmpl<text:tab/>%ebp, %ebx</text:p>
            <text:p text:style-name="P145"><text:tab/>jl<text:tab/>.LBB5_3</text:p>
            <text:p text:style-name="P145"># %bb.11: <text:s text:c="2"/></text:p>
            <text:p text:style-name="P145"><text:tab/>addl<text:tab/>%ebp, %ebx</text:p>
            <text:p text:style-name="P145"><text:tab/>movq<text:tab/>%r13, %rdi</text:p>
            <text:p text:style-name="P145"><text:tab/>movl<text:tab/>%ebx, %esi</text:p>
            <text:p text:style-name="P145"><text:tab/>xorl<text:tab/>%eax, %eax</text:p>
            <text:p text:style-name="P145"><text:tab/>callq<text:tab/>printf@PLT</text:p>
            <text:p text:style-name="P145"><text:tab/>cmpl<text:tab/>%r15d, %ebx</text:p>
            <text:p text:style-name="P145"><text:tab/>jg<text:tab/>.LBB5_2</text:p>
            <text:p text:style-name="P145">.LBB5_12:</text:p>
            <text:p text:style-name="P145"><text:tab/>addl<text:tab/>%ebx, %r15d</text:p>
            <text:p text:style-name="P145">.LBB5_13:</text:p>
            <text:p text:style-name="P145"><text:tab/>addl<text:tab/>%r12d, %ebp</text:p>
            <text:p text:style-name="P145"><text:tab/>addl<text:tab/>%r14d, %ebx</text:p>
            <text:p text:style-name="P145"><text:tab/>addl<text:tab/>%r15d, %ebx</text:p>
            <text:p text:style-name="P145"><text:tab/>addl<text:tab/>%ebp, %ebx</text:p>
            <text:p text:style-name="P145"><text:tab/>movl<text:tab/>%ebx, %eax</text:p>
            <text:p text:style-name="P145"><text:tab/>addq<text:tab/>$8, %rsp</text:p>
            <text:p text:style-name="P145"><text:tab/>.cfi_def_cfa_offset 56</text:p>
            <text:p text:style-name="P145"><text:tab/>popq<text:tab/>%rbx</text:p>
            <text:p text:style-name="P145"><text:tab/>.cfi_def_cfa_offset 48</text:p>
            <text:p text:style-name="P145"><text:tab/>popq<text:tab/>%r12</text:p>
            <text:p text:style-name="P145"><text:tab/>.cfi_def_cfa_offset 40</text:p>
            <text:p text:style-name="P145"><text:tab/>popq<text:tab/>%r13</text:p>
            <text:p text:style-name="P145"><text:tab/>.cfi_def_cfa_offset 32</text:p>
            <text:p text:style-name="P145"><text:tab/>popq<text:tab/>%r14</text:p>
            <text:p text:style-name="P145"><text:tab/>.cfi_def_cfa_offset 24</text:p>
            <text:p text:style-name="P145"><text:tab/>popq<text:tab/>%r15</text:p>
            <text:p text:style-name="P145"><text:tab/>.cfi_def_cfa_offset 16</text:p>
            <text:p text:style-name="P145"><text:tab/>popq<text:tab/>%rbp</text:p>
            <text:p text:style-name="P145"><text:tab/>.cfi_def_cfa_offset 8</text:p>
            <text:p text:style-name="P145"><text:tab/>retq</text:p>
            <text:p text:style-name="P145"><text:tab/>.p2align<text:tab/>4, 0x90</text:p>
            <text:p text:style-name="P145">.LBB5_7: <text:s/></text:p>
            <text:p text:style-name="P145"><text:tab/>.cfi_def_cfa_offset 64</text:p>
            <text:p text:style-name="P145"><text:tab/>cmpl<text:tab/>%r15d, %ebx</text:p>
            <text:p text:style-name="P145"><text:tab/>jle<text:tab/>.LBB5_12</text:p>
            <text:p text:style-name="P145">.LBB5_5: <text:s text:c="3"/></text:p>
            <text:p text:style-name="P145"><text:tab/>cmpl<text:tab/>%ebp, %ebx</text:p>
            <text:p text:style-name="P145"><text:tab/>jl<text:tab/>.LBB5_7</text:p>
            <text:p text:style-name="P145"># %bb.6: </text:p>
            <text:p text:style-name="P145"><text:tab/>addl<text:tab/>%ebp, %ebx</text:p>
            <text:p text:style-name="P145"><text:tab/>movq<text:tab/>%r13, %rdi</text:p>
            <text:p text:style-name="P145"><text:tab/>movl<text:tab/>%ebx, %esi</text:p>
            <text:p text:style-name="P145"><text:tab/>xorl<text:tab/>%eax, %eax</text:p>
            <text:p text:style-name="P145"><text:tab/>callq<text:tab/>printf@PLT</text:p>
            <text:p text:style-name="P145"><text:tab/>jmp<text:tab/>.LBB5_7</text:p>
            <text:p text:style-name="P145">.LBB5_3:</text:p>
            <text:p text:style-name="P145"><text:tab/>addl<text:tab/>%r12d, %ebp</text:p>
            <text:p text:style-name="P145"><text:tab/>jmp<text:tab/>.LBB5_13</text:p>
            <text:p text:style-name="P145">.LBB5_10:</text:p>
            <text:p text:style-name="P145"><text:tab/>addl<text:tab/>%r14d, %r12d</text:p>
            <text:p text:style-name="P145"><text:tab/>jmp<text:tab/>.LBB5_13</text:p>
          </table:table-cell>
        </table:table-row>
      </table:table>
      <text:p text:style-name="P64"><text:span text:style-name="T23"/></text:p>
      <text:p text:style-name="P194">GCC</text:p>
      <table:table table:name="Таблица28" table:style-name="Таблица28">
        <table:table-column table:style-name="Таблица28.A" table:number-columns-repeated="2"/>
        <table:table-row>
          <table:table-cell table:style-name="Таблица28.A1" office:value-type="string">
            <text:p text:style-name="P149"><text:tab/><text:span text:style-name="T38">movl<text:tab/>$2, j4(%rip)</text:span></text:p>
            <text:p text:style-name="P149"><text:tab/><text:span text:style-name="T38">movl<text:tab/>j4(%rip), %eax</text:span></text:p>
            <text:p text:style-name="P149"><text:tab/><text:span text:style-name="T38">movl<text:tab/>%eax, %esi</text:span></text:p>
            <text:p text:style-name="P149"><text:tab/><text:span text:style-name="T41">leaq<text:tab/>.LC0(%rip), %rax</text:span></text:p>
            <text:p text:style-name="P149"><text:tab/><text:span text:style-name="T41">movq<text:tab/>%rax, %rdi</text:span></text:p>
            <text:p text:style-name="P149"><text:tab/>movl<text:tab/>$0, %eax</text:p>
            <text:p text:style-name="P149"><text:tab/>call<text:tab/>printf@PLT</text:p>
            <text:p text:style-name="P149"><text:tab/>movl<text:tab/>i2(%rip), %edx</text:p>
            <text:p text:style-name="P149"><text:tab/>movl<text:tab/>j4(%rip), %eax</text:p>
            <text:p text:style-name="P149"><text:tab/>cmpl<text:tab/>%eax, %edx</text:p>
            <text:p text:style-name="P149"><text:tab/>jge<text:tab/>.L2</text:p>
            <text:p text:style-name="P149"><text:tab/>movl<text:tab/>i4(%rip), %edx</text:p>
            <text:p text:style-name="P149"><text:tab/>movl<text:tab/>j4(%rip), %eax</text:p>
            <text:p text:style-name="P149"><text:tab/>cmpl<text:tab/>%eax, %edx</text:p>
            <text:p text:style-name="P149"><text:tab/>jge<text:tab/>.L2</text:p>
            <text:p text:style-name="P149"><text:tab/>movl<text:tab/>$2, i2(%rip)</text:p>
            <text:p text:style-name="P149"><text:tab/>movl<text:tab/>i2(%rip), %eax</text:p>
            <text:p text:style-name="P149"><text:tab/>movl<text:tab/>%eax, %esi</text:p>
            <text:p text:style-name="P149"><text:tab/>leaq<text:tab/>.LC0(%rip), %rax</text:p>
            <text:p text:style-name="P149"><text:tab/>movq<text:tab/>%rax, %rdi</text:p>
            <text:p text:style-name="P149"><text:tab/>movl<text:tab/>$0, %eax</text:p>
            <text:p text:style-name="P149"><text:tab/>call<text:tab/>printf@PLT</text:p>
            <text:p text:style-name="P149">.L2:</text:p>
            <text:p text:style-name="P149"><text:tab/>movl<text:tab/>k5(%rip), %eax</text:p>
            <text:p text:style-name="P149"><text:tab/>movl<text:tab/>%eax, j4(%rip)</text:p>
            <text:p text:style-name="P149"><text:tab/>movl<text:tab/>j4(%rip), %eax</text:p>
            <text:p text:style-name="P149"><text:tab/>movl<text:tab/>%eax, %esi</text:p>
            <text:p text:style-name="P149"><text:tab/>leaq<text:tab/>.LC0(%rip), %rax</text:p>
            <text:p text:style-name="P149"><text:tab/>movq<text:tab/>%rax, %rdi</text:p>
            <text:p text:style-name="P149"><text:tab/>movl<text:tab/>$0, %eax</text:p>
            <text:p text:style-name="P149"><text:tab/>call<text:tab/>printf@PLT</text:p>
            <text:p text:style-name="P149"><text:tab/>movl<text:tab/>i2(%rip), %edx</text:p>
            <text:p text:style-name="P149"><text:tab/>movl<text:tab/>j4(%rip), %eax</text:p>
            <text:p text:style-name="P149"><text:tab/>cmpl<text:tab/>%eax, %edx</text:p>
            <text:p text:style-name="P149"><text:tab/>jge<text:tab/>.L3</text:p>
            <text:p text:style-name="P149"><text:tab/>movl<text:tab/>i4(%rip), %edx</text:p>
            <text:p text:style-name="P149"><text:tab/>movl<text:tab/>j4(%rip), %eax</text:p>
            <text:p text:style-name="P149"><text:tab/>cmpl<text:tab/>%eax, %edx</text:p>
            <text:p text:style-name="P149"><text:tab/>jge<text:tab/>.L3</text:p>
            <text:p text:style-name="P149"><text:tab/>movl<text:tab/>$3, i5(%rip)</text:p>
            <text:p text:style-name="P149"><text:tab/>movl<text:tab/>i5(%rip), %eax</text:p>
            <text:p text:style-name="P149"><text:tab/>movl<text:tab/>%eax, %esi</text:p>
            <text:p text:style-name="P149"><text:tab/>leaq<text:tab/>.LC0(%rip), %rax</text:p>
            <text:p text:style-name="P149"><text:tab/>movq<text:tab/>%rax, %rdi</text:p>
            <text:p text:style-name="P149"><text:tab/>movl<text:tab/>$0, %eax</text:p>
            <text:p text:style-name="P149"><text:tab/>call<text:tab/>printf@PLT</text:p>
            <text:p text:style-name="P149">.L3:</text:p>
          </table:table-cell>
          <table:table-cell table:style-name="Таблица28.A1" office:value-type="string">
            <text:p text:style-name="P178"><text:tab/>j4 = 2;</text:p>
            <text:p text:style-name="P179"><text:tab/>printf("%d", j4);</text:p>
            <text:p text:style-name="P179"><text:tab/>if (i2 &lt; j4 &amp;&amp; i4 &lt; j4) {</text:p>
            <text:p text:style-name="P179"><text:tab/><text:tab/>i2 = 2;</text:p>
            <text:p text:style-name="P179"><text:tab/><text:tab/>printf("%d", i2);</text:p>
            <text:p text:style-name="P179"><text:tab/>}</text:p>
            <text:p text:style-name="P179"><text:tab/>j4 = k5;</text:p>
            <text:p text:style-name="P179"><text:tab/>printf("%d", j4);</text:p>
            <text:p text:style-name="P179"><text:tab/>if (i2 &lt; j4 &amp;&amp; i4 &lt; j4) {</text:p>
            <text:p text:style-name="P179"><text:tab/><text:tab/>i5 = 3;</text:p>
            <text:p text:style-name="P179"><text:tab/><text:tab/>printf("%d", i5);</text:p>
            <text:p text:style-name="P179"><text:tab/>}</text:p>
          </table:table-cell>
        </table:table-row>
      </table:table>
      <text:p text:style-name="P191"/>
      <text:p text:style-name="P192"><text:span text:style-name="T44">GCC с флагом -o0 не оптимизирует размножение копий. Более того явно бросается в глаза, что при записи j4 в регистр %esi он записывает j4 в %eax, а уже %eax в %esi. Похожим образом он поступает и дальше с %rax и %rdi. Clang в этом аспекте показывал себя намного лучше.</text:span></text:p>
      <table:table table:name="Таблица30" table:style-name="Таблица30">
        <table:table-column table:style-name="Таблица30.A"/>
        <table:table-column table:style-name="Таблица30.B"/>
        <table:table-row table:style-name="Таблица30.1">
          <table:table-cell table:style-name="Таблица30.A1" office:value-type="string">
            <text:p text:style-name="P164"><text:tab/>movl<text:tab/>$2, j4(%rip)</text:p>
            <text:p text:style-name="P164"><text:tab/>movl<text:tab/>j4(%rip), %eax</text:p>
            <text:p text:style-name="P164"><text:tab/>movl<text:tab/>%eax, %esi</text:p>
            <text:p text:style-name="P164"><text:tab/>leaq<text:tab/>.LC0(%rip), %rax</text:p>
            <text:p text:style-name="P164"><text:tab/>movq<text:tab/>%rax, %rdi</text:p>
            <text:p text:style-name="P150"><text:tab/>movl<text:tab/>$0, %eax</text:p>
            <text:p text:style-name="P150"><text:tab/>call<text:tab/>printf@PLT</text:p>
            <text:p text:style-name="P150"><text:tab/>movl<text:tab/>i2(%rip), %edx</text:p>
            <text:p text:style-name="P150"><text:tab/>movl<text:tab/>j4(%rip), %eax</text:p>
            <text:p text:style-name="P150"><text:tab/>cmpl<text:tab/>%eax, %edx</text:p>
            <text:p text:style-name="P150"><text:tab/>jge<text:tab/>.L2</text:p>
            <text:p text:style-name="P150"><text:tab/>movl<text:tab/>i4(%rip), %edx</text:p>
            <text:p text:style-name="P150"><text:tab/>movl<text:tab/>j4(%rip), %eax</text:p>
            <text:p text:style-name="P150"><text:tab/>cmpl<text:tab/>%eax, %edx</text:p>
            <text:p text:style-name="P150"><text:tab/>jge<text:tab/>.L2</text:p>
            <text:p text:style-name="P150"><text:tab/>movl<text:tab/>$2, i2(%rip)</text:p>
            <text:p text:style-name="P150"><text:tab/>movl<text:tab/>i2(%rip), %eax</text:p>
            <text:p text:style-name="P150"><text:tab/>movl<text:tab/>%eax, %esi</text:p>
            <text:p text:style-name="P150"><text:tab/>leaq<text:tab/>.LC0(%rip), %rax</text:p>
            <text:p text:style-name="P150"><text:tab/>movq<text:tab/>%rax, %rdi</text:p>
            <text:p text:style-name="P150"><text:tab/>movl<text:tab/>$0, %eax</text:p>
            <text:p text:style-name="P150"><text:tab/>call<text:tab/>printf@PLT</text:p>
            <text:p text:style-name="P150">.L2:</text:p>
            <text:p text:style-name="P150"><text:tab/>movl<text:tab/>k5(%rip), %eax</text:p>
            <text:p text:style-name="P150"><text:tab/>movl<text:tab/>%eax, j4(%rip)</text:p>
            <text:p text:style-name="P150"><text:tab/>movl<text:tab/>j4(%rip), %eax</text:p>
            <text:p text:style-name="P150"><text:tab/>movl<text:tab/>%eax, %esi</text:p>
            <text:p text:style-name="P150"><text:tab/>leaq<text:tab/>.LC0(%rip), %rax</text:p>
            <text:p text:style-name="P150"><text:tab/>movq<text:tab/>%rax, %rdi</text:p>
            <text:p text:style-name="P150"><text:tab/>movl<text:tab/>$0, %eax</text:p>
            <text:p text:style-name="P150"><text:tab/>call<text:tab/>printf@PLT</text:p>
            <text:p text:style-name="P150"><text:tab/>movl<text:tab/>i2(%rip), %edx</text:p>
            <text:p text:style-name="P150"><text:tab/>movl<text:tab/>j4(%rip), %eax</text:p>
            <text:p text:style-name="P150"><text:tab/>cmpl<text:tab/>%eax, %edx</text:p>
            <text:p text:style-name="P150"><text:tab/>jge<text:tab/>.L3</text:p>
            <text:p text:style-name="P150"><text:tab/>movl<text:tab/>i4(%rip), %edx</text:p>
            <text:p text:style-name="P150"><text:tab/>movl<text:tab/>j4(%rip), %eax</text:p>
            <text:p text:style-name="P150"><text:tab/>cmpl<text:tab/>%eax, %edx</text:p>
            <text:p text:style-name="P150"><text:tab/>jge<text:tab/>.L3</text:p>
            <text:p text:style-name="P150"><text:tab/>movl<text:tab/>$3, i5(%rip)</text:p>
            <text:p text:style-name="P150"><text:tab/>movl<text:tab/>i5(%rip), %eax</text:p>
            <text:p text:style-name="P150"><text:tab/>movl<text:tab/>%eax, %esi</text:p>
            <text:p text:style-name="P150"><text:tab/>leaq<text:tab/>.LC0(%rip), %rax</text:p>
            <text:p text:style-name="P150"><text:tab/>movq<text:tab/>%rax, %rdi</text:p>
            <text:p text:style-name="P150"><text:tab/>movl<text:tab/>$0, %eax</text:p>
            <text:p text:style-name="P150"><text:tab/>call<text:tab/>printf@PLT</text:p>
            <text:p text:style-name="P150">.L3:</text:p>
          </table:table-cell>
          <table:table-cell table:style-name="Таблица30.A1" office:value-type="string">
            <text:p text:style-name="P135"><text:tab/><text:span text:style-name="T38">movl<text:tab/>$2, j4(%rip)</text:span></text:p>
            <text:p text:style-name="P135"><text:tab/>call<text:tab/>__printf_chk@PLT</text:p>
            <text:p text:style-name="P135"><text:tab/><text:span text:style-name="T38">movl<text:tab/>j4(%rip), %eax</text:span></text:p>
            <text:p text:style-name="P135"><text:tab/>cmpl<text:tab/>%eax, i2(%rip)</text:p>
            <text:p text:style-name="P135"><text:tab/>jge<text:tab/>.L36</text:p>
            <text:p text:style-name="P135"><text:tab/>cmpl<text:tab/>i4(%rip), %eax</text:p>
            <text:p text:style-name="P135"><text:tab/>jg<text:tab/>.L46</text:p>
            <text:p text:style-name="P135">.L36:</text:p>
            <text:p text:style-name="P135"><text:tab/>movl<text:tab/>k5(%rip), %edx</text:p>
            <text:p text:style-name="P135"><text:tab/>xorl<text:tab/>%eax, %eax</text:p>
            <text:p text:style-name="P135"><text:tab/>movq<text:tab/>%rbx, %rsi</text:p>
            <text:p text:style-name="P135"><text:tab/>movl<text:tab/>$2, %edi</text:p>
            <text:p text:style-name="P135"><text:tab/>movl<text:tab/>%edx, j4(%rip)</text:p>
            <text:p text:style-name="P135"><text:tab/>call<text:tab/>__printf_chk@PLT</text:p>
            <text:p text:style-name="P135"><text:tab/>movl<text:tab/>j4(%rip), %eax</text:p>
            <text:p text:style-name="P135"><text:tab/>cmpl<text:tab/>%eax, i2(%rip)</text:p>
            <text:p text:style-name="P135"><text:tab/>jge<text:tab/>.L37</text:p>
            <text:p text:style-name="P135"><text:tab/>cmpl<text:tab/>i4(%rip), %eax</text:p>
            <text:p text:style-name="P135"><text:tab/>jg<text:tab/>.L47</text:p>
            <text:p text:style-name="P135">.L37:<text:line-break/></text:p>
            <text:p text:style-name="P135"><text:span text:style-name="T45">...</text:span></text:p>
            <text:p text:style-name="P135"/>
            <text:p text:style-name="P152"/>
            <text:p text:style-name="P135"/>
            <text:p text:style-name="P135"/>
            <text:p text:style-name="P135"/>
            <text:p text:style-name="P135"><text:line-break/><text:line-break/>.L47:</text:p>
            <text:p text:style-name="P135"><text:tab/>movl<text:tab/>$3, %edx</text:p>
            <text:p text:style-name="P135"><text:tab/>movq<text:tab/>%rbx, %rsi</text:p>
            <text:p text:style-name="P135"><text:tab/>movl<text:tab/>$2, %edi</text:p>
            <text:p text:style-name="P135"><text:tab/>xorl<text:tab/>%eax, %eax</text:p>
            <text:p text:style-name="P135"><text:tab/>movl<text:tab/>$3, i5(%rip)</text:p>
            <text:p text:style-name="P135"><text:tab/>call<text:tab/>__printf_chk@PLT</text:p>
            <text:p text:style-name="P135"><text:tab/>jmp<text:tab/>.L37</text:p>
            <text:p text:style-name="P135">.L46:</text:p>
            <text:p text:style-name="P135"><text:tab/>movl<text:tab/>$2, %edx</text:p>
            <text:p text:style-name="P135"><text:tab/>movq<text:tab/>%rbx, %rsi</text:p>
            <text:p text:style-name="P135"><text:tab/>movl<text:tab/>$2, %edi</text:p>
            <text:p text:style-name="P135"><text:tab/>xorl<text:tab/>%eax, %eax</text:p>
            <text:p text:style-name="P135"><text:tab/>movl<text:tab/>$2, i2(%rip)</text:p>
            <text:p text:style-name="P135"><text:tab/>call<text:tab/>__printf_chk@PLT</text:p>
            <text:p text:style-name="P135"><text:tab/>jmp<text:tab/>.L36</text:p>
          </table:table-cell>
        </table:table-row>
      </table:table>
      <text:p text:style-name="P93"><text:span text:style-name="T20"/></text:p>
      <text:p text:style-name="P35">Почему-то gcc не оптимизирует размножение копий в данном случае <text:span text:style-name="T48">при оптимизации по скорости</text:span></text:p>
      <table:table table:name="Таблица31" table:style-name="Таблица31">
        <table:table-column table:style-name="Таблица31.A"/>
        <table:table-column table:style-name="Таблица31.B"/>
        <table:table-row table:style-name="Таблица31.1">
          <table:table-cell table:style-name="Таблица31.A1" office:value-type="string">
            <text:p text:style-name="P165"><text:tab/>movl<text:tab/>$3, i3(%rip)</text:p>
            <text:p text:style-name="P165"/>
            <text:p text:style-name="P165"><text:tab/>movsd<text:tab/>.LC1(%rip), %xmm0</text:p>
            <text:p text:style-name="P165"><text:tab/>movsd<text:tab/>%xmm0, flt_1(%rip)</text:p>
            <text:p text:style-name="P165"/>
            <text:p text:style-name="P165"><text:tab/>movl<text:tab/>$5, i2(%rip)</text:p>
            <text:p text:style-name="P165"/>
            <text:p text:style-name="P165"><text:tab/><text:span text:style-name="T37">movl<text:tab/>i(%rip), %eax</text:span></text:p>
            <text:p text:style-name="P165"><text:tab/>movl<text:tab/>%eax, j2(%rip)</text:p>
            <text:p text:style-name="P165"/>
            <text:p text:style-name="P165"><text:tab/><text:span text:style-name="T37">movl<text:tab/>i(%rip), %eax</text:span></text:p>
            <text:p text:style-name="P165"><text:tab/>movl<text:tab/>%eax, k2(%rip)</text:p>
            <text:p text:style-name="P165"/>
            <text:p text:style-name="P165"><text:tab/>movl<text:tab/>i(%rip), %eax</text:p>
            <text:p text:style-name="P165"><text:tab/>movl<text:tab/>%eax, i4(%rip)</text:p>
            <text:p text:style-name="P165"/>
            <text:p text:style-name="P165"><text:tab/>movl<text:tab/>$0, i5(%rip)</text:p>
            <text:p text:style-name="P165"/>
            <text:p text:style-name="P165"><text:tab/>leaq<text:tab/>.LC2(%rip), %rax</text:p>
            <text:p text:style-name="P165"><text:tab/>movq<text:tab/>%rax, %rdi</text:p>
            <text:p text:style-name="P165"><text:tab/>call<text:tab/>puts@PLT</text:p>
            <text:p text:style-name="P165"/>
            <text:p text:style-name="P165"><text:tab/>movsd<text:tab/>.LC3(%rip), %xmm0</text:p>
            <text:p text:style-name="P165"><text:tab/>movsd<text:tab/>%xmm0, flt_3(%rip)</text:p>
            <text:p text:style-name="P165"/>
            <text:p text:style-name="P165"><text:tab/>movsd<text:tab/>.LC4(%rip), %xmm0</text:p>
            <text:p text:style-name="P165"><text:tab/>movsd<text:tab/>%xmm0, flt_4(%rip)</text:p>
            <text:p text:style-name="P165"/>
            <text:p text:style-name="P165"><text:tab/>movsd<text:tab/>flt_6(%rip), %xmm1</text:p>
            <text:p text:style-name="P165"><text:tab/>pxor<text:tab/>%xmm0, %xmm0</text:p>
            <text:p text:style-name="P165"><text:tab/>mulsd<text:tab/>%xmm1, %xmm0</text:p>
            <text:p text:style-name="P165"><text:tab/>movsd<text:tab/>%xmm0, flt_5(%rip)</text:p>
            <text:p text:style-name="P165"/>
            <text:p text:style-name="P165"><text:tab/>movsd<text:tab/>flt_2(%rip), %xmm1</text:p>
            <text:p text:style-name="P165"><text:tab/>movsd<text:tab/>flt_3(%rip), %xmm0</text:p>
            <text:p text:style-name="P165"><text:tab/>mulsd<text:tab/>%xmm1, %xmm0</text:p>
            <text:p text:style-name="P165"><text:tab/>movsd<text:tab/>%xmm0, flt_6(%rip)</text:p>
          </table:table-cell>
          <table:table-cell table:style-name="Таблица31.A1" office:value-type="string">
            <text:p text:style-name="P183"><text:tab/>I3 = 1 + 2;</text:p>
            <text:p text:style-name="P183"><text:tab/>flt_1 = 2.4 + 6.3;</text:p>
            <text:p text:style-name="P183"><text:tab/>i2 = 5;</text:p>
            <text:p text:style-name="P183"><text:tab/>j2 = i + 0;</text:p>
            <text:p text:style-name="P183"><text:tab/>k2 = i / 1;</text:p>
            <text:p text:style-name="P183"><text:tab/>i4 = i * 1;</text:p>
            <text:p text:style-name="P183"><text:tab/>i5 = i * 0;</text:p>
            <text:p text:style-name="P184"><text:tab/>printf("This compiler handles divide-by-zero as \</text:p>
            <text:p text:style-name="P184"><text:s text:c="20"/>an error\n");</text:p>
            <text:p text:style-name="P184"><text:tab/>flt_3 = 2.4 / 1.0;</text:p>
            <text:p text:style-name="P183"><text:tab/>flt_4 = 1.0 + 0.0000001;</text:p>
            <text:p text:style-name="P183"><text:tab/>flt_5 = flt_6 * 0.0;</text:p>
            <text:p text:style-name="P183"><text:tab/>flt_6 = flt_2 * flt_3;</text:p>
          </table:table-cell>
        </table:table-row>
      </table:table>
      <text:p text:style-name="P84"/>
      <text:p text:style-name="P7">Без оптимизации происходит <text:span text:style-name="T46">как </text:span>свёртка констант, <text:span text:style-name="T46">так и оптимизация </text:span>арифметически<text:span text:style-name="T46">х</text:span> тождеств, <text:span text:style-name="T46">чего не было у clang. Явно видно, что без оптимизации нет удаления лишних загрузок в память</text:span></text:p>
      <table:table table:name="Таблица32" table:style-name="Таблица32">
        <table:table-column table:style-name="Таблица32.A"/>
        <table:table-column table:style-name="Таблица32.B"/>
        <table:table-row table:style-name="Таблица32.1">
          <table:table-cell table:style-name="Таблица32.A1" office:value-type="string">
            <text:p text:style-name="P165"><text:tab/>movl<text:tab/>$3, i3(%rip)</text:p>
            <text:p text:style-name="P165"/>
            <text:p text:style-name="P165"><text:tab/>movsd<text:tab/>.LC1(%rip), %xmm0</text:p>
            <text:p text:style-name="P165"><text:tab/>movsd<text:tab/>%xmm0, flt_1(%rip)</text:p>
            <text:p text:style-name="P165"/>
            <text:p text:style-name="P165"><text:tab/>movl<text:tab/>$5, i2(%rip)</text:p>
            <text:p text:style-name="P165"/>
            <text:p text:style-name="P165"><text:tab/>movl<text:tab/>i(%rip), %eax</text:p>
            <text:p text:style-name="P165"><text:tab/>movl<text:tab/>%eax, j2(%rip)</text:p>
            <text:p text:style-name="P165"/>
            <text:p text:style-name="P165"><text:tab/>movl<text:tab/>i(%rip), %eax</text:p>
            <text:p text:style-name="P165"><text:tab/>movl<text:tab/>%eax, k2(%rip)</text:p>
            <text:p text:style-name="P165"/>
            <text:p text:style-name="P165"><text:tab/>movl<text:tab/>i(%rip), %eax</text:p>
            <text:p text:style-name="P165"><text:tab/>movl<text:tab/>%eax, i4(%rip)</text:p>
            <text:p text:style-name="P165"/>
            <text:p text:style-name="P165"><text:tab/>movl<text:tab/>$0, i5(%rip)</text:p>
            <text:p text:style-name="P165"/>
            <text:p text:style-name="P165"><text:tab/>leaq<text:tab/>.LC2(%rip), %rax</text:p>
            <text:p text:style-name="P165"><text:tab/>movq<text:tab/>%rax, %rdi</text:p>
            <text:p text:style-name="P165"><text:tab/>call<text:tab/>puts@PLT</text:p>
            <text:p text:style-name="P165"/>
            <text:p text:style-name="P165"><text:tab/>movsd<text:tab/>.LC3(%rip), %xmm0</text:p>
            <text:p text:style-name="P165"><text:tab/>movsd<text:tab/>%xmm0, flt_3(%rip)</text:p>
            <text:p text:style-name="P165"/>
            <text:p text:style-name="P165"><text:tab/>movsd<text:tab/>.LC4(%rip), %xmm0</text:p>
            <text:p text:style-name="P165"><text:tab/>movsd<text:tab/>%xmm0, flt_4(%rip)</text:p>
            <text:p text:style-name="P165"/>
            <text:p text:style-name="P165"><text:tab/>movsd<text:tab/>flt_6(%rip), %xmm1</text:p>
            <text:p text:style-name="P165"><text:tab/>pxor<text:tab/>%xmm0, %xmm0</text:p>
            <text:p text:style-name="P165"><text:tab/>mulsd<text:tab/>%xmm1, %xmm0</text:p>
            <text:p text:style-name="P165"><text:tab/>movsd<text:tab/>%xmm0, flt_5(%rip)</text:p>
            <text:p text:style-name="P165"/>
            <text:p text:style-name="P165"><text:tab/>movsd<text:tab/>flt_2(%rip), %xmm1</text:p>
            <text:p text:style-name="P165"><text:tab/>movsd<text:tab/>flt_3(%rip), %xmm0</text:p>
            <text:p text:style-name="P165"><text:tab/>mulsd<text:tab/>%xmm1, %xmm0</text:p>
            <text:p text:style-name="P165"><text:tab/>movsd<text:tab/>%xmm0, flt_6(%rip)</text:p>
          </table:table-cell>
          <table:table-cell table:style-name="Таблица32.A1" office:value-type="string">
            <text:p text:style-name="P136"><text:tab/>movq<text:tab/>.LC1(%rip), %rax</text:p>
            <text:p text:style-name="P135"><text:tab/>leaq<text:tab/>.LC2(%rip), %rdi</text:p>
            <text:p text:style-name="P135"/>
            <text:p text:style-name="P135"><text:tab/>movl<text:tab/>$3, i3(%rip)</text:p>
            <text:p text:style-name="P135"/>
            <text:p text:style-name="P135"><text:tab/>movl<text:tab/>$5, i2(%rip)</text:p>
            <text:p text:style-name="P135"/>
            <text:p text:style-name="P135"><text:tab/>movq<text:tab/>%rax, flt_1(%rip)</text:p>
            <text:p text:style-name="P135"><text:tab/>movl<text:tab/>i(%rip), %eax</text:p>
            <text:p text:style-name="P137"/>
            <text:p text:style-name="P137"><text:tab/>movl<text:tab/>$0, i5(%rip)</text:p>
            <text:p text:style-name="P135"><text:tab/>movl<text:tab/>%eax, j2(%rip)</text:p>
            <text:p text:style-name="P135"><text:tab/>movl<text:tab/>%eax, k2(%rip)</text:p>
            <text:p text:style-name="P135"><text:tab/>movl<text:tab/>%eax, i4(%rip)</text:p>
            <text:p text:style-name="P137"/>
            <text:p text:style-name="P137"><text:tab/>call<text:tab/>puts@PLT</text:p>
            <text:p text:style-name="P135"/>
            <text:p text:style-name="P135"><text:tab/>movq<text:tab/>.LC4(%rip), %rax</text:p>
            <text:p text:style-name="P135"><text:tab/>pxor<text:tab/>%xmm1, %xmm1</text:p>
            <text:p text:style-name="P135"/>
            <text:p text:style-name="P135"><text:tab/>movsd<text:tab/>.LC3(%rip), %xmm0</text:p>
            <text:p text:style-name="P135"><text:tab/>mulsd<text:tab/>flt_6(%rip), %xmm1</text:p>
            <text:p text:style-name="P153"/>
            <text:p text:style-name="P153"><text:tab/>movq<text:tab/>%rax, flt_4(%rip)</text:p>
            <text:p text:style-name="P153"/>
            <text:p text:style-name="P153"><text:tab/>movsd<text:tab/>%xmm0, flt_3(%rip)</text:p>
            <text:p text:style-name="P153"/>
            <text:p text:style-name="P153"><text:tab/>mulsd<text:tab/>flt_2(%rip), %xmm0</text:p>
            <text:p text:style-name="P153"/>
            <text:p text:style-name="P153"><text:tab/>movsd<text:tab/>%xmm1, flt_5(%rip)</text:p>
            <text:p text:style-name="P153"><text:tab/>movsd<text:tab/>%xmm0, flt_6(%rip)</text:p>
          </table:table-cell>
        </table:table-row>
      </table:table>
      <text:p text:style-name="P96"/>
      <text:p text:style-name="P8">При оптимизации gcc оптимизировал арифметическое тождество с умножением на 0.0, что не смог сделать clang</text:p>
      <text:p text:style-name="P7"/>
      <text:p text:style-name="P2">Хорошо видна оптимизация излишних загрузок переменной в регистр.</text:p>
      <text:p text:style-name="P7"/>
      <table:table table:name="Таблица33" table:style-name="Таблица33">
        <table:table-column table:style-name="Таблица33.A"/>
        <table:table-column table:style-name="Таблица33.B"/>
        <table:table-row>
          <table:table-cell table:style-name="Таблица33.A1" office:value-type="string">
            <text:p text:style-name="P119">movl<text:tab/>$1, k3(%rip)</text:p>
            <text:p text:style-name="P119">movl<text:tab/>$1, k3(%rip)</text:p>
          </table:table-cell>
          <table:table-cell table:style-name="Таблица33.A1" office:value-type="string">
            <text:p text:style-name="P119">movl<text:tab/>$1, k3(%rip)</text:p>
          </table:table-cell>
        </table:table-row>
      </table:table>
      <text:p text:style-name="P7"/>
      <text:p text:style-name="P73"><text:span text:style-name="T22">Удаление излишнего присваивания проис</text:span><text:span text:style-name="T17">ходит только с оптимизацией, </text:span><text:span text:style-name="T18">так же как у clang</text:span></text:p>
      <table:table table:name="Таблица34" table:style-name="Таблица34">
        <table:table-column table:style-name="Таблица34.A"/>
        <table:table-column table:style-name="Таблица34.B"/>
        <table:table-row table:style-name="Таблица34.1">
          <table:table-cell table:style-name="Таблица34.A1" office:value-type="string">
            <text:p text:style-name="P154"><text:span text:style-name="T15"><text:tab/></text:span>movl<text:tab/>j5(%rip), %eax</text:p>
            <text:p text:style-name="P151"><text:tab/><text:span text:style-name="T38">sall<text:tab/>$2, %eax</text:span></text:p>
            <text:p text:style-name="P151"><text:tab/>movl<text:tab/>%eax, k2(%rip)</text:p>
            <text:p text:style-name="P151"><text:tab/>movl<text:tab/>$0, i(%rip)</text:p>
            <text:p text:style-name="P151"><text:tab/>jmp<text:tab/>.L4</text:p>
            <text:p text:style-name="P151">.L5:</text:p>
            <text:p text:style-name="P151"><text:tab/>movl<text:tab/>i(%rip), %eax</text:p>
            <text:p text:style-name="P151"><text:tab/>leal<text:tab/>(%rax,%rax), %edx</text:p>
            <text:p text:style-name="P151"><text:tab/>movl<text:tab/>i(%rip), %eax</text:p>
            <text:p text:style-name="P151"><text:tab/>movl<text:tab/>%edx, %ecx</text:p>
            <text:p text:style-name="P151"><text:tab/>cltq</text:p>
            <text:p text:style-name="P151"><text:tab/>leaq<text:tab/>(%rax,%rax), %rdx</text:p>
            <text:p text:style-name="P151"><text:tab/>leaq<text:tab/>ivector4(%rip), %rax</text:p>
            <text:p text:style-name="P151"><text:tab/>movw<text:tab/>%cx, (%rdx,%rax)</text:p>
            <text:p text:style-name="P151"><text:tab/>movl<text:tab/>i(%rip), %eax</text:p>
            <text:p text:style-name="P151"><text:tab/>addl<text:tab/>$1, %eax</text:p>
            <text:p text:style-name="P151"><text:tab/>movl<text:tab/>%eax, i(%rip)</text:p>
            <text:p text:style-name="P151">.L4:</text:p>
            <text:p text:style-name="P151"><text:tab/>movl<text:tab/>i(%rip), %eax</text:p>
            <text:p text:style-name="P151"><text:tab/>cmpl<text:tab/>$5, %eax</text:p>
            <text:p text:style-name="P151"><text:tab/>jle<text:tab/>.L5</text:p>
          </table:table-cell>
          <table:table-cell table:style-name="Таблица34.A1" office:value-type="string">
            <text:p text:style-name="P183"><text:tab/>k2 = 4 * j5;</text:p>
            <text:p text:style-name="P183"><text:tab/>for (i = 0; i &lt;= 5; i++)</text:p>
            <text:p text:style-name="P183"><text:tab/><text:tab/>ivector4[i] = i * 2;</text:p>
          </table:table-cell>
        </table:table-row>
      </table:table>
      <text:p text:style-name="P73"><text:span text:style-name="T17"/></text:p>
      <text:p text:style-name="P40"><text:span text:style-name="T23">Даже без флага оптимизации выполняется снижение мощности: умножение на степень двойки превращается в битовый сдвиг</text:span></text:p>
      <text:p text:style-name="P40"><text:span text:style-name="T23"/></text:p>
      <table:table table:name="Таблица35" table:style-name="Таблица35">
        <table:table-column table:style-name="Таблица35.A"/>
        <table:table-column table:style-name="Таблица35.B"/>
        <table:table-row>
          <table:table-cell table:style-name="Таблица35.A1" office:value-type="string">
            <text:p text:style-name="P166"><text:tab/>movl<text:tab/>j5(%rip), %eax</text:p>
            <text:p text:style-name="P166"><text:tab/>sall<text:tab/>$2, %eax</text:p>
            <text:p text:style-name="P166"><text:tab/>movl<text:tab/>%eax, k2(%rip)</text:p>
            <text:p text:style-name="P166"><text:tab/>movl<text:tab/>$0, i(%rip)</text:p>
            <text:p text:style-name="P166"><text:tab/>jmp<text:tab/>.L4</text:p>
            <text:p text:style-name="P166">.L5:</text:p>
            <text:p text:style-name="P166"><text:tab/>movl<text:tab/>i(%rip), %eax</text:p>
            <text:p text:style-name="P166"><text:tab/>leal<text:tab/>(%rax,%rax), %edx</text:p>
            <text:p text:style-name="P166"><text:tab/>movl<text:tab/>i(%rip), %eax</text:p>
            <text:p text:style-name="P166"><text:tab/>movl<text:tab/>%edx, %ecx</text:p>
            <text:p text:style-name="P166"><text:tab/>cltq</text:p>
            <text:p text:style-name="P166"><text:tab/>leaq<text:tab/>(%rax,%rax), %rdx</text:p>
            <text:p text:style-name="P166"><text:tab/>leaq<text:tab/>ivector4(%rip), %rax</text:p>
            <text:p text:style-name="P166"><text:tab/>movw<text:tab/>%cx, (%rdx,%rax)</text:p>
            <text:p text:style-name="P166"><text:tab/>movl<text:tab/>i(%rip), %eax</text:p>
            <text:p text:style-name="P166"><text:tab/>addl<text:tab/>$1, %eax</text:p>
            <text:p text:style-name="P166"><text:tab/>movl<text:tab/>%eax, i(%rip)</text:p>
            <text:p text:style-name="P166">.L4:</text:p>
            <text:p text:style-name="P166"><text:tab/>movl<text:tab/>i(%rip), %eax</text:p>
            <text:p text:style-name="P166"><text:tab/>cmpl<text:tab/>$5, %eax</text:p>
            <text:p text:style-name="P166"><text:tab/>jle<text:tab/>.L5</text:p>
          </table:table-cell>
          <table:table-cell table:style-name="Таблица35.A1" office:value-type="string">
            <text:p text:style-name="P151"><text:tab/>movl<text:tab/>j5(%rip), %eax</text:p>
            <text:p text:style-name="P151"><text:tab/>movl<text:tab/>$655368, 8+ivector4(%rip)</text:p>
            <text:p text:style-name="P151"><text:tab/><text:span text:style-name="T38">sall<text:tab/>$2, %eax</text:span></text:p>
            <text:p text:style-name="P151"><text:tab/>movl<text:tab/>%eax, k2(%rip)</text:p>
          </table:table-cell>
        </table:table-row>
      </table:table>
      <text:p text:style-name="P40"><text:span text:style-name="T23"/></text:p>
      <text:p text:style-name="P71"><text:span text:style-name="T23">Снижение мощности </text:span><text:span text:style-name="T28">остаётся</text:span><text:span text:style-name="T23"> и при оптимизации по скорости, </text:span><text:span text:style-name="T25">при этом</text:span><text:span text:style-name="T23"> цикл был убран.</text:span></text:p>
      <table:table table:name="Таблица36" table:style-name="Таблица36">
        <table:table-column table:style-name="Таблица36.A"/>
        <table:table-column table:style-name="Таблица36.B"/>
        <table:table-row table:style-name="Таблица36.1">
          <table:table-cell table:style-name="Таблица36.A1" office:value-type="string">
            <text:p text:style-name="P151"><text:tab/>movl<text:tab/>$0, j5(%rip)</text:p>
            <text:p text:style-name="P151"><text:tab/>movl<text:tab/>$10000, k5(%rip)</text:p>
            <text:p text:style-name="P151">.L6:</text:p>
            <text:p text:style-name="P151"><text:tab/>movl<text:tab/>k5(%rip), %eax</text:p>
            <text:p text:style-name="P151"><text:tab/>subl<text:tab/>$1, %eax</text:p>
            <text:p text:style-name="P151"><text:tab/>movl<text:tab/>%eax, k5(%rip)</text:p>
            <text:p text:style-name="P151"><text:tab/>movl<text:tab/>j5(%rip), %eax</text:p>
            <text:p text:style-name="P151"><text:tab/>addl<text:tab/>$1, %eax</text:p>
            <text:p text:style-name="P151"><text:tab/>movl<text:tab/>%eax, j5(%rip)</text:p>
            <text:p text:style-name="P151"><text:tab/>movl<text:tab/>k5(%rip), %edx</text:p>
            <text:p text:style-name="P151"><text:tab/>movl<text:tab/>%edx, %eax</text:p>
            <text:p text:style-name="P151"><text:tab/>addl<text:tab/>%eax, %eax</text:p>
            <text:p text:style-name="P151"><text:tab/>leal<text:tab/>(%rax,%rdx), %ecx</text:p>
            <text:p text:style-name="P151"><text:tab/>movl<text:tab/>j5(%rip), %edx</text:p>
            <text:p text:style-name="P151"><text:tab/>movl<text:tab/>%edx, %eax</text:p>
            <text:p text:style-name="P151"><text:tab/>sall<text:tab/>$2, %eax</text:p>
            <text:p text:style-name="P151"><text:tab/>leal<text:tab/>(%rdx,%rax), %esi</text:p>
            <text:p text:style-name="P151"><text:tab/>movl<text:tab/>%ecx, %eax</text:p>
            <text:p text:style-name="P151"><text:tab/>cltd</text:p>
            <text:p text:style-name="P151"><text:tab/>idivl<text:tab/>%esi</text:p>
            <text:p text:style-name="P151"><text:tab/>movl<text:tab/>%eax, i5(%rip)</text:p>
            <text:p text:style-name="P151"><text:tab/>movl<text:tab/>k5(%rip), %eax</text:p>
            <text:p text:style-name="P151"><text:tab/>testl<text:tab/>%eax, %eax</text:p>
            <text:p text:style-name="P151"><text:tab/>jg<text:tab/>.L6</text:p>
          </table:table-cell>
          <table:table-cell table:style-name="Таблица36.A1" office:value-type="string">
            <text:p text:style-name="P180"><text:tab/>j5 = 0;</text:p>
            <text:p text:style-name="P180"><text:tab/>k5 = 10000;</text:p>
            <text:p text:style-name="P180"><text:tab/>do {</text:p>
            <text:p text:style-name="P180"><text:tab/><text:tab/>k5 = k5 - 1;</text:p>
            <text:p text:style-name="P180"><text:tab/><text:tab/>j5 = j5 + 1;</text:p>
            <text:p text:style-name="P180"><text:tab/><text:tab/>i5 = (k5 * 3) / (j5 * constant5);</text:p>
            <text:p text:style-name="P180"><text:tab/>} while (k5 &gt; 0);</text:p>
          </table:table-cell>
        </table:table-row>
      </table:table>
      <text:p text:style-name="P87"/>
      <text:p text:style-name="P78"/>
      <table:table table:name="Таблица37" table:style-name="Таблица37">
        <table:table-column table:style-name="Таблица37.A"/>
        <table:table-column table:style-name="Таблица37.B"/>
        <table:table-row table:style-name="Таблица37.1">
          <table:table-cell table:style-name="Таблица37.A1" office:value-type="string">
            <text:p text:style-name="P151"><text:tab/>movl<text:tab/>$0, j5(%rip)</text:p>
            <text:p text:style-name="P151"><text:tab/>movl<text:tab/>$10000, k5(%rip)</text:p>
            <text:p text:style-name="P151">.L6:</text:p>
            <text:p text:style-name="P151"><text:tab/>movl<text:tab/>k5(%rip), %eax</text:p>
            <text:p text:style-name="P151"><text:tab/>subl<text:tab/>$1, %eax</text:p>
            <text:p text:style-name="P151"><text:tab/>movl<text:tab/>%eax, k5(%rip)</text:p>
            <text:p text:style-name="P151"><text:tab/>movl<text:tab/>j5(%rip), %eax</text:p>
            <text:p text:style-name="P151"><text:tab/>addl<text:tab/>$1, %eax</text:p>
            <text:p text:style-name="P151"><text:tab/>movl<text:tab/>%eax, j5(%rip)</text:p>
            <text:p text:style-name="P151"><text:tab/>movl<text:tab/>k5(%rip), %edx</text:p>
            <text:p text:style-name="P151"><text:tab/>movl<text:tab/>%edx, %eax</text:p>
            <text:p text:style-name="P151"><text:tab/>addl<text:tab/>%eax, %eax</text:p>
            <text:p text:style-name="P151"><text:tab/>leal<text:tab/>(%rax,%rdx), %ecx</text:p>
            <text:p text:style-name="P151"><text:tab/>movl<text:tab/>j5(%rip), %edx</text:p>
            <text:p text:style-name="P151"><text:tab/>movl<text:tab/>%edx, %eax</text:p>
            <text:p text:style-name="P151"><text:tab/>sall<text:tab/>$2, %eax</text:p>
            <text:p text:style-name="P151"><text:tab/>leal<text:tab/>(%rdx,%rax), %esi</text:p>
            <text:p text:style-name="P151"><text:tab/>movl<text:tab/>%ecx, %eax</text:p>
            <text:p text:style-name="P151"><text:tab/>cltd</text:p>
            <text:p text:style-name="P151"><text:tab/>idivl<text:tab/>%esi</text:p>
            <text:p text:style-name="P151"><text:tab/>movl<text:tab/>%eax, i5(%rip)</text:p>
            <text:p text:style-name="P151"><text:tab/>movl<text:tab/>k5(%rip), %eax</text:p>
            <text:p text:style-name="P151"><text:tab/>testl<text:tab/>%eax, %eax</text:p>
            <text:p text:style-name="P151"><text:tab/>jg<text:tab/>.L6</text:p>
          </table:table-cell>
          <table:table-cell table:style-name="Таблица37.A1" office:value-type="string">
            <text:p text:style-name="P151"><text:tab/>movl<text:tab/>$10000, j5(%rip)</text:p>
            <text:p text:style-name="P151"><text:tab/>movl<text:tab/>$0, i5(%rip)</text:p>
          </table:table-cell>
        </table:table-row>
      </table:table>
      <text:p text:style-name="P78"/>
      <text:p text:style-name="P19">В результате оптимизации цикл исчез</text:p>
      <table:table table:name="Таблица38" table:style-name="Таблица38">
        <table:table-column table:style-name="Таблица38.A" table:number-columns-repeated="2"/>
        <table:table-row>
          <table:table-cell table:style-name="Таблица38.A1" office:value-type="string">
            <text:p text:style-name="P151"><text:tab/>movl<text:tab/>$0, i(%rip)</text:p>
            <text:p text:style-name="P151"><text:tab/>jmp<text:tab/>.L7</text:p>
            <text:p text:style-name="P151">.L8:</text:p>
            <text:p text:style-name="P151"><text:tab/>movl<text:tab/>i(%rip), %eax</text:p>
            <text:p text:style-name="P151"><text:tab/>addl<text:tab/>%eax, %eax</text:p>
            <text:p text:style-name="P151"><text:tab/>addl<text:tab/>$3, %eax</text:p>
            <text:p text:style-name="P151"><text:tab/>cltq</text:p>
            <text:p text:style-name="P151"><text:tab/>leaq<text:tab/>0(,%rax,4), %rdx</text:p>
            <text:p text:style-name="P151"><text:tab/>leaq<text:tab/>ivector5(%rip), %rax</text:p>
            <text:p text:style-name="P151"><text:tab/>movl<text:tab/>$5, (%rdx,%rax)</text:p>
            <text:p text:style-name="P151"><text:tab/>movl<text:tab/>i(%rip), %eax</text:p>
            <text:p text:style-name="P151"><text:tab/>addl<text:tab/>$1, %eax</text:p>
            <text:p text:style-name="P151"><text:tab/>movl<text:tab/>%eax, i(%rip)</text:p>
            <text:p text:style-name="P151">.L7:</text:p>
            <text:p text:style-name="P151"><text:tab/>movl<text:tab/>i(%rip), %eax</text:p>
            <text:p text:style-name="P151"><text:tab/>cmpl<text:tab/>$99, %eax</text:p>
            <text:p text:style-name="P151"><text:tab/>jle<text:tab/>.L8</text:p>
          </table:table-cell>
          <table:table-cell table:style-name="Таблица38.A1" office:value-type="string">
            <text:p text:style-name="P188"><text:tab/>for (i = 0; i &lt; 100; i++)</text:p>
            <text:p text:style-name="P187"><text:tab/><text:tab/>ivector5[i * 2 + 3] = 5;</text:p>
          </table:table-cell>
        </table:table-row>
      </table:table>
      <text:p text:style-name="P19"/>
      <text:p text:style-name="P22">Без оптимизации переменная индукции осталась<text:line-break/><text:line-break/></text:p>
      <table:table table:name="Таблица39" table:style-name="Таблица39">
        <table:table-column table:style-name="Таблица39.A" table:number-columns-repeated="2"/>
        <table:table-row>
          <table:table-cell table:style-name="Таблица39.A1" office:value-type="string">
            <text:p text:style-name="P151"><text:tab/>movl<text:tab/>$0, i(%rip)</text:p>
            <text:p text:style-name="P151"><text:tab/>jmp<text:tab/>.L7</text:p>
            <text:p text:style-name="P151">.L8:</text:p>
            <text:p text:style-name="P151"><text:tab/>movl<text:tab/>i(%rip), %eax</text:p>
            <text:p text:style-name="P151"><text:tab/>addl<text:tab/>%eax, %eax</text:p>
            <text:p text:style-name="P151"><text:tab/>addl<text:tab/>$3, %eax</text:p>
            <text:p text:style-name="P151"><text:tab/>cltq</text:p>
            <text:p text:style-name="P151"><text:tab/>leaq<text:tab/>0(,%rax,4), %rdx</text:p>
            <text:p text:style-name="P151"><text:tab/>leaq<text:tab/>ivector5(%rip), %rax</text:p>
            <text:p text:style-name="P151"><text:tab/>movl<text:tab/>$5, (%rdx,%rax)</text:p>
            <text:p text:style-name="P151"><text:tab/>movl<text:tab/>i(%rip), %eax</text:p>
            <text:p text:style-name="P151"><text:tab/>addl<text:tab/>$1, %eax</text:p>
            <text:p text:style-name="P151"><text:tab/>movl<text:tab/>%eax, i(%rip)</text:p>
            <text:p text:style-name="P151">.L7:</text:p>
            <text:p text:style-name="P151"><text:tab/>movl<text:tab/>i(%rip), %eax</text:p>
            <text:p text:style-name="P151"><text:tab/>cmpl<text:tab/>$99, %eax</text:p>
            <text:p text:style-name="P151"><text:tab/>jle<text:tab/>.L8</text:p>
          </table:table-cell>
          <table:table-cell table:style-name="Таблица39.A1" office:value-type="string">
            <text:p text:style-name="P151"><text:tab/>movq<text:tab/>.LC6(%rip), %rax</text:p>
            <text:p text:style-name="P151"><text:tab/>movq<text:tab/>%rax, ivector4(%rip)</text:p>
            <text:p text:style-name="P151"><text:tab/>leaq<text:tab/>12+ivector5(%rip), %rax</text:p>
            <text:p text:style-name="P151"><text:tab/>leaq<text:tab/>800(%rax), %rdx</text:p>
            <text:p text:style-name="P151">.L38:</text:p>
            <text:p text:style-name="P151"><text:tab/>movl<text:tab/>$5, (%rax)</text:p>
            <text:p text:style-name="P151"><text:tab/>addq<text:tab/>$16, %rax</text:p>
            <text:p text:style-name="P151"><text:tab/>movl<text:tab/>$5, -8(%rax)</text:p>
            <text:p text:style-name="P151"><text:tab/>cmpq<text:tab/>%rdx, %rax</text:p>
            <text:p text:style-name="P151"><text:tab/>jne<text:tab/>.L38</text:p>
          </table:table-cell>
        </table:table-row>
      </table:table>
      <text:p text:style-name="P22"/>
      <text:p text:style-name="P22">При оптимизации переменная индукции была убрана</text:p>
      <table:table table:name="Таблица40" table:style-name="Таблица40">
        <table:table-column table:style-name="Таблица40.A"/>
        <table:table-column table:style-name="Таблица40.B"/>
        <table:table-row>
          <table:table-cell table:style-name="Таблица40.A1" office:value-type="string">
            <text:p text:style-name="P169"><text:tab/><text:span text:style-name="T37">movl<text:tab/>h3(%rip), %edx</text:span></text:p>
            <text:p text:style-name="P169"><text:tab/><text:span text:style-name="T37">movl<text:tab/>k3(%rip), %eax</text:span></text:p>
            <text:p text:style-name="P169"><text:tab/>addl<text:tab/>%edx, %eax</text:p>
            <text:p text:style-name="P169"><text:tab/>testl<text:tab/>%eax, %eax</text:p>
            <text:p text:style-name="P169"><text:tab/>js<text:tab/>.L11</text:p>
            <text:p text:style-name="P169"><text:tab/><text:span text:style-name="T37">movl<text:tab/>h3(%rip), %edx</text:span></text:p>
            <text:p text:style-name="P169"><text:tab/><text:span text:style-name="T37">movl<text:tab/>k3(%rip), %eax</text:span></text:p>
            <text:p text:style-name="P169"><text:tab/>addl<text:tab/>%edx, %eax</text:p>
            <text:p text:style-name="P169"><text:tab/>cmpl<text:tab/>$5, %eax</text:p>
            <text:p text:style-name="P169"><text:tab/>jle<text:tab/>.L12</text:p>
            <text:p text:style-name="P169">.L11:</text:p>
            <text:p text:style-name="P169"><text:tab/>leaq<text:tab/>.LC6(%rip), %rax</text:p>
            <text:p text:style-name="P169"><text:tab/>movq<text:tab/>%rax, %rdi</text:p>
            <text:p text:style-name="P169"><text:tab/>call<text:tab/>puts@PLT</text:p>
            <text:p text:style-name="P169"><text:tab/>jmp<text:tab/>.L13</text:p>
            <text:p text:style-name="P169">.L12:</text:p>
            <text:p text:style-name="P169"><text:tab/><text:span text:style-name="T37">movl<text:tab/>h3(%rip), %edx</text:span></text:p>
            <text:p text:style-name="P169"><text:tab/><text:span text:style-name="T37">movl<text:tab/>k3(%rip), %eax</text:span></text:p>
            <text:p text:style-name="P169"><text:tab/>addl<text:tab/>%edx, %eax</text:p>
            <text:p text:style-name="P169"><text:tab/>movl<text:tab/>i3(%rip), %ecx</text:p>
            <text:p text:style-name="P169"><text:tab/>cltd</text:p>
            <text:p text:style-name="P169"><text:tab/>idivl<text:tab/>%ecx</text:p>
            <text:p text:style-name="P169"><text:tab/>movl<text:tab/>%eax, m3(%rip)</text:p>
            <text:p text:style-name="P169"><text:tab/>movl<text:tab/>m3(%rip), %eax</text:p>
            <text:p text:style-name="P169"><text:tab/>movl<text:tab/>%eax, %esi</text:p>
            <text:p text:style-name="P169"><text:tab/>leaq<text:tab/>.LC0(%rip), %rax</text:p>
            <text:p text:style-name="P169"><text:tab/>movq<text:tab/>%rax, %rdi</text:p>
            <text:p text:style-name="P169"><text:tab/>movl<text:tab/>$0, %eax</text:p>
            <text:p text:style-name="P169"><text:tab/>call<text:tab/>printf@PLT</text:p>
            <text:p text:style-name="P169"><text:tab/><text:span text:style-name="T37">movl<text:tab/>h3(%rip), %edx</text:span></text:p>
            <text:p text:style-name="P169"><text:tab/><text:span text:style-name="T37">movl<text:tab/>k3(%rip), %eax</text:span></text:p>
            <text:p text:style-name="P169"><text:tab/>addl<text:tab/>%eax, %edx</text:p>
            <text:p text:style-name="P169"><text:tab/>movl<text:tab/>i3(%rip), %eax</text:p>
            <text:p text:style-name="P169"><text:tab/>addl<text:tab/>%edx, %eax</text:p>
            <text:p text:style-name="P169"><text:tab/>movl<text:tab/>%eax, g3(%rip)</text:p>
            <text:p text:style-name="P169"><text:tab/>movl<text:tab/>g3(%rip), %eax</text:p>
            <text:p text:style-name="P169"><text:tab/>movl<text:tab/>%eax, %esi</text:p>
            <text:p text:style-name="P169"><text:tab/>leaq<text:tab/>.LC0(%rip), %rax</text:p>
            <text:p text:style-name="P169"><text:tab/>movq<text:tab/>%rax, %rdi</text:p>
            <text:p text:style-name="P169"><text:tab/>movl<text:tab/>$0, %eax</text:p>
            <text:p text:style-name="P169"><text:tab/>call<text:tab/>printf@PLT</text:p>
          </table:table-cell>
          <table:table-cell table:style-name="Таблица40.A1" office:value-type="string">
            <text:p text:style-name="P102"><text:tab/>if ((h3 + k3) &lt; 0 || (h3 + k3) &gt; 5)</text:p>
            <text:p text:style-name="P102"><text:tab/><text:tab/>printf("Common subexpression elimination\n");</text:p>
            <text:p text:style-name="P102"><text:tab/>else {</text:p>
            <text:p text:style-name="P102"><text:tab/><text:tab/>m3 = (h3 + k3) / i3;</text:p>
            <text:p text:style-name="P102"><text:tab/><text:tab/>printf("%d", m3);</text:p>
            <text:p text:style-name="P102"><text:tab/><text:tab/>g3 = i3 + (h3 + k3);</text:p>
            <text:p text:style-name="P102"><text:tab/><text:tab/>printf("%d", g3);</text:p>
            <text:p text:style-name="P102"><text:tab/>}</text:p>
          </table:table-cell>
        </table:table-row>
      </table:table>
      <text:p text:style-name="P19"><text:span text:style-name="T1"/></text:p>
      <text:p text:style-name="P13">Без оптимизации вынесение общих подвыражений не наблюдается</text:p>
      <table:table table:name="Таблица41" table:style-name="Таблица41">
        <table:table-column table:style-name="Таблица41.A"/>
        <table:table-column table:style-name="Таблица41.B"/>
        <table:table-row table:style-name="Таблица41.1">
          <table:table-cell table:style-name="Таблица41.A1" office:value-type="string">
            <text:p text:style-name="P126"><text:tab/><text:span text:style-name="T38">movl<text:tab/>h3(%rip), %eax</text:span></text:p>
            <text:p text:style-name="P126"><text:tab/><text:span text:style-name="T38">addl<text:tab/>k3(%rip), %eax</text:span></text:p>
            <text:p text:style-name="P126"><text:tab/>cmpl<text:tab/>$0, %eax</text:p>
            <text:p text:style-name="P126"><text:tab/>jl<text:tab/>.LBB0_22</text:p>
            <text:p text:style-name="P126"># %bb.21:</text:p>
            <text:p text:style-name="P126"><text:tab/><text:span text:style-name="T38">movl<text:tab/>h3(%rip), %eax</text:span></text:p>
            <text:p text:style-name="P126"><text:tab/><text:span text:style-name="T38">addl<text:tab/>k3(%rip), %eax</text:span></text:p>
            <text:p text:style-name="P126"><text:tab/>cmpl<text:tab/>$5, %eax</text:p>
            <text:p text:style-name="P126"><text:tab/>jle<text:tab/>.LBB0_23</text:p>
            <text:p text:style-name="P126">.LBB0_22:</text:p>
            <text:p text:style-name="P126"/>
            <text:p text:style-name="P126"><text:tab/>leaq<text:tab/>.L.str.2(%rip), %rdi</text:p>
            <text:p text:style-name="P126"><text:tab/>movb<text:tab/>$0, %al</text:p>
            <text:p text:style-name="P126"><text:tab/>callq<text:tab/>printf@PLT</text:p>
            <text:p text:style-name="P126"><text:tab/>mp<text:tab/>.LBB0_24</text:p>
            <text:p text:style-name="P126">.LBB0_23:</text:p>
            <text:p text:style-name="P126"/>
            <text:p text:style-name="P126"><text:tab/><text:span text:style-name="T38">movl<text:tab/>h3(%rip), %eax</text:span></text:p>
            <text:p text:style-name="P126"><text:tab/><text:span text:style-name="T38">addl<text:tab/>k3(%rip), %eax</text:span></text:p>
            <text:p text:style-name="P126"><text:tab/>cltd</text:p>
            <text:p text:style-name="P126"><text:tab/>idivl<text:tab/>i3(%rip)</text:p>
            <text:p text:style-name="P126"/>
            <text:p text:style-name="P126"><text:tab/>movl<text:tab/>%eax, m3(%rip)</text:p>
            <text:p text:style-name="P126"><text:tab/>movl<text:tab/>m3(%rip), %esi</text:p>
            <text:p text:style-name="P126"><text:tab/>leaq<text:tab/>.L.str(%rip), %rdi</text:p>
            <text:p text:style-name="P126"><text:tab/>movb<text:tab/>$0, %al</text:p>
            <text:p text:style-name="P126"><text:tab/>callq<text:tab/>printf@PLT</text:p>
            <text:p text:style-name="P126"/>
            <text:p text:style-name="P126"><text:tab/>movl<text:tab/>i3(%rip), %eax</text:p>
            <text:p text:style-name="P126"><text:tab/><text:span text:style-name="T38">movl<text:tab/>h3(%rip), %ecx</text:span></text:p>
            <text:p text:style-name="P126"><text:tab/><text:span text:style-name="T38">addl<text:tab/>k3(%rip), %ecx</text:span></text:p>
            <text:p text:style-name="P126"><text:tab/>addl<text:tab/>%ecx, %eax</text:p>
            <text:p text:style-name="P126"><text:tab/>movl<text:tab/>%eax, g3(%rip)</text:p>
            <text:p text:style-name="P126"/>
            <text:p text:style-name="P126"><text:tab/>movl<text:tab/>g3(%rip), %esi</text:p>
            <text:p text:style-name="P126"><text:tab/>leaq<text:tab/>.L.str(%rip), %rdi</text:p>
            <text:p text:style-name="P126"><text:tab/>movb<text:tab/>$0, %al</text:p>
            <text:p text:style-name="P126"><text:tab/>callq<text:tab/>printf@PLT</text:p>
            <text:p text:style-name="P126">.LBB0_24:</text:p>
          </table:table-cell>
          <table:table-cell table:style-name="Таблица41.A1" office:value-type="string">
            <text:p text:style-name="P169"><text:tab/><text:span text:style-name="T37">movl<text:tab/>k3(%rip), %eax</text:span></text:p>
            <text:p text:style-name="P169"><text:tab/><text:span text:style-name="T37">addl<text:tab/>h3(%rip), %eax</text:span></text:p>
            <text:p text:style-name="P169"><text:tab/>cmpl<text:tab/>$5, %eax</text:p>
            <text:p text:style-name="P169"><text:tab/>jbe<text:tab/>.L39</text:p>
            <text:p text:style-name="P169"><text:tab/>leaq<text:tab/>.LC8(%rip), %rdi</text:p>
            <text:p text:style-name="P169"><text:tab/>call<text:tab/>puts@PLT</text:p>
            <text:p text:style-name="P170">.<text:span text:style-name="T47">L40:</text:span></text:p>
            <text:p text:style-name="P170">...</text:p>
            <text:p text:style-name="P170">...</text:p>
            <text:p text:style-name="P170">...</text:p>
            <text:p text:style-name="P170"/>
            <text:p text:style-name="P170"/>
            <text:p text:style-name="P170"/>
            <text:p text:style-name="P170"/>
            <text:p text:style-name="P170"/>
            <text:p text:style-name="P170"/>
            <text:p text:style-name="P170"/>
            <text:p text:style-name="P170"/>
            <text:p text:style-name="P170"/>
            <text:p text:style-name="P170"/>
            <text:p text:style-name="P170">L39:</text:p>
            <text:p text:style-name="P169"><text:tab/>.cfi_restore_state</text:p>
            <text:p text:style-name="P169"><text:tab/>cltd</text:p>
            <text:p text:style-name="P169"><text:tab/>movq<text:tab/>%rbx, %rsi</text:p>
            <text:p text:style-name="P169"><text:tab/>movl<text:tab/>$2, %edi</text:p>
            <text:p text:style-name="P169"><text:tab/><text:span text:style-name="T37">idivl</text:span><text:tab/>i3(%rip)</text:p>
            <text:p text:style-name="P169"><text:tab/>movl<text:tab/>%eax, %edx</text:p>
            <text:p text:style-name="P169"><text:tab/>movl<text:tab/><text:span text:style-name="T37">%eax</text:span>, m3(%rip)</text:p>
            <text:p text:style-name="P169"><text:tab/>xorl<text:tab/>%eax, %eax</text:p>
            <text:p text:style-name="P169"><text:tab/>call<text:tab/>__printf_chk@PLT</text:p>
            <text:p text:style-name="P169"><text:tab/>movl<text:tab/>k3(%rip), %edx</text:p>
            <text:p text:style-name="P169"><text:tab/>movq<text:tab/>%rbx, %rsi</text:p>
            <text:p text:style-name="P169"><text:tab/>xorl<text:tab/>%eax, %eax</text:p>
            <text:p text:style-name="P169"><text:tab/>addl<text:tab/>h3(%rip), %edx</text:p>
            <text:p text:style-name="P169"><text:tab/>movl<text:tab/>$2, %edi</text:p>
            <text:p text:style-name="P169"><text:tab/>addl<text:tab/>i3(%rip), %edx</text:p>
            <text:p text:style-name="P169"><text:tab/>movl<text:tab/>%edx, g3(%rip)</text:p>
            <text:p text:style-name="P169"><text:tab/>call<text:tab/>__printf_chk@PLT</text:p>
            <text:p text:style-name="P169"><text:tab/>jmp<text:tab/>.L40</text:p>
          </table:table-cell>
        </table:table-row>
      </table:table>
      <text:p text:style-name="P13"/>
      <text:p text:style-name="P16">Под действием оптимизации GCC вынес общее подвыражение в регистр.</text:p>
      <text:p text:style-name="P16"/>
      <text:p text:style-name="P16"><text:span text:style-name="T4"/></text:p>
      <table:table table:name="Таблица42" table:style-name="Таблица42">
        <table:table-column table:style-name="Таблица42.A" table:number-columns-repeated="2"/>
        <table:table-row>
          <table:table-cell table:style-name="Таблица42.A1" office:value-type="string">
            <text:p text:style-name="P151"><text:tab/>movl<text:tab/>$0, i4(%rip)</text:p>
            <text:p text:style-name="P151"><text:tab/>jmp<text:tab/>.L14</text:p>
            <text:p text:style-name="P151">.L15:</text:p>
            <text:p text:style-name="P151"><text:tab/><text:span text:style-name="T38">movl<text:tab/>j(%rip), %eax</text:span></text:p>
            <text:p text:style-name="P151"><text:tab/>movl<text:tab/>%eax, %esi</text:p>
            <text:p text:style-name="P151"><text:tab/><text:span text:style-name="T38">movl<text:tab/>k(%rip), %eax</text:span></text:p>
            <text:p text:style-name="P151"><text:tab/><text:span text:style-name="T38">movl<text:tab/>%eax, %edx</text:span></text:p>
            <text:p text:style-name="P151"><text:tab/>movl<text:tab/>i4(%rip), %ecx</text:p>
            <text:p text:style-name="P151"><text:tab/>movl<text:tab/>%esi, %eax</text:p>
            <text:p text:style-name="P151"><text:tab/><text:span text:style-name="T38">imull<text:tab/>%edx, %eax</text:span></text:p>
            <text:p text:style-name="P151"><text:tab/>movl<text:tab/>%eax, %edx</text:p>
            <text:p text:style-name="P151"><text:tab/>movslq<text:tab/>%ecx, %rax</text:p>
            <text:p text:style-name="P151"><text:tab/>leaq<text:tab/>ivector2(%rip), %rcx</text:p>
            <text:p text:style-name="P151"><text:tab/>movb<text:tab/>%dl, (%rax,%rcx)</text:p>
            <text:p text:style-name="P151"><text:tab/>movl<text:tab/>i4(%rip), %eax</text:p>
            <text:p text:style-name="P151"><text:tab/>cltq</text:p>
            <text:p text:style-name="P151"><text:tab/>leaq<text:tab/>ivector2(%rip), %rdx</text:p>
            <text:p text:style-name="P151"><text:tab/>movzbl<text:tab/>(%rax,%rdx), %eax</text:p>
            <text:p text:style-name="P151"><text:tab/>movzbl<text:tab/>%al, %eax</text:p>
            <text:p text:style-name="P151"><text:tab/>movl<text:tab/>%eax, %esi</text:p>
            <text:p text:style-name="P151"><text:tab/>leaq<text:tab/>.LC0(%rip), %rax</text:p>
            <text:p text:style-name="P151"><text:tab/>movq<text:tab/>%rax, %rdi</text:p>
            <text:p text:style-name="P151"><text:tab/>movl<text:tab/>$0, %eax</text:p>
            <text:p text:style-name="P151"><text:tab/>call<text:tab/>printf@PLT</text:p>
            <text:p text:style-name="P151"><text:tab/>movl<text:tab/>i4(%rip), %eax</text:p>
            <text:p text:style-name="P151"><text:tab/>addl<text:tab/>$1, %eax</text:p>
            <text:p text:style-name="P151"><text:tab/>movl<text:tab/>%eax, i4(%rip)</text:p>
            <text:p text:style-name="P151">.L14:</text:p>
            <text:p text:style-name="P151"><text:tab/>movl<text:tab/>i4(%rip), %eax</text:p>
            <text:p text:style-name="P151"><text:tab/>cmpl<text:tab/>$2, %eax</text:p>
            <text:p text:style-name="P151"><text:tab/>jle<text:tab/>.L15</text:p>
          </table:table-cell>
          <table:table-cell table:style-name="Таблица42.A1" office:value-type="string">
            <text:p text:style-name="P180"><text:tab/>for (i4 = 0; i4 &lt;= max_vector; i4++){</text:p>
            <text:p text:style-name="P180"><text:tab/><text:tab/>ivector2[i4] = j * k;</text:p>
            <text:p text:style-name="P180"><text:tab/>printf("%d", ivector2[i4]);</text:p>
            <text:p text:style-name="P180">}</text:p>
          </table:table-cell>
        </table:table-row>
      </table:table>
      <text:p text:style-name="P40"><text:span text:style-name="T23"/></text:p>
      <text:p text:style-name="P43"><text:span text:style-name="T23">Заметно, что умножение выполняется на каждой итерации, а инвариантный код из цикла не выносится.</text:span></text:p>
      <table:table table:name="Таблица43" table:style-name="Таблица43">
        <table:table-column table:style-name="Таблица43.A" table:number-columns-repeated="2"/>
        <table:table-row table:style-name="Таблица43.1">
          <table:table-cell table:style-name="Таблица43.A1" office:value-type="string">
            <text:p text:style-name="P151"><text:tab/>movl<text:tab/>$0, i4(%rip)</text:p>
            <text:p text:style-name="P151"><text:tab/>jmp<text:tab/>.L14</text:p>
            <text:p text:style-name="P151">.L15:</text:p>
            <text:p text:style-name="P151"><text:tab/>movl<text:tab/>j(%rip), %eax</text:p>
            <text:p text:style-name="P151"><text:tab/>movl<text:tab/>%eax, %esi</text:p>
            <text:p text:style-name="P151"><text:tab/>movl<text:tab/>k(%rip), %eax</text:p>
            <text:p text:style-name="P151"><text:tab/>movl<text:tab/>%eax, %edx</text:p>
            <text:p text:style-name="P151"><text:tab/>movl<text:tab/>i4(%rip), %ecx</text:p>
            <text:p text:style-name="P151"><text:tab/>movl<text:tab/>%esi, %eax</text:p>
            <text:p text:style-name="P151"><text:tab/>imull<text:tab/>%edx, %eax</text:p>
            <text:p text:style-name="P151"><text:tab/>movl<text:tab/>%eax, %edx</text:p>
            <text:p text:style-name="P151"><text:tab/>movslq<text:tab/>%ecx, %rax</text:p>
            <text:p text:style-name="P151"><text:tab/>leaq<text:tab/>ivector2(%rip), %rcx</text:p>
            <text:p text:style-name="P151"><text:tab/>movb<text:tab/>%dl, (%rax,%rcx)</text:p>
            <text:p text:style-name="P151"><text:tab/>movl<text:tab/>i4(%rip), %eax</text:p>
            <text:p text:style-name="P151"><text:tab/>cltq</text:p>
            <text:p text:style-name="P151"><text:tab/>leaq<text:tab/>ivector2(%rip), %rdx</text:p>
            <text:p text:style-name="P151"><text:tab/>movzbl<text:tab/>(%rax,%rdx), %eax</text:p>
            <text:p text:style-name="P151"><text:tab/>movzbl<text:tab/>%al, %eax</text:p>
            <text:p text:style-name="P151"><text:tab/>movl<text:tab/>%eax, %esi</text:p>
            <text:p text:style-name="P151"><text:tab/>leaq<text:tab/>.LC0(%rip), %rax</text:p>
            <text:p text:style-name="P151"><text:tab/>movq<text:tab/>%rax, %rdi</text:p>
            <text:p text:style-name="P151"><text:tab/>movl<text:tab/>$0, %eax</text:p>
            <text:p text:style-name="P151"><text:tab/>call<text:tab/>printf@PLT</text:p>
            <text:p text:style-name="P151"><text:tab/>movl<text:tab/>i4(%rip), %eax</text:p>
            <text:p text:style-name="P151"><text:tab/>addl<text:tab/>$1, %eax</text:p>
            <text:p text:style-name="P151"><text:tab/>movl<text:tab/>%eax, i4(%rip)</text:p>
            <text:p text:style-name="P151">.L14:</text:p>
            <text:p text:style-name="P151"><text:tab/>movl<text:tab/>i4(%rip), %eax</text:p>
            <text:p text:style-name="P151"><text:tab/>cmpl<text:tab/>$2, %eax</text:p>
            <text:p text:style-name="P151"><text:tab/>jle<text:tab/>.L15</text:p>
          </table:table-cell>
          <table:table-cell table:style-name="Таблица43.A1" office:value-type="string">
            <text:p text:style-name="P151"><text:tab/>movl<text:tab/>$0, i4(%rip)</text:p>
            <text:p text:style-name="P151"><text:tab/>xorl<text:tab/>%ecx, %ecx</text:p>
            <text:p text:style-name="P151"><text:tab/>leaq<text:tab/>ivector2(%rip), %rbp</text:p>
            <text:p text:style-name="P151"><text:tab/>.p2align 4,,10</text:p>
            <text:p text:style-name="P151"><text:tab/>.p2align 3</text:p>
            <text:p text:style-name="P151">.L41:</text:p>
            <text:p text:style-name="P151"><text:tab/>movzbl<text:tab/>j(%rip), %eax</text:p>
            <text:p text:style-name="P151"><text:tab/>movslq<text:tab/>%ecx, %rcx</text:p>
            <text:p text:style-name="P151"><text:tab/>movq<text:tab/>%rbx, %rsi</text:p>
            <text:p text:style-name="P151"><text:tab/>movl<text:tab/>$2, %edi</text:p>
            <text:p text:style-name="P151"><text:tab/><text:span text:style-name="T38">mulb<text:tab/>k(%rip)</text:span></text:p>
            <text:p text:style-name="P151"><text:tab/>movb<text:tab/>%al, 0(%rbp,%rcx)</text:p>
            <text:p text:style-name="P151"><text:tab/>movzbl<text:tab/>%al, %edx</text:p>
            <text:p text:style-name="P151"><text:tab/>xorl<text:tab/>%eax, %eax</text:p>
            <text:p text:style-name="P151"><text:tab/>call<text:tab/>__printf_chk@PLT</text:p>
            <text:p text:style-name="P151"><text:tab/>movl<text:tab/>i4(%rip), %eax</text:p>
            <text:p text:style-name="P151"><text:tab/>leal<text:tab/>1(%rax), %ecx</text:p>
            <text:p text:style-name="P151"><text:tab/>movl<text:tab/>%ecx, i4(%rip)</text:p>
            <text:p text:style-name="P151"><text:tab/>cmpl<text:tab/>$2, %ecx</text:p>
            <text:p text:style-name="P151"><text:tab/>jle<text:tab/>.L41</text:p>
          </table:table-cell>
        </table:table-row>
      </table:table>
      <text:p text:style-name="P81"><text:span text:style-name="T23"/></text:p>
      <text:p text:style-name="P46"><text:span text:style-name="T23">Даже при оптимизации, нацеленной на скорость, инвариантный код остаётся внутри цикла.</text:span></text:p>
      <text:p text:style-name="P46"><text:span text:style-name="T23"/></text:p>
      <table:table table:name="Таблица44" table:style-name="Таблица44">
        <table:table-column table:style-name="Таблица44.A" table:number-columns-repeated="2"/>
        <table:table-row>
          <table:table-cell table:style-name="Таблица44.A1" office:value-type="string">
            <text:p text:style-name="P151">dead_code:</text:p>
            <text:p text:style-name="P151">.LFB1:</text:p>
            <text:p text:style-name="P151"><text:tab/>.cfi_startproc</text:p>
            <text:p text:style-name="P151"><text:tab/>endbr64</text:p>
            <text:p text:style-name="P151"><text:tab/>pushq<text:tab/>%rbp</text:p>
            <text:p text:style-name="P151"><text:tab/>.cfi_def_cfa_offset 16</text:p>
            <text:p text:style-name="P151"><text:tab/>.cfi_offset 6, -16</text:p>
            <text:p text:style-name="P151"><text:tab/>movq<text:tab/>%rsp, %rbp</text:p>
            <text:p text:style-name="P151"><text:tab/>.cfi_def_cfa_register 6</text:p>
            <text:p text:style-name="P151"><text:tab/>movl<text:tab/>%edi, -20(%rbp)</text:p>
            <text:p text:style-name="P151"><text:tab/>movq<text:tab/>%rsi, -32(%rbp)</text:p>
            <text:p text:style-name="P151"><text:tab/>movl<text:tab/>-20(%rbp), %eax</text:p>
            <text:p text:style-name="P151"><text:tab/>movl<text:tab/>%eax, -4(%rbp)</text:p>
            <text:p text:style-name="P151"><text:tab/>nop</text:p>
            <text:p text:style-name="P151"><text:tab/>popq<text:tab/>%rbp</text:p>
            <text:p text:style-name="P151"><text:tab/>.cfi_def_cfa 7, 8</text:p>
            <text:p text:style-name="P151"><text:tab/>ret</text:p>
          </table:table-cell>
          <table:table-cell table:style-name="Таблица44.A1" office:value-type="string">
            <text:p text:style-name="P180">void dead_code(int a,</text:p>
            <text:p text:style-name="P180"><text:tab/>char *b)</text:p>
            <text:p text:style-name="P180">{</text:p>
            <text:p text:style-name="P180"><text:tab/>int idead_store;</text:p>
            <text:p text:style-name="P180"/>
            <text:p text:style-name="P180"><text:tab/>idead_store = a;</text:p>
            <text:p text:style-name="P180"><text:tab/>if (0)</text:p>
            <text:p text:style-name="P180"><text:tab/><text:tab/>printf("%s\n", b);</text:p>
            <text:p text:style-name="P180">}</text:p>
          </table:table-cell>
        </table:table-row>
      </table:table>
      <text:p text:style-name="P46"><text:span text:style-name="T23"/></text:p>
      <text:p text:style-name="P46"><text:span text:style-name="T23">При выключенной оптимизации компилятор создал функцию непосредственно, а при включённой - функция получилась пустой, без недостижимых фрагментов и избыточных присваиваний.</text:span></text:p>
      <table:table table:name="Таблица45" table:style-name="Таблица45">
        <table:table-column table:style-name="Таблица45.A" table:number-columns-repeated="2"/>
        <table:table-row table:style-name="Таблица45.1">
          <table:table-cell table:style-name="Таблица45.A1" office:value-type="string">
            <text:p text:style-name="P151">unnecessary_loop:</text:p>
            <text:p text:style-name="P151">.LFB2:</text:p>
            <text:p text:style-name="P151"><text:tab/>.cfi_startproc</text:p>
            <text:p text:style-name="P151"><text:tab/>endbr64</text:p>
            <text:p text:style-name="P151"><text:tab/>pushq<text:tab/>%rbp</text:p>
            <text:p text:style-name="P151"><text:tab/>.cfi_def_cfa_offset 16</text:p>
            <text:p text:style-name="P151"><text:tab/>.cfi_offset 6, -16</text:p>
            <text:p text:style-name="P151"><text:tab/>movq<text:tab/>%rsp, %rbp</text:p>
            <text:p text:style-name="P151"><text:tab/>.cfi_def_cfa_register 6</text:p>
            <text:p text:style-name="P151"><text:tab/>subq<text:tab/>$16, %rsp</text:p>
            <text:p text:style-name="P151"><text:tab/>movl<text:tab/>$0, -4(%rbp)</text:p>
            <text:p text:style-name="P151"><text:tab/>movl<text:tab/>$0, i(%rip)</text:p>
            <text:p text:style-name="P151"><text:tab/>jmp<text:tab/>.L19</text:p>
            <text:p text:style-name="P151">.L20:</text:p>
            <text:p text:style-name="P151"><text:tab/>movl<text:tab/>j5(%rip), %edx</text:p>
            <text:p text:style-name="P151"><text:tab/>movl<text:tab/>-4(%rbp), %eax</text:p>
            <text:p text:style-name="P151"><text:tab/>addl<text:tab/>%edx, %eax</text:p>
            <text:p text:style-name="P151"><text:tab/>movl<text:tab/>%eax, k5(%rip)</text:p>
            <text:p text:style-name="P151"><text:tab/>movl<text:tab/>i(%rip), %eax</text:p>
            <text:p text:style-name="P151"><text:tab/>addl<text:tab/>$1, %eax</text:p>
            <text:p text:style-name="P151"><text:tab/>movl<text:tab/>%eax, i(%rip)</text:p>
            <text:p text:style-name="P151">.L19:</text:p>
            <text:p text:style-name="P151"><text:tab/>movl<text:tab/>i(%rip), %eax</text:p>
            <text:p text:style-name="P151"><text:tab/>cmpl<text:tab/>$4, %eax</text:p>
            <text:p text:style-name="P151"><text:tab/>jle<text:tab/>.L20</text:p>
            <text:p text:style-name="P151"><text:tab/>movl<text:tab/>k5(%rip), %eax</text:p>
            <text:p text:style-name="P151"><text:tab/>movl<text:tab/>%eax, %esi</text:p>
            <text:p text:style-name="P151"><text:tab/>leaq<text:tab/>.LC0(%rip), %rax</text:p>
            <text:p text:style-name="P151"><text:tab/>movq<text:tab/>%rax, %rdi</text:p>
            <text:p text:style-name="P151"><text:tab/>movl<text:tab/>$0, %eax</text:p>
            <text:p text:style-name="P151"><text:tab/>call<text:tab/>printf@PLT</text:p>
            <text:p text:style-name="P151"><text:tab/>nop</text:p>
            <text:p text:style-name="P151"><text:tab/>leave</text:p>
            <text:p text:style-name="P151"><text:tab/>.cfi_def_cfa 7, 8</text:p>
            <text:p text:style-name="P151"><text:tab/>ret</text:p>
          </table:table-cell>
          <table:table-cell table:style-name="Таблица45.A1" office:value-type="string">
            <text:p text:style-name="P180">void unnecessary_loop()</text:p>
            <text:p text:style-name="P180">{</text:p>
            <text:p text:style-name="P180"><text:tab/>int x;</text:p>
            <text:p text:style-name="P180"/>
            <text:p text:style-name="P180"><text:tab/>x = 0;</text:p>
            <text:p text:style-name="P180"><text:tab/>for (i = 0; i &lt; 5; i++)</text:p>
            <text:p text:style-name="P180"><text:tab/><text:tab/>k5 = x + j5;</text:p>
            <text:p text:style-name="P180"><text:tab/>printf("%d", k5);</text:p>
            <text:p text:style-name="P180">}</text:p>
          </table:table-cell>
        </table:table-row>
      </table:table>
      <text:p text:style-name="P50"><text:span text:style-name="T23"/></text:p>
      <text:p text:style-name="P50"><text:span text:style-name="T23">Без оптимизации цикл остался</text:span></text:p>
      <text:p text:style-name="P50"><text:span text:style-name="T23"/></text:p>
      <table:table table:name="Таблица46" table:style-name="Таблица46">
        <table:table-column table:style-name="Таблица46.A" table:number-columns-repeated="2"/>
        <table:table-row>
          <table:table-cell table:style-name="Таблица46.A1" office:value-type="string">
            <text:p text:style-name="P151">unnecessary_loop:</text:p>
            <text:p text:style-name="P151">.LFB2:</text:p>
            <text:p text:style-name="P151"><text:tab/>.cfi_startproc</text:p>
            <text:p text:style-name="P151"><text:tab/>endbr64</text:p>
            <text:p text:style-name="P151"><text:tab/>pushq<text:tab/>%rbp</text:p>
            <text:p text:style-name="P151"><text:tab/>.cfi_def_cfa_offset 16</text:p>
            <text:p text:style-name="P151"><text:tab/>.cfi_offset 6, -16</text:p>
            <text:p text:style-name="P151"><text:tab/>movq<text:tab/>%rsp, %rbp</text:p>
            <text:p text:style-name="P151"><text:tab/>.cfi_def_cfa_register 6</text:p>
            <text:p text:style-name="P151"><text:tab/>subq<text:tab/>$16, %rsp</text:p>
            <text:p text:style-name="P151"><text:tab/>movl<text:tab/>$0, -4(%rbp)</text:p>
            <text:p text:style-name="P151"><text:tab/>movl<text:tab/>$0, i(%rip)</text:p>
            <text:p text:style-name="P151"><text:tab/>jmp<text:tab/>.L19</text:p>
            <text:p text:style-name="P151">.L20:</text:p>
            <text:p text:style-name="P151"><text:tab/>movl<text:tab/>j5(%rip), %edx</text:p>
            <text:p text:style-name="P151"><text:tab/>movl<text:tab/>-4(%rbp), %eax</text:p>
            <text:p text:style-name="P151"><text:tab/>addl<text:tab/>%edx, %eax</text:p>
            <text:p text:style-name="P151"><text:tab/>movl<text:tab/>%eax, k5(%rip)</text:p>
            <text:p text:style-name="P151"><text:tab/>movl<text:tab/>i(%rip), %eax</text:p>
            <text:p text:style-name="P151"><text:tab/>addl<text:tab/>$1, %eax</text:p>
            <text:p text:style-name="P151"><text:tab/>movl<text:tab/>%eax, i(%rip)</text:p>
            <text:p text:style-name="P151">.L19:</text:p>
            <text:p text:style-name="P151"><text:tab/>movl<text:tab/>i(%rip), %eax</text:p>
            <text:p text:style-name="P151"><text:soft-page-break/><text:tab/>cmpl<text:tab/>$4, %eax</text:p>
            <text:p text:style-name="P151"><text:tab/>jle<text:tab/>.L20</text:p>
            <text:p text:style-name="P151"><text:tab/>movl<text:tab/>k5(%rip), %eax</text:p>
            <text:p text:style-name="P151"><text:tab/>movl<text:tab/>%eax, %esi</text:p>
            <text:p text:style-name="P151"><text:tab/>leaq<text:tab/>.LC0(%rip), %rax</text:p>
            <text:p text:style-name="P151"><text:tab/>movq<text:tab/>%rax, %rdi</text:p>
            <text:p text:style-name="P151"><text:tab/>movl<text:tab/>$0, %eax</text:p>
            <text:p text:style-name="P151"><text:tab/>call<text:tab/>printf@PLT</text:p>
            <text:p text:style-name="P151"><text:tab/>nop</text:p>
            <text:p text:style-name="P151"><text:tab/>leave</text:p>
            <text:p text:style-name="P151"><text:tab/>.cfi_def_cfa 7, 8</text:p>
            <text:p text:style-name="P151"><text:tab/>ret</text:p>
          </table:table-cell>
          <table:table-cell table:style-name="Таблица46.A1" office:value-type="string">
            <text:p text:style-name="P151">unnecessary_loop:</text:p>
            <text:p text:style-name="P151">.LFB39:</text:p>
            <text:p text:style-name="P151"><text:tab/>.cfi_startproc</text:p>
            <text:p text:style-name="P151"><text:tab/>endbr64</text:p>
            <text:p text:style-name="P151"><text:tab/>movl<text:tab/>j5(%rip), %edx</text:p>
            <text:p text:style-name="P151"><text:tab/>leaq<text:tab/>.LC0(%rip), %rsi</text:p>
            <text:p text:style-name="P151"><text:tab/>movl<text:tab/>$2, %edi</text:p>
            <text:p text:style-name="P151"><text:tab/>xorl<text:tab/>%eax, %eax</text:p>
            <text:p text:style-name="P151"><text:tab/>movl<text:tab/>$5, i(%rip)</text:p>
            <text:p text:style-name="P151"><text:tab/>movl<text:tab/>%edx, k5(%rip)</text:p>
            <text:p text:style-name="P151"><text:tab/>jmp<text:tab/>__printf_chk@PLT</text:p>
            <text:p text:style-name="P151"><text:tab/>.cfi_endproc</text:p>
          </table:table-cell>
        </table:table-row>
      </table:table>
      <text:p text:style-name="P50"><text:span text:style-name="T23"/></text:p>
      <text:p text:style-name="P50"><text:span text:style-name="T23">При оптимизации цикл был удалён</text:span></text:p>
      <text:p text:style-name="P50"><text:span text:style-name="T23"/></text:p>
      <text:p text:style-name="P50"><text:span text:style-name="T23"/></text:p>
      <table:table table:name="Таблица47" table:style-name="Таблица47">
        <table:table-column table:style-name="Таблица47.A" table:number-columns-repeated="2"/>
        <table:table-row>
          <table:table-cell table:style-name="Таблица47.A1" office:value-type="string">
            <text:p text:style-name="P151">loop_jamming:</text:p>
            <text:p text:style-name="P151">.LFB3:</text:p>
            <text:p text:style-name="P151"><text:tab/>.cfi_startproc</text:p>
            <text:p text:style-name="P151"><text:tab/>endbr64</text:p>
            <text:p text:style-name="P151"><text:tab/>pushq<text:tab/>%rbp</text:p>
            <text:p text:style-name="P151"><text:tab/>.cfi_def_cfa_offset 16</text:p>
            <text:p text:style-name="P151"><text:tab/>.cfi_offset 6, -16</text:p>
            <text:p text:style-name="P151"><text:tab/>movq<text:tab/>%rsp, %rbp</text:p>
            <text:p text:style-name="P151"><text:tab/>.cfi_def_cfa_register 6</text:p>
            <text:p text:style-name="P151"><text:tab/>subq<text:tab/>$16, %rsp</text:p>
            <text:p text:style-name="P151"><text:tab/>movl<text:tab/>%edi, -4(%rbp)</text:p>
            <text:p text:style-name="P151"><text:tab/>movl<text:tab/>$0, i(%rip)</text:p>
            <text:p text:style-name="P151"><text:tab/>jmp<text:tab/>.L22</text:p>
            <text:p text:style-name="P151">.L23:</text:p>
            <text:p text:style-name="P151"><text:tab/>movl<text:tab/>j5(%rip), %edx</text:p>
            <text:p text:style-name="P151"><text:tab/>movl<text:tab/>i(%rip), %eax</text:p>
            <text:p text:style-name="P151"><text:tab/>imull<text:tab/>%eax, %edx</text:p>
            <text:p text:style-name="P151"><text:tab/>movl<text:tab/>-4(%rbp), %eax</text:p>
            <text:p text:style-name="P151"><text:tab/>addl<text:tab/>%edx, %eax</text:p>
            <text:p text:style-name="P151"><text:tab/>movl<text:tab/>%eax, k5(%rip)</text:p>
            <text:p text:style-name="P151"><text:tab/>movl<text:tab/>k5(%rip), %eax</text:p>
            <text:p text:style-name="P151"><text:tab/>movl<text:tab/>%eax, %esi</text:p>
            <text:p text:style-name="P151"><text:tab/>leaq<text:tab/>.LC0(%rip), %rax</text:p>
            <text:p text:style-name="P151"><text:tab/>movq<text:tab/>%rax, %rdi</text:p>
            <text:p text:style-name="P151"><text:tab/>movl<text:tab/>$0, %eax</text:p>
            <text:p text:style-name="P151"><text:tab/>call<text:tab/>printf@PLT</text:p>
            <text:p text:style-name="P151"><text:tab/>movl<text:tab/>i(%rip), %eax</text:p>
            <text:p text:style-name="P151"><text:tab/>addl<text:tab/>$1, %eax</text:p>
            <text:p text:style-name="P151"><text:tab/>movl<text:tab/>%eax, i(%rip)</text:p>
            <text:p text:style-name="P151">.L22:</text:p>
            <text:p text:style-name="P151"><text:tab/>movl<text:tab/>i(%rip), %eax</text:p>
            <text:p text:style-name="P151"><text:tab/>cmpl<text:tab/>$4, %eax</text:p>
            <text:p text:style-name="P151"><text:tab/>jle<text:tab/>.L23</text:p>
            <text:p text:style-name="P151"><text:tab/>movl<text:tab/>$0, i(%rip)</text:p>
            <text:p text:style-name="P151"><text:tab/>jmp<text:tab/>.L24</text:p>
            <text:p text:style-name="P151">.L25:</text:p>
            <text:p text:style-name="P151"><text:tab/>movl<text:tab/>k5(%rip), %eax</text:p>
            <text:p text:style-name="P151"><text:tab/>imull<text:tab/>-4(%rbp), %eax</text:p>
            <text:p text:style-name="P151"><text:tab/>movl<text:tab/>%eax, %edx</text:p>
            <text:p text:style-name="P151"><text:tab/>movl<text:tab/>i(%rip), %eax</text:p>
            <text:p text:style-name="P151"><text:tab/>imull<text:tab/>%edx, %eax</text:p>
            <text:p text:style-name="P151"><text:tab/>movl<text:tab/>%eax, i5(%rip)</text:p>
            <text:p text:style-name="P151"><text:tab/>movl<text:tab/>k5(%rip), %eax</text:p>
            <text:p text:style-name="P151"><text:tab/>movl<text:tab/>%eax, %esi</text:p>
            <text:p text:style-name="P151"><text:tab/>leaq<text:tab/>.LC0(%rip), %rax</text:p>
            <text:p text:style-name="P151"><text:tab/>movq<text:tab/>%rax, %rdi</text:p>
            <text:p text:style-name="P151"><text:tab/>movl<text:tab/>$0, %eax</text:p>
            <text:p text:style-name="P151"><text:tab/>call<text:tab/>printf@PLT</text:p>
            <text:p text:style-name="P151"><text:tab/>movl<text:tab/>i(%rip), %eax</text:p>
            <text:p text:style-name="P151"><text:tab/>addl<text:tab/>$1, %eax</text:p>
            <text:p text:style-name="P151"><text:tab/>movl<text:tab/>%eax, i(%rip)</text:p>
            <text:p text:style-name="P151">.L24:</text:p>
            <text:p text:style-name="P151"><text:tab/>movl<text:tab/>i(%rip), %eax</text:p>
            <text:p text:style-name="P151"><text:tab/>cmpl<text:tab/>$4, %eax</text:p>
            <text:p text:style-name="P151"><text:tab/>jle<text:tab/>.L25</text:p>
            <text:p text:style-name="P151"><text:tab/>nop</text:p>
            <text:p text:style-name="P151"><text:tab/>nop</text:p>
            <text:p text:style-name="P151"><text:tab/>leave</text:p>
            <text:p text:style-name="P151"><text:tab/>.cfi_def_cfa 7, 8</text:p>
            <text:p text:style-name="P151"><text:tab/>ret</text:p>
            <text:p text:style-name="P151"><text:tab/>.cfi_endproc</text:p>
          </table:table-cell>
          <table:table-cell table:style-name="Таблица47.A1" office:value-type="string">
            <text:p text:style-name="P180">void loop_jamming(int x)</text:p>
            <text:p text:style-name="P180">{</text:p>
            <text:p text:style-name="P180"><text:tab/>for (i = 0; i &lt; 5; i++) {</text:p>
            <text:p text:style-name="P180"><text:tab/><text:tab/>k5 = x + j5 * i;</text:p>
            <text:p text:style-name="P180"/>
            <text:p text:style-name="P180"><text:tab/><text:tab/>printf("%d", k5);</text:p>
            <text:p text:style-name="P180"><text:tab/>}</text:p>
            <text:p text:style-name="P180"><text:tab/>for (i = 0; i &lt; 5; i++) {</text:p>
            <text:p text:style-name="P180"><text:tab/><text:tab/>i5 = x * k5 * i;</text:p>
            <text:p text:style-name="P180"><text:tab/><text:tab/>printf("%d", k5);</text:p>
            <text:p text:style-name="P180"><text:tab/>}</text:p>
            <text:p text:style-name="P180">}</text:p>
          </table:table-cell>
        </table:table-row>
      </table:table>
      <text:p text:style-name="P54"><text:span text:style-name="T23"/></text:p>
      <text:p text:style-name="P55"><text:span text:style-name="T23">При </text:span><text:span text:style-name="T28">отсутствии</text:span><text:span text:style-name="T23"> оптимизации сгенерировано два цикла.</text:span></text:p>
      <text:p text:style-name="P54"/>
      <table:table table:name="Таблица48" table:style-name="Таблица48">
        <table:table-column table:style-name="Таблица48.A" table:number-columns-repeated="2"/>
        <table:table-row table:style-name="Таблица48.1">
          <table:table-cell table:style-name="Таблица48.A1" office:value-type="string">
            <text:p text:style-name="P151">loop_jamming: <text:s text:c="26"/># @loop_jamming</text:p>
            <text:p text:style-name="P151"><text:tab/>.cfi_startproc</text:p>
            <text:p text:style-name="P151"># %bb.0:</text:p>
            <text:p text:style-name="P151"><text:tab/>pushq<text:tab/>%rbp</text:p>
            <text:p text:style-name="P151"><text:tab/>.cfi_def_cfa_offset 16</text:p>
            <text:p text:style-name="P151"><text:tab/>.cfi_offset %rbp, -16</text:p>
            <text:p text:style-name="P151"><text:tab/>movq<text:tab/>%rsp, %rbp</text:p>
            <text:p text:style-name="P151"><text:tab/>.cfi_def_cfa_register %rbp</text:p>
            <text:p text:style-name="P151"><text:tab/>subq<text:tab/>$16, %rsp</text:p>
            <text:p text:style-name="P151"><text:tab/>movl<text:tab/>%edi, -4(%rbp)</text:p>
            <text:p text:style-name="P151"><text:tab/>movl<text:tab/>$0, i(%rip)</text:p>
            <text:p text:style-name="P151">.LBB3_1: </text:p>
            <text:p text:style-name="P151"><text:tab/>cmpl<text:tab/>$5, i(%rip)</text:p>
            <text:p text:style-name="P151"><text:tab/>jge<text:tab/>.LBB3_4</text:p>
            <text:p text:style-name="P151"># %bb.2: <text:s text:c="2"/></text:p>
            <text:p text:style-name="P151"><text:tab/>movl<text:tab/>-4(%rbp), %eax</text:p>
            <text:p text:style-name="P151"><text:tab/>movl<text:tab/>j5(%rip), %ecx</text:p>
            <text:p text:style-name="P151"><text:tab/>imull<text:tab/>i(%rip), %ecx</text:p>
            <text:p text:style-name="P151"><text:tab/>addl<text:tab/>%ecx, %eax</text:p>
            <text:p text:style-name="P151"><text:tab/>movl<text:tab/>%eax, k5(%rip)</text:p>
            <text:p text:style-name="P151"><text:tab/>movl<text:tab/>k5(%rip), %esi</text:p>
            <text:p text:style-name="P151"><text:tab/>leaq<text:tab/>.L.str(%rip), %rdi</text:p>
            <text:p text:style-name="P151"><text:tab/>movb<text:tab/>$0, %al</text:p>
            <text:p text:style-name="P151"><text:tab/>callq<text:tab/>printf@PLT</text:p>
            <text:p text:style-name="P151"># %bb.3:</text:p>
            <text:p text:style-name="P151"><text:tab/>movl<text:tab/>i(%rip), %eax</text:p>
            <text:p text:style-name="P151"><text:tab/>addl<text:tab/>$1, %eax</text:p>
            <text:p text:style-name="P151"><text:tab/>movl<text:tab/>%eax, i(%rip)</text:p>
            <text:p text:style-name="P151"><text:tab/>jmp<text:tab/>.LBB3_1</text:p>
            <text:p text:style-name="P151">.LBB3_4:</text:p>
            <text:p text:style-name="P151"><text:tab/>movl<text:tab/>$0, i(%rip)</text:p>
            <text:p text:style-name="P151">.LBB3_5: <text:s text:c="9"/></text:p>
            <text:p text:style-name="P151"><text:tab/>cmpl<text:tab/>$5, i(%rip)</text:p>
            <text:p text:style-name="P151"><text:tab/>jge<text:tab/>.LBB3_8</text:p>
            <text:p text:style-name="P151"># %bb.6: <text:s text:c="6"/></text:p>
            <text:p text:style-name="P151"><text:tab/>movl<text:tab/>-4(%rbp), %eax</text:p>
            <text:p text:style-name="P151"><text:tab/>imull<text:tab/>k5(%rip), %eax</text:p>
            <text:p text:style-name="P151"><text:tab/>imull<text:tab/>i(%rip), %eax</text:p>
            <text:p text:style-name="P151"><text:tab/>movl<text:tab/>%eax, i5(%rip)</text:p>
            <text:p text:style-name="P151"><text:tab/>movl<text:tab/>k5(%rip), %esi</text:p>
            <text:p text:style-name="P151"><text:tab/>leaq<text:tab/>.L.str(%rip), %rdi</text:p>
            <text:p text:style-name="P151"><text:tab/>movb<text:tab/>$0, %al</text:p>
            <text:p text:style-name="P151"><text:tab/>callq<text:tab/>printf@PLT</text:p>
            <text:p text:style-name="P151"># %bb.7: <text:s text:c="2"/></text:p>
            <text:p text:style-name="P151"><text:tab/>movl<text:tab/>i(%rip), %eax</text:p>
            <text:p text:style-name="P151"><text:tab/>addl<text:tab/>$1, %eax</text:p>
            <text:p text:style-name="P151"><text:tab/>movl<text:tab/>%eax, i(%rip)</text:p>
            <text:p text:style-name="P151"><text:tab/>jmp<text:tab/>.LBB3_5</text:p>
            <text:p text:style-name="P151">.LBB3_8:</text:p>
            <text:p text:style-name="P151"><text:tab/>addq<text:tab/>$16, %rsp</text:p>
            <text:p text:style-name="P151"><text:tab/>popq<text:tab/>%rbp</text:p>
            <text:p text:style-name="P151"><text:tab/>.cfi_def_cfa %rsp, 8</text:p>
            <text:p text:style-name="P151"><text:tab/>retq</text:p>
          </table:table-cell>
          <table:table-cell table:style-name="Таблица48.A1" office:value-type="string">
            <text:p text:style-name="P151">loop_jamming:</text:p>
            <text:p text:style-name="P151">.LFB40:</text:p>
            <text:p text:style-name="P151"><text:tab/>.cfi_startproc</text:p>
            <text:p text:style-name="P151"><text:tab/>endbr64</text:p>
            <text:p text:style-name="P151"><text:tab/>pushq<text:tab/>%rbp</text:p>
            <text:p text:style-name="P151"><text:tab/>.cfi_def_cfa_offset 16</text:p>
            <text:p text:style-name="P151"><text:tab/>.cfi_offset 6, -16</text:p>
            <text:p text:style-name="P151"><text:tab/>xorl<text:tab/>%edx, %edx</text:p>
            <text:p text:style-name="P151"><text:tab/>leaq<text:tab/>.LC0(%rip), %rbp</text:p>
            <text:p text:style-name="P151"><text:tab/>pushq<text:tab/>%rbx</text:p>
            <text:p text:style-name="P151"><text:tab/>.cfi_def_cfa_offset 24</text:p>
            <text:p text:style-name="P151"><text:tab/>.cfi_offset 3, -24</text:p>
            <text:p text:style-name="P151"><text:tab/>movl<text:tab/>%edi, %ebx</text:p>
            <text:p text:style-name="P151"><text:tab/>subq<text:tab/>$8, %rsp</text:p>
            <text:p text:style-name="P151"><text:tab/>.cfi_def_cfa_offset 32</text:p>
            <text:p text:style-name="P151"><text:tab/>movl<text:tab/>$0, i(%rip)</text:p>
            <text:p text:style-name="P151"><text:tab/>.p2align 4,,10</text:p>
            <text:p text:style-name="P151"><text:tab/>.p2align 3</text:p>
            <text:p text:style-name="P151">.L5:</text:p>
            <text:p text:style-name="P151"><text:tab/>imull<text:tab/>j5(%rip), %edx</text:p>
            <text:p text:style-name="P151"><text:tab/>movq<text:tab/>%rbp, %rsi</text:p>
            <text:p text:style-name="P151"><text:tab/>movl<text:tab/>$2, %edi</text:p>
            <text:p text:style-name="P151"><text:tab/>xorl<text:tab/>%eax, %eax</text:p>
            <text:p text:style-name="P151"><text:tab/>addl<text:tab/>%ebx, %edx</text:p>
            <text:p text:style-name="P151"><text:tab/>movl<text:tab/>%edx, k5(%rip)</text:p>
            <text:p text:style-name="P151"><text:tab/>call<text:tab/>__printf_chk@PLT</text:p>
            <text:p text:style-name="P151"><text:tab/>movl<text:tab/>i(%rip), %eax</text:p>
            <text:p text:style-name="P151"><text:tab/>leal<text:tab/>1(%rax), %edx</text:p>
            <text:p text:style-name="P151"><text:tab/>movl<text:tab/>%edx, i(%rip)</text:p>
            <text:p text:style-name="P151"><text:tab/>cmpl<text:tab/>$4, %edx</text:p>
            <text:p text:style-name="P151"><text:tab/>jle<text:tab/>.L5</text:p>
            <text:p text:style-name="P151"><text:tab/>movl<text:tab/>$0, i(%rip)</text:p>
            <text:p text:style-name="P151"><text:tab/>xorl<text:tab/>%eax, %eax</text:p>
            <text:p text:style-name="P151"><text:tab/>.p2align 4,,10</text:p>
            <text:p text:style-name="P151"><text:tab/>.p2align 3</text:p>
            <text:p text:style-name="P151">.L6:</text:p>
            <text:p text:style-name="P151"><text:tab/>movl<text:tab/>k5(%rip), %ecx</text:p>
            <text:p text:style-name="P151"><text:tab/>movq<text:tab/>%rbp, %rsi</text:p>
            <text:p text:style-name="P151"><text:tab/>movl<text:tab/>$2, %edi</text:p>
            <text:p text:style-name="P151"><text:tab/>movl<text:tab/>%ecx, %edx</text:p>
            <text:p text:style-name="P151"><text:tab/>imull<text:tab/>%ebx, %edx</text:p>
            <text:p text:style-name="P151"><text:tab/>imull<text:tab/>%edx, %eax</text:p>
            <text:p text:style-name="P151"><text:tab/>movl<text:tab/>%ecx, %edx</text:p>
            <text:p text:style-name="P151"><text:tab/>movl<text:tab/>%eax, i5(%rip)</text:p>
            <text:p text:style-name="P151"><text:tab/>xorl<text:tab/>%eax, %eax</text:p>
            <text:p text:style-name="P151"><text:tab/>call<text:tab/>__printf_chk@PLT</text:p>
            <text:p text:style-name="P151"><text:tab/>movl<text:tab/>i(%rip), %eax</text:p>
            <text:p text:style-name="P151"><text:tab/>addl<text:tab/>$1, %eax</text:p>
            <text:p text:style-name="P151"><text:tab/>movl<text:tab/>%eax, i(%rip)</text:p>
            <text:p text:style-name="P151"><text:tab/>cmpl<text:tab/>$4, %eax</text:p>
            <text:p text:style-name="P151"><text:tab/>jle<text:tab/>.L6</text:p>
            <text:p text:style-name="P151"><text:tab/>addq<text:tab/>$8, %rsp</text:p>
            <text:p text:style-name="P151"><text:tab/>.cfi_def_cfa_offset 24</text:p>
            <text:p text:style-name="P151"><text:tab/>popq<text:tab/>%rbx</text:p>
            <text:p text:style-name="P151"><text:tab/>.cfi_def_cfa_offset 16</text:p>
            <text:p text:style-name="P151"><text:tab/>popq<text:tab/>%rbp</text:p>
            <text:p text:style-name="P151"><text:tab/>.cfi_def_cfa_offset 8</text:p>
            <text:p text:style-name="P151"><text:tab/>ret</text:p>
            <text:p text:style-name="P151"><text:tab/>.cfi_endproc</text:p>
          </table:table-cell>
        </table:table-row>
      </table:table>
      <text:p text:style-name="P54"><text:span text:style-name="T23"/></text:p>
      <text:p text:style-name="P54"><text:soft-page-break/><text:span text:style-name="T27">Даже при оптимизации слияние циклов не выполнилось: отчётливо различимы два цикла с метками .L5 и .L6</text:span></text:p>
      <table:table table:name="Таблица49" table:style-name="Таблица49">
        <table:table-column table:style-name="Таблица49.A" table:number-columns-repeated="2"/>
        <table:table-row>
          <table:table-cell table:style-name="Таблица49.A1" office:value-type="string">
            <text:p text:style-name="P151">loop_unrolling:</text:p>
            <text:p text:style-name="P151">.LFB4:</text:p>
            <text:p text:style-name="P151"><text:tab/>.cfi_startproc</text:p>
            <text:p text:style-name="P151"><text:tab/>endbr64</text:p>
            <text:p text:style-name="P151"><text:tab/>pushq<text:tab/>%rbp</text:p>
            <text:p text:style-name="P151"><text:tab/>.cfi_def_cfa_offset 16</text:p>
            <text:p text:style-name="P151"><text:tab/>.cfi_offset 6, -16</text:p>
            <text:p text:style-name="P151"><text:tab/>movq<text:tab/>%rsp, %rbp</text:p>
            <text:p text:style-name="P151"><text:tab/>.cfi_def_cfa_register 6</text:p>
            <text:p text:style-name="P151"><text:tab/>subq<text:tab/>$16, %rsp</text:p>
            <text:p text:style-name="P151"><text:tab/>movl<text:tab/>%edi, -4(%rbp)</text:p>
            <text:p text:style-name="P151"><text:tab/>movl<text:tab/>$0, i(%rip)</text:p>
            <text:p text:style-name="P151"><text:tab/>jmp<text:tab/>.L27</text:p>
            <text:p text:style-name="P151">.L28:</text:p>
            <text:p text:style-name="P151"><text:tab/>movl<text:tab/>i(%rip), %eax</text:p>
            <text:p text:style-name="P151"><text:tab/>cltq</text:p>
            <text:p text:style-name="P151"><text:tab/>leaq<text:tab/>(%rax,%rax), %rdx</text:p>
            <text:p text:style-name="P151"><text:tab/>leaq<text:tab/>ivector4(%rip), %rax</text:p>
            <text:p text:style-name="P151"><text:tab/>movw<text:tab/>$0, (%rdx,%rax)</text:p>
            <text:p text:style-name="P151"><text:tab/>movl<text:tab/>i(%rip), %eax</text:p>
            <text:p text:style-name="P151"><text:tab/>cltq</text:p>
            <text:p text:style-name="P151"><text:tab/>leaq<text:tab/>(%rax,%rax), %rdx</text:p>
            <text:p text:style-name="P151"><text:tab/>leaq<text:tab/>ivector4(%rip), %rax</text:p>
            <text:p text:style-name="P151"><text:tab/>movzwl<text:tab/>(%rdx,%rax), %eax</text:p>
            <text:p text:style-name="P151"><text:tab/>cwtl</text:p>
            <text:p text:style-name="P151"><text:tab/>movl<text:tab/>%eax, %esi</text:p>
            <text:p text:style-name="P151"><text:tab/>leaq<text:tab/>.LC0(%rip), %rax</text:p>
            <text:p text:style-name="P151"><text:tab/>movq<text:tab/>%rax, %rdi</text:p>
            <text:p text:style-name="P151"><text:tab/>movl<text:tab/>$0, %eax</text:p>
            <text:p text:style-name="P151"><text:tab/>call<text:tab/>printf@PLT</text:p>
            <text:p text:style-name="P151"><text:tab/>movl<text:tab/>i(%rip), %eax</text:p>
            <text:p text:style-name="P151"><text:tab/>addl<text:tab/>$1, %eax</text:p>
            <text:p text:style-name="P151"><text:tab/>movl<text:tab/>%eax, i(%rip)</text:p>
            <text:p text:style-name="P151">.L27:</text:p>
            <text:p text:style-name="P151"><text:tab/>movl<text:tab/>i(%rip), %eax</text:p>
            <text:p text:style-name="P151"><text:tab/>cmpl<text:tab/>$5, %eax</text:p>
            <text:p text:style-name="P151"><text:tab/>jle<text:tab/>.L28</text:p>
            <text:p text:style-name="P151"><text:tab/>nop</text:p>
            <text:p text:style-name="P151"><text:tab/>nop</text:p>
            <text:p text:style-name="P151"><text:tab/>leave</text:p>
            <text:p text:style-name="P151"><text:tab/>.cfi_def_cfa 7, 8</text:p>
            <text:p text:style-name="P151"><text:tab/>ret</text:p>
            <text:p text:style-name="P151"><text:tab/>.cfi_endproc</text:p>
          </table:table-cell>
          <table:table-cell table:style-name="Таблица49.A1" office:value-type="string">
            <text:p text:style-name="P180">void loop_unrolling(int x)</text:p>
            <text:p text:style-name="P180">{</text:p>
            <text:p text:style-name="P180"><text:tab/>for (i = 0; i &lt; 6; i++) {</text:p>
            <text:p text:style-name="P180"><text:tab/><text:tab/>ivector4[i] = 0;</text:p>
            <text:p text:style-name="P180"><text:tab/><text:tab/>printf("%d", ivector4[i]);</text:p>
            <text:p text:style-name="P180"><text:tab/>}</text:p>
            <text:p text:style-name="P180">} </text:p>
          </table:table-cell>
        </table:table-row>
      </table:table>
      <text:p text:style-name="P54"><text:span text:style-name="T23"/></text:p>
      <text:p text:style-name="P59"><text:span text:style-name="T23">При отсутствии оптимизации развёртка циклов не применяется</text:span></text:p>
      <text:p text:style-name="P59"><text:span text:style-name="T23"/></text:p>
      <table:table table:name="Таблица50" table:style-name="Таблица50">
        <table:table-column table:style-name="Таблица50.A" table:number-columns-repeated="2"/>
        <table:table-row table:style-name="Таблица50.1">
          <table:table-cell table:style-name="Таблица50.A1" office:value-type="string">
            <text:p text:style-name="P155">loop_unrolling:</text:p>
            <text:p text:style-name="P155">.LFB4:</text:p>
            <text:p text:style-name="P155"><text:tab/>.cfi_startproc</text:p>
            <text:p text:style-name="P155"><text:tab/>endbr64</text:p>
            <text:p text:style-name="P155"><text:tab/>pushq<text:tab/>%rbp</text:p>
            <text:p text:style-name="P155"><text:tab/>.cfi_def_cfa_offset 16</text:p>
            <text:p text:style-name="P155"><text:tab/>.cfi_offset 6, -16</text:p>
            <text:p text:style-name="P155"><text:tab/>movq<text:tab/>%rsp, %rbp</text:p>
            <text:p text:style-name="P155"><text:tab/>.cfi_def_cfa_register 6</text:p>
            <text:p text:style-name="P155"><text:tab/>subq<text:tab/>$16, %rsp</text:p>
            <text:p text:style-name="P155"><text:tab/>movl<text:tab/>%edi, -4(%rbp)</text:p>
            <text:p text:style-name="P155"><text:tab/>movl<text:tab/>$0, i(%rip)</text:p>
            <text:p text:style-name="P155"><text:tab/>jmp<text:tab/>.L27</text:p>
            <text:p text:style-name="P155">.L28:</text:p>
            <text:p text:style-name="P155"><text:tab/>movl<text:tab/>i(%rip), %eax</text:p>
            <text:p text:style-name="P155"><text:tab/>cltq</text:p>
            <text:p text:style-name="P155"><text:tab/>leaq<text:tab/>(%rax,%rax), %rdx</text:p>
            <text:p text:style-name="P155"><text:tab/>leaq<text:tab/>ivector4(%rip), %rax</text:p>
            <text:p text:style-name="P155"><text:tab/>movw<text:tab/>$0, (%rdx,%rax)</text:p>
            <text:p text:style-name="P155"><text:tab/>movl<text:tab/>i(%rip), %eax</text:p>
            <text:p text:style-name="P155"><text:tab/>cltq</text:p>
            <text:p text:style-name="P155"><text:tab/>leaq<text:tab/>(%rax,%rax), %rdx</text:p>
            <text:p text:style-name="P155"><text:tab/>leaq<text:tab/>ivector4(%rip), %rax</text:p>
            <text:p text:style-name="P155"><text:tab/>movzwl<text:tab/>(%rdx,%rax), %eax</text:p>
            <text:p text:style-name="P155"><text:tab/>cwtl</text:p>
            <text:p text:style-name="P155"><text:tab/>movl<text:tab/>%eax, %esi</text:p>
            <text:p text:style-name="P155"><text:tab/>leaq<text:tab/>.LC0(%rip), %rax</text:p>
            <text:p text:style-name="P155"><text:tab/>movq<text:tab/>%rax, %rdi</text:p>
            <text:p text:style-name="P155"><text:tab/>movl<text:tab/>$0, %eax</text:p>
            <text:p text:style-name="P155"><text:tab/>call<text:tab/>printf@PLT</text:p>
            <text:p text:style-name="P155"><text:tab/>movl<text:tab/>i(%rip), %eax</text:p>
            <text:p text:style-name="P155"><text:tab/>addl<text:tab/>$1, %eax</text:p>
            <text:p text:style-name="P155"><text:tab/>movl<text:tab/>%eax, i(%rip)</text:p>
            <text:p text:style-name="P155">.L27:</text:p>
            <text:p text:style-name="P155"><text:tab/>movl<text:tab/>i(%rip), %eax</text:p>
            <text:p text:style-name="P155"><text:tab/>cmpl<text:tab/>$5, %eax</text:p>
            <text:p text:style-name="P155"><text:tab/>jle<text:tab/>.L28</text:p>
            <text:p text:style-name="P155"><text:tab/>nop</text:p>
            <text:p text:style-name="P155"><text:tab/>nop</text:p>
            <text:p text:style-name="P155"><text:tab/>leave</text:p>
            <text:p text:style-name="P155"><text:tab/>.cfi_def_cfa 7, 8</text:p>
            <text:p text:style-name="P155"><text:tab/>ret</text:p>
            <text:p text:style-name="P155"><text:tab/>.cfi_endproc</text:p>
          </table:table-cell>
          <table:table-cell table:style-name="Таблица50.A1" office:value-type="string">
            <text:p text:style-name="P151">loop_unrolling:</text:p>
            <text:p text:style-name="P151">.LFB41:</text:p>
            <text:p text:style-name="P151"><text:tab/>.cfi_startproc</text:p>
            <text:p text:style-name="P151"><text:tab/>endbr64</text:p>
            <text:p text:style-name="P151"><text:tab/>pushq<text:tab/>%rbp</text:p>
            <text:p text:style-name="P151"><text:tab/>.cfi_def_cfa_offset 16</text:p>
            <text:p text:style-name="P151"><text:tab/>.cfi_offset 6, -16</text:p>
            <text:p text:style-name="P151"><text:tab/>xorl<text:tab/>%eax, %eax</text:p>
            <text:p text:style-name="P151"><text:tab/>leaq<text:tab/>ivector4(%rip), %rbp</text:p>
            <text:p text:style-name="P151"><text:tab/>pushq<text:tab/>%rbx</text:p>
            <text:p text:style-name="P151"><text:tab/>.cfi_def_cfa_offset 24</text:p>
            <text:p text:style-name="P151"><text:tab/>.cfi_offset 3, -24</text:p>
            <text:p text:style-name="P151"><text:tab/>leaq<text:tab/>.LC0(%rip), %rbx</text:p>
            <text:p text:style-name="P151"><text:tab/>subq<text:tab/>$8, %rsp</text:p>
            <text:p text:style-name="P151"><text:tab/>.cfi_def_cfa_offset 32</text:p>
            <text:p text:style-name="P151"><text:tab/>movl<text:tab/>$0, i(%rip)</text:p>
            <text:p text:style-name="P151"><text:tab/>.p2align 4,,10</text:p>
            <text:p text:style-name="P151"><text:tab/>.p2align 3</text:p>
            <text:p text:style-name="P151">.L11:</text:p>
            <text:p text:style-name="P151"><text:tab/>cltq</text:p>
            <text:p text:style-name="P151"><text:tab/>xorl<text:tab/>%edx, %edx</text:p>
            <text:p text:style-name="P151"><text:tab/>movq<text:tab/>%rbx, %rsi</text:p>
            <text:p text:style-name="P151"><text:tab/>movl<text:tab/>$2, %edi</text:p>
            <text:p text:style-name="P151"><text:tab/>movw<text:tab/>%dx, 0(%rbp,%rax,2)</text:p>
            <text:p text:style-name="P151"><text:tab/>xorl<text:tab/>%edx, %edx</text:p>
            <text:p text:style-name="P151"><text:tab/>xorl<text:tab/>%eax, %eax</text:p>
            <text:p text:style-name="P151"><text:tab/>call<text:tab/>__printf_chk@PLT</text:p>
            <text:p text:style-name="P151"><text:tab/>movl<text:tab/>i(%rip), %eax</text:p>
            <text:p text:style-name="P151"><text:tab/>addl<text:tab/>$1, %eax</text:p>
            <text:p text:style-name="P151"><text:tab/>movl<text:tab/>%eax, i(%rip)</text:p>
            <text:p text:style-name="P151"><text:tab/>cmpl<text:tab/>$5, %eax</text:p>
            <text:p text:style-name="P151"><text:tab/>jle<text:tab/>.L11</text:p>
            <text:p text:style-name="P151"><text:tab/>addq<text:tab/>$8, %rsp</text:p>
            <text:p text:style-name="P151"><text:tab/>.cfi_def_cfa_offset 24</text:p>
            <text:p text:style-name="P151"><text:tab/>popq<text:tab/>%rbx</text:p>
            <text:p text:style-name="P151"><text:tab/>.cfi_def_cfa_offset 16</text:p>
            <text:p text:style-name="P151"><text:tab/>popq<text:tab/>%rbp</text:p>
            <text:p text:style-name="P151"><text:tab/>.cfi_def_cfa_offset 8</text:p>
            <text:p text:style-name="P151"><text:tab/>ret</text:p>
            <text:p text:style-name="P151"><text:tab/>.cfi_endproc</text:p>
          </table:table-cell>
        </table:table-row>
      </table:table>
      <text:p text:style-name="P59"><text:span text:style-name="T23"/></text:p>
      <text:p text:style-name="P62"><text:span text:style-name="T23">Цикл сохранился и на фоне оптимизации, его развёртывание не состоялось.</text:span></text:p>
      <table:table table:name="Таблица51" table:style-name="Таблица51">
        <table:table-column table:style-name="Таблица51.A" table:number-columns-repeated="2"/>
        <table:table-row>
          <table:table-cell table:style-name="Таблица51.A1" office:value-type="string">
            <text:p text:style-name="P151">jump_compression:</text:p>
            <text:p text:style-name="P151">.LFB5:</text:p>
            <text:p text:style-name="P151"><text:tab/>.cfi_startproc</text:p>
            <text:p text:style-name="P151"><text:tab/>endbr64</text:p>
            <text:p text:style-name="P151"><text:tab/>pushq<text:tab/>%rbp</text:p>
            <text:p text:style-name="P151"><text:tab/>.cfi_def_cfa_offset 16</text:p>
            <text:p text:style-name="P151"><text:tab/>.cfi_offset 6, -16</text:p>
            <text:p text:style-name="P151"><text:tab/>movq<text:tab/>%rsp, %rbp</text:p>
            <text:p text:style-name="P151"><text:tab/>.cfi_def_cfa_register 6</text:p>
            <text:p text:style-name="P151"><text:tab/>subq<text:tab/>$32, %rsp</text:p>
            <text:p text:style-name="P151"><text:tab/>movl<text:tab/>%edi, -4(%rbp)</text:p>
            <text:p text:style-name="P151"><text:tab/>movl<text:tab/>%esi, -8(%rbp)</text:p>
            <text:p text:style-name="P151"><text:tab/>movl<text:tab/>%edx, -12(%rbp)</text:p>
            <text:p text:style-name="P151"><text:tab/>movl<text:tab/>%ecx, -16(%rbp)</text:p>
            <text:p text:style-name="P151"><text:tab/>movl<text:tab/>%r8d, -20(%rbp)</text:p>
            <text:p text:style-name="P151">.L30:</text:p>
            <text:p text:style-name="P151"><text:tab/>movl<text:tab/>-4(%rbp), %eax</text:p>
            <text:p text:style-name="P151"><text:tab/>cmpl<text:tab/>-8(%rbp), %eax</text:p>
            <text:p text:style-name="P151"><text:tab/>jge<text:tab/>.L31</text:p>
            <text:p text:style-name="P151"><text:tab/>movl<text:tab/>-8(%rbp), %eax</text:p>
            <text:p text:style-name="P151"><text:tab/>cmpl<text:tab/>-12(%rbp), %eax</text:p>
            <text:p text:style-name="P151"><text:tab/>jge<text:tab/>.L32</text:p>
            <text:p text:style-name="P151"><text:tab/>movl<text:tab/>-12(%rbp), %eax</text:p>
            <text:p text:style-name="P151"><text:tab/>cmpl<text:tab/>-16(%rbp), %eax</text:p>
            <text:p text:style-name="P151"><text:tab/>jge<text:tab/>.L33</text:p>
            <text:p text:style-name="P151"><text:tab/>movl<text:tab/>-16(%rbp), %eax</text:p>
            <text:p text:style-name="P151"><text:tab/>cmpl<text:tab/>-20(%rbp), %eax</text:p>
            <text:p text:style-name="P151"><text:tab/>jge<text:tab/>.L38</text:p>
            <text:p text:style-name="P151"><text:tab/>movl<text:tab/>-20(%rbp), %eax</text:p>
            <text:p text:style-name="P151"><text:tab/>addl<text:tab/>%eax, -16(%rbp)</text:p>
            <text:p text:style-name="P151"><text:tab/>jmp<text:tab/>.L35</text:p>
            <text:p text:style-name="P151">.L33:</text:p>
            <text:p text:style-name="P151"><text:tab/>movl<text:tab/>-16(%rbp), %eax</text:p>
            <text:p text:style-name="P151"><text:tab/>addl<text:tab/>%eax, -12(%rbp)</text:p>
            <text:p text:style-name="P151"><text:tab/>jmp<text:tab/>.L35</text:p>
            <text:p text:style-name="P151">.L32:</text:p>
            <text:p text:style-name="P151"><text:tab/>movl<text:tab/>-12(%rbp), %eax</text:p>
            <text:p text:style-name="P151"><text:tab/>addl<text:tab/>%eax, -8(%rbp)</text:p>
            <text:p text:style-name="P151"><text:tab/>movl<text:tab/>-8(%rbp), %eax</text:p>
            <text:p text:style-name="P151"><text:tab/>movl<text:tab/>%eax, %esi</text:p>
            <text:p text:style-name="P151"><text:tab/>leaq<text:tab/>.LC0(%rip), %rax</text:p>
            <text:p text:style-name="P151"><text:tab/>movq<text:tab/>%rax, %rdi</text:p>
            <text:p text:style-name="P151"><text:tab/>movl<text:tab/>$0, %eax</text:p>
            <text:p text:style-name="P151"><text:tab/>call<text:tab/>printf@PLT</text:p>
            <text:p text:style-name="P151"><text:tab/>jmp<text:tab/>.L30</text:p>
            <text:p text:style-name="P151">.L38:</text:p>
            <text:p text:style-name="P151"><text:tab/><text:span text:style-name="T38">nop</text:span></text:p>
            <text:p text:style-name="P151">.L36:</text:p>
            <text:p text:style-name="P151"><text:tab/><text:span text:style-name="T38">jmp<text:tab/>.L30</text:span></text:p>
            <text:p text:style-name="P151">.L31:</text:p>
            <text:p text:style-name="P151"><text:tab/>movl<text:tab/>-8(%rbp), %eax</text:p>
            <text:p text:style-name="P151"><text:tab/>addl<text:tab/>%eax, -4(%rbp)</text:p>
            <text:p text:style-name="P151">.L35:</text:p>
            <text:p text:style-name="P151"><text:tab/>movl<text:tab/>-4(%rbp), %edx</text:p>
            <text:p text:style-name="P151"><text:tab/>movl<text:tab/>-8(%rbp), %eax</text:p>
            <text:p text:style-name="P151"><text:tab/>addl<text:tab/>%eax, %edx</text:p>
            <text:p text:style-name="P151"><text:tab/>movl<text:tab/>-12(%rbp), %eax</text:p>
            <text:p text:style-name="P151"><text:tab/>addl<text:tab/>%eax, %edx</text:p>
            <text:p text:style-name="P151"><text:tab/>movl<text:tab/>-16(%rbp), %eax</text:p>
            <text:p text:style-name="P151"><text:tab/>addl<text:tab/>%eax, %edx</text:p>
            <text:p text:style-name="P151"><text:tab/>movl<text:tab/>-20(%rbp), %eax</text:p>
            <text:p text:style-name="P151"><text:tab/>addl<text:tab/>%edx, %eax</text:p>
            <text:p text:style-name="P151"><text:tab/>leave</text:p>
            <text:p text:style-name="P151"><text:soft-page-break/><text:tab/>.cfi_def_cfa 7, 8</text:p>
            <text:p text:style-name="P151"><text:tab/>ret</text:p>
            <text:p text:style-name="P151"><text:tab/>.cfi_endproc</text:p>
          </table:table-cell>
          <table:table-cell table:style-name="Таблица51.A1" office:value-type="string">
            <text:p text:style-name="P180">int jump_compression(int i, int j, int k, int l, int m)</text:p>
            <text:p text:style-name="P180">{</text:p>
            <text:p text:style-name="P180">beg_1:</text:p>
            <text:p text:style-name="P180"><text:tab/>if (i &lt; j)</text:p>
            <text:p text:style-name="P180"><text:tab/><text:tab/>if (j &lt; k)</text:p>
            <text:p text:style-name="P180"><text:tab/><text:tab/><text:tab/>if (k &lt; l)</text:p>
            <text:p text:style-name="P180"><text:tab/><text:tab/><text:tab/><text:tab/>if (l &lt; m)</text:p>
            <text:p text:style-name="P180"><text:tab/><text:tab/><text:tab/><text:tab/><text:tab/>l += m;</text:p>
            <text:p text:style-name="P180"><text:tab/><text:tab/><text:tab/><text:tab/>else</text:p>
            <text:p text:style-name="P180"><text:tab/><text:tab/><text:tab/><text:tab/><text:tab/>goto end_1;</text:p>
            <text:p text:style-name="P180"><text:tab/><text:tab/><text:tab/>else</text:p>
            <text:p text:style-name="P180"><text:tab/><text:tab/><text:tab/><text:tab/>k += l;</text:p>
            <text:p text:style-name="P180"><text:tab/><text:tab/>else {</text:p>
            <text:p text:style-name="P180"><text:tab/><text:tab/><text:tab/>j += k;</text:p>
            <text:p text:style-name="P180"><text:tab/><text:tab/><text:tab/>printf("%d", j);</text:p>
            <text:p text:style-name="P180"><text:tab/><text:tab/>end_1:</text:p>
            <text:p text:style-name="P180"><text:tab/><text:tab/><text:tab/>goto beg_1;</text:p>
            <text:p text:style-name="P180"><text:tab/><text:tab/>}</text:p>
            <text:p text:style-name="P180"><text:tab/>else</text:p>
            <text:p text:style-name="P180"><text:tab/><text:tab/>i += j;</text:p>
            <text:p text:style-name="P180"><text:tab/>return(i + j + k + l + m);</text:p>
            <text:p text:style-name="P180">}</text:p>
          </table:table-cell>
        </table:table-row>
      </table:table>
      <text:p text:style-name="P62"><text:span text:style-name="T23"/></text:p>
      <text:p text:style-name="P65"><text:span text:style-name="T23">При выключенной оптимизации компилятор сохраняет ненужные цепочки переходов, а включённая оптимизация избавляет от них</text:span></text:p>
      <text:p text:style-name="P65"><text:span text:style-name="T23"/></text:p>
      <table:table table:name="Таблица52" table:style-name="Таблица52">
        <table:table-column table:style-name="Таблица52.A" table:number-columns-repeated="2"/>
        <table:table-row>
          <table:table-cell table:style-name="Таблица52.A1" office:value-type="string">
            <text:p text:style-name="P155">jump_compression:</text:p>
            <text:p text:style-name="P155">.LFB5:</text:p>
            <text:p text:style-name="P155"><text:tab/>.cfi_startproc</text:p>
            <text:p text:style-name="P155"><text:tab/>endbr64</text:p>
            <text:p text:style-name="P155"><text:tab/>pushq<text:tab/>%rbp</text:p>
            <text:p text:style-name="P155"><text:tab/>.cfi_def_cfa_offset 16</text:p>
            <text:p text:style-name="P155"><text:tab/>.cfi_offset 6, -16</text:p>
            <text:p text:style-name="P155"><text:tab/>movq<text:tab/>%rsp, %rbp</text:p>
            <text:p text:style-name="P155"><text:tab/>.cfi_def_cfa_register 6</text:p>
            <text:p text:style-name="P155"><text:tab/>subq<text:tab/>$32, %rsp</text:p>
            <text:p text:style-name="P155"><text:tab/>movl<text:tab/>%edi, -4(%rbp)</text:p>
            <text:p text:style-name="P155"><text:tab/>movl<text:tab/>%esi, -8(%rbp)</text:p>
            <text:p text:style-name="P155"><text:tab/>movl<text:tab/>%edx, -12(%rbp)</text:p>
            <text:p text:style-name="P155"><text:tab/>movl<text:tab/>%ecx, -16(%rbp)</text:p>
            <text:p text:style-name="P155"><text:tab/>movl<text:tab/>%r8d, -20(%rbp)</text:p>
            <text:p text:style-name="P155">.L30:</text:p>
            <text:p text:style-name="P155"><text:tab/>movl<text:tab/>-4(%rbp), %eax</text:p>
            <text:p text:style-name="P155"><text:tab/>cmpl<text:tab/>-8(%rbp), %eax</text:p>
            <text:p text:style-name="P155"><text:tab/>jge<text:tab/>.L31</text:p>
            <text:p text:style-name="P155"><text:tab/>movl<text:tab/>-8(%rbp), %eax</text:p>
            <text:p text:style-name="P155"><text:tab/>cmpl<text:tab/>-12(%rbp), %eax</text:p>
            <text:p text:style-name="P155"><text:tab/>jge<text:tab/>.L32</text:p>
            <text:p text:style-name="P155"><text:tab/>movl<text:tab/>-12(%rbp), %eax</text:p>
            <text:p text:style-name="P155"><text:tab/>cmpl<text:tab/>-16(%rbp), %eax</text:p>
            <text:p text:style-name="P155"><text:tab/>jge<text:tab/>.L33</text:p>
            <text:p text:style-name="P155"><text:tab/>movl<text:tab/>-16(%rbp), %eax</text:p>
            <text:p text:style-name="P155"><text:tab/>cmpl<text:tab/>-20(%rbp), %eax</text:p>
            <text:p text:style-name="P155"><text:tab/>jge<text:tab/>.L38</text:p>
            <text:p text:style-name="P155"><text:tab/>movl<text:tab/>-20(%rbp), %eax</text:p>
            <text:p text:style-name="P155"><text:tab/>addl<text:tab/>%eax, -16(%rbp)</text:p>
            <text:p text:style-name="P155"><text:tab/>jmp<text:tab/>.L35</text:p>
            <text:p text:style-name="P155">.L33:</text:p>
            <text:p text:style-name="P155"><text:tab/>movl<text:tab/>-16(%rbp), %eax</text:p>
            <text:p text:style-name="P155"><text:tab/>addl<text:tab/>%eax, -12(%rbp)</text:p>
            <text:p text:style-name="P155"><text:tab/>jmp<text:tab/>.L35</text:p>
            <text:p text:style-name="P155">.L32:</text:p>
            <text:p text:style-name="P155"><text:tab/>movl<text:tab/>-12(%rbp), %eax</text:p>
            <text:p text:style-name="P155"><text:tab/>addl<text:tab/>%eax, -8(%rbp)</text:p>
            <text:p text:style-name="P155"><text:tab/>movl<text:tab/>-8(%rbp), %eax</text:p>
            <text:p text:style-name="P155"><text:tab/>movl<text:tab/>%eax, %esi</text:p>
            <text:p text:style-name="P155"><text:tab/>leaq<text:tab/>.LC0(%rip), %rax</text:p>
            <text:p text:style-name="P155"><text:tab/>movq<text:tab/>%rax, %rdi</text:p>
            <text:p text:style-name="P155"><text:tab/>movl<text:tab/>$0, %eax</text:p>
            <text:p text:style-name="P155"><text:tab/>call<text:tab/>printf@PLT</text:p>
            <text:p text:style-name="P155"><text:tab/>jmp<text:tab/>.L30</text:p>
            <text:p text:style-name="P155">.L38:</text:p>
            <text:p text:style-name="P155"><text:tab/><text:span text:style-name="T38">nop</text:span></text:p>
            <text:p text:style-name="P155">.L36:</text:p>
            <text:p text:style-name="P155"><text:tab/><text:span text:style-name="T38">jmp<text:tab/>.L30</text:span></text:p>
            <text:p text:style-name="P155">.L31:</text:p>
            <text:p text:style-name="P155"><text:tab/>movl<text:tab/>-8(%rbp), %eax</text:p>
            <text:p text:style-name="P155"><text:tab/>addl<text:tab/>%eax, -4(%rbp)</text:p>
            <text:p text:style-name="P155">.L35:</text:p>
            <text:p text:style-name="P155"><text:tab/>movl<text:tab/>-4(%rbp), %edx</text:p>
            <text:p text:style-name="P155"><text:soft-page-break/><text:tab/>movl<text:tab/>-8(%rbp), %eax</text:p>
            <text:p text:style-name="P155"><text:tab/>addl<text:tab/>%eax, %edx</text:p>
            <text:p text:style-name="P155"><text:tab/>movl<text:tab/>-12(%rbp), %eax</text:p>
            <text:p text:style-name="P155"><text:tab/>addl<text:tab/>%eax, %edx</text:p>
            <text:p text:style-name="P155"><text:tab/>movl<text:tab/>-16(%rbp), %eax</text:p>
            <text:p text:style-name="P155"><text:tab/>addl<text:tab/>%eax, %edx</text:p>
            <text:p text:style-name="P155"><text:tab/>movl<text:tab/>-20(%rbp), %eax</text:p>
            <text:p text:style-name="P155"><text:tab/>addl<text:tab/>%edx, %eax</text:p>
            <text:p text:style-name="P155"><text:tab/>leave</text:p>
            <text:p text:style-name="P155"><text:tab/>.cfi_def_cfa 7, 8</text:p>
            <text:p text:style-name="P155"><text:tab/>ret</text:p>
            <text:p text:style-name="P155"><text:tab/>.cfi_endproc</text:p>
          </table:table-cell>
          <table:table-cell table:style-name="Таблица52.A1" office:value-type="string">
            <text:p text:style-name="P146">jump_compression:</text:p>
            <text:p text:style-name="P146">.LFB42:</text:p>
            <text:p text:style-name="P146"><text:tab/>.cfi_startproc</text:p>
            <text:p text:style-name="P146"><text:tab/>endbr64</text:p>
            <text:p text:style-name="P146"><text:tab/>pushq<text:tab/>%r15</text:p>
            <text:p text:style-name="P146"><text:tab/>.cfi_def_cfa_offset 16</text:p>
            <text:p text:style-name="P146"><text:tab/>.cfi_offset 15, -16</text:p>
            <text:p text:style-name="P146"><text:tab/>pushq<text:tab/>%r14</text:p>
            <text:p text:style-name="P146"><text:tab/>.cfi_def_cfa_offset 24</text:p>
            <text:p text:style-name="P146"><text:tab/>.cfi_offset 14, -24</text:p>
            <text:p text:style-name="P146"><text:tab/>movl<text:tab/>%edx, %r14d</text:p>
            <text:p text:style-name="P146"><text:tab/>pushq<text:tab/>%r13</text:p>
            <text:p text:style-name="P146"><text:tab/>.cfi_def_cfa_offset 32</text:p>
            <text:p text:style-name="P146"><text:tab/>.cfi_offset 13, -32</text:p>
            <text:p text:style-name="P146"><text:tab/>movl<text:tab/>%ecx, %r13d</text:p>
            <text:p text:style-name="P146"><text:tab/>pushq<text:tab/>%r12</text:p>
            <text:p text:style-name="P146"><text:tab/>.cfi_def_cfa_offset 40</text:p>
            <text:p text:style-name="P146"><text:tab/>.cfi_offset 12, -40</text:p>
            <text:p text:style-name="P146"><text:tab/>movl<text:tab/>%r8d, %r12d</text:p>
            <text:p text:style-name="P146"><text:tab/>pushq<text:tab/>%rbp</text:p>
            <text:p text:style-name="P146"><text:tab/>.cfi_def_cfa_offset 48</text:p>
            <text:p text:style-name="P146"><text:tab/>.cfi_offset 6, -48</text:p>
            <text:p text:style-name="P146"><text:tab/>movl<text:tab/>%edi, %ebp</text:p>
            <text:p text:style-name="P146"><text:tab/>pushq<text:tab/>%rbx</text:p>
            <text:p text:style-name="P146"><text:tab/>.cfi_def_cfa_offset 56</text:p>
            <text:p text:style-name="P146"><text:tab/>.cfi_offset 3, -56</text:p>
            <text:p text:style-name="P146"><text:tab/>movl<text:tab/>%esi, %ebx</text:p>
            <text:p text:style-name="P146"><text:tab/>subq<text:tab/>$8, %rsp</text:p>
            <text:p text:style-name="P146"><text:tab/>.cfi_def_cfa_offset 64</text:p>
            <text:p text:style-name="P146"><text:tab/>cmpl<text:tab/>%edi, %esi</text:p>
            <text:p text:style-name="P146"><text:tab/>jle<text:tab/>.L15</text:p>
            <text:p text:style-name="P146"><text:tab/>leaq<text:tab/>.LC0(%rip), %r15</text:p>
            <text:p text:style-name="P146"><text:tab/>cmpl<text:tab/>%ecx, %edx</text:p>
            <text:p text:style-name="P146"><text:tab/>jge<text:tab/>.L16</text:p>
            <text:p text:style-name="P146"><text:tab/>cmpl<text:tab/>%r8d, %ecx</text:p>
            <text:p text:style-name="P146"><text:tab/>jl<text:tab/>.L17</text:p>
            <text:p text:style-name="P146">.L19:</text:p>
            <text:p text:style-name="P146"><text:tab/>cmpl<text:tab/>%ebx, %r14d</text:p>
            <text:p text:style-name="P146"><text:tab/>jle<text:tab/>.L33</text:p>
            <text:p text:style-name="P146"><text:tab/>cmpl<text:tab/>%ebx, %ebp</text:p>
            <text:p text:style-name="P146"><text:tab/>jge<text:tab/>.L15</text:p>
            <text:p text:style-name="P146">.L21:</text:p>
            <text:p text:style-name="P146"><text:tab/>jmp<text:tab/>.L21</text:p>
            <text:p text:style-name="P146"><text:tab/>.p2align 4,,10</text:p>
            <text:p text:style-name="P146"><text:tab/>.p2align 3</text:p>
            <text:p text:style-name="P146">.L33:</text:p>
            <text:p text:style-name="P146"><text:tab/>addl<text:tab/>%r14d, %ebx</text:p>
            <text:p text:style-name="P146"><text:tab/>xorl<text:tab/>%eax, %eax</text:p>
            <text:p text:style-name="P146"><text:tab/>movq<text:tab/>%r15, %rsi</text:p>
            <text:p text:style-name="P146"><text:tab/>movl<text:tab/>$2, %edi</text:p>
            <text:p text:style-name="P146"><text:tab/>movl<text:tab/>%ebx, %edx</text:p>
            <text:p text:style-name="P146"><text:tab/>call<text:tab/>__printf_chk@PLT</text:p>
            <text:p text:style-name="P146"><text:tab/>cmpl<text:tab/>%ebx, %ebp</text:p>
            <text:p text:style-name="P146"><text:tab/>jl<text:tab/>.L19</text:p>
            <text:p text:style-name="P146"><text:soft-page-break/>.L15:</text:p>
            <text:p text:style-name="P146"><text:tab/>addl<text:tab/>%ebx, %ebp</text:p>
            <text:p text:style-name="P146">.L24:</text:p>
            <text:p text:style-name="P146"><text:tab/>leal<text:tab/>0(%rbp,%rbx), %eax</text:p>
            <text:p text:style-name="P146"><text:tab/>addq<text:tab/>$8, %rsp</text:p>
            <text:p text:style-name="P146"><text:tab/>.cfi_remember_state</text:p>
            <text:p text:style-name="P146"><text:tab/>.cfi_def_cfa_offset 56</text:p>
            <text:p text:style-name="P146"><text:tab/>addl<text:tab/>%r14d, %eax</text:p>
            <text:p text:style-name="P146"><text:tab/>popq<text:tab/>%rbx</text:p>
            <text:p text:style-name="P146"><text:tab/>.cfi_def_cfa_offset 48</text:p>
            <text:p text:style-name="P146"><text:tab/>popq<text:tab/>%rbp</text:p>
            <text:p text:style-name="P146"><text:tab/>.cfi_def_cfa_offset 40</text:p>
            <text:p text:style-name="P146"><text:tab/>addl<text:tab/>%r13d, %eax</text:p>
            <text:p text:style-name="P146"><text:tab/>addl<text:tab/>%r12d, %eax</text:p>
            <text:p text:style-name="P146"><text:tab/>popq<text:tab/>%r12</text:p>
            <text:p text:style-name="P146"><text:tab/>.cfi_def_cfa_offset 32</text:p>
            <text:p text:style-name="P146"><text:tab/>popq<text:tab/>%r13</text:p>
            <text:p text:style-name="P146"><text:tab/>.cfi_def_cfa_offset 24</text:p>
            <text:p text:style-name="P146"><text:tab/>popq<text:tab/>%r14</text:p>
            <text:p text:style-name="P146"><text:tab/>.cfi_def_cfa_offset 16</text:p>
            <text:p text:style-name="P146"><text:tab/>popq<text:tab/>%r15</text:p>
            <text:p text:style-name="P146"><text:tab/>.cfi_def_cfa_offset 8</text:p>
            <text:p text:style-name="P146"><text:tab/>ret</text:p>
            <text:p text:style-name="P146">.L34:</text:p>
            <text:p text:style-name="P146"><text:tab/>.cfi_restore_state</text:p>
            <text:p text:style-name="P146"><text:tab/>addl<text:tab/>%r14d, %ebx</text:p>
            <text:p text:style-name="P146"><text:tab/>xorl<text:tab/>%eax, %eax</text:p>
            <text:p text:style-name="P146"><text:tab/>movq<text:tab/>%r15, %rsi</text:p>
            <text:p text:style-name="P146"><text:tab/>movl<text:tab/>$2, %edi</text:p>
            <text:p text:style-name="P146"><text:tab/>movl<text:tab/>%ebx, %edx</text:p>
            <text:p text:style-name="P146"><text:tab/>call<text:tab/>__printf_chk@PLT</text:p>
            <text:p text:style-name="P146"><text:tab/>cmpl<text:tab/>%ebx, %ebp</text:p>
            <text:p text:style-name="P146"><text:tab/>jge<text:tab/>.L15</text:p>
            <text:p text:style-name="P146">.L16:</text:p>
            <text:p text:style-name="P146"><text:tab/>cmpl<text:tab/>%ebx, %r14d</text:p>
            <text:p text:style-name="P146"><text:tab/>jle<text:tab/>.L34</text:p>
            <text:p text:style-name="P146"><text:tab/>addl<text:tab/>%r13d, %r14d</text:p>
            <text:p text:style-name="P146"><text:tab/>jmp<text:tab/>.L24</text:p>
            <text:p text:style-name="P146">.L23:</text:p>
            <text:p text:style-name="P146"><text:tab/>addl<text:tab/>%r14d, %ebx</text:p>
            <text:p text:style-name="P146"><text:tab/>xorl<text:tab/>%eax, %eax</text:p>
            <text:p text:style-name="P146"><text:tab/>movq<text:tab/>%r15, %rsi</text:p>
            <text:p text:style-name="P146"><text:tab/>movl<text:tab/>$2, %edi</text:p>
            <text:p text:style-name="P146"><text:tab/>movl<text:tab/>%ebx, %edx</text:p>
            <text:p text:style-name="P146"><text:tab/>call<text:tab/>__printf_chk@PLT</text:p>
            <text:p text:style-name="P146"><text:tab/>cmpl<text:tab/>%ebx, %ebp</text:p>
            <text:p text:style-name="P146"><text:tab/>jge<text:tab/>.L15</text:p>
            <text:p text:style-name="P146">.L17:</text:p>
            <text:p text:style-name="P146"><text:tab/>cmpl<text:tab/>%ebx, %r14d</text:p>
            <text:p text:style-name="P146"><text:tab/>jle<text:tab/>.L23</text:p>
            <text:p text:style-name="P146"><text:tab/>addl<text:tab/>%r12d, %r13d</text:p>
            <text:p text:style-name="P146"><text:tab/>jmp<text:tab/>.L24</text:p>
            <text:p text:style-name="P146"><text:tab/>.cfi_endproc</text:p>
          </table:table-cell>
        </table:table-row>
      </table:table>
      <text:p text:style-name="P96"/>
      <text:p text:style-name="P195">CompCert</text:p>
      <text:p text:style-name="P97"><text:line-break/><text:span text:style-name="T32">Размножение </text:span><text:span text:style-name="T33">копий</text:span><text:span text:style-name="T32"> не оптимизируется с -o0</text:span></text:p>
      <text:p text:style-name="P97"/>
      <table:table table:name="Таблица2" table:style-name="Таблица2">
        <table:table-column table:style-name="Таблица2.A"/>
        <table:table-column table:style-name="Таблица2.B"/>
        <table:table-row table:style-name="Таблица2.1">
          <table:table-cell table:style-name="Таблица2.A1" office:value-type="string">
            <text:p text:style-name="P156"><text:tab/>movq <text:s text:c="3"/>j4@GOTPCREL(%rip), %rsi</text:p>
            <text:p text:style-name="P156"><text:tab/>movl<text:tab/>$2, %r8d</text:p>
            <text:p text:style-name="P156"><text:tab/>movl<text:tab/>%r8d, 0(%rsi)</text:p>
            <text:p text:style-name="P156"><text:tab/>leaq<text:tab/>__stringlit_1(%rip), %rdi</text:p>
            <text:p text:style-name="P156"><text:tab/>movq <text:s text:c="3"/>j4@GOTPCREL(%rip), %rdx</text:p>
            <text:p text:style-name="P156"><text:tab/>movl<text:tab/>0(%rdx), %esi</text:p>
            <text:p text:style-name="P156"><text:tab/>movl<text:tab/>$0, %eax</text:p>
            <text:p text:style-name="P156"><text:tab/>call<text:tab/>printf@PLT</text:p>
            <text:p text:style-name="P156"><text:tab/>movq <text:s text:c="3"/>i2@GOTPCREL(%rip), %rax</text:p>
            <text:p text:style-name="P156"><text:tab/>movl<text:tab/>0(%rax), %esi</text:p>
            <text:p text:style-name="P156"><text:tab/>movq <text:s text:c="3"/>j4@GOTPCREL(%rip), %rax</text:p>
            <text:p text:style-name="P156"><text:tab/>movl<text:tab/>0(%rax), %r10d</text:p>
            <text:p text:style-name="P156"><text:tab/>cmpl<text:tab/>%r10d, %esi</text:p>
            <text:p text:style-name="P156"><text:tab/>jge<text:tab/>.L100</text:p>
            <text:p text:style-name="P156"><text:tab/>movq <text:s text:c="3"/>i4@GOTPCREL(%rip), %rax</text:p>
            <text:p text:style-name="P156"><text:tab/>movl<text:tab/>0(%rax), %ecx</text:p>
            <text:p text:style-name="P156"><text:tab/>movq <text:s text:c="3"/>j4@GOTPCREL(%rip), %r9</text:p>
            <text:p text:style-name="P156"><text:tab/>movl<text:tab/>0(%r9), %esi</text:p>
            <text:p text:style-name="P156"><text:tab/>cmpl<text:tab/>%esi, %ecx</text:p>
            <text:p text:style-name="P156"><text:tab/>setl<text:tab/>%al</text:p>
            <text:p text:style-name="P156"><text:tab/><text:span text:style-name="T38">movzbl<text:tab/>%al, %eax</text:span></text:p>
            <text:p text:style-name="P156"><text:tab/>jmp<text:tab/>.L101</text:p>
            <text:p text:style-name="P156">.L100:</text:p>
            <text:p text:style-name="P156"><text:tab/>xorl<text:tab/>%eax, %eax</text:p>
            <text:p text:style-name="P156">.L101:</text:p>
            <text:p text:style-name="P156"><text:tab/>cmpl<text:tab/>$0, %eax</text:p>
            <text:p text:style-name="P156"><text:tab/>je<text:tab/>.L102</text:p>
            <text:p text:style-name="P156"><text:tab/>movq <text:s text:c="3"/>i2@GOTPCREL(%rip), %rsi</text:p>
            <text:p text:style-name="P156"><text:tab/>movl<text:tab/>$2, %ecx</text:p>
            <text:p text:style-name="P156"><text:tab/>movl<text:tab/>%ecx, 0(%rsi)</text:p>
            <text:p text:style-name="P156"><text:tab/>leaq<text:tab/>__stringlit_1(%rip), %rdi</text:p>
            <text:p text:style-name="P156"><text:tab/>movq <text:s text:c="3"/>i2@GOTPCREL(%rip), %r9</text:p>
            <text:p text:style-name="P156"><text:tab/>movl<text:tab/>0(%r9), %esi</text:p>
            <text:p text:style-name="P156"><text:tab/>movl<text:tab/>$0, %eax</text:p>
            <text:p text:style-name="P156"><text:tab/>call<text:tab/>printf@PLT</text:p>
            <text:p text:style-name="P156">.L102:</text:p>
            <text:p text:style-name="P156"><text:tab/>movq <text:s text:c="3"/>j4@GOTPCREL(%rip), %rsi</text:p>
            <text:p text:style-name="P156"><text:tab/>movq <text:s text:c="3"/>k5@GOTPCREL(%rip), %r8</text:p>
            <text:p text:style-name="P156"><text:tab/>movl<text:tab/>0(%r8), %r9d</text:p>
            <text:p text:style-name="P156"><text:tab/>movl<text:tab/>%r9d, 0(%rsi)</text:p>
            <text:p text:style-name="P156"><text:tab/>leaq<text:tab/>__stringlit_1(%rip), %rdi</text:p>
            <text:p text:style-name="P156"><text:tab/>movq <text:s text:c="3"/>j4@GOTPCREL(%rip), %rcx</text:p>
            <text:p text:style-name="P156"><text:tab/>movl<text:tab/>0(%rcx), %esi</text:p>
            <text:p text:style-name="P156"><text:tab/>movl<text:tab/>$0, %eax</text:p>
            <text:p text:style-name="P156"><text:tab/>call<text:tab/>printf@PLT</text:p>
            <text:p text:style-name="P156"><text:tab/>movq <text:s text:c="3"/>i2@GOTPCREL(%rip), %rax</text:p>
            <text:p text:style-name="P156"><text:tab/>movl<text:tab/>0(%rax), %eax</text:p>
            <text:p text:style-name="P156"><text:tab/>movq <text:s text:c="3"/>j4@GOTPCREL(%rip), %rdi</text:p>
            <text:p text:style-name="P156"><text:tab/>movl<text:tab/>0(%rdi), %edi</text:p>
            <text:p text:style-name="P156"><text:tab/>cmpl<text:tab/>%edi, %eax</text:p>
            <text:p text:style-name="P156"><text:tab/>jge<text:tab/>.L103</text:p>
            <text:p text:style-name="P156"><text:tab/>movq <text:s text:c="3"/>i4@GOTPCREL(%rip), %rax</text:p>
            <text:p text:style-name="P156"><text:tab/>movl<text:tab/>0(%rax), %r11d</text:p>
            <text:p text:style-name="P156"><text:tab/>movq <text:s text:c="3"/>j4@GOTPCREL(%rip), %rax</text:p>
            <text:p text:style-name="P156"><text:soft-page-break/><text:tab/>movl<text:tab/>0(%rax), %ecx</text:p>
            <text:p text:style-name="P156"><text:tab/>cmpl<text:tab/>%ecx, %r11d</text:p>
            <text:p text:style-name="P156"><text:tab/>setl<text:tab/>%al</text:p>
            <text:p text:style-name="P156"><text:tab/>movzbl<text:tab/>%al, %eax</text:p>
            <text:p text:style-name="P156"><text:tab/>jmp<text:tab/>.L104</text:p>
            <text:p text:style-name="P156">.L103:</text:p>
            <text:p text:style-name="P156"><text:tab/>xorl<text:tab/>%eax, %eax</text:p>
            <text:p text:style-name="P156">.L104:</text:p>
            <text:p text:style-name="P156"><text:tab/>cmpl<text:tab/>$0, %eax</text:p>
            <text:p text:style-name="P156"><text:tab/>je<text:tab/>.L105</text:p>
            <text:p text:style-name="P156"><text:tab/>movq <text:s text:c="3"/>i5@GOTPCREL(%rip), %r10</text:p>
            <text:p text:style-name="P156"><text:tab/>movl<text:tab/>$3, %eax</text:p>
            <text:p text:style-name="P156"><text:tab/>movl<text:tab/>%eax, 0(%r10)</text:p>
            <text:p text:style-name="P156"><text:tab/>leaq<text:tab/>__stringlit_1(%rip), %rdi</text:p>
            <text:p text:style-name="P156"><text:tab/>movq <text:s text:c="3"/>i5@GOTPCREL(%rip), %rdx</text:p>
            <text:p text:style-name="P156"><text:tab/>movl<text:tab/>0(%rdx), %esi</text:p>
            <text:p text:style-name="P156"><text:tab/>movl<text:tab/>$0, %eax</text:p>
            <text:p text:style-name="P156"><text:tab/>call<text:tab/>printf@PLT</text:p>
            <text:p text:style-name="P156">.L105:</text:p>
            <text:p text:style-name="P156"/>
          </table:table-cell>
          <table:table-cell table:style-name="Таблица2.A1" office:value-type="string">
            <text:p text:style-name="P177"><text:span text:style-name="T34"><text:tab/></text:span>j4 = 2;</text:p>
            <text:p text:style-name="P177"><text:tab/>printf("%d", j4);</text:p>
            <text:p text:style-name="P177"><text:tab/>if (i2 &lt; j4 &amp;&amp; i4 &lt; j4) {</text:p>
            <text:p text:style-name="P177"><text:tab/><text:tab/>i2 = 2;</text:p>
            <text:p text:style-name="P177"><text:tab/><text:tab/>printf("%d", i2);</text:p>
            <text:p text:style-name="P177"><text:tab/>}</text:p>
            <text:p text:style-name="P177"><text:tab/>j4 = k5;</text:p>
            <text:p text:style-name="P177"><text:tab/>printf("%d", j4);</text:p>
            <text:p text:style-name="P177"><text:tab/>if (i2 &lt; j4 &amp;&amp; i4 &lt; j4) {</text:p>
            <text:p text:style-name="P177"><text:tab/><text:tab/>i5 = 3;</text:p>
            <text:p text:style-name="P177"><text:tab/><text:tab/>printf("%d", i5);</text:p>
            <text:p text:style-name="P90"><text:tab/>}</text:p>
          </table:table-cell>
        </table:table-row>
      </table:table>
      <table:table table:name="Таблица53" table:style-name="Таблица53">
        <table:table-column table:style-name="Таблица53.A"/>
        <table:table-column table:style-name="Таблица53.B"/>
        <table:table-row table:style-name="Таблица53.1">
          <table:table-cell table:style-name="Таблица53.A1" office:value-type="string">
            <text:p text:style-name="P156"><text:tab/>movq <text:s text:c="3"/>j4@GOTPCREL(%rip), %rsi</text:p>
            <text:p text:style-name="P156"><text:tab/>movl<text:tab/>$2, %r8d</text:p>
            <text:p text:style-name="P156"><text:tab/>movl<text:tab/>%r8d, 0(%rsi)</text:p>
            <text:p text:style-name="P156"><text:tab/>leaq<text:tab/>__stringlit_1(%rip), %rdi</text:p>
            <text:p text:style-name="P156"><text:tab/>movq <text:s text:c="3"/>j4@GOTPCREL(%rip), %rdx</text:p>
            <text:p text:style-name="P156"><text:tab/>movl<text:tab/>0(%rdx), %esi</text:p>
            <text:p text:style-name="P156"><text:tab/>movl<text:tab/>$0, %eax</text:p>
            <text:p text:style-name="P156"><text:tab/>call<text:tab/>printf@PLT</text:p>
            <text:p text:style-name="P156"><text:tab/>movq <text:s text:c="3"/>i2@GOTPCREL(%rip), %rax</text:p>
            <text:p text:style-name="P156"><text:tab/>movl<text:tab/>0(%rax), %esi</text:p>
            <text:p text:style-name="P156"><text:tab/>movq <text:s text:c="3"/>j4@GOTPCREL(%rip), %rax</text:p>
            <text:p text:style-name="P156"><text:tab/>movl<text:tab/>0(%rax), %r10d</text:p>
            <text:p text:style-name="P156"><text:tab/>cmpl<text:tab/>%r10d, %esi</text:p>
            <text:p text:style-name="P156"><text:tab/>jge<text:tab/>.L100</text:p>
            <text:p text:style-name="P156"><text:tab/>movq <text:s text:c="3"/>i4@GOTPCREL(%rip), %rax</text:p>
            <text:p text:style-name="P156"><text:tab/>movl<text:tab/>0(%rax), %ecx</text:p>
            <text:p text:style-name="P156"><text:tab/>movq <text:s text:c="3"/>j4@GOTPCREL(%rip), %r9</text:p>
            <text:p text:style-name="P156"><text:tab/>movl<text:tab/>0(%r9), %esi</text:p>
            <text:p text:style-name="P156"><text:tab/>cmpl<text:tab/>%esi, %ecx</text:p>
            <text:p text:style-name="P156"><text:tab/>setl<text:tab/>%al</text:p>
            <text:p text:style-name="P156"><text:tab/><text:span text:style-name="T15">movzbl<text:tab/>%al, %eax</text:span></text:p>
            <text:p text:style-name="P156"><text:tab/>jmp<text:tab/>.L101</text:p>
            <text:p text:style-name="P156">.L100:</text:p>
            <text:p text:style-name="P156"><text:tab/>xorl<text:tab/>%eax, %eax</text:p>
            <text:p text:style-name="P156">.L101:</text:p>
            <text:p text:style-name="P156"><text:tab/>cmpl<text:tab/>$0, %eax</text:p>
            <text:p text:style-name="P156"><text:tab/>je<text:tab/>.L102</text:p>
            <text:p text:style-name="P156"><text:tab/>movq <text:s text:c="3"/>i2@GOTPCREL(%rip), %rsi</text:p>
            <text:p text:style-name="P156"><text:tab/>movl<text:tab/>$2, %ecx</text:p>
            <text:p text:style-name="P156"><text:tab/>movl<text:tab/>%ecx, 0(%rsi)</text:p>
            <text:p text:style-name="P156"><text:tab/>leaq<text:tab/>__stringlit_1(%rip), %rdi</text:p>
            <text:p text:style-name="P156"><text:tab/>movq <text:s text:c="3"/>i2@GOTPCREL(%rip), %r9</text:p>
            <text:p text:style-name="P156"><text:tab/><text:span text:style-name="T38">movl<text:tab/>0(%r9), %esi</text:span></text:p>
            <text:p text:style-name="P156"><text:tab/>movl<text:tab/>$0, %eax</text:p>
            <text:p text:style-name="P156"><text:tab/>call<text:tab/>printf@PLT</text:p>
            <text:p text:style-name="P156">.L102:</text:p>
            <text:p text:style-name="P156"><text:tab/>movq <text:s text:c="3"/>j4@GOTPCREL(%rip), %rsi</text:p>
            <text:p text:style-name="P156"><text:tab/>movq <text:s text:c="3"/>k5@GOTPCREL(%rip), %r8</text:p>
            <text:p text:style-name="P156"><text:tab/>movl<text:tab/>0(%r8), %r9d</text:p>
            <text:p text:style-name="P156"><text:tab/>movl<text:tab/>%r9d, 0(%rsi)</text:p>
            <text:p text:style-name="P156"><text:tab/>leaq<text:tab/>__stringlit_1(%rip), %rdi</text:p>
            <text:p text:style-name="P156"><text:tab/>movq <text:s text:c="3"/>j4@GOTPCREL(%rip), %rcx</text:p>
            <text:p text:style-name="P156"><text:tab/>movl<text:tab/>0(%rcx), %esi</text:p>
            <text:p text:style-name="P156"><text:tab/>movl<text:tab/>$0, %eax</text:p>
            <text:p text:style-name="P156"><text:tab/>call<text:tab/>printf@PLT</text:p>
            <text:p text:style-name="P156"><text:tab/>movq <text:s text:c="3"/>i2@GOTPCREL(%rip), %rax</text:p>
            <text:p text:style-name="P156"><text:tab/>movl<text:tab/>0(%rax), %eax</text:p>
            <text:p text:style-name="P156"><text:tab/>movq <text:s text:c="3"/>j4@GOTPCREL(%rip), %rdi</text:p>
            <text:p text:style-name="P156"><text:tab/>movl<text:tab/>0(%rdi), %edi</text:p>
            <text:p text:style-name="P156"><text:tab/>cmpl<text:tab/>%edi, %eax</text:p>
            <text:p text:style-name="P156"><text:tab/>jge<text:tab/>.L103</text:p>
            <text:p text:style-name="P156"><text:tab/>movq <text:s text:c="3"/>i4@GOTPCREL(%rip), %rax</text:p>
            <text:p text:style-name="P156"><text:tab/>movl<text:tab/>0(%rax), %r11d</text:p>
            <text:p text:style-name="P156"><text:tab/>movq <text:s text:c="3"/>j4@GOTPCREL(%rip), %rax</text:p>
            <text:p text:style-name="P156"><text:tab/>movl<text:tab/>0(%rax), %ecx</text:p>
            <text:p text:style-name="P156"><text:tab/>cmpl<text:tab/>%ecx, %r11d</text:p>
            <text:p text:style-name="P156"><text:tab/>setl<text:tab/>%al</text:p>
            <text:p text:style-name="P156"><text:tab/>movzbl<text:tab/>%al, %eax</text:p>
            <text:p text:style-name="P156"><text:tab/>jmp<text:tab/>.L104</text:p>
            <text:p text:style-name="P156">.L103:</text:p>
            <text:p text:style-name="P156"><text:tab/>xorl<text:tab/>%eax, %eax</text:p>
            <text:p text:style-name="P156">.L104:</text:p>
            <text:p text:style-name="P156"><text:tab/>cmpl<text:tab/>$0, %eax</text:p>
            <text:p text:style-name="P156"><text:soft-page-break/><text:tab/>je<text:tab/>.L105</text:p>
            <text:p text:style-name="P156"><text:tab/>movq <text:s text:c="3"/>i5@GOTPCREL(%rip), %r10</text:p>
            <text:p text:style-name="P156"><text:tab/>movl<text:tab/>$3, %eax</text:p>
            <text:p text:style-name="P156"><text:tab/>movl<text:tab/>%eax, 0(%r10)</text:p>
            <text:p text:style-name="P156"><text:tab/>leaq<text:tab/>__stringlit_1(%rip), %rdi</text:p>
            <text:p text:style-name="P156"><text:tab/>movq <text:s text:c="3"/>i5@GOTPCREL(%rip), %rdx</text:p>
            <text:p text:style-name="P156"><text:tab/>movl<text:tab/>0(%rdx), %esi</text:p>
            <text:p text:style-name="P156"><text:tab/>movl<text:tab/>$0, %eax</text:p>
            <text:p text:style-name="P156"><text:tab/>call<text:tab/>printf@PLT</text:p>
            <text:p text:style-name="P156">.L105:</text:p>
          </table:table-cell>
          <table:table-cell table:style-name="Таблица53.A1" office:value-type="string">
            <text:p text:style-name="P138"><text:tab/>movq<text:tab/>%rax, 0(%rsp)</text:p>
            <text:p text:style-name="P138"><text:tab/>movq <text:s text:c="3"/>j4@GOTPCREL(%rip), %rdx</text:p>
            <text:p text:style-name="P138"><text:tab/>movl<text:tab/>$2, %edi</text:p>
            <text:p text:style-name="P138"><text:tab/>movl<text:tab/>%edi, 0(%rdx)</text:p>
            <text:p text:style-name="P138"><text:tab/>leaq<text:tab/>__stringlit_1(%rip), %rdi</text:p>
            <text:p text:style-name="P138"><text:tab/>movl<text:tab/>$2, %esi</text:p>
            <text:p text:style-name="P138"><text:tab/>movl<text:tab/>$0, %eax</text:p>
            <text:p text:style-name="P138"><text:tab/>call<text:tab/>printf@PLT</text:p>
            <text:p text:style-name="P138"><text:tab/>movq <text:s text:c="3"/>i2@GOTPCREL(%rip), %r10</text:p>
            <text:p text:style-name="P138"><text:tab/>movl<text:tab/>0(%r10), %esi</text:p>
            <text:p text:style-name="P138"><text:tab/>movq <text:s text:c="3"/>j4@GOTPCREL(%rip), %r8</text:p>
            <text:p text:style-name="P138"><text:tab/>movl<text:tab/>0(%r8), %eax</text:p>
            <text:p text:style-name="P138"><text:tab/>cmpl<text:tab/>%eax, %esi</text:p>
            <text:p text:style-name="P138"><text:tab/>jge<text:tab/>.L100</text:p>
            <text:p text:style-name="P138"><text:tab/>movq <text:s text:c="3"/>i4@GOTPCREL(%rip), %rcx</text:p>
            <text:p text:style-name="P138"><text:tab/>movl<text:tab/>0(%rcx), %r8d</text:p>
            <text:p text:style-name="P138"><text:tab/>cmpl<text:tab/>%eax, %r8d</text:p>
            <text:p text:style-name="P138"><text:tab/>jge<text:tab/>.L100</text:p>
            <text:p text:style-name="P138"><text:tab/>movl<text:tab/>$2, %edx</text:p>
            <text:p text:style-name="P138"><text:tab/>movl<text:tab/>%edx, 0(%r10)</text:p>
            <text:p text:style-name="P138"><text:tab/>leaq<text:tab/>__stringlit_1(%rip), %rdi</text:p>
            <text:p text:style-name="P138"><text:tab/><text:span text:style-name="T38">movl<text:tab/>$2, %esi</text:span></text:p>
            <text:p text:style-name="P138"><text:tab/>movl<text:tab/>$0, %eax</text:p>
            <text:p text:style-name="P138"><text:tab/>call<text:tab/>printf@PLT</text:p>
            <text:p text:style-name="P138">.L100:</text:p>
            <text:p text:style-name="P138"><text:tab/>movq <text:s text:c="3"/>j4@GOTPCREL(%rip), %r10</text:p>
            <text:p text:style-name="P138"><text:tab/>movq <text:s text:c="3"/>k5@GOTPCREL(%rip), %rax</text:p>
            <text:p text:style-name="P138"><text:tab/>movl<text:tab/>0(%rax), %esi</text:p>
            <text:p text:style-name="P138"><text:tab/>movl<text:tab/>%esi, 0(%r10)</text:p>
            <text:p text:style-name="P138"><text:tab/>leaq<text:tab/>__stringlit_1(%rip), %rdi</text:p>
            <text:p text:style-name="P138"><text:tab/>movl<text:tab/>$0, %eax</text:p>
            <text:p text:style-name="P138"><text:tab/>call<text:tab/>printf@PLT</text:p>
            <text:p text:style-name="P138"><text:tab/>movq <text:s text:c="3"/>i2@GOTPCREL(%rip), %rax</text:p>
            <text:p text:style-name="P138"><text:tab/>movl<text:tab/>0(%rax), %edx</text:p>
            <text:p text:style-name="P138"><text:tab/>movq <text:s text:c="3"/>j4@GOTPCREL(%rip), %rcx</text:p>
            <text:p text:style-name="P138"><text:tab/>movl<text:tab/>0(%rcx), %r8d</text:p>
            <text:p text:style-name="P138"><text:tab/>cmpl<text:tab/>%r8d, %edx</text:p>
            <text:p text:style-name="P138"><text:tab/>jge<text:tab/>.L101</text:p>
            <text:p text:style-name="P138"><text:tab/>movq <text:s text:c="3"/>i4@GOTPCREL(%rip), %rax</text:p>
            <text:p text:style-name="P138"><text:tab/>movl<text:tab/>0(%rax), %r11d</text:p>
            <text:p text:style-name="P138"><text:tab/>cmpl<text:tab/>%r8d, %r11d</text:p>
            <text:p text:style-name="P138"><text:tab/>jge<text:tab/>.L101</text:p>
            <text:p text:style-name="P138"><text:tab/>movq <text:s text:c="3"/>i5@GOTPCREL(%rip), %r11</text:p>
            <text:p text:style-name="P138"><text:tab/>movl<text:tab/>$3, %r9d</text:p>
            <text:p text:style-name="P138"><text:tab/>movl<text:tab/>%r9d, 0(%r11)</text:p>
            <text:p text:style-name="P138"><text:tab/>leaq<text:tab/>__stringlit_1(%rip), %rdi</text:p>
            <text:p text:style-name="P138"><text:tab/>movl<text:tab/>$3, %esi</text:p>
            <text:p text:style-name="P138"><text:tab/>movl<text:tab/>$0, %eax</text:p>
            <text:p text:style-name="P138"><text:tab/>call<text:tab/>printf@PLT</text:p>
            <text:p text:style-name="P138">.L101:</text:p>
          </table:table-cell>
        </table:table-row>
      </table:table>
      <text:p text:style-name="P94"><text:span text:style-name="T20"/></text:p>
      <text:p text:style-name="P9">При оптимизации по скорости <text:span text:style-name="T49">происходит</text:span> оптимизаци<text:span text:style-name="T49">я</text:span> размножения <text:span text:style-name="T3">копий</text:span></text:p>
      <table:table table:name="Таблица54" table:style-name="Таблица54">
        <table:table-column table:style-name="Таблица54.A"/>
        <table:table-column table:style-name="Таблица54.B"/>
        <table:table-row table:style-name="Таблица54.1">
          <table:table-cell table:style-name="Таблица54.A1" office:value-type="string">
            <text:p text:style-name="P167"><text:tab/>movq <text:s text:c="3"/>i3@GOTPCREL(%rip), %r9</text:p>
            <text:p text:style-name="P167"><text:tab/>movl<text:tab/>$3, %r10d</text:p>
            <text:p text:style-name="P167"><text:tab/>movl<text:tab/>%r10d, 0(%r9)</text:p>
            <text:p text:style-name="P167"><text:tab/>movq <text:s text:c="3"/>flt_1@GOTPCREL(%rip), %rdi</text:p>
            <text:p text:style-name="P167"><text:tab/><text:span text:style-name="T37">movsd<text:tab/>.L106(%rip), %xmm1 </text:span></text:p>
            <text:p text:style-name="P167"><text:tab/><text:span text:style-name="T37">movsd<text:tab/>.L107(%rip), %xmm2</text:span></text:p>
            <text:p text:style-name="P167"><text:tab/><text:span text:style-name="T37">addsd<text:tab/>%xmm2, %xmm1</text:span></text:p>
            <text:p text:style-name="P167"><text:tab/>movsd<text:tab/>%xmm1, 0(%rdi)</text:p>
            <text:p text:style-name="P167"><text:tab/>movq <text:s text:c="3"/>i2@GOTPCREL(%rip), %rsi</text:p>
            <text:p text:style-name="P167"><text:tab/>movl<text:tab/>$5, %edx</text:p>
            <text:p text:style-name="P167"><text:tab/>movl<text:tab/>%edx, 0(%rsi)</text:p>
            <text:p text:style-name="P167"><text:tab/>movq <text:s text:c="3"/>j2@GOTPCREL(%rip), %r9</text:p>
            <text:p text:style-name="P167"><text:tab/>movq <text:s text:c="3"/>i@GOTPCREL(%rip), %r8</text:p>
            <text:p text:style-name="P167"><text:tab/>movl<text:tab/>0(%r8), %ecx</text:p>
            <text:p text:style-name="P167"><text:tab/>movl<text:tab/>%ecx, 0(%r9)</text:p>
            <text:p text:style-name="P167"><text:tab/>movq <text:s text:c="3"/>k2@GOTPCREL(%rip), %rax</text:p>
            <text:p text:style-name="P167"><text:tab/>movq <text:s text:c="3"/>i@GOTPCREL(%rip), %r10</text:p>
            <text:p text:style-name="P167"><text:tab/>movl<text:tab/>0(%r10), %r10d</text:p>
            <text:p text:style-name="P167"><text:tab/>movl<text:tab/>%r10d, 0(%rax)</text:p>
            <text:p text:style-name="P167"><text:tab/>movq <text:s text:c="3"/>i4@GOTPCREL(%rip), %rax</text:p>
            <text:p text:style-name="P167"><text:tab/>movq <text:s text:c="3"/>i@GOTPCREL(%rip), %rdi</text:p>
            <text:p text:style-name="P167"><text:tab/>movl<text:tab/>0(%rdi), %edi</text:p>
            <text:p text:style-name="P167"><text:tab/>movl<text:tab/>%edi, 0(%rax)</text:p>
            <text:p text:style-name="P167"><text:tab/>movq <text:s text:c="3"/>i5@GOTPCREL(%rip), %r11</text:p>
            <text:p text:style-name="P167"><text:tab/>xorl<text:tab/>%r9d, %r9d</text:p>
            <text:p text:style-name="P167"><text:tab/>movl<text:tab/>%r9d, 0(%r11)</text:p>
            <text:p text:style-name="P167"><text:tab/>leaq<text:tab/>__stringlit_2(%rip), %rdi</text:p>
            <text:p text:style-name="P167"><text:tab/>movl<text:tab/>$0, %eax</text:p>
            <text:p text:style-name="P167"><text:tab/>call<text:tab/>printf@PLT</text:p>
            <text:p text:style-name="P167"><text:tab/>movq <text:s text:c="3"/>flt_3@GOTPCREL(%rip), %r8</text:p>
            <text:p text:style-name="P167"><text:tab/>movsd<text:tab/>.L106(%rip), %xmm4</text:p>
            <text:p text:style-name="P167"><text:tab/>movsd<text:tab/>.L108(%rip), %xmm5 # 1</text:p>
            <text:p text:style-name="P167"><text:tab/>mulsd<text:tab/>%xmm5, %xmm4</text:p>
            <text:p text:style-name="P167"><text:tab/>movsd<text:tab/>%xmm4, 0(%r8)</text:p>
            <text:p text:style-name="P167"><text:tab/>movq <text:s text:c="3"/>flt_4@GOTPCREL(%rip), %rdi</text:p>
            <text:p text:style-name="P167"><text:tab/>movsd<text:tab/>.L108(%rip), %xmm2 # 1</text:p>
            <text:p text:style-name="P167"><text:tab/>movsd<text:tab/>.L109(%rip), %xmm4</text:p>
            <text:p text:style-name="P167"><text:tab/>addsd<text:tab/>%xmm4, %xmm2</text:p>
            <text:p text:style-name="P167"><text:tab/>movsd<text:tab/>%xmm2, 0(%rdi)</text:p>
            <text:p text:style-name="P167"><text:tab/>movq <text:s text:c="3"/>flt_5@GOTPCREL(%rip), %rcx</text:p>
            <text:p text:style-name="P167"><text:tab/>movq <text:s text:c="3"/>flt_6@GOTPCREL(%rip), %rdx</text:p>
            <text:p text:style-name="P167"><text:tab/>movsd<text:tab/>0(%rdx), %xmm0</text:p>
            <text:p text:style-name="P167"><text:tab/>xorpd<text:tab/>%xmm15, %xmm15</text:p>
            <text:p text:style-name="P167"><text:tab/>mulsd<text:tab/>%xmm15, %xmm0</text:p>
            <text:p text:style-name="P167"><text:tab/>movsd<text:tab/>%xmm0, 0(%rcx)</text:p>
            <text:p text:style-name="P167"><text:tab/>movq <text:s text:c="3"/>flt_6@GOTPCREL(%rip), %r11</text:p>
            <text:p text:style-name="P167"><text:tab/>movq <text:s text:c="3"/>flt_2@GOTPCREL(%rip), %rcx</text:p>
            <text:p text:style-name="P167"><text:tab/>movsd<text:tab/>0(%rcx), %xmm3</text:p>
            <text:p text:style-name="P167"><text:tab/>movq <text:s text:c="3"/>flt_3@GOTPCREL(%rip), %rsi</text:p>
            <text:p text:style-name="P167"><text:tab/>movsd<text:tab/>0(%rsi), %xmm4</text:p>
            <text:p text:style-name="P167"><text:tab/>mulsd<text:tab/>%xmm4, %xmm3</text:p>
            <text:p text:style-name="P167"><text:tab/>movsd<text:tab/>%xmm3, 0(%r11)</text:p>
            <text:p text:style-name="P167"><text:tab/></text:p>
          </table:table-cell>
          <table:table-cell table:style-name="Таблица54.A1" office:value-type="string">
            <text:p text:style-name="P185"><text:tab/>I3 = 1 + 2;</text:p>
            <text:p text:style-name="P185"><text:tab/>flt_1 = 2.4 + 6.3;</text:p>
            <text:p text:style-name="P185"><text:tab/>i2 = 5;</text:p>
            <text:p text:style-name="P185"><text:tab/>j2 = i + 0;</text:p>
            <text:p text:style-name="P185"><text:tab/>k2 = i / 1;</text:p>
            <text:p text:style-name="P185"><text:tab/>i4 = i * 1;</text:p>
            <text:p text:style-name="P185"><text:tab/>i5 = i * 0;</text:p>
            <text:p text:style-name="P185"><text:tab/>printf("This compiler handles divide-by-zero as \</text:p>
            <text:p text:style-name="P185"><text:s text:c="20"/>an error\n");</text:p>
            <text:p text:style-name="P185"><text:tab/>flt_3 = 2.4 / 1.0;</text:p>
            <text:p text:style-name="P185"><text:tab/>flt_4 = 1.0 + 0.0000001;</text:p>
            <text:p text:style-name="P185"><text:tab/>flt_5 = flt_6 * 0.0;</text:p>
            <text:p text:style-name="P185"><text:tab/>flt_6 = flt_2 * flt_3;</text:p>
          </table:table-cell>
        </table:table-row>
      </table:table>
      <text:p text:style-name="P85"/>
      <text:p text:style-name="P9">Без оптимизации <text:span text:style-name="T50">произошла</text:span> свёртка <text:span text:style-name="T50">целой </text:span>констант<text:span text:style-name="T50">ы, не целую не свернуло</text:span>, <text:span text:style-name="T51">А</text:span>рифметические тождества оптимизируются <text:span text:style-name="T51">частично</text:span></text:p>
      <table:table table:name="Таблица55" table:style-name="Таблица55">
        <table:table-column table:style-name="Таблица55.A"/>
        <table:table-column table:style-name="Таблица55.B"/>
        <table:table-row table:style-name="Таблица55.1">
          <table:table-cell table:style-name="Таблица55.A1" office:value-type="string">
            <text:p text:style-name="P168"><text:tab/>movq <text:s text:c="3"/>i3@GOTPCREL(%rip), %r9</text:p>
            <text:p text:style-name="P168"><text:tab/>movl<text:tab/>$3, %r10d</text:p>
            <text:p text:style-name="P168"><text:tab/>movl<text:tab/>%r10d, 0(%r9)</text:p>
            <text:p text:style-name="P168"><text:tab/>movq <text:s text:c="3"/>flt_1@GOTPCREL(%rip), %rdi</text:p>
            <text:p text:style-name="P168"><text:tab/><text:span text:style-name="T37">movsd<text:tab/>.L106(%rip), %xmm1 </text:span></text:p>
            <text:p text:style-name="P168"><text:tab/><text:span text:style-name="T37">movsd<text:tab/>.L107(%rip), %xmm2</text:span></text:p>
            <text:p text:style-name="P168"><text:tab/><text:span text:style-name="T37">addsd<text:tab/>%xmm2, %xmm1</text:span></text:p>
            <text:p text:style-name="P168"><text:tab/>movsd<text:tab/>%xmm1, 0(%rdi)</text:p>
            <text:p text:style-name="P168"><text:tab/>movq <text:s text:c="3"/>i2@GOTPCREL(%rip), %rsi</text:p>
            <text:p text:style-name="P168"><text:tab/>movl<text:tab/>$5, %edx</text:p>
            <text:p text:style-name="P168"><text:tab/>movl<text:tab/>%edx, 0(%rsi)</text:p>
            <text:p text:style-name="P168"><text:tab/>movq <text:s text:c="3"/>j2@GOTPCREL(%rip), %r9</text:p>
            <text:p text:style-name="P168"><text:tab/><text:span text:style-name="T40">movq <text:s text:c="3"/>i@GOTPCREL(%rip), %r8</text:span></text:p>
            <text:p text:style-name="P168"><text:tab/>movl<text:tab/>0(%r8), %ecx</text:p>
            <text:p text:style-name="P168"><text:tab/>movl<text:tab/>%ecx, 0(%r9)</text:p>
            <text:p text:style-name="P168"><text:tab/>movq <text:s text:c="3"/>k2@GOTPCREL(%rip), %rax</text:p>
            <text:p text:style-name="P168"><text:tab/><text:span text:style-name="T40">movq <text:s text:c="3"/>i@GOTPCREL(%rip), %r10</text:span></text:p>
            <text:p text:style-name="P168"><text:tab/>movl<text:tab/>0(%r10), %r10d</text:p>
            <text:p text:style-name="P168"><text:tab/>movl<text:tab/>%r10d, 0(%rax)</text:p>
            <text:p text:style-name="P168"><text:tab/>movq <text:s text:c="3"/>i4@GOTPCREL(%rip), %rax</text:p>
            <text:p text:style-name="P168"><text:tab/><text:span text:style-name="T40">movq <text:s text:c="3"/>i@GOTPCREL(%rip), %rdi</text:span></text:p>
            <text:p text:style-name="P168"><text:tab/>movl<text:tab/>0(%rdi), %edi</text:p>
            <text:p text:style-name="P168"><text:tab/>movl<text:tab/>%edi, 0(%rax)</text:p>
            <text:p text:style-name="P168"><text:tab/>movq <text:s text:c="3"/>i5@GOTPCREL(%rip), %r11</text:p>
            <text:p text:style-name="P168"><text:tab/>xorl<text:tab/>%r9d, %r9d</text:p>
            <text:p text:style-name="P168"><text:tab/>movl<text:tab/>%r9d, 0(%r11)</text:p>
            <text:p text:style-name="P168"><text:tab/>leaq<text:tab/>__stringlit_2(%rip), %rdi</text:p>
            <text:p text:style-name="P168"><text:tab/>movl<text:tab/>$0, %eax</text:p>
            <text:p text:style-name="P168"><text:tab/>call<text:tab/>printf@PLT</text:p>
            <text:p text:style-name="P168"><text:tab/>movq <text:s text:c="3"/>flt_3@GOTPCREL(%rip), %r8</text:p>
            <text:p text:style-name="P168"><text:tab/>movsd<text:tab/>.L106(%rip), %xmm4</text:p>
            <text:p text:style-name="P168"><text:tab/>movsd<text:tab/>.L108(%rip), %xmm5 # 1</text:p>
            <text:p text:style-name="P168"><text:tab/>mulsd<text:tab/>%xmm5, %xmm4</text:p>
            <text:p text:style-name="P168"><text:tab/>movsd<text:tab/>%xmm4, 0(%r8)</text:p>
            <text:p text:style-name="P168"><text:tab/>movq <text:s text:c="3"/>flt_4@GOTPCREL(%rip), %rdi</text:p>
            <text:p text:style-name="P168"><text:tab/>movsd<text:tab/>.L108(%rip), %xmm2 # 1</text:p>
            <text:p text:style-name="P168"><text:tab/>movsd<text:tab/>.L109(%rip), %xmm4</text:p>
            <text:p text:style-name="P168"><text:tab/>addsd<text:tab/>%xmm4, %xmm2</text:p>
            <text:p text:style-name="P168"><text:tab/>movsd<text:tab/>%xmm2, 0(%rdi)</text:p>
            <text:p text:style-name="P168"><text:tab/>movq <text:s text:c="3"/>flt_5@GOTPCREL(%rip), %rcx</text:p>
            <text:p text:style-name="P168"><text:tab/>movq <text:s text:c="3"/>flt_6@GOTPCREL(%rip), %rdx</text:p>
            <text:p text:style-name="P168"><text:tab/>movsd<text:tab/>0(%rdx), %xmm0</text:p>
            <text:p text:style-name="P168"><text:tab/>xorpd<text:tab/>%xmm15, %xmm15</text:p>
            <text:p text:style-name="P168"><text:tab/>mulsd<text:tab/>%xmm15, %xmm0</text:p>
            <text:p text:style-name="P168"><text:tab/>movsd<text:tab/>%xmm0, 0(%rcx)</text:p>
            <text:p text:style-name="P168"><text:tab/>movq <text:s text:c="3"/>flt_6@GOTPCREL(%rip), %r11</text:p>
            <text:p text:style-name="P168"><text:tab/>movq <text:s text:c="3"/>flt_2@GOTPCREL(%rip), %rcx</text:p>
            <text:p text:style-name="P168"><text:tab/>movsd<text:tab/>0(%rcx), %xmm3</text:p>
            <text:p text:style-name="P168"><text:tab/>movq <text:s text:c="3"/>flt_3@GOTPCREL(%rip), %rsi</text:p>
            <text:p text:style-name="P168"><text:tab/>movsd<text:tab/>0(%rsi), %xmm4</text:p>
            <text:p text:style-name="P168"><text:tab/>mulsd<text:tab/>%xmm4, %xmm3</text:p>
            <text:p text:style-name="P168"><text:tab/>movsd<text:tab/>%xmm3, 0(%r11)</text:p>
            <text:p text:style-name="P168"><text:tab/></text:p>
          </table:table-cell>
          <table:table-cell table:style-name="Таблица55.A1" office:value-type="string">
            <text:p text:style-name="P139"><text:tab/>movq <text:s text:c="3"/>i3@GOTPCREL(%rip), %rax</text:p>
            <text:p text:style-name="P138"><text:tab/>movl<text:tab/>$3, %r8d</text:p>
            <text:p text:style-name="P138"><text:tab/>movl<text:tab/>%r8d, 0(%rax)</text:p>
            <text:p text:style-name="P138"><text:tab/>movq <text:s text:c="3"/>flt_1@GOTPCREL(%rip), %r10</text:p>
            <text:p text:style-name="P138"><text:tab/>movsd<text:tab/>.L102(%rip), %xmm0</text:p>
            <text:p text:style-name="P138"><text:tab/>movsd<text:tab/>%xmm0, 0(%r10)</text:p>
            <text:p text:style-name="P138"><text:tab/>movq <text:s text:c="3"/>i2@GOTPCREL(%rip), %r8</text:p>
            <text:p text:style-name="P138"><text:tab/>movl<text:tab/>$5, %esi</text:p>
            <text:p text:style-name="P138"><text:tab/>movl<text:tab/>%esi, 0(%r8)</text:p>
            <text:p text:style-name="P138"><text:tab/>movq <text:s text:c="3"/>j2@GOTPCREL(%rip), %r9</text:p>
            <text:p text:style-name="P138"><text:tab/>movq <text:s text:c="3"/><text:span text:style-name="T41">i@GOTPCREL(%rip), %r8</text:span></text:p>
            <text:p text:style-name="P138"><text:tab/>movl<text:tab/><text:span text:style-name="T41">0(%r8), %esi</text:span></text:p>
            <text:p text:style-name="P138"><text:tab/>movl<text:tab/><text:span text:style-name="T41">%esi, 0(%r9)</text:span></text:p>
            <text:p text:style-name="P138"><text:tab/>movq <text:s text:c="3"/>k2@GOTPCREL(%rip), %rdi</text:p>
            <text:p text:style-name="P138"><text:tab/>movl<text:tab/><text:span text:style-name="T41">%esi, 0(%rdi)</text:span></text:p>
            <text:p text:style-name="P138"><text:tab/>movq <text:s text:c="3"/>i4@GOTPCREL(%rip), %r10</text:p>
            <text:p text:style-name="P138"><text:tab/>movl<text:tab/><text:span text:style-name="T41">%esi, 0(%r10)</text:span></text:p>
            <text:p text:style-name="P138"><text:tab/>movq <text:s text:c="3"/>i5@GOTPCREL(%rip), %r8</text:p>
            <text:p text:style-name="P138"><text:tab/>xorl<text:tab/>%r9d, %r9d</text:p>
            <text:p text:style-name="P138"><text:tab/>movl<text:tab/>%r9d, 0(%r8)</text:p>
            <text:p text:style-name="P138"><text:tab/>leaq<text:tab/>__stringlit_2(%rip), %rdi</text:p>
            <text:p text:style-name="P138"><text:tab/>movl<text:tab/>$0, %eax</text:p>
            <text:p text:style-name="P138"><text:tab/>call<text:tab/>printf@PLT</text:p>
            <text:p text:style-name="P138"><text:tab/>movq <text:s text:c="3"/>flt_3@GOTPCREL(%rip), %r11</text:p>
            <text:p text:style-name="P138"><text:tab/>movsd<text:tab/>.L103(%rip), %xmm1 </text:p>
            <text:p text:style-name="P138"><text:tab/>movsd<text:tab/>%xmm1, 0(%r11)</text:p>
            <text:p text:style-name="P138"><text:tab/>movq <text:s text:c="3"/>flt_4@GOTPCREL(%rip), %r11</text:p>
            <text:p text:style-name="P138"><text:tab/>movsd<text:tab/>.L104(%rip), %xmm6 </text:p>
            <text:p text:style-name="P138"><text:tab/>movsd<text:tab/>%xmm6, 0(%r11)</text:p>
            <text:p text:style-name="P138"><text:tab/>movq <text:s text:c="3"/>flt_5@GOTPCREL(%rip), %r11</text:p>
            <text:p text:style-name="P138"><text:tab/>movq <text:s text:c="3"/>flt_6@GOTPCREL(%rip), %rcx</text:p>
            <text:p text:style-name="P138"><text:tab/><text:span text:style-name="T38">movsd<text:tab/>0(%rcx), %xmm0</text:span></text:p>
            <text:p text:style-name="P138"><text:tab/><text:span text:style-name="T38">xorpd<text:tab/>%xmm11, %xmm11</text:span></text:p>
            <text:p text:style-name="P138"><text:tab/><text:span text:style-name="T38">mulsd<text:tab/>%xmm11, %xmm0</text:span></text:p>
            <text:p text:style-name="P138"><text:tab/>movsd<text:tab/>%xmm0, 0(%r11)</text:p>
            <text:p text:style-name="P138"><text:tab/>movq <text:s text:c="3"/>flt_2@GOTPCREL(%rip), %rdx</text:p>
            <text:p text:style-name="P138"><text:tab/>movsd<text:tab/>0(%rdx), %xmm2</text:p>
            <text:p text:style-name="P138"><text:tab/>mulsd<text:tab/>%xmm1, %xmm2</text:p>
            <text:p text:style-name="P138"><text:tab/>movsd<text:tab/>%xmm2, 0(%rcx)</text:p>
          </table:table-cell>
        </table:table-row>
      </table:table>
      <text:p text:style-name="P97"/>
      <text:p text:style-name="P11">Свёртка констант выполняется. Оптимизаций арифметических тождеств есть, кроме умножения на 0.0</text:p>
      <text:p text:style-name="P9"/>
      <text:p text:style-name="P10"><text:tab/></text:p>
      <text:p text:style-name="P3"><text:span text:style-name="T52">Можно увидеть</text:span> оптимизаци<text:span text:style-name="T52">ю </text:span>излишних загрузок переменной в регистр.</text:p>
      <text:p text:style-name="P9"/>
      <table:table table:name="Таблица56" table:style-name="Таблица56">
        <table:table-column table:style-name="Таблица56.A"/>
        <table:table-column table:style-name="Таблица56.B"/>
        <table:table-row>
          <table:table-cell table:style-name="Таблица56.A1" office:value-type="string">
            <text:p text:style-name="P120"><text:tab/>movq <text:s text:c="3"/>k3@GOTPCREL(%rip), %rdi</text:p>
            <text:p text:style-name="P120"><text:tab/>movl<text:tab/>$1, %r10d</text:p>
            <text:p text:style-name="P120"><text:tab/>movl<text:tab/>%r10d, 0(%rdi)</text:p>
            <text:p text:style-name="P120"><text:tab/>movq <text:s text:c="3"/>k3@GOTPCREL(%rip), %rcx</text:p>
            <text:p text:style-name="P120"><text:tab/>movl<text:tab/>$1, %eax</text:p>
            <text:p text:style-name="P120"><text:tab/>movl<text:tab/>%eax, 0(%rcx)</text:p>
          </table:table-cell>
          <table:table-cell table:style-name="Таблица56.A1" office:value-type="string">
            <text:p text:style-name="P120"><text:tab/>movq <text:s text:c="3"/>k3@GOTPCREL(%rip), %r9</text:p>
            <text:p text:style-name="P120"><text:tab/>movl<text:tab/>$1, %esi</text:p>
            <text:p text:style-name="P120"><text:tab/>movl<text:tab/>%esi, 0(%r9)</text:p>
          </table:table-cell>
        </table:table-row>
      </table:table>
      <text:p text:style-name="P9"/>
      <text:p text:style-name="P74"><text:span text:style-name="T22">Удаление излишнего присваивания проис</text:span><text:span text:style-name="T17">ходит только с оптимизацией</text:span></text:p>
      <table:table table:name="Таблица57" table:style-name="Таблица57">
        <table:table-column table:style-name="Таблица57.A"/>
        <table:table-column table:style-name="Таблица57.B"/>
        <table:table-row table:style-name="Таблица57.1">
          <table:table-cell table:style-name="Таблица57.A1" office:value-type="string">
            <text:p text:style-name="P157"><text:tab/>movq <text:s text:c="3"/>k2@GOTPCREL(%rip), %rsi</text:p>
            <text:p text:style-name="P157"><text:tab/>movq <text:s text:c="3"/>j5@GOTPCREL(%rip), %rax</text:p>
            <text:p text:style-name="P157"><text:tab/>movl<text:tab/>0(%rax), %edi</text:p>
            <text:p text:style-name="P157"><text:tab/><text:span text:style-name="T38">leal<text:tab/>0(,%edi,4), %eax</text:span></text:p>
            <text:p text:style-name="P157"><text:tab/>movl<text:tab/>%eax, 0(%rsi)</text:p>
            <text:p text:style-name="P157"><text:tab/>movq <text:s text:c="3"/>i@GOTPCREL(%rip), %r9</text:p>
            <text:p text:style-name="P157"><text:tab/>xorl<text:tab/>%r8d, %r8d</text:p>
            <text:p text:style-name="P157"><text:tab/>movl<text:tab/>%r8d, 0(%r9)</text:p>
            <text:p text:style-name="P157">.L110:</text:p>
            <text:p text:style-name="P157"><text:tab/>movq <text:s text:c="3"/>i@GOTPCREL(%rip), %rax</text:p>
            <text:p text:style-name="P157"><text:tab/>movl<text:tab/>0(%rax), %eax</text:p>
            <text:p text:style-name="P157"><text:tab/>cmpl<text:tab/>$5, %eax</text:p>
            <text:p text:style-name="P157"><text:tab/>jg<text:tab/>.L111</text:p>
            <text:p text:style-name="P157"><text:tab/>movq <text:s text:c="3"/>ivector4@GOTPCREL(%rip), %rcx</text:p>
            <text:p text:style-name="P157"><text:tab/>movq <text:s text:c="3"/>i@GOTPCREL(%rip), %rsi</text:p>
            <text:p text:style-name="P157"><text:tab/>movl<text:tab/>0(%rsi), %r9d</text:p>
            <text:p text:style-name="P157"><text:tab/>movslq<text:tab/>%r9d, %r11</text:p>
            <text:p text:style-name="P157"><text:tab/>movq <text:s text:c="3"/>i@GOTPCREL(%rip), %r8</text:p>
            <text:p text:style-name="P157"><text:tab/>movl<text:tab/>0(%r8), %eax</text:p>
            <text:p text:style-name="P157"><text:tab/><text:span text:style-name="T38">leal<text:tab/>0(,%eax,2), %r10d</text:span></text:p>
            <text:p text:style-name="P157"><text:tab/>movswl<text:tab/>%r10w, %r9d</text:p>
            <text:p text:style-name="P157"><text:tab/>movw<text:tab/>%r9w, 0(%rcx,%r11,2)</text:p>
            <text:p text:style-name="P157"><text:tab/>movq <text:s text:c="3"/>i@GOTPCREL(%rip), %r9</text:p>
            <text:p text:style-name="P157"><text:tab/>movq <text:s text:c="3"/>i@GOTPCREL(%rip), %r8</text:p>
            <text:p text:style-name="P157"><text:tab/>movl<text:tab/>0(%r8), %eax</text:p>
            <text:p text:style-name="P157"><text:tab/>leal<text:tab/>1(%eax), %edi</text:p>
            <text:p text:style-name="P157"><text:tab/>movl<text:tab/>%edi, 0(%r9)</text:p>
            <text:p text:style-name="P157"><text:tab/>jmp<text:tab/>.L110</text:p>
            <text:p text:style-name="P157">L111:</text:p>
          </table:table-cell>
          <table:table-cell table:style-name="Таблица57.A1" office:value-type="string">
            <text:p text:style-name="P185"><text:tab/>k2 = 4 * j5;</text:p>
            <text:p text:style-name="P185"><text:tab/>for (i = 0; i &lt;= 5; i++)</text:p>
            <text:p text:style-name="P185"><text:tab/><text:tab/>ivector4[i] = i * 2;</text:p>
          </table:table-cell>
        </table:table-row>
      </table:table>
      <text:p text:style-name="P74"><text:span text:style-name="T17"/></text:p>
      <text:p text:style-name="P41"><text:span text:style-name="T17">С</text:span><text:span text:style-name="T16">нижение мощности </text:span><text:span text:style-name="T19">в отличии от остальных рассмотренных компиляторов не </text:span><text:span text:style-name="T16">происходит без флага оптимизации</text:span><text:span text:style-name="T23">, </text:span><text:span text:style-name="T29">более того даже с флагом оптимизации, умножение не заменяется на сдвиг</text:span></text:p>
      <text:p text:style-name="P41"><text:span text:style-name="T23"/></text:p>
      <table:table table:name="Таблица58" table:style-name="Таблица58">
        <table:table-column table:style-name="Таблица58.A"/>
        <table:table-column table:style-name="Таблица58.B"/>
        <table:table-row>
          <table:table-cell table:style-name="Таблица58.A1" office:value-type="string">
            <text:p text:style-name="P156"><text:tab/>movq <text:s text:c="3"/>k2@GOTPCREL(%rip), %rsi</text:p>
            <text:p text:style-name="P156"><text:tab/>movq <text:s text:c="3"/>j5@GOTPCREL(%rip), %rax</text:p>
            <text:p text:style-name="P156"><text:tab/>movl<text:tab/>0(%rax), %edi</text:p>
            <text:p text:style-name="P156"><text:tab/><text:span text:style-name="T38">leal<text:tab/>0(,%edi,4), %eax</text:span></text:p>
            <text:p text:style-name="P156"><text:tab/>movl<text:tab/>%eax, 0(%rsi)</text:p>
            <text:p text:style-name="P156"><text:tab/>movq <text:s text:c="3"/>i@GOTPCREL(%rip), %r9</text:p>
            <text:p text:style-name="P156"><text:tab/>xorl<text:tab/>%r8d, %r8d</text:p>
            <text:p text:style-name="P156"><text:tab/>movl<text:tab/>%r8d, 0(%r9)</text:p>
            <text:p text:style-name="P156">.L110:</text:p>
            <text:p text:style-name="P156"><text:tab/>movq <text:s text:c="3"/>i@GOTPCREL(%rip), %rax</text:p>
            <text:p text:style-name="P156"><text:tab/>movl<text:tab/>0(%rax), %eax</text:p>
            <text:p text:style-name="P156"><text:tab/>cmpl<text:tab/>$5, %eax</text:p>
            <text:p text:style-name="P156"><text:tab/>jg<text:tab/>.L111</text:p>
            <text:p text:style-name="P156"><text:tab/>movq <text:s text:c="3"/>ivector4@GOTPCREL(%rip), %rcx</text:p>
            <text:p text:style-name="P156"><text:tab/>movq <text:s text:c="3"/>i@GOTPCREL(%rip), %rsi</text:p>
            <text:p text:style-name="P156"><text:tab/>movl<text:tab/>0(%rsi), %r9d</text:p>
            <text:p text:style-name="P156"><text:tab/>movslq<text:tab/>%r9d, %r11</text:p>
            <text:p text:style-name="P156"><text:tab/>movq <text:s text:c="3"/>i@GOTPCREL(%rip), %r8</text:p>
            <text:p text:style-name="P156"><text:tab/>movl<text:tab/>0(%r8), %eax</text:p>
            <text:p text:style-name="P156"><text:tab/><text:span text:style-name="T38">leal<text:tab/>0(,%eax,2), %r10d</text:span></text:p>
            <text:p text:style-name="P156"><text:tab/>movswl<text:tab/>%r10w, %r9d</text:p>
            <text:p text:style-name="P156"><text:tab/>movw<text:tab/>%r9w, 0(%rcx,%r11,2)</text:p>
            <text:p text:style-name="P156"><text:tab/>movq <text:s text:c="3"/>i@GOTPCREL(%rip), %r9</text:p>
            <text:p text:style-name="P156"><text:tab/>movq <text:s text:c="3"/>i@GOTPCREL(%rip), %r8</text:p>
            <text:p text:style-name="P156"><text:tab/>movl<text:tab/>0(%r8), %eax</text:p>
            <text:p text:style-name="P156"><text:tab/>leal<text:tab/>1(%eax), %edi</text:p>
            <text:p text:style-name="P156"><text:tab/>movl<text:tab/>%edi, 0(%r9)</text:p>
            <text:p text:style-name="P156"><text:soft-page-break/><text:tab/>jmp<text:tab/>.L110</text:p>
            <text:p text:style-name="P156">L111:</text:p>
          </table:table-cell>
          <table:table-cell table:style-name="Таблица58.A1" office:value-type="string">
            <text:p text:style-name="P156"><text:tab/>movq <text:s text:c="3"/>k2@GOTPCREL(%rip), %rsi</text:p>
            <text:p text:style-name="P156"><text:tab/>movq <text:s text:c="3"/>j5@GOTPCREL(%rip), %r9</text:p>
            <text:p text:style-name="P156"><text:tab/>movl<text:tab/>0(%r9), %edi</text:p>
            <text:p text:style-name="P156"><text:tab/><text:span text:style-name="T38">leal<text:tab/>0(,%edi,4), %edx</text:span></text:p>
            <text:p text:style-name="P156"><text:tab/>movl<text:tab/>%edx, 0(%rsi)</text:p>
            <text:p text:style-name="P156"><text:tab/>movq <text:s text:c="3"/>i@GOTPCREL(%rip), %r9</text:p>
            <text:p text:style-name="P156"><text:tab/>xorl<text:tab/>%eax, %eax</text:p>
            <text:p text:style-name="P156"><text:tab/>movl<text:tab/>%eax, 0(%r9)</text:p>
            <text:p text:style-name="P156">.L105:</text:p>
            <text:p text:style-name="P156"><text:tab/>movq <text:s text:c="3"/>i@GOTPCREL(%rip), %r10</text:p>
            <text:p text:style-name="P156"><text:tab/>movl<text:tab/>0(%r10), %esi</text:p>
            <text:p text:style-name="P156"><text:tab/>cmpl<text:tab/>$5, %esi</text:p>
            <text:p text:style-name="P156"><text:tab/>jg<text:tab/>.L106</text:p>
            <text:p text:style-name="P156"><text:tab/>movq <text:s text:c="3"/>ivector4@GOTPCREL(%rip), %r8</text:p>
            <text:p text:style-name="P156"><text:tab/>movslq<text:tab/>%esi, %rcx</text:p>
            <text:p text:style-name="P156"><text:tab/><text:span text:style-name="T38">leal<text:tab/>0(,%esi,2), %eax</text:span></text:p>
            <text:p text:style-name="P156"><text:tab/>movw<text:tab/>%ax, 0(%r8,%rcx,2)</text:p>
            <text:p text:style-name="P156"><text:tab/>leal<text:tab/>1(%esi), %edi</text:p>
            <text:p text:style-name="P156"><text:tab/>movl<text:tab/>%edi, 0(%r10)</text:p>
            <text:p text:style-name="P156"><text:tab/>jmp<text:tab/>.L105</text:p>
            <text:p text:style-name="P156">L106:</text:p>
          </table:table-cell>
        </table:table-row>
      </table:table>
      <text:p text:style-name="P72"><text:span text:style-name="T23"/></text:p>
      <table:table table:name="Таблица59" table:style-name="Таблица59">
        <table:table-column table:style-name="Таблица59.A"/>
        <table:table-column table:style-name="Таблица59.B"/>
        <table:table-row table:style-name="Таблица59.1">
          <table:table-cell table:style-name="Таблица59.A1" office:value-type="string">
            <text:p text:style-name="P156"><text:tab/>movq <text:s text:c="3"/>j5@GOTPCREL(%rip), %r8</text:p>
            <text:p text:style-name="P156"><text:tab/>xorl<text:tab/>%ecx, %ecx</text:p>
            <text:p text:style-name="P156"><text:tab/>movl<text:tab/>%ecx, 0(%r8)</text:p>
            <text:p text:style-name="P156"><text:tab/>movq <text:s text:c="3"/>k5@GOTPCREL(%rip), %rax</text:p>
            <text:p text:style-name="P156"><text:tab/>movl<text:tab/>$10000, %ecx</text:p>
            <text:p text:style-name="P156"><text:tab/>movl<text:tab/>%ecx, 0(%rax)</text:p>
            <text:p text:style-name="P156">.L112:</text:p>
            <text:p text:style-name="P156"><text:tab/>movq <text:s text:c="3"/>k5@GOTPCREL(%rip), %rdi</text:p>
            <text:p text:style-name="P156"><text:tab/>movq <text:s text:c="3"/>k5@GOTPCREL(%rip), %rcx</text:p>
            <text:p text:style-name="P156"><text:tab/>movl<text:tab/>0(%rcx), %esi</text:p>
            <text:p text:style-name="P156"><text:tab/>leal<text:tab/>-1(%esi), %r10d</text:p>
            <text:p text:style-name="P156"><text:tab/>movl<text:tab/>%r10d, 0(%rdi)</text:p>
            <text:p text:style-name="P156"><text:tab/>movq <text:s text:c="3"/>j5@GOTPCREL(%rip), %rdi</text:p>
            <text:p text:style-name="P156"><text:tab/>movq <text:s text:c="3"/>j5@GOTPCREL(%rip), %r9</text:p>
            <text:p text:style-name="P156"><text:tab/>movl<text:tab/>0(%r9), %esi</text:p>
            <text:p text:style-name="P156"><text:tab/>leal<text:tab/>1(%esi), %r11d</text:p>
            <text:p text:style-name="P156"><text:tab/>movl<text:tab/>%r11d, 0(%rdi)</text:p>
            <text:p text:style-name="P156"><text:tab/>movq <text:s text:c="3"/>i5@GOTPCREL(%rip), %rsi</text:p>
            <text:p text:style-name="P156"><text:tab/>movq <text:s text:c="3"/>k5@GOTPCREL(%rip), %r8</text:p>
            <text:p text:style-name="P156"><text:tab/>movl<text:tab/>0(%r8), %r8d</text:p>
            <text:p text:style-name="P156"><text:tab/>leal<text:tab/>0(%r8d,%r8d,2), %eax</text:p>
            <text:p text:style-name="P156"><text:tab/>movq <text:s text:c="3"/>j5@GOTPCREL(%rip), %r11</text:p>
            <text:p text:style-name="P156"><text:tab/>movl<text:tab/>0(%r11), %r9d</text:p>
            <text:p text:style-name="P156"><text:tab/>leal<text:tab/>0(%r9d,%r9d,4), %ecx</text:p>
            <text:p text:style-name="P156"><text:tab/>cltd</text:p>
            <text:p text:style-name="P156"><text:tab/>idivl<text:tab/>%ecx</text:p>
            <text:p text:style-name="P156"><text:tab/>movl<text:tab/>%eax, 0(%rsi)</text:p>
            <text:p text:style-name="P156"><text:tab/>movq <text:s text:c="3"/>k5@GOTPCREL(%rip), %rax</text:p>
            <text:p text:style-name="P156"><text:tab/>movl<text:tab/>0(%rax), %eax</text:p>
            <text:p text:style-name="P156"><text:tab/>testl<text:tab/>%eax, %eax</text:p>
            <text:p text:style-name="P156"><text:tab/>jg<text:tab/>.L112</text:p>
          </table:table-cell>
          <table:table-cell table:style-name="Таблица59.A1" office:value-type="string">
            <text:p text:style-name="P181"><text:tab/>j5 = 0;</text:p>
            <text:p text:style-name="P181"><text:tab/>k5 = 10000;</text:p>
            <text:p text:style-name="P181"><text:tab/>do {</text:p>
            <text:p text:style-name="P181"><text:tab/><text:tab/>k5 = k5 - 1;</text:p>
            <text:p text:style-name="P181"><text:tab/><text:tab/>j5 = j5 + 1;</text:p>
            <text:p text:style-name="P181"><text:tab/><text:tab/>i5 = (k5 * 3) / (j5 * constant5);</text:p>
            <text:p text:style-name="P181"><text:tab/>} while (k5 &gt; 0);</text:p>
          </table:table-cell>
        </table:table-row>
      </table:table>
      <text:p text:style-name="P88"/>
      <text:p text:style-name="P79"/>
      <table:table table:name="Таблица60" table:style-name="Таблица60">
        <table:table-column table:style-name="Таблица60.A"/>
        <table:table-column table:style-name="Таблица60.B"/>
        <table:table-row table:style-name="Таблица60.1">
          <table:table-cell table:style-name="Таблица60.A1" office:value-type="string">
            <text:p text:style-name="P156"><text:tab/>movq <text:s text:c="3"/>j5@GOTPCREL(%rip), %r8</text:p>
            <text:p text:style-name="P156"><text:tab/>xorl<text:tab/>%ecx, %ecx</text:p>
            <text:p text:style-name="P156"><text:tab/>movl<text:tab/>%ecx, 0(%r8)</text:p>
            <text:p text:style-name="P156"><text:tab/>movq <text:s text:c="3"/>k5@GOTPCREL(%rip), %rax</text:p>
            <text:p text:style-name="P156"><text:tab/>movl<text:tab/>$10000, %ecx</text:p>
            <text:p text:style-name="P156"><text:tab/>movl<text:tab/>%ecx, 0(%rax)</text:p>
            <text:p text:style-name="P156">.L112:</text:p>
            <text:p text:style-name="P156"><text:tab/>movq <text:s text:c="3"/>k5@GOTPCREL(%rip), %rdi</text:p>
            <text:p text:style-name="P156"><text:tab/>movq <text:s text:c="3"/>k5@GOTPCREL(%rip), %rcx</text:p>
            <text:p text:style-name="P156"><text:tab/>movl<text:tab/>0(%rcx), %esi</text:p>
            <text:p text:style-name="P156"><text:tab/>leal<text:tab/>-1(%esi), %r10d</text:p>
            <text:p text:style-name="P156"><text:tab/>movl<text:tab/>%r10d, 0(%rdi)</text:p>
            <text:p text:style-name="P156"><text:tab/>movq <text:s text:c="3"/>j5@GOTPCREL(%rip), %rdi</text:p>
            <text:p text:style-name="P156"><text:tab/>movq <text:s text:c="3"/>j5@GOTPCREL(%rip), %r9</text:p>
            <text:p text:style-name="P156"><text:tab/>movl<text:tab/>0(%r9), %esi</text:p>
            <text:p text:style-name="P156"><text:tab/>leal<text:tab/>1(%esi), %r11d</text:p>
            <text:p text:style-name="P156"><text:tab/>movl<text:tab/>%r11d, 0(%rdi)</text:p>
            <text:p text:style-name="P156"><text:tab/>movq <text:s text:c="3"/>i5@GOTPCREL(%rip), %rsi</text:p>
            <text:p text:style-name="P156"><text:tab/>movq <text:s text:c="3"/>k5@GOTPCREL(%rip), %r8</text:p>
            <text:p text:style-name="P156"><text:tab/>movl<text:tab/>0(%r8), %r8d</text:p>
            <text:p text:style-name="P156"><text:tab/>leal<text:tab/>0(%r8d,%r8d,2), %eax</text:p>
            <text:p text:style-name="P156"><text:tab/>movq <text:s text:c="3"/>j5@GOTPCREL(%rip), %r11</text:p>
            <text:p text:style-name="P156"><text:tab/>movl<text:tab/>0(%r11), %r9d</text:p>
            <text:p text:style-name="P156"><text:tab/>leal<text:tab/>0(%r9d,%r9d,4), %ecx</text:p>
            <text:p text:style-name="P156"><text:tab/>cltd</text:p>
            <text:p text:style-name="P156"><text:tab/>idivl<text:tab/>%ecx</text:p>
            <text:p text:style-name="P156"><text:tab/>movl<text:tab/>%eax, 0(%rsi)</text:p>
            <text:p text:style-name="P156"><text:tab/>movq <text:s text:c="3"/>k5@GOTPCREL(%rip), %rax</text:p>
            <text:p text:style-name="P156"><text:tab/>movl<text:tab/>0(%rax), %eax</text:p>
            <text:p text:style-name="P156"><text:soft-page-break/><text:tab/>testl<text:tab/>%eax, %eax</text:p>
            <text:p text:style-name="P156"><text:tab/>jg<text:tab/>.L112</text:p>
          </table:table-cell>
          <table:table-cell table:style-name="Таблица60.A1" office:value-type="string">
            <text:p text:style-name="P156"><text:tab/>movl<text:tab/>$10000, j5(%rip)</text:p>
            <text:p text:style-name="P156"><text:tab/>movl<text:tab/>$0, i5(%rip)<text:tab/>movq <text:s text:c="3"/>j5@GOTPCREL(%rip), %r11</text:p>
            <text:p text:style-name="P156"><text:tab/>xorl<text:tab/>%esi, %esi</text:p>
            <text:p text:style-name="P156"><text:tab/>movl<text:tab/>%esi, 0(%r11)</text:p>
            <text:p text:style-name="P156"><text:tab/>movq <text:s text:c="3"/>k5@GOTPCREL(%rip), %r10</text:p>
            <text:p text:style-name="P156"><text:tab/>movl<text:tab/>$10000, %r11d</text:p>
            <text:p text:style-name="P156"><text:tab/>movl<text:tab/>%r11d, 0(%r10)</text:p>
            <text:p text:style-name="P156">.L107:</text:p>
            <text:p text:style-name="P156"><text:tab/>movq <text:s text:c="3"/>k5@GOTPCREL(%rip), %rdx</text:p>
            <text:p text:style-name="P156"><text:tab/>movl<text:tab/>0(%rdx), %r10d</text:p>
            <text:p text:style-name="P156"><text:tab/>leal<text:tab/>-1(%r10d), %r11d</text:p>
            <text:p text:style-name="P156"><text:tab/>movl<text:tab/>%r11d, 0(%rdx)</text:p>
            <text:p text:style-name="P156"><text:tab/>movq <text:s text:c="3"/>j5@GOTPCREL(%rip), %r8</text:p>
            <text:p text:style-name="P156"><text:tab/>movl<text:tab/>0(%r8), %r10d</text:p>
            <text:p text:style-name="P156"><text:tab/>leal<text:tab/>1(%r10d), %edi</text:p>
            <text:p text:style-name="P156"><text:tab/>movl<text:tab/>%edi, 0(%r8)</text:p>
            <text:p text:style-name="P156"><text:tab/>movq <text:s text:c="3"/>i5@GOTPCREL(%rip), %rsi</text:p>
            <text:p text:style-name="P156"><text:tab/>leal<text:tab/>0(%r11d,%r11d,2), %eax</text:p>
            <text:p text:style-name="P156"><text:tab/>leal<text:tab/>0(%edi,%edi,4), %ecx</text:p>
            <text:p text:style-name="P156"><text:tab/>cltd</text:p>
            <text:p text:style-name="P156"><text:tab/>idivl<text:tab/>%ecx</text:p>
            <text:p text:style-name="P156"><text:tab/>movl<text:tab/>%eax, 0(%rsi)</text:p>
            <text:p text:style-name="P156"><text:tab/>testl<text:tab/>%r11d, %r11d</text:p>
            <text:p text:style-name="P156"><text:tab/>jg<text:tab/>.L107</text:p>
          </table:table-cell>
        </table:table-row>
      </table:table>
      <text:p text:style-name="P79"/>
      <text:p text:style-name="P20"><text:span text:style-name="T53">Ccomp смог посчитать конечное значение j5, но цикл оставил</text:span></text:p>
      <table:table table:name="Таблица61" table:style-name="Таблица61">
        <table:table-column table:style-name="Таблица61.A" table:number-columns-repeated="2"/>
        <table:table-row>
          <table:table-cell table:style-name="Таблица61.A1" office:value-type="string">
            <text:p text:style-name="P156"/>
            <text:p text:style-name="P156"><text:tab/>movq <text:s text:c="3"/>j5@GOTPCREL(%rip), %r8</text:p>
            <text:p text:style-name="P156"><text:tab/>xorl<text:tab/>%ecx, %ecx</text:p>
            <text:p text:style-name="P156"><text:tab/>movl<text:tab/>%ecx, 0(%r8)</text:p>
            <text:p text:style-name="P156"><text:tab/>movq <text:s text:c="3"/>k5@GOTPCREL(%rip), %rax</text:p>
            <text:p text:style-name="P156"><text:tab/>movl<text:tab/>$10000, %ecx</text:p>
            <text:p text:style-name="P156"><text:tab/>movl<text:tab/>%ecx, 0(%rax)</text:p>
            <text:p text:style-name="P156">.L112:</text:p>
            <text:p text:style-name="P156"><text:tab/>movq <text:s text:c="3"/>k5@GOTPCREL(%rip), %rdi</text:p>
            <text:p text:style-name="P156"><text:tab/>movq <text:s text:c="3"/>k5@GOTPCREL(%rip), %rcx</text:p>
            <text:p text:style-name="P156"><text:tab/>movl<text:tab/>0(%rcx), %esi</text:p>
            <text:p text:style-name="P156"><text:tab/>leal<text:tab/>-1(%esi), %r10d</text:p>
            <text:p text:style-name="P156"><text:tab/>movl<text:tab/>%r10d, 0(%rdi)</text:p>
            <text:p text:style-name="P156"><text:tab/>movq <text:s text:c="3"/>j5@GOTPCREL(%rip), %rdi</text:p>
            <text:p text:style-name="P156"><text:tab/>movq <text:s text:c="3"/>j5@GOTPCREL(%rip), %r9</text:p>
            <text:p text:style-name="P156"><text:tab/>movl<text:tab/>0(%r9), %esi</text:p>
            <text:p text:style-name="P156"><text:tab/>leal<text:tab/>1(%esi), %r11d</text:p>
            <text:p text:style-name="P156"><text:tab/>movl<text:tab/>%r11d, 0(%rdi)</text:p>
            <text:p text:style-name="P156"><text:tab/>movq <text:s text:c="3"/>i5@GOTPCREL(%rip), %rsi</text:p>
            <text:p text:style-name="P156"><text:tab/>movq <text:s text:c="3"/>k5@GOTPCREL(%rip), %r8</text:p>
            <text:p text:style-name="P156"><text:tab/>movl<text:tab/>0(%r8), %r8d</text:p>
            <text:p text:style-name="P156"><text:tab/>leal<text:tab/>0(%r8d,%r8d,2), %eax</text:p>
            <text:p text:style-name="P156"><text:tab/>movq <text:s text:c="3"/>j5@GOTPCREL(%rip), %r11</text:p>
            <text:p text:style-name="P156"><text:tab/>movl<text:tab/>0(%r11), %r9d</text:p>
            <text:p text:style-name="P156"><text:tab/>leal<text:tab/>0(%r9d,%r9d,4), %ecx</text:p>
            <text:p text:style-name="P156"><text:tab/>cltd</text:p>
            <text:p text:style-name="P156"><text:tab/>idivl<text:tab/>%ecx</text:p>
            <text:p text:style-name="P156"><text:tab/>movl<text:tab/>%eax, 0(%rsi)</text:p>
            <text:p text:style-name="P156"><text:tab/>movq <text:s text:c="3"/>k5@GOTPCREL(%rip), %rax</text:p>
            <text:p text:style-name="P156"><text:tab/>movl<text:tab/>0(%rax), %eax</text:p>
            <text:p text:style-name="P156"><text:tab/>testl<text:tab/>%eax, %eax</text:p>
            <text:p text:style-name="P156"><text:tab/>jg<text:tab/>.L112</text:p>
          </table:table-cell>
          <table:table-cell table:style-name="Таблица61.A1" office:value-type="string">
            <text:p text:style-name="P189">for (i = 0; i &lt; 100; i++)</text:p>
            <text:p text:style-name="P189"><text:tab/><text:tab/>ivector5[i * 2 + 3] = 5;</text:p>
          </table:table-cell>
        </table:table-row>
      </table:table>
      <text:p text:style-name="P20"/>
      <text:p text:style-name="P23">Без оптимизации переменная индукции осталась<text:line-break/><text:line-break/></text:p>
      <table:table table:name="Таблица62" table:style-name="Таблица62">
        <table:table-column table:style-name="Таблица62.A" table:number-columns-repeated="2"/>
        <table:table-row>
          <table:table-cell table:style-name="Таблица62.A1" office:value-type="string">
            <text:p text:style-name="P156"/>
            <text:p text:style-name="P156"><text:tab/>movq <text:s text:c="3"/>j5@GOTPCREL(%rip), %r8</text:p>
            <text:p text:style-name="P156"><text:tab/>xorl<text:tab/>%ecx, %ecx</text:p>
            <text:p text:style-name="P156"><text:tab/>movl<text:tab/>%ecx, 0(%r8)</text:p>
            <text:p text:style-name="P156"><text:tab/>movq <text:s text:c="3"/>k5@GOTPCREL(%rip), %rax</text:p>
            <text:p text:style-name="P156"><text:tab/>movl<text:tab/>$10000, %ecx</text:p>
            <text:p text:style-name="P156"><text:tab/>movl<text:tab/>%ecx, 0(%rax)</text:p>
            <text:p text:style-name="P156">.L112:</text:p>
            <text:p text:style-name="P156"><text:tab/>movq <text:s text:c="3"/>k5@GOTPCREL(%rip), %rdi</text:p>
            <text:p text:style-name="P156"><text:tab/>movq <text:s text:c="3"/>k5@GOTPCREL(%rip), %rcx</text:p>
            <text:p text:style-name="P156"><text:tab/>movl<text:tab/>0(%rcx), %esi</text:p>
            <text:p text:style-name="P156"><text:tab/>leal<text:tab/>-1(%esi), %r10d</text:p>
            <text:p text:style-name="P156"><text:tab/>movl<text:tab/>%r10d, 0(%rdi)</text:p>
            <text:p text:style-name="P156"><text:tab/>movq <text:s text:c="3"/>j5@GOTPCREL(%rip), %rdi</text:p>
            <text:p text:style-name="P156"><text:tab/>movq <text:s text:c="3"/>j5@GOTPCREL(%rip), %r9</text:p>
            <text:p text:style-name="P156"><text:tab/>movl<text:tab/>0(%r9), %esi</text:p>
            <text:p text:style-name="P156"><text:tab/>leal<text:tab/>1(%esi), %r11d</text:p>
            <text:p text:style-name="P156"><text:tab/>movl<text:tab/>%r11d, 0(%rdi)</text:p>
            <text:p text:style-name="P156"><text:tab/>movq <text:s text:c="3"/>i5@GOTPCREL(%rip), %rsi</text:p>
            <text:p text:style-name="P156"><text:tab/>movq <text:s text:c="3"/>k5@GOTPCREL(%rip), %r8</text:p>
            <text:p text:style-name="P156"><text:tab/>movl<text:tab/>0(%r8), %r8d</text:p>
            <text:p text:style-name="P156"><text:tab/>leal<text:tab/>0(%r8d,%r8d,2), %eax</text:p>
            <text:p text:style-name="P156"><text:tab/>movq <text:s text:c="3"/>j5@GOTPCREL(%rip), %r11</text:p>
            <text:p text:style-name="P156"><text:tab/>movl<text:tab/>0(%r11), %r9d</text:p>
            <text:p text:style-name="P156"><text:tab/>leal<text:tab/>0(%r9d,%r9d,4), %ecx</text:p>
            <text:p text:style-name="P156"><text:soft-page-break/><text:tab/>cltd</text:p>
            <text:p text:style-name="P156"><text:tab/>idivl<text:tab/>%ecx</text:p>
            <text:p text:style-name="P156"><text:tab/>movl<text:tab/>%eax, 0(%rsi)</text:p>
            <text:p text:style-name="P156"><text:tab/>movq <text:s text:c="3"/>k5@GOTPCREL(%rip), %rax</text:p>
            <text:p text:style-name="P156"><text:tab/>movl<text:tab/>0(%rax), %eax</text:p>
            <text:p text:style-name="P156"><text:tab/>testl<text:tab/>%eax, %eax</text:p>
            <text:p text:style-name="P156"><text:tab/>jg<text:tab/>.L112</text:p>
          </table:table-cell>
          <table:table-cell table:style-name="Таблица62.A1" office:value-type="string">
            <text:p text:style-name="P156"><text:tab/>movq <text:s text:c="3"/>i@GOTPCREL(%rip), %rdx</text:p>
            <text:p text:style-name="P156"><text:tab/>xorl<text:tab/>%r9d, %r9d</text:p>
            <text:p text:style-name="P156"><text:tab/>movl<text:tab/>%r9d, 0(%rdx)</text:p>
            <text:p text:style-name="P156">.L108:</text:p>
            <text:p text:style-name="P156"><text:tab/><text:span text:style-name="T38">movq <text:s text:c="3"/>i@GOTPCREL(%rip), %rdx</text:span></text:p>
            <text:p text:style-name="P156"><text:tab/><text:span text:style-name="T38">movl<text:tab/>0(%rdx), %r8d</text:span></text:p>
            <text:p text:style-name="P156"><text:tab/><text:span text:style-name="T38">cmpl<text:tab/>$100, %r8d</text:span></text:p>
            <text:p text:style-name="P156"><text:tab/>jge<text:tab/>.L109</text:p>
            <text:p text:style-name="P156"><text:tab/>movq <text:s text:c="3"/>ivector5@GOTPCREL(%rip), %rsi</text:p>
            <text:p text:style-name="P156"><text:tab/>leal<text:tab/>3(,%r8d,2), %edi</text:p>
            <text:p text:style-name="P156"><text:tab/>movslq<text:tab/>%edi, %rcx</text:p>
            <text:p text:style-name="P156"><text:tab/>movl<text:tab/>$5, %r9d</text:p>
            <text:p text:style-name="P156"><text:tab/>movl<text:tab/>%r9d, 0(%rsi,%rcx,4)</text:p>
            <text:p text:style-name="P156"><text:tab/>leal<text:tab/>1(%r8d), %esi</text:p>
            <text:p text:style-name="P156"><text:tab/>movl<text:tab/>%esi, 0(%rdx)</text:p>
            <text:p text:style-name="P156"><text:tab/>jmp<text:tab/>.L108</text:p>
            <text:p text:style-name="P156">.L109:</text:p>
          </table:table-cell>
        </table:table-row>
      </table:table>
      <text:p text:style-name="P23"/>
      <text:p text:style-name="P23">При оптимизации переменная индукции <text:span text:style-name="T53">всё равно осталась</text:span></text:p>
      <table:table table:name="Таблица63" table:style-name="Таблица63">
        <table:table-column table:style-name="Таблица63.A"/>
        <table:table-column table:style-name="Таблица63.B"/>
        <table:table-row>
          <table:table-cell table:style-name="Таблица63.A1" office:value-type="string">
            <text:p text:style-name="P171"><text:tab/>movq <text:s text:c="3"/>h3@GOTPCREL(%rip), %rax</text:p>
            <text:p text:style-name="P171"><text:tab/>movl<text:tab/>0(%rax), %r11d</text:p>
            <text:p text:style-name="P171"><text:tab/>movq <text:s text:c="3"/>k3@GOTPCREL(%rip), %r10</text:p>
            <text:p text:style-name="P171"><text:tab/>movl<text:tab/>0(%r10), %r9d</text:p>
            <text:p text:style-name="P171"><text:tab/><text:span text:style-name="T37">leal<text:tab/>0(%r11d,%r9d,1), %eax</text:span></text:p>
            <text:p text:style-name="P171"><text:tab/>testl<text:tab/>%eax, %eax</text:p>
            <text:p text:style-name="P171"><text:tab/>jl<text:tab/>.L117</text:p>
            <text:p text:style-name="P171"><text:tab/>movq <text:s text:c="3"/>h3@GOTPCREL(%rip), %rax</text:p>
            <text:p text:style-name="P171"><text:tab/>movl<text:tab/>0(%rax), %r8d</text:p>
            <text:p text:style-name="P171"><text:tab/>movq <text:s text:c="3"/>k3@GOTPCREL(%rip), %r11</text:p>
            <text:p text:style-name="P171"><text:tab/>movl<text:tab/>0(%r11), %r10d</text:p>
            <text:p text:style-name="P171"><text:tab/><text:span text:style-name="T37">leal<text:tab/>0(%r8d,%r10d,1), %eax</text:span></text:p>
            <text:p text:style-name="P171"><text:tab/>cmpl<text:tab/>$5, %eax</text:p>
            <text:p text:style-name="P171"><text:tab/>setg<text:tab/>%al</text:p>
            <text:p text:style-name="P171"><text:tab/>movzbl<text:tab/>%al, %eax</text:p>
            <text:p text:style-name="P171"><text:tab/>jmp<text:tab/>.L118</text:p>
            <text:p text:style-name="P171">.L117:</text:p>
            <text:p text:style-name="P171"><text:tab/>movl<text:tab/>$1, %eax</text:p>
            <text:p text:style-name="P171">.L118:</text:p>
            <text:p text:style-name="P171"><text:tab/>cmpl<text:tab/>$0, %eax</text:p>
            <text:p text:style-name="P171"><text:tab/>jne<text:tab/>.L119</text:p>
            <text:p text:style-name="P171"><text:tab/>movq <text:s text:c="3"/>m3@GOTPCREL(%rip), %r11</text:p>
            <text:p text:style-name="P171"><text:tab/>movq <text:s text:c="3"/>h3@GOTPCREL(%rip), %r8</text:p>
            <text:p text:style-name="P171"><text:tab/>movl<text:tab/>0(%r8), %r8d</text:p>
            <text:p text:style-name="P171"><text:tab/>movq <text:s text:c="3"/>k3@GOTPCREL(%rip), %rdx</text:p>
            <text:p text:style-name="P171"><text:tab/>movl<text:tab/>0(%rdx), %ecx</text:p>
            <text:p text:style-name="P171"><text:tab/><text:span text:style-name="T37">leal<text:tab/>0(%r8d,%ecx,1), %eax</text:span></text:p>
            <text:p text:style-name="P171"><text:tab/>movq <text:s text:c="3"/>i3@GOTPCREL(%rip), %rsi</text:p>
            <text:p text:style-name="P171"><text:tab/>movl<text:tab/>0(%rsi), %ecx</text:p>
            <text:p text:style-name="P171"><text:tab/>cltd</text:p>
            <text:p text:style-name="P171"><text:tab/>idivl<text:tab/>%ecx</text:p>
            <text:p text:style-name="P171"><text:tab/>movl<text:tab/>%eax, 0(%r11)</text:p>
            <text:p text:style-name="P171"><text:tab/>leaq<text:tab/>__stringlit_1(%rip), %rdi</text:p>
            <text:p text:style-name="P171"><text:tab/>movq <text:s text:c="3"/>m3@GOTPCREL(%rip), %r8</text:p>
            <text:p text:style-name="P171"><text:tab/>movl<text:tab/>0(%r8), %esi</text:p>
            <text:p text:style-name="P171"><text:tab/>movl<text:tab/>$0, %eax</text:p>
            <text:p text:style-name="P171"><text:tab/>call<text:tab/>printf@PLT</text:p>
            <text:p text:style-name="P171"><text:tab/>movq <text:s text:c="3"/>g3@GOTPCREL(%rip), %rsi</text:p>
            <text:p text:style-name="P171"><text:tab/>movq <text:s text:c="3"/>i3@GOTPCREL(%rip), %r9</text:p>
            <text:p text:style-name="P171"><text:tab/>movl<text:tab/>0(%r9), %ecx</text:p>
            <text:p text:style-name="P171"><text:tab/>movq <text:s text:c="3"/>h3@GOTPCREL(%rip), %r9</text:p>
            <text:p text:style-name="P171"><text:tab/>movl<text:tab/>0(%r9), %r10d</text:p>
            <text:p text:style-name="P171"><text:tab/>movq <text:s text:c="3"/>k3@GOTPCREL(%rip), %r11</text:p>
            <text:p text:style-name="P171"><text:tab/>movl<text:tab/>0(%r11), %r9d</text:p>
            <text:p text:style-name="P171"><text:tab/><text:span text:style-name="T37">leal<text:tab/>0(%r10d,%r9d,1), %edx</text:span></text:p>
            <text:p text:style-name="P171"><text:tab/>leal<text:tab/>0(%ecx,%edx,1), %r11d</text:p>
            <text:p text:style-name="P171"><text:tab/>movl<text:tab/>%r11d, 0(%rsi)</text:p>
            <text:p text:style-name="P171"><text:tab/>leaq<text:tab/>__stringlit_1(%rip), %rdi</text:p>
            <text:p text:style-name="P171"><text:tab/>movq <text:s text:c="3"/>g3@GOTPCREL(%rip), %rcx</text:p>
            <text:p text:style-name="P171"><text:tab/>movl<text:tab/>0(%rcx), %esi</text:p>
            <text:p text:style-name="P171"><text:tab/>movl<text:tab/>$0, %eax</text:p>
            <text:p text:style-name="P171"><text:tab/>call<text:tab/>printf@PLT</text:p>
            <text:p text:style-name="P171"><text:tab/>jmp<text:tab/>.L120</text:p>
            <text:p text:style-name="P171">.L119:</text:p>
            <text:p text:style-name="P171"><text:tab/>leaq<text:tab/>__stringlit_3(%rip), %rdi</text:p>
            <text:p text:style-name="P171"><text:tab/>movl<text:tab/>$0, %eax</text:p>
            <text:p text:style-name="P171"><text:tab/>call<text:tab/>printf@PLT</text:p>
            <text:p text:style-name="P171">.L120:</text:p>
          </table:table-cell>
          <table:table-cell table:style-name="Таблица63.A1" office:value-type="string">
            <text:p text:style-name="P103"><text:tab/>if ((h3 + k3) &lt; 0 || (h3 + k3) &gt; 5)</text:p>
            <text:p text:style-name="P103"><text:tab/><text:tab/>printf("Common subexpression elimination\n");</text:p>
            <text:p text:style-name="P103"><text:tab/>else {</text:p>
            <text:p text:style-name="P103"><text:tab/><text:tab/>m3 = (h3 + k3) / i3;</text:p>
            <text:p text:style-name="P103"><text:tab/><text:tab/>printf("%d", m3);</text:p>
            <text:p text:style-name="P103"><text:tab/><text:tab/>g3 = i3 + (h3 + k3);</text:p>
            <text:p text:style-name="P103"><text:tab/><text:tab/>printf("%d", g3);</text:p>
            <text:p text:style-name="P103"><text:tab/>}</text:p>
          </table:table-cell>
        </table:table-row>
      </table:table>
      <text:p text:style-name="P20"><text:span text:style-name="T1"/></text:p>
      <text:p text:style-name="P14">Без оптимизации вынесение общих подвыражений не наблюдается</text:p>
      <table:table table:name="Таблица64" table:style-name="Таблица64">
        <table:table-column table:style-name="Таблица64.A"/>
        <table:table-column table:style-name="Таблица64.B"/>
        <table:table-row table:style-name="Таблица64.1">
          <table:table-cell table:style-name="Таблица64.A1" office:value-type="string">
            <text:p text:style-name="P172"><text:tab/>movq <text:s text:c="3"/>h3@GOTPCREL(%rip), %rax</text:p>
            <text:p text:style-name="P172"><text:tab/>movl<text:tab/>0(%rax), %r11d</text:p>
            <text:p text:style-name="P172"><text:tab/>movq <text:s text:c="3"/>k3@GOTPCREL(%rip), %r10</text:p>
            <text:p text:style-name="P172"><text:tab/>movl<text:tab/>0(%r10), %r9d</text:p>
            <text:p text:style-name="P172"><text:tab/><text:span text:style-name="T37">leal<text:tab/>0(%r11d,%r9d,1), %eax</text:span></text:p>
            <text:p text:style-name="P172"><text:tab/>testl<text:tab/>%eax, %eax</text:p>
            <text:p text:style-name="P172"><text:tab/>jl<text:tab/>.L117</text:p>
            <text:p text:style-name="P172"><text:tab/>movq <text:s text:c="3"/>h3@GOTPCREL(%rip), %rax</text:p>
            <text:p text:style-name="P172"><text:tab/>movl<text:tab/>0(%rax), %r8d</text:p>
            <text:p text:style-name="P172"><text:tab/>movq <text:s text:c="3"/>k3@GOTPCREL(%rip), %r11</text:p>
            <text:p text:style-name="P172"><text:tab/>movl<text:tab/>0(%r11), %r10d</text:p>
            <text:p text:style-name="P172"><text:tab/><text:span text:style-name="T37">leal<text:tab/>0(%r8d,%r10d,1), %eax</text:span></text:p>
            <text:p text:style-name="P172"><text:tab/>cmpl<text:tab/>$5, %eax</text:p>
            <text:p text:style-name="P172"><text:tab/>setg<text:tab/>%al</text:p>
            <text:p text:style-name="P172"><text:tab/>movzbl<text:tab/>%al, %eax</text:p>
            <text:p text:style-name="P172"><text:tab/>jmp<text:tab/>.L118</text:p>
            <text:p text:style-name="P172">.L117:</text:p>
            <text:p text:style-name="P172"><text:tab/>movl<text:tab/>$1, %eax</text:p>
            <text:p text:style-name="P172">.L118:</text:p>
            <text:p text:style-name="P172"><text:tab/>cmpl<text:tab/>$0, %eax</text:p>
            <text:p text:style-name="P172"><text:tab/>jne<text:tab/>.L119</text:p>
            <text:p text:style-name="P172"><text:tab/>movq <text:s text:c="3"/>m3@GOTPCREL(%rip), %r11</text:p>
            <text:p text:style-name="P172"><text:tab/>movq <text:s text:c="3"/>h3@GOTPCREL(%rip), %r8</text:p>
            <text:p text:style-name="P172"><text:tab/>movl<text:tab/>0(%r8), %r8d</text:p>
            <text:p text:style-name="P172"><text:tab/>movq <text:s text:c="3"/>k3@GOTPCREL(%rip), %rdx</text:p>
            <text:p text:style-name="P172"><text:tab/>movl<text:tab/>0(%rdx), %ecx</text:p>
            <text:p text:style-name="P172"><text:tab/><text:span text:style-name="T37">leal<text:tab/>0(%r8d,%ecx,1), %eax</text:span></text:p>
            <text:p text:style-name="P172"><text:tab/>movq <text:s text:c="3"/>i3@GOTPCREL(%rip), %rsi</text:p>
            <text:p text:style-name="P172"><text:tab/>movl<text:tab/>0(%rsi), %ecx</text:p>
            <text:p text:style-name="P172"><text:tab/>cltd</text:p>
            <text:p text:style-name="P172"><text:tab/>idivl<text:tab/>%ecx</text:p>
            <text:p text:style-name="P172"><text:tab/>movl<text:tab/>%eax, 0(%r11)</text:p>
            <text:p text:style-name="P172"><text:tab/>leaq<text:tab/>__stringlit_1(%rip), %rdi</text:p>
            <text:p text:style-name="P172"><text:tab/>movq <text:s text:c="3"/>m3@GOTPCREL(%rip), %r8</text:p>
            <text:p text:style-name="P172"><text:tab/>movl<text:tab/>0(%r8), %esi</text:p>
            <text:p text:style-name="P172"><text:tab/>movl<text:tab/>$0, %eax</text:p>
            <text:p text:style-name="P172"><text:tab/>call<text:tab/>printf@PLT</text:p>
            <text:p text:style-name="P172"><text:tab/>movq <text:s text:c="3"/>g3@GOTPCREL(%rip), %rsi</text:p>
            <text:p text:style-name="P172"><text:tab/>movq <text:s text:c="3"/>i3@GOTPCREL(%rip), %r9</text:p>
            <text:p text:style-name="P172"><text:tab/>movl<text:tab/>0(%r9), %ecx</text:p>
            <text:p text:style-name="P172"><text:tab/>movq <text:s text:c="3"/>h3@GOTPCREL(%rip), %r9</text:p>
            <text:p text:style-name="P172"><text:tab/>movl<text:tab/>0(%r9), %r10d</text:p>
            <text:p text:style-name="P172"><text:tab/>movq <text:s text:c="3"/>k3@GOTPCREL(%rip), %r11</text:p>
            <text:p text:style-name="P172"><text:tab/>movl<text:tab/>0(%r11), %r9d</text:p>
            <text:p text:style-name="P172"><text:tab/><text:span text:style-name="T37">leal<text:tab/>0(%r10d,%r9d,1), %edx</text:span></text:p>
            <text:p text:style-name="P172"><text:tab/>leal<text:tab/>0(%ecx,%edx,1), %r11d</text:p>
            <text:p text:style-name="P172"><text:tab/>movl<text:tab/>%r11d, 0(%rsi)</text:p>
            <text:p text:style-name="P172"><text:tab/>leaq<text:tab/>__stringlit_1(%rip), %rdi</text:p>
            <text:p text:style-name="P172"><text:tab/>movq <text:s text:c="3"/>g3@GOTPCREL(%rip), %rcx</text:p>
            <text:p text:style-name="P172"><text:tab/>movl<text:tab/>0(%rcx), %esi</text:p>
            <text:p text:style-name="P172"><text:tab/>movl<text:tab/>$0, %eax</text:p>
            <text:p text:style-name="P172"><text:tab/>call<text:tab/>printf@PLT</text:p>
            <text:p text:style-name="P172"><text:tab/>jmp<text:tab/>.L120</text:p>
            <text:p text:style-name="P172">.L119:</text:p>
            <text:p text:style-name="P172"><text:tab/>leaq<text:tab/>__stringlit_3(%rip), %rdi</text:p>
            <text:p text:style-name="P172"><text:tab/>movl<text:tab/>$0, %eax</text:p>
            <text:p text:style-name="P172"><text:tab/>call<text:tab/>printf@PLT</text:p>
            <text:p text:style-name="P172">.L120:</text:p>
          </table:table-cell>
          <table:table-cell table:style-name="Таблица64.A1" office:value-type="string">
            <text:p text:style-name="P172"><text:tab/><text:span text:style-name="T37">movq <text:s text:c="3"/>h3@GOTPCREL(%rip), %rax</text:span></text:p>
            <text:p text:style-name="P171"><text:tab/><text:span text:style-name="T37">movl<text:tab/>0(%rax), %ecx</text:span></text:p>
            <text:p text:style-name="P171"><text:tab/><text:span text:style-name="T37">movq <text:s text:c="3"/>k3@GOTPCREL(%rip), %r11</text:span></text:p>
            <text:p text:style-name="P171"><text:tab/><text:span text:style-name="T37">movl<text:tab/>0(%r11), %edx</text:span></text:p>
            <text:p text:style-name="P171"><text:tab/><text:span text:style-name="T37">leal<text:tab/>0(%ecx,%edx,1), %eax</text:span></text:p>
            <text:p text:style-name="P171"><text:tab/>testl<text:tab/>%eax, %eax</text:p>
            <text:p text:style-name="P171"><text:tab/>jl<text:tab/>.L112</text:p>
            <text:p text:style-name="P171"><text:tab/>cmpl<text:tab/>$5, %eax</text:p>
            <text:p text:style-name="P171"><text:tab/>jg<text:tab/>.L112</text:p>
            <text:p text:style-name="P171"><text:tab/>movq <text:s text:c="3"/>m3@GOTPCREL(%rip), %rsi</text:p>
            <text:p text:style-name="P171"><text:tab/>movq <text:s text:c="3"/>i3@GOTPCREL(%rip), %rcx</text:p>
            <text:p text:style-name="P171"><text:tab/>movl<text:tab/>0(%rcx), %ecx</text:p>
            <text:p text:style-name="P171"><text:tab/>cltd</text:p>
            <text:p text:style-name="P171"><text:tab/>idivl<text:tab/>%ecx</text:p>
            <text:p text:style-name="P171"><text:tab/>movl<text:tab/>%eax, 0(%rsi)</text:p>
            <text:p text:style-name="P171"><text:tab/>leaq<text:tab/>__stringlit_1(%rip), %rdi</text:p>
            <text:p text:style-name="P171"><text:tab/>movq<text:tab/>%rax, %rsi</text:p>
            <text:p text:style-name="P171"><text:tab/>movl<text:tab/>$0, %eax</text:p>
            <text:p text:style-name="P171"><text:tab/>call<text:tab/>printf@PLT</text:p>
            <text:p text:style-name="P171"><text:tab/>movq <text:s text:c="3"/>g3@GOTPCREL(%rip), %rdi</text:p>
            <text:p text:style-name="P171"><text:tab/>movq <text:s text:c="3"/>i3@GOTPCREL(%rip), %r9</text:p>
            <text:p text:style-name="P171"><text:tab/>movl<text:tab/>0(%r9), %eax</text:p>
            <text:p text:style-name="P171"><text:tab/><text:span text:style-name="T37">movq <text:s text:c="3"/>h3@GOTPCREL(%rip), %r10</text:span></text:p>
            <text:p text:style-name="P171"><text:tab/><text:span text:style-name="T37">movl<text:tab/>0(%r10), %r11d</text:span></text:p>
            <text:p text:style-name="P171"><text:tab/><text:span text:style-name="T37">movq <text:s text:c="3"/>k3@GOTPCREL(%rip), %rdx</text:span></text:p>
            <text:p text:style-name="P171"><text:tab/><text:span text:style-name="T37">movl<text:tab/>0(%rdx), %r8d</text:span></text:p>
            <text:p text:style-name="P171"><text:tab/><text:span text:style-name="T37">leal<text:tab/>0(%r11d,%r8d,1), %esi</text:span></text:p>
            <text:p text:style-name="P171"><text:tab/>leal<text:tab/>0(%eax,%esi,1), %esi</text:p>
            <text:p text:style-name="P171"><text:tab/>movl<text:tab/>%esi, 0(%rdi)</text:p>
            <text:p text:style-name="P171"><text:tab/>leaq<text:tab/>__stringlit_1(%rip), %rdi</text:p>
            <text:p text:style-name="P171"><text:tab/>movl<text:tab/>$0, %eax</text:p>
            <text:p text:style-name="P171"><text:tab/>call<text:tab/>printf@PLT</text:p>
            <text:p text:style-name="P171"><text:tab/>jmp<text:tab/>.L113</text:p>
            <text:p text:style-name="P171">.L112:</text:p>
            <text:p text:style-name="P171"><text:tab/>leaq<text:tab/>__stringlit_3(%rip), %rdi</text:p>
            <text:p text:style-name="P171"><text:tab/>movl<text:tab/>$0, %eax</text:p>
            <text:p text:style-name="P171"><text:tab/>call<text:tab/>printf@PLT</text:p>
            <text:p text:style-name="P171">.L113:</text:p>
          </table:table-cell>
        </table:table-row>
      </table:table>
      <text:p text:style-name="P14"/>
      <text:p text:style-name="P17">Пот оптимизации <text:span text:style-name="T54">ccomp не вынес общее подвыражение</text:span></text:p>
      <text:p text:style-name="P17"><text:span text:style-name="T4"/></text:p>
      <table:table table:name="Таблица65" table:style-name="Таблица65">
        <table:table-column table:style-name="Таблица65.A" table:number-columns-repeated="2"/>
        <table:table-row>
          <table:table-cell table:style-name="Таблица65.A1" office:value-type="string">
            <text:p text:style-name="P156"><text:tab/>movq <text:s text:c="3"/>i4@GOTPCREL(%rip), %rdi</text:p>
            <text:p text:style-name="P156"><text:tab/>xorl<text:tab/>%r8d, %r8d</text:p>
            <text:p text:style-name="P156"><text:tab/>movl<text:tab/>%r8d, 0(%rdi)</text:p>
            <text:p text:style-name="P156">.L121:</text:p>
            <text:p text:style-name="P156"><text:tab/>movq <text:s text:c="3"/>i4@GOTPCREL(%rip), %rax</text:p>
            <text:p text:style-name="P156"><text:tab/>movl<text:tab/>0(%rax), %eax</text:p>
            <text:p text:style-name="P156"><text:tab/>cmpl<text:tab/>$2, %eax</text:p>
            <text:p text:style-name="P156"><text:tab/>jg<text:tab/>.L122</text:p>
            <text:p text:style-name="P156"><text:tab/>movq <text:s text:c="3"/>ivector2@GOTPCREL(%rip), %rdi</text:p>
            <text:p text:style-name="P156"><text:tab/>movq <text:s text:c="3"/>i4@GOTPCREL(%rip), %rdx</text:p>
            <text:p text:style-name="P156"><text:tab/>movl<text:tab/>0(%rdx), %edx</text:p>
            <text:p text:style-name="P156"><text:tab/>movslq<text:tab/>%edx, %rsi</text:p>
            <text:p text:style-name="P156"><text:tab/>movq <text:s text:c="3"/>j@GOTPCREL(%rip), %r10</text:p>
            <text:p text:style-name="P156"><text:tab/>movl<text:tab/>0(%r10), %eax</text:p>
            <text:p text:style-name="P156"><text:tab/>movq <text:s text:c="3"/>k@GOTPCREL(%rip), %rcx</text:p>
            <text:p text:style-name="P156"><text:tab/>movl<text:tab/>0(%rcx), %r9d</text:p>
            <text:p text:style-name="P156"><text:tab/><text:span text:style-name="T38">imull<text:tab/>%r9d, %eax</text:span></text:p>
            <text:p text:style-name="P156"><text:tab/>movzbl<text:tab/>%al, %r11d</text:p>
            <text:p text:style-name="P156"><text:tab/>movb<text:tab/>%r11b, 0(%rdi,%rsi,1)</text:p>
            <text:p text:style-name="P156"><text:tab/>leaq<text:tab/>__stringlit_1(%rip), %rdi</text:p>
            <text:p text:style-name="P156"><text:tab/>movq <text:s text:c="3"/>ivector2@GOTPCREL(%rip), %rcx</text:p>
            <text:p text:style-name="P156"><text:tab/>movq <text:s text:c="3"/>i4@GOTPCREL(%rip), %r10</text:p>
            <text:p text:style-name="P156"><text:tab/>movl<text:tab/>0(%r10), %esi</text:p>
            <text:p text:style-name="P156"><text:tab/>movslq<text:tab/>%esi, %rdx</text:p>
            <text:p text:style-name="P156"><text:tab/>movzbl<text:tab/>0(%rcx,%rdx,1), %esi</text:p>
            <text:p text:style-name="P156"><text:tab/>movl<text:tab/>$0, %eax</text:p>
            <text:p text:style-name="P156"><text:tab/>call<text:tab/>printf@PLT</text:p>
            <text:p text:style-name="P156"><text:tab/>movq <text:s text:c="3"/>i4@GOTPCREL(%rip), %r9</text:p>
            <text:p text:style-name="P156"><text:tab/>movq <text:s text:c="3"/>i4@GOTPCREL(%rip), %rax</text:p>
            <text:p text:style-name="P156"><text:tab/>movl<text:tab/>0(%rax), %r8d</text:p>
            <text:p text:style-name="P156"><text:tab/>leal<text:tab/>1(%r8d), %edx</text:p>
            <text:p text:style-name="P156"><text:tab/>movl<text:tab/>%edx, 0(%r9)</text:p>
            <text:p text:style-name="P156"><text:tab/>jmp<text:tab/>.L121</text:p>
            <text:p text:style-name="P156">.L122:</text:p>
          </table:table-cell>
          <table:table-cell table:style-name="Таблица65.A1" office:value-type="string">
            <text:p text:style-name="P181"><text:tab/>for (i4 = 0; i4 &lt;= max_vector; i4++){</text:p>
            <text:p text:style-name="P181"><text:tab/><text:tab/>ivector2[i4] = j * k;</text:p>
            <text:p text:style-name="P181"><text:tab/>printf("%d", ivector2[i4]);</text:p>
            <text:p text:style-name="P181">}</text:p>
          </table:table-cell>
        </table:table-row>
      </table:table>
      <text:p text:style-name="P41"><text:span text:style-name="T23"/></text:p>
      <text:p text:style-name="P44"><text:span text:style-name="T23">Видно, что умножение происходит постоянно и инвариантный код не выносится из цикла</text:span></text:p>
      <text:p text:style-name="P82"><text:span text:style-name="T23"/></text:p>
      <table:table table:name="Таблица66" table:style-name="Таблица66">
        <table:table-column table:style-name="Таблица66.A" table:number-columns-repeated="2"/>
        <table:table-row table:style-name="Таблица66.1">
          <table:table-cell table:style-name="Таблица66.A1" office:value-type="string">
            <text:p text:style-name="P156"><text:tab/>movq <text:s text:c="3"/>i4@GOTPCREL(%rip), %rdi</text:p>
            <text:p text:style-name="P156"><text:tab/>xorl<text:tab/>%r8d, %r8d</text:p>
            <text:p text:style-name="P156"><text:tab/>movl<text:tab/>%r8d, 0(%rdi)</text:p>
            <text:p text:style-name="P156">.L121:</text:p>
            <text:p text:style-name="P156"><text:tab/>movq <text:s text:c="3"/>i4@GOTPCREL(%rip), %rax</text:p>
            <text:p text:style-name="P156"><text:tab/>movl<text:tab/>0(%rax), %eax</text:p>
            <text:p text:style-name="P156"><text:tab/>cmpl<text:tab/>$2, %eax</text:p>
            <text:p text:style-name="P156"><text:tab/>jg<text:tab/>.L122</text:p>
            <text:p text:style-name="P156"><text:tab/>movq <text:s text:c="3"/>ivector2@GOTPCREL(%rip), %rdi</text:p>
            <text:p text:style-name="P156"><text:tab/>movq <text:s text:c="3"/>i4@GOTPCREL(%rip), %rdx</text:p>
            <text:p text:style-name="P156"><text:tab/>movl<text:tab/>0(%rdx), %edx</text:p>
            <text:p text:style-name="P156"><text:tab/>movslq<text:tab/>%edx, %rsi</text:p>
            <text:p text:style-name="P156"><text:tab/>movq <text:s text:c="3"/>j@GOTPCREL(%rip), %r10</text:p>
            <text:p text:style-name="P156"><text:tab/>movl<text:tab/>0(%r10), %eax</text:p>
            <text:p text:style-name="P156"><text:tab/>movq <text:s text:c="3"/>k@GOTPCREL(%rip), %rcx</text:p>
            <text:p text:style-name="P156"><text:tab/>movl<text:tab/>0(%rcx), %r9d</text:p>
            <text:p text:style-name="P156"><text:tab/><text:span text:style-name="T38">imull<text:tab/>%r9d, %eax</text:span></text:p>
            <text:p text:style-name="P156"><text:tab/>movzbl<text:tab/>%al, %r11d</text:p>
            <text:p text:style-name="P156"><text:tab/>movb<text:tab/>%r11b, 0(%rdi,%rsi,1)</text:p>
            <text:p text:style-name="P156"><text:tab/>leaq<text:tab/>__stringlit_1(%rip), %rdi</text:p>
            <text:p text:style-name="P156"><text:tab/>movq <text:s text:c="3"/>ivector2@GOTPCREL(%rip), %rcx</text:p>
            <text:p text:style-name="P156"><text:tab/>movq <text:s text:c="3"/>i4@GOTPCREL(%rip), %r10</text:p>
            <text:p text:style-name="P156"><text:tab/>movl<text:tab/>0(%r10), %esi</text:p>
            <text:p text:style-name="P156"><text:soft-page-break/><text:tab/>movslq<text:tab/>%esi, %rdx</text:p>
            <text:p text:style-name="P156"><text:tab/>movzbl<text:tab/>0(%rcx,%rdx,1), %esi</text:p>
            <text:p text:style-name="P156"><text:tab/>movl<text:tab/>$0, %eax</text:p>
            <text:p text:style-name="P156"><text:tab/>call<text:tab/>printf@PLT</text:p>
            <text:p text:style-name="P156"><text:tab/>movq <text:s text:c="3"/>i4@GOTPCREL(%rip), %r9</text:p>
            <text:p text:style-name="P156"><text:tab/>movq <text:s text:c="3"/>i4@GOTPCREL(%rip), %rax</text:p>
            <text:p text:style-name="P156"><text:tab/>movl<text:tab/>0(%rax), %r8d</text:p>
            <text:p text:style-name="P156"><text:tab/>leal<text:tab/>1(%r8d), %edx</text:p>
            <text:p text:style-name="P156"><text:tab/>movl<text:tab/>%edx, 0(%r9)</text:p>
            <text:p text:style-name="P156"><text:tab/>jmp<text:tab/>.L121</text:p>
            <text:p text:style-name="P156">.L122:</text:p>
          </table:table-cell>
          <table:table-cell table:style-name="Таблица66.A1" office:value-type="string">
            <text:p text:style-name="P158"/>
            <text:p text:style-name="P158"><text:tab/>movq <text:s text:c="3"/>i4@GOTPCREL(%rip), %rdx</text:p>
            <text:p text:style-name="P158"><text:tab/>xorl<text:tab/>%ecx, %ecx</text:p>
            <text:p text:style-name="P158"><text:tab/>movl<text:tab/>%ecx, 0(%rdx)</text:p>
            <text:p text:style-name="P158">.L114:</text:p>
            <text:p text:style-name="P158"><text:tab/>movq <text:s text:c="3"/>i4@GOTPCREL(%rip), %rax</text:p>
            <text:p text:style-name="P158"><text:tab/>movl<text:tab/>0(%rax), %r11d</text:p>
            <text:p text:style-name="P158"><text:tab/>cmpl<text:tab/>$2, %r11d</text:p>
            <text:p text:style-name="P158"><text:tab/>jg<text:tab/>.L115</text:p>
            <text:p text:style-name="P158"><text:tab/>movq <text:s text:c="3"/>ivector2@GOTPCREL(%rip), %rdx</text:p>
            <text:p text:style-name="P158"><text:tab/>movslq<text:tab/>%r11d, %r8</text:p>
            <text:p text:style-name="P158"><text:tab/>movq <text:s text:c="3"/>j@GOTPCREL(%rip), %rsi</text:p>
            <text:p text:style-name="P158"><text:tab/>movl<text:tab/>0(%rsi), %ecx</text:p>
            <text:p text:style-name="P158"><text:tab/>movq <text:s text:c="3"/>k@GOTPCREL(%rip), %rsi</text:p>
            <text:p text:style-name="P158"><text:tab/>movl<text:tab/>0(%rsi), %esi</text:p>
            <text:p text:style-name="P158"><text:tab/><text:span text:style-name="T38">imull<text:tab/>%esi, %ecx</text:span></text:p>
            <text:p text:style-name="P158"><text:tab/>movzbl<text:tab/>%cl, %esi</text:p>
            <text:p text:style-name="P158"><text:tab/>movb<text:tab/>%sil, 0(%rdx,%r8,1)</text:p>
            <text:p text:style-name="P158"><text:tab/>leaq<text:tab/>__stringlit_1(%rip), %rdi</text:p>
            <text:p text:style-name="P158"><text:tab/>movl<text:tab/>$0, %eax</text:p>
            <text:p text:style-name="P158"><text:tab/>call<text:tab/>printf@PLT</text:p>
            <text:p text:style-name="P158"><text:tab/>movq <text:s text:c="3"/>i4@GOTPCREL(%rip), %r9</text:p>
            <text:p text:style-name="P158"><text:tab/>movl<text:tab/>0(%r9), %r11d</text:p>
            <text:p text:style-name="P158"><text:soft-page-break/><text:tab/>leal<text:tab/>1(%r11d), %r10d</text:p>
            <text:p text:style-name="P158"><text:tab/>movl<text:tab/>%r10d, 0(%r9)</text:p>
            <text:p text:style-name="P158"><text:tab/>jmp<text:tab/>.L114</text:p>
            <text:p text:style-name="P158">.L115:</text:p>
          </table:table-cell>
        </table:table-row>
      </table:table>
      <text:p text:style-name="P82"><text:span text:style-name="T23"/></text:p>
      <text:p text:style-name="P47"><text:span text:style-name="T23">При оптимизации по скорости работы инвариантный код всё равно не выносится</text:span></text:p>
      <table:table table:name="Таблица67" table:style-name="Таблица67">
        <table:table-column table:style-name="Таблица67.A" table:number-columns-repeated="2"/>
        <table:table-row>
          <table:table-cell table:style-name="Таблица67.A1" office:value-type="string">
            <text:p text:style-name="P158">dead_code:</text:p>
            <text:p text:style-name="P158"><text:tab/>.cfi_startproc</text:p>
            <text:p text:style-name="P158"><text:tab/>subq<text:tab/>$8, %rsp</text:p>
            <text:p text:style-name="P158"><text:tab/>.cfi_adjust_cfa_offset<text:tab/>8</text:p>
            <text:p text:style-name="P158"><text:tab/>leaq<text:tab/>16(%rsp), %rax</text:p>
            <text:p text:style-name="P158"><text:tab/>movq<text:tab/>%rax, 0(%rsp)</text:p>
            <text:p text:style-name="P158"><text:tab/>xorl<text:tab/>%ecx, %ecx</text:p>
            <text:p text:style-name="P158"><text:tab/>cmpl<text:tab/>$0, %ecx</text:p>
            <text:p text:style-name="P158"><text:tab/>je<text:tab/>.L123</text:p>
            <text:p text:style-name="P158"><text:tab/>leaq<text:tab/>__stringlit_5(%rip), %rdi</text:p>
            <text:p text:style-name="P158"><text:tab/>movl<text:tab/>$0, %eax</text:p>
            <text:p text:style-name="P158"><text:tab/>call<text:tab/>printf@PLT</text:p>
            <text:p text:style-name="P158">.L123:</text:p>
            <text:p text:style-name="P158"><text:tab/>addq<text:tab/>$8, %rsp</text:p>
            <text:p text:style-name="P158"><text:tab/>ret</text:p>
            <text:p text:style-name="P158"><text:tab/>.cfi_endproc</text:p>
          </table:table-cell>
          <table:table-cell table:style-name="Таблица67.A1" office:value-type="string">
            <text:p text:style-name="P181">void dead_code(int a,</text:p>
            <text:p text:style-name="P181"><text:tab/>char *b)</text:p>
            <text:p text:style-name="P181">{</text:p>
            <text:p text:style-name="P181"><text:tab/>int idead_store;</text:p>
            <text:p text:style-name="P181"/>
            <text:p text:style-name="P181"><text:tab/>idead_store = a;</text:p>
            <text:p text:style-name="P181"><text:tab/>if (0)</text:p>
            <text:p text:style-name="P181"><text:tab/><text:tab/>printf("%s\n", b);</text:p>
            <text:p text:style-name="P181">}</text:p>
          </table:table-cell>
        </table:table-row>
      </table:table>
      <text:p text:style-name="P47"><text:span text:style-name="T23"/></text:p>
      <text:p text:style-name="P47"><text:span text:style-name="T23">Без оптимизации </text:span><text:span text:style-name="T30">ccomp</text:span><text:span text:style-name="T23"> напрямую сгенерировал функцию.</text:span></text:p>
      <text:p text:style-name="P47"><text:span text:style-name="T23"/></text:p>
      <table:table table:name="Таблица76" table:style-name="Таблица76">
        <table:table-column table:style-name="Таблица76.A" table:number-columns-repeated="2"/>
        <table:table-row table:style-name="Таблица76.1">
          <table:table-cell table:style-name="Таблица76.A1" office:value-type="string">
            <text:p text:style-name="P159">dead_code:</text:p>
            <text:p text:style-name="P159"><text:tab/>.cfi_startproc</text:p>
            <text:p text:style-name="P159"><text:tab/>subq<text:tab/>$8, %rsp</text:p>
            <text:p text:style-name="P159"><text:tab/>.cfi_adjust_cfa_offset<text:tab/>8</text:p>
            <text:p text:style-name="P159"><text:tab/>leaq<text:tab/>16(%rsp), %rax</text:p>
            <text:p text:style-name="P159"><text:tab/>movq<text:tab/>%rax, 0(%rsp)</text:p>
            <text:p text:style-name="P159"><text:tab/>xorl<text:tab/>%ecx, %ecx</text:p>
            <text:p text:style-name="P159"><text:tab/>cmpl<text:tab/>$0, %ecx</text:p>
            <text:p text:style-name="P159"><text:tab/>je<text:tab/>.L123</text:p>
            <text:p text:style-name="P159"><text:tab/>leaq<text:tab/>__stringlit_5(%rip), %rdi</text:p>
            <text:p text:style-name="P159"><text:tab/>movl<text:tab/>$0, %eax</text:p>
            <text:p text:style-name="P159"><text:tab/>call<text:tab/>printf@PLT</text:p>
            <text:p text:style-name="P159">.L123:</text:p>
            <text:p text:style-name="P159"><text:tab/>addq<text:tab/>$8, %rsp</text:p>
            <text:p text:style-name="P159"><text:tab/>ret</text:p>
            <text:p text:style-name="P159"><text:tab/>.cfi_endproc</text:p>
          </table:table-cell>
          <table:table-cell table:style-name="Таблица76.A1" office:value-type="string">
            <text:p text:style-name="P159">dead_code:</text:p>
            <text:p text:style-name="P159"><text:tab/>.cfi_startproc</text:p>
            <text:p text:style-name="P159"><text:tab/>subq<text:tab/>$8, %rsp</text:p>
            <text:p text:style-name="P159"><text:tab/>.cfi_adjust_cfa_offset<text:tab/>8</text:p>
            <text:p text:style-name="P159"><text:tab/>leaq<text:tab/>16(%rsp), %rax</text:p>
            <text:p text:style-name="P159"><text:tab/>movq<text:tab/>%rax, 0(%rsp)</text:p>
            <text:p text:style-name="P159"><text:tab/>addq<text:tab/>$8, %rsp</text:p>
            <text:p text:style-name="P159"><text:tab/>ret</text:p>
            <text:p text:style-name="P159"><text:tab/>.cfi_endproc</text:p>
          </table:table-cell>
        </table:table-row>
      </table:table>
      <text:p text:style-name="P47"><text:span text:style-name="T23"/></text:p>
      <text:p text:style-name="P75"><text:span text:style-name="T23">При оптимизации функция ужалась, убралось ветвление, но сохранились лишние операции, более того если в случае других компиляторов они убирали вызов этой функции поскольку она не влияет на выполнение программы, ccomp оставил её.</text:span></text:p>
      <table:table table:name="Таблица68" table:style-name="Таблица68">
        <table:table-column table:style-name="Таблица68.A" table:number-columns-repeated="2"/>
        <table:table-row table:style-name="Таблица68.1">
          <table:table-cell table:style-name="Таблица68.A1" office:value-type="string">
            <text:p text:style-name="P156">unnecessary_loop:</text:p>
            <text:p text:style-name="P156"><text:tab/>.cfi_startproc</text:p>
            <text:p text:style-name="P156"><text:tab/>subq<text:tab/>$8, %rsp</text:p>
            <text:p text:style-name="P156"><text:tab/>.cfi_adjust_cfa_offset<text:tab/>8</text:p>
            <text:p text:style-name="P156"><text:tab/>leaq<text:tab/>16(%rsp), %rax</text:p>
            <text:p text:style-name="P156"><text:tab/>movq<text:tab/>%rax, 0(%rsp)</text:p>
            <text:p text:style-name="P156"><text:tab/>xorl<text:tab/>%eax, %eax</text:p>
            <text:p text:style-name="P156"><text:tab/>movq <text:s text:c="3"/>i@GOTPCREL(%rip), %r8</text:p>
            <text:p text:style-name="P156"><text:tab/>xorl<text:tab/>%r10d, %r10d</text:p>
            <text:p text:style-name="P156"><text:tab/>movl<text:tab/>%r10d, 0(%r8)</text:p>
            <text:p text:style-name="P156">.L124:</text:p>
            <text:p text:style-name="P156"><text:tab/>movq <text:s text:c="3"/>i@GOTPCREL(%rip), %rcx</text:p>
            <text:p text:style-name="P156"><text:tab/>movl<text:tab/>0(%rcx), %ecx</text:p>
            <text:p text:style-name="P156"><text:tab/>cmpl<text:tab/>$5, %ecx</text:p>
            <text:p text:style-name="P156"><text:tab/>jge<text:tab/>.L125</text:p>
            <text:p text:style-name="P156"><text:tab/>movq <text:s text:c="3"/>k5@GOTPCREL(%rip), %r8</text:p>
            <text:p text:style-name="P156"><text:tab/>movq <text:s text:c="3"/>j5@GOTPCREL(%rip), %rdx</text:p>
            <text:p text:style-name="P156"><text:tab/>movl<text:tab/>0(%rdx), %ecx</text:p>
            <text:p text:style-name="P156"><text:tab/>leal<text:tab/>0(%eax,%ecx,1), %esi</text:p>
            <text:p text:style-name="P156"><text:tab/>movl<text:tab/>%esi, 0(%r8)</text:p>
            <text:p text:style-name="P156"><text:tab/>movq <text:s text:c="3"/>i@GOTPCREL(%rip), %r9</text:p>
            <text:p text:style-name="P156"><text:tab/>movq <text:s text:c="3"/>i@GOTPCREL(%rip), %rdi</text:p>
            <text:p text:style-name="P156"><text:tab/>movl<text:tab/>0(%rdi), %edx</text:p>
            <text:p text:style-name="P156"><text:tab/>leal<text:tab/>1(%edx), %r11d</text:p>
            <text:p text:style-name="P156"><text:tab/>movl<text:tab/>%r11d, 0(%r9)</text:p>
            <text:p text:style-name="P156"><text:tab/>jmp<text:tab/>.L124</text:p>
            <text:p text:style-name="P156">.L125:</text:p>
            <text:p text:style-name="P156"><text:tab/>leaq<text:tab/>__stringlit_1(%rip), %rdi</text:p>
            <text:p text:style-name="P156"><text:tab/>movq <text:s text:c="3"/>k5@GOTPCREL(%rip), %rsi</text:p>
            <text:p text:style-name="P156"><text:tab/>movl<text:tab/>0(%rsi), %esi</text:p>
            <text:p text:style-name="P156"><text:tab/>movl<text:tab/>$0, %eax</text:p>
            <text:p text:style-name="P156"><text:tab/>call<text:tab/>printf@PLT</text:p>
            <text:p text:style-name="P156"><text:tab/>addq<text:tab/>$8, %rsp</text:p>
            <text:p text:style-name="P156"><text:tab/>ret</text:p>
            <text:p text:style-name="P156"><text:tab/>.cfi_endproc</text:p>
          </table:table-cell>
          <table:table-cell table:style-name="Таблица68.A1" office:value-type="string">
            <text:p text:style-name="P181">void unnecessary_loop()</text:p>
            <text:p text:style-name="P181">{</text:p>
            <text:p text:style-name="P181"><text:tab/>int x;</text:p>
            <text:p text:style-name="P181"/>
            <text:p text:style-name="P181"><text:tab/>x = 0;</text:p>
            <text:p text:style-name="P181"><text:tab/>for (i = 0; i &lt; 5; i++)</text:p>
            <text:p text:style-name="P181"><text:tab/><text:tab/>k5 = x + j5;</text:p>
            <text:p text:style-name="P181"><text:tab/>printf("%d", k5);</text:p>
            <text:p text:style-name="P181">}</text:p>
          </table:table-cell>
        </table:table-row>
      </table:table>
      <text:p text:style-name="P51"><text:span text:style-name="T23"/></text:p>
      <text:p text:style-name="P51"><text:span text:style-name="T23">Без оптимизации цикл остался</text:span></text:p>
      <text:p text:style-name="P51"><text:span text:style-name="T23"/></text:p>
      <table:table table:name="Таблица69" table:style-name="Таблица69">
        <table:table-column table:style-name="Таблица69.A" table:number-columns-repeated="2"/>
        <table:table-row>
          <table:table-cell table:style-name="Таблица69.A1" office:value-type="string">
            <text:p text:style-name="P156">unnecessary_loop:</text:p>
            <text:p text:style-name="P156"><text:tab/>.cfi_startproc</text:p>
            <text:p text:style-name="P156"><text:tab/>subq<text:tab/>$8, %rsp</text:p>
            <text:p text:style-name="P156"><text:tab/>.cfi_adjust_cfa_offset<text:tab/>8</text:p>
            <text:p text:style-name="P156"><text:tab/>leaq<text:tab/>16(%rsp), %rax</text:p>
            <text:p text:style-name="P156"><text:tab/>movq<text:tab/>%rax, 0(%rsp)</text:p>
            <text:p text:style-name="P156"><text:tab/>xorl<text:tab/>%eax, %eax</text:p>
            <text:p text:style-name="P156"><text:tab/>movq <text:s text:c="3"/>i@GOTPCREL(%rip), %r8</text:p>
            <text:p text:style-name="P156"><text:tab/>xorl<text:tab/>%r10d, %r10d</text:p>
            <text:p text:style-name="P156"><text:tab/>movl<text:tab/>%r10d, 0(%r8)</text:p>
            <text:p text:style-name="P156">.L124:</text:p>
            <text:p text:style-name="P156"><text:tab/>movq <text:s text:c="3"/>i@GOTPCREL(%rip), %rcx</text:p>
            <text:p text:style-name="P156"><text:tab/>movl<text:tab/>0(%rcx), %ecx</text:p>
            <text:p text:style-name="P156"><text:tab/>cmpl<text:tab/>$5, %ecx</text:p>
            <text:p text:style-name="P156"><text:tab/>jge<text:tab/>.L125</text:p>
            <text:p text:style-name="P156"><text:tab/>movq <text:s text:c="3"/>k5@GOTPCREL(%rip), %r8</text:p>
            <text:p text:style-name="P156"><text:tab/>movq <text:s text:c="3"/>j5@GOTPCREL(%rip), %rdx</text:p>
            <text:p text:style-name="P156"><text:tab/>movl<text:tab/>0(%rdx), %ecx</text:p>
            <text:p text:style-name="P156"><text:tab/>leal<text:tab/>0(%eax,%ecx,1), %esi</text:p>
            <text:p text:style-name="P156"><text:tab/>movl<text:tab/>%esi, 0(%r8)</text:p>
            <text:p text:style-name="P156"><text:tab/>movq <text:s text:c="3"/>i@GOTPCREL(%rip), %r9</text:p>
            <text:p text:style-name="P156"><text:tab/>movq <text:s text:c="3"/>i@GOTPCREL(%rip), %rdi</text:p>
            <text:p text:style-name="P156"><text:tab/>movl<text:tab/>0(%rdi), %edx</text:p>
            <text:p text:style-name="P156"><text:soft-page-break/><text:tab/>leal<text:tab/>1(%edx), %r11d</text:p>
            <text:p text:style-name="P156"><text:tab/>movl<text:tab/>%r11d, 0(%r9)</text:p>
            <text:p text:style-name="P156"><text:tab/>jmp<text:tab/>.L124</text:p>
            <text:p text:style-name="P156">.L125:</text:p>
            <text:p text:style-name="P156"><text:tab/>leaq<text:tab/>__stringlit_1(%rip), %rdi</text:p>
            <text:p text:style-name="P156"><text:tab/>movq <text:s text:c="3"/>k5@GOTPCREL(%rip), %rsi</text:p>
            <text:p text:style-name="P156"><text:tab/>movl<text:tab/>0(%rsi), %esi</text:p>
            <text:p text:style-name="P156"><text:tab/>movl<text:tab/>$0, %eax</text:p>
            <text:p text:style-name="P156"><text:tab/>call<text:tab/>printf@PLT</text:p>
            <text:p text:style-name="P156"><text:tab/>addq<text:tab/>$8, %rsp</text:p>
            <text:p text:style-name="P156"><text:tab/>ret</text:p>
            <text:p text:style-name="P156"><text:tab/>.cfi_endproc</text:p>
          </table:table-cell>
          <table:table-cell table:style-name="Таблица69.A1" office:value-type="string">
            <text:p text:style-name="P156">unnecessary_loop:</text:p>
            <text:p text:style-name="P156"><text:tab/>.cfi_startproc</text:p>
            <text:p text:style-name="P156"><text:tab/>subq<text:tab/>$8, %rsp</text:p>
            <text:p text:style-name="P156"><text:tab/>.cfi_adjust_cfa_offset<text:tab/>8</text:p>
            <text:p text:style-name="P156"><text:tab/>leaq<text:tab/>16(%rsp), %rax</text:p>
            <text:p text:style-name="P156"><text:tab/>movq<text:tab/>%rax, 0(%rsp)</text:p>
            <text:p text:style-name="P156"><text:tab/>movq <text:s text:c="3"/>i@GOTPCREL(%rip), %r8</text:p>
            <text:p text:style-name="P156"><text:tab/>xorl<text:tab/>%r11d, %r11d</text:p>
            <text:p text:style-name="P156"><text:tab/>movl<text:tab/>%r11d, 0(%r8)</text:p>
            <text:p text:style-name="P156">.L116:</text:p>
            <text:p text:style-name="P156"><text:tab/>movq <text:s text:c="3"/>i@GOTPCREL(%rip), %rcx</text:p>
            <text:p text:style-name="P156"><text:tab/>movl<text:tab/>0(%rcx), %eax</text:p>
            <text:p text:style-name="P156"><text:tab/>cmpl<text:tab/>$5, %eax</text:p>
            <text:p text:style-name="P156"><text:tab/>jge<text:tab/>.L117</text:p>
            <text:p text:style-name="P156"><text:tab/>movq <text:s text:c="3"/>k5@GOTPCREL(%rip), %rsi</text:p>
            <text:p text:style-name="P156"><text:tab/>movq <text:s text:c="3"/>j5@GOTPCREL(%rip), %rdx</text:p>
            <text:p text:style-name="P156"><text:tab/>movl<text:tab/>0(%rdx), %edx</text:p>
            <text:p text:style-name="P156"><text:tab/>leal<text:tab/>0(%edx), %edi</text:p>
            <text:p text:style-name="P156"><text:tab/>movl<text:tab/>%edi, 0(%rsi)</text:p>
            <text:p text:style-name="P156"><text:tab/>leal<text:tab/>1(%eax), %r9d</text:p>
            <text:p text:style-name="P156"><text:tab/>movl<text:tab/>%r9d, 0(%rcx)</text:p>
            <text:p text:style-name="P156"><text:tab/>jmp<text:tab/>.L116</text:p>
            <text:p text:style-name="P156">.L117:</text:p>
            <text:p text:style-name="P156"><text:soft-page-break/><text:tab/>leaq<text:tab/>__stringlit_1(%rip), %rdi</text:p>
            <text:p text:style-name="P156"><text:tab/>movq <text:s text:c="3"/>k5@GOTPCREL(%rip), %rcx</text:p>
            <text:p text:style-name="P156"><text:tab/>movl<text:tab/>0(%rcx), %esi</text:p>
            <text:p text:style-name="P156"><text:tab/>movl<text:tab/>$0, %eax</text:p>
            <text:p text:style-name="P156"><text:tab/>call<text:tab/>printf@PLT</text:p>
            <text:p text:style-name="P156"><text:tab/>addq<text:tab/>$8, %rsp</text:p>
            <text:p text:style-name="P156"><text:tab/>ret</text:p>
            <text:p text:style-name="P156"><text:tab/>.cfi_endproc</text:p>
          </table:table-cell>
        </table:table-row>
      </table:table>
      <text:p text:style-name="P51"><text:span text:style-name="T23"/></text:p>
      <text:p text:style-name="P51"><text:span text:style-name="T23">При оптимизации цикл </text:span><text:span text:style-name="T31">остался</text:span></text:p>
      <text:p text:style-name="P51"><text:span text:style-name="T23"/></text:p>
      <text:p text:style-name="P51"><text:span text:style-name="T23"/></text:p>
      <table:table table:name="Таблица70" table:style-name="Таблица70">
        <table:table-column table:style-name="Таблица70.A" table:number-columns-repeated="2"/>
        <table:table-row>
          <table:table-cell table:style-name="Таблица70.A1" office:value-type="string">
            <text:p text:style-name="P156">loop_jamming:</text:p>
            <text:p text:style-name="P156"><text:tab/>.cfi_startproc</text:p>
            <text:p text:style-name="P156"><text:tab/>subq<text:tab/>$24, %rsp</text:p>
            <text:p text:style-name="P156"><text:tab/>.cfi_adjust_cfa_offset<text:tab/>24</text:p>
            <text:p text:style-name="P156"><text:tab/>leaq<text:tab/>32(%rsp), %rax</text:p>
            <text:p text:style-name="P156"><text:tab/>movq<text:tab/>%rax, 0(%rsp)</text:p>
            <text:p text:style-name="P156"><text:tab/>movq<text:tab/>%rbx, 8(%rsp)</text:p>
            <text:p text:style-name="P156"><text:tab/>movq<text:tab/>%rdi, %rbx</text:p>
            <text:p text:style-name="P156"><text:tab/>movq <text:s text:c="3"/>i@GOTPCREL(%rip), %r11</text:p>
            <text:p text:style-name="P156"><text:tab/>xorl<text:tab/>%edi, %edi</text:p>
            <text:p text:style-name="P156"><text:tab/>movl<text:tab/>%edi, 0(%r11)</text:p>
            <text:p text:style-name="P156">.L126:</text:p>
            <text:p text:style-name="P156"><text:tab/>movq <text:s text:c="3"/>i@GOTPCREL(%rip), %rsi</text:p>
            <text:p text:style-name="P156"><text:tab/>movl<text:tab/>0(%rsi), %ecx</text:p>
            <text:p text:style-name="P156"><text:tab/>cmpl<text:tab/>$5, %ecx</text:p>
            <text:p text:style-name="P156"><text:tab/>jge<text:tab/>.L127</text:p>
            <text:p text:style-name="P156"><text:tab/>movq <text:s text:c="3"/>k5@GOTPCREL(%rip), %r11</text:p>
            <text:p text:style-name="P156"><text:tab/>movq <text:s text:c="3"/>j5@GOTPCREL(%rip), %rdx</text:p>
            <text:p text:style-name="P156"><text:tab/>movl<text:tab/>0(%rdx), %ecx</text:p>
            <text:p text:style-name="P156"><text:tab/>movq <text:s text:c="3"/>i@GOTPCREL(%rip), %rdi</text:p>
            <text:p text:style-name="P156"><text:tab/>movl<text:tab/>0(%rdi), %edx</text:p>
            <text:p text:style-name="P156"><text:tab/>imull<text:tab/>%edx, %ecx</text:p>
            <text:p text:style-name="P156"><text:tab/>leal<text:tab/>0(%ebx,%ecx,1), %r10d</text:p>
            <text:p text:style-name="P156"><text:tab/>movl<text:tab/>%r10d, 0(%r11)</text:p>
            <text:p text:style-name="P156"><text:tab/>leaq<text:tab/>__stringlit_1(%rip), %rdi</text:p>
            <text:p text:style-name="P156"><text:tab/>movq <text:s text:c="3"/>k5@GOTPCREL(%rip), %rsi</text:p>
            <text:p text:style-name="P156"><text:tab/>movl<text:tab/>0(%rsi), %esi</text:p>
            <text:p text:style-name="P156"><text:tab/>movl<text:tab/>$0, %eax</text:p>
            <text:p text:style-name="P156"><text:tab/>call<text:tab/>printf@PLT</text:p>
            <text:p text:style-name="P156"><text:tab/>movq <text:s text:c="3"/>i@GOTPCREL(%rip), %rax</text:p>
            <text:p text:style-name="P156"><text:tab/>movq <text:s text:c="3"/>i@GOTPCREL(%rip), %r9</text:p>
            <text:p text:style-name="P156"><text:tab/>movl<text:tab/>0(%r9), %esi</text:p>
            <text:p text:style-name="P156"><text:tab/>leal<text:tab/>1(%esi), %edx</text:p>
            <text:p text:style-name="P156"><text:tab/>movl<text:tab/>%edx, 0(%rax)</text:p>
            <text:p text:style-name="P156"><text:tab/>jmp<text:tab/>.L126</text:p>
            <text:p text:style-name="P156">.L127:</text:p>
            <text:p text:style-name="P156"><text:tab/>movq <text:s text:c="3"/>i@GOTPCREL(%rip), %rcx</text:p>
            <text:p text:style-name="P156"><text:tab/>xorl<text:tab/>%eax, %eax</text:p>
            <text:p text:style-name="P156"><text:tab/>movl<text:tab/>%eax, 0(%rcx)</text:p>
            <text:p text:style-name="P156">.L128:</text:p>
            <text:p text:style-name="P156"><text:tab/>movq <text:s text:c="3"/>i@GOTPCREL(%rip), %rdi</text:p>
            <text:p text:style-name="P156"><text:tab/>movl<text:tab/>0(%rdi), %edi</text:p>
            <text:p text:style-name="P156"><text:tab/>cmpl<text:tab/>$5, %edi</text:p>
            <text:p text:style-name="P156"><text:tab/>jge<text:tab/>.L129</text:p>
            <text:p text:style-name="P156"><text:tab/>movq <text:s text:c="3"/>i5@GOTPCREL(%rip), %rdx</text:p>
            <text:p text:style-name="P156"><text:tab/>movq <text:s text:c="3"/>k5@GOTPCREL(%rip), %r8</text:p>
            <text:p text:style-name="P156"><text:tab/>movl<text:tab/>0(%r8), %esi</text:p>
            <text:p text:style-name="P156"><text:tab/>movq<text:tab/>%rbx, %rax</text:p>
            <text:p text:style-name="P156"><text:tab/>imull<text:tab/>%esi, %eax</text:p>
            <text:p text:style-name="P156"><text:tab/>movq <text:s text:c="3"/>i@GOTPCREL(%rip), %r8</text:p>
            <text:p text:style-name="P156"><text:tab/>movl<text:tab/>0(%r8), %esi</text:p>
            <text:p text:style-name="P156"><text:tab/>imull<text:tab/>%esi, %eax</text:p>
            <text:p text:style-name="P156"><text:tab/>movl<text:tab/>%eax, 0(%rdx)</text:p>
            <text:p text:style-name="P156"><text:tab/>leaq<text:tab/>__stringlit_1(%rip), %rdi</text:p>
            <text:p text:style-name="P156"><text:tab/>movq <text:s text:c="3"/>k5@GOTPCREL(%rip), %rcx</text:p>
            <text:p text:style-name="P156"><text:tab/>movl<text:tab/>0(%rcx), %esi</text:p>
            <text:p text:style-name="P156"><text:tab/>movl<text:tab/>$0, %eax</text:p>
            <text:p text:style-name="P156"><text:tab/>call<text:tab/>printf@PLT</text:p>
            <text:p text:style-name="P156"><text:tab/>movq <text:s text:c="3"/>i@GOTPCREL(%rip), %r11</text:p>
            <text:p text:style-name="P156"><text:tab/>movq <text:s text:c="3"/>i@GOTPCREL(%rip), %r10</text:p>
            <text:p text:style-name="P156"><text:tab/>movl<text:tab/>0(%r10), %r10d</text:p>
            <text:p text:style-name="P156"><text:tab/>leal<text:tab/>1(%r10d), %r9d</text:p>
            <text:p text:style-name="P156"><text:tab/>movl<text:tab/>%r9d, 0(%r11)</text:p>
            <text:p text:style-name="P156"><text:soft-page-break/><text:tab/>jmp<text:tab/>.L128</text:p>
            <text:p text:style-name="P156">.L129:</text:p>
            <text:p text:style-name="P156"><text:tab/>movq<text:tab/>8(%rsp), %rbx</text:p>
            <text:p text:style-name="P156"><text:tab/>addq<text:tab/>$24, %rsp</text:p>
            <text:p text:style-name="P156"><text:tab/>ret</text:p>
            <text:p text:style-name="P156"><text:tab/>.cfi_endproc</text:p>
          </table:table-cell>
          <table:table-cell table:style-name="Таблица70.A1" office:value-type="string">
            <text:p text:style-name="P181">loop_jamming:</text:p>
            <text:p text:style-name="P181"><text:tab/>.cfi_startproc</text:p>
            <text:p text:style-name="P181"><text:tab/>subq<text:tab/>$24, %rsp</text:p>
            <text:p text:style-name="P181"><text:tab/>.cfi_adjust_cfa_offset<text:tab/>24</text:p>
            <text:p text:style-name="P181"><text:tab/>leaq<text:tab/>32(%rsp), %rax</text:p>
            <text:p text:style-name="P181"><text:tab/>movq<text:tab/>%rax, 0(%rsp)</text:p>
            <text:p text:style-name="P181"><text:tab/>movq<text:tab/>%rbx, 8(%rsp)</text:p>
            <text:p text:style-name="P181"><text:tab/>movq<text:tab/>%rdi, %rbx</text:p>
            <text:p text:style-name="P181"><text:tab/>movq <text:s text:c="3"/>i@GOTPCREL(%rip), %r10</text:p>
            <text:p text:style-name="P181"><text:tab/>xorl<text:tab/>%ecx, %ecx</text:p>
            <text:p text:style-name="P181"><text:tab/>movl<text:tab/>%ecx, 0(%r10)</text:p>
            <text:p text:style-name="P181">.L118:</text:p>
            <text:p text:style-name="P181"><text:tab/>movq <text:s text:c="3"/>i@GOTPCREL(%rip), %rdx</text:p>
            <text:p text:style-name="P181"><text:tab/>movl<text:tab/>0(%rdx), %ecx</text:p>
            <text:p text:style-name="P181"><text:tab/>cmpl<text:tab/>$5, %ecx</text:p>
            <text:p text:style-name="P181"><text:tab/>jge<text:tab/>.L119</text:p>
            <text:p text:style-name="P181"><text:tab/>movq <text:s text:c="3"/>k5@GOTPCREL(%rip), %rdx</text:p>
            <text:p text:style-name="P181"><text:tab/>movq <text:s text:c="3"/>j5@GOTPCREL(%rip), %r8</text:p>
            <text:p text:style-name="P181"><text:tab/>movl<text:tab/>0(%r8), %r8d</text:p>
            <text:p text:style-name="P181"><text:tab/>imull<text:tab/>%ecx, %r8d</text:p>
            <text:p text:style-name="P181"><text:tab/>leal<text:tab/>0(%ebx,%r8d,1), %esi</text:p>
            <text:p text:style-name="P181"><text:tab/>movl<text:tab/>%esi, 0(%rdx)</text:p>
            <text:p text:style-name="P181"><text:tab/>leaq<text:tab/>__stringlit_1(%rip), %rdi</text:p>
            <text:p text:style-name="P181"><text:tab/>movl<text:tab/>$0, %eax</text:p>
            <text:p text:style-name="P181"><text:tab/>call<text:tab/>printf@PLT</text:p>
            <text:p text:style-name="P181"><text:tab/>movq <text:s text:c="3"/>i@GOTPCREL(%rip), %r9</text:p>
            <text:p text:style-name="P181"><text:tab/>movl<text:tab/>0(%r9), %r11d</text:p>
            <text:p text:style-name="P181"><text:tab/>leal<text:tab/>1(%r11d), %edx</text:p>
            <text:p text:style-name="P181"><text:tab/>movl<text:tab/>%edx, 0(%r9)</text:p>
            <text:p text:style-name="P181"><text:tab/>jmp<text:tab/>.L118</text:p>
            <text:p text:style-name="P181">.L119:</text:p>
            <text:p text:style-name="P181"><text:tab/>xorl<text:tab/>%r10d, %r10d</text:p>
            <text:p text:style-name="P181"><text:tab/>movl<text:tab/>%r10d, 0(%rdx)</text:p>
            <text:p text:style-name="P181">.L120:</text:p>
            <text:p text:style-name="P181"><text:tab/>movq <text:s text:c="3"/>i@GOTPCREL(%rip), %rax</text:p>
            <text:p text:style-name="P181"><text:tab/>movl<text:tab/>0(%rax), %edi</text:p>
            <text:p text:style-name="P181"><text:tab/>cmpl<text:tab/>$5, %edi</text:p>
            <text:p text:style-name="P181"><text:tab/>jge<text:tab/>.L121</text:p>
            <text:p text:style-name="P181"><text:tab/>movq <text:s text:c="3"/>i5@GOTPCREL(%rip), %r11</text:p>
            <text:p text:style-name="P181"><text:tab/>movq <text:s text:c="3"/>k5@GOTPCREL(%rip), %r8</text:p>
            <text:p text:style-name="P181"><text:tab/>movl<text:tab/>0(%r8), %esi</text:p>
            <text:p text:style-name="P181"><text:tab/>movq<text:tab/>%rbx, %rax</text:p>
            <text:p text:style-name="P181"><text:tab/>imull<text:tab/>%esi, %eax</text:p>
            <text:p text:style-name="P181"><text:tab/>imull<text:tab/>%edi, %eax</text:p>
            <text:p text:style-name="P181"><text:tab/>movl<text:tab/>%eax, 0(%r11)</text:p>
            <text:p text:style-name="P181"><text:tab/>leaq<text:tab/>__stringlit_1(%rip), %rdi</text:p>
            <text:p text:style-name="P181"><text:tab/>movl<text:tab/>$0, %eax</text:p>
            <text:p text:style-name="P181"><text:tab/>call<text:tab/>printf@PLT</text:p>
            <text:p text:style-name="P181"><text:tab/>movq <text:s text:c="3"/>i@GOTPCREL(%rip), %rsi</text:p>
            <text:p text:style-name="P181"><text:tab/>movl<text:tab/>0(%rsi), %edx</text:p>
            <text:p text:style-name="P181"><text:tab/>leal<text:tab/>1(%edx), %eax</text:p>
            <text:p text:style-name="P181"><text:tab/>movl<text:tab/>%eax, 0(%rsi)</text:p>
            <text:p text:style-name="P181"><text:soft-page-break/><text:tab/>jmp<text:tab/>.L120</text:p>
            <text:p text:style-name="P181">.L121:</text:p>
            <text:p text:style-name="P181"><text:tab/>movq<text:tab/>8(%rsp), %rbx</text:p>
            <text:p text:style-name="P181"><text:tab/>addq<text:tab/>$24, %rsp</text:p>
            <text:p text:style-name="P181"><text:tab/>ret</text:p>
            <text:p text:style-name="P181"><text:tab/>.cfi_endproc</text:p>
          </table:table-cell>
        </table:table-row>
      </table:table>
      <text:p text:style-name="P51"><text:span text:style-name="T23"/></text:p>
      <text:p text:style-name="P56"><text:span text:style-name="T23"/></text:p>
      <text:p text:style-name="P57"><text:span text:style-name="T23">Без оптимизации было сгенерированно 2 цикла</text:span></text:p>
      <text:p text:style-name="P56"><text:span text:style-name="T23"/></text:p>
      <table:table table:name="Таблица71" table:style-name="Таблица71">
        <table:table-column table:style-name="Таблица71.A" table:number-columns-repeated="2"/>
        <table:table-row table:style-name="Таблица71.1">
          <table:table-cell table:style-name="Таблица71.A1" office:value-type="string">
            <text:p text:style-name="P156">loop_jamming:</text:p>
            <text:p text:style-name="P156"><text:tab/>.cfi_startproc</text:p>
            <text:p text:style-name="P156"><text:tab/>subq<text:tab/>$24, %rsp</text:p>
            <text:p text:style-name="P156"><text:tab/>.cfi_adjust_cfa_offset<text:tab/>24</text:p>
            <text:p text:style-name="P156"><text:tab/>leaq<text:tab/>32(%rsp), %rax</text:p>
            <text:p text:style-name="P156"><text:tab/>movq<text:tab/>%rax, 0(%rsp)</text:p>
            <text:p text:style-name="P156"><text:tab/>movq<text:tab/>%rbx, 8(%rsp)</text:p>
            <text:p text:style-name="P156"><text:tab/>movq<text:tab/>%rdi, %rbx</text:p>
            <text:p text:style-name="P156"><text:tab/>movq <text:s text:c="3"/>i@GOTPCREL(%rip), %r11</text:p>
            <text:p text:style-name="P156"><text:tab/>xorl<text:tab/>%edi, %edi</text:p>
            <text:p text:style-name="P156"><text:tab/>movl<text:tab/>%edi, 0(%r11)</text:p>
            <text:p text:style-name="P156">.L126:</text:p>
            <text:p text:style-name="P156"><text:tab/>movq <text:s text:c="3"/>i@GOTPCREL(%rip), %rsi</text:p>
            <text:p text:style-name="P156"><text:tab/>movl<text:tab/>0(%rsi), %ecx</text:p>
            <text:p text:style-name="P156"><text:tab/>cmpl<text:tab/>$5, %ecx</text:p>
            <text:p text:style-name="P156"><text:tab/>jge<text:tab/>.L127</text:p>
            <text:p text:style-name="P156"><text:tab/>movq <text:s text:c="3"/>k5@GOTPCREL(%rip), %r11</text:p>
            <text:p text:style-name="P156"><text:tab/>movq <text:s text:c="3"/>j5@GOTPCREL(%rip), %rdx</text:p>
            <text:p text:style-name="P156"><text:tab/>movl<text:tab/>0(%rdx), %ecx</text:p>
            <text:p text:style-name="P156"><text:tab/>movq <text:s text:c="3"/>i@GOTPCREL(%rip), %rdi</text:p>
            <text:p text:style-name="P156"><text:tab/>movl<text:tab/>0(%rdi), %edx</text:p>
            <text:p text:style-name="P156"><text:tab/>imull<text:tab/>%edx, %ecx</text:p>
            <text:p text:style-name="P156"><text:tab/>leal<text:tab/>0(%ebx,%ecx,1), %r10d</text:p>
            <text:p text:style-name="P156"><text:tab/>movl<text:tab/>%r10d, 0(%r11)</text:p>
            <text:p text:style-name="P156"><text:tab/>leaq<text:tab/>__stringlit_1(%rip), %rdi</text:p>
            <text:p text:style-name="P156"><text:tab/>movq <text:s text:c="3"/>k5@GOTPCREL(%rip), %rsi</text:p>
            <text:p text:style-name="P156"><text:tab/>movl<text:tab/>0(%rsi), %esi</text:p>
            <text:p text:style-name="P156"><text:tab/>movl<text:tab/>$0, %eax</text:p>
            <text:p text:style-name="P156"><text:tab/>call<text:tab/>printf@PLT</text:p>
            <text:p text:style-name="P156"><text:tab/>movq <text:s text:c="3"/>i@GOTPCREL(%rip), %rax</text:p>
            <text:p text:style-name="P156"><text:tab/>movq <text:s text:c="3"/>i@GOTPCREL(%rip), %r9</text:p>
            <text:p text:style-name="P156"><text:tab/>movl<text:tab/>0(%r9), %esi</text:p>
            <text:p text:style-name="P156"><text:tab/>leal<text:tab/>1(%esi), %edx</text:p>
            <text:p text:style-name="P156"><text:tab/>movl<text:tab/>%edx, 0(%rax)</text:p>
            <text:p text:style-name="P156"><text:tab/>jmp<text:tab/>.L126</text:p>
            <text:p text:style-name="P156">.L127:</text:p>
            <text:p text:style-name="P156"><text:tab/>movq <text:s text:c="3"/>i@GOTPCREL(%rip), %rcx</text:p>
            <text:p text:style-name="P156"><text:tab/>xorl<text:tab/>%eax, %eax</text:p>
            <text:p text:style-name="P156"><text:tab/>movl<text:tab/>%eax, 0(%rcx)</text:p>
            <text:p text:style-name="P156">.L128:</text:p>
            <text:p text:style-name="P156"><text:tab/>movq <text:s text:c="3"/>i@GOTPCREL(%rip), %rdi</text:p>
            <text:p text:style-name="P156"><text:tab/>movl<text:tab/>0(%rdi), %edi</text:p>
            <text:p text:style-name="P156"><text:tab/>cmpl<text:tab/>$5, %edi</text:p>
            <text:p text:style-name="P156"><text:tab/>jge<text:tab/>.L129</text:p>
            <text:p text:style-name="P156"><text:tab/>movq <text:s text:c="3"/>i5@GOTPCREL(%rip), %rdx</text:p>
            <text:p text:style-name="P156"><text:tab/>movq <text:s text:c="3"/>k5@GOTPCREL(%rip), %r8</text:p>
            <text:p text:style-name="P156"><text:tab/>movl<text:tab/>0(%r8), %esi</text:p>
            <text:p text:style-name="P156"><text:tab/>movq<text:tab/>%rbx, %rax</text:p>
            <text:p text:style-name="P156"><text:tab/>imull<text:tab/>%esi, %eax</text:p>
            <text:p text:style-name="P156"><text:tab/>movq <text:s text:c="3"/>i@GOTPCREL(%rip), %r8</text:p>
            <text:p text:style-name="P156"><text:tab/>movl<text:tab/>0(%r8), %esi</text:p>
            <text:p text:style-name="P156"><text:tab/>imull<text:tab/>%esi, %eax</text:p>
            <text:p text:style-name="P156"><text:tab/>movl<text:tab/>%eax, 0(%rdx)</text:p>
            <text:p text:style-name="P156"><text:tab/>leaq<text:tab/>__stringlit_1(%rip), %rdi</text:p>
            <text:p text:style-name="P156"><text:tab/>movq <text:s text:c="3"/>k5@GOTPCREL(%rip), %rcx</text:p>
            <text:p text:style-name="P156"><text:tab/>movl<text:tab/>0(%rcx), %esi</text:p>
            <text:p text:style-name="P156"><text:tab/>movl<text:tab/>$0, %eax</text:p>
            <text:p text:style-name="P156"><text:tab/>call<text:tab/>printf@PLT</text:p>
            <text:p text:style-name="P156"><text:tab/>movq <text:s text:c="3"/>i@GOTPCREL(%rip), %r11</text:p>
            <text:p text:style-name="P156"><text:tab/>movq <text:s text:c="3"/>i@GOTPCREL(%rip), %r10</text:p>
            <text:p text:style-name="P156"><text:soft-page-break/><text:tab/>movl<text:tab/>0(%r10), %r10d</text:p>
            <text:p text:style-name="P156"><text:tab/>leal<text:tab/>1(%r10d), %r9d</text:p>
            <text:p text:style-name="P156"><text:tab/>movl<text:tab/>%r9d, 0(%r11)</text:p>
            <text:p text:style-name="P156"><text:tab/>jmp<text:tab/>.L128</text:p>
            <text:p text:style-name="P156">.L129:</text:p>
            <text:p text:style-name="P156"><text:tab/>movq<text:tab/>8(%rsp), %rbx</text:p>
            <text:p text:style-name="P156"><text:tab/>addq<text:tab/>$24, %rsp</text:p>
            <text:p text:style-name="P156"><text:tab/>ret</text:p>
            <text:p text:style-name="P156"><text:tab/>.cfi_endproc</text:p>
          </table:table-cell>
          <table:table-cell table:style-name="Таблица71.A1" office:value-type="string">
            <text:p text:style-name="P156">loop_jamming:</text:p>
            <text:p text:style-name="P156"><text:tab/>.cfi_startproc</text:p>
            <text:p text:style-name="P156"><text:tab/>subq<text:tab/>$24, %rsp</text:p>
            <text:p text:style-name="P156"><text:tab/>.cfi_adjust_cfa_offset<text:tab/>24</text:p>
            <text:p text:style-name="P156"><text:tab/>leaq<text:tab/>32(%rsp), %rax</text:p>
            <text:p text:style-name="P156"><text:tab/>movq<text:tab/>%rax, 0(%rsp)</text:p>
            <text:p text:style-name="P156"><text:tab/>movq<text:tab/>%rbx, 8(%rsp)</text:p>
            <text:p text:style-name="P156"><text:tab/>movq<text:tab/>%rdi, %rbx</text:p>
            <text:p text:style-name="P156"><text:tab/>movq <text:s text:c="3"/>i@GOTPCREL(%rip), %r10</text:p>
            <text:p text:style-name="P156"><text:tab/>xorl<text:tab/>%ecx, %ecx</text:p>
            <text:p text:style-name="P156"><text:tab/>movl<text:tab/>%ecx, 0(%r10)</text:p>
            <text:p text:style-name="P156">.L118:</text:p>
            <text:p text:style-name="P156"><text:tab/>movq <text:s text:c="3"/>i@GOTPCREL(%rip), %rdx</text:p>
            <text:p text:style-name="P156"><text:tab/>movl<text:tab/>0(%rdx), %ecx</text:p>
            <text:p text:style-name="P156"><text:tab/>cmpl<text:tab/>$5, %ecx</text:p>
            <text:p text:style-name="P156"><text:tab/>jge<text:tab/>.L119</text:p>
            <text:p text:style-name="P156"><text:tab/>movq <text:s text:c="3"/>k5@GOTPCREL(%rip), %rdx</text:p>
            <text:p text:style-name="P156"><text:tab/>movq <text:s text:c="3"/>j5@GOTPCREL(%rip), %r8</text:p>
            <text:p text:style-name="P156"><text:tab/>movl<text:tab/>0(%r8), %r8d</text:p>
            <text:p text:style-name="P156"><text:tab/>imull<text:tab/>%ecx, %r8d</text:p>
            <text:p text:style-name="P156"><text:tab/>leal<text:tab/>0(%ebx,%r8d,1), %esi</text:p>
            <text:p text:style-name="P156"><text:tab/>movl<text:tab/>%esi, 0(%rdx)</text:p>
            <text:p text:style-name="P156"><text:tab/>leaq<text:tab/>__stringlit_1(%rip), %rdi</text:p>
            <text:p text:style-name="P156"><text:tab/>movl<text:tab/>$0, %eax</text:p>
            <text:p text:style-name="P156"><text:tab/>call<text:tab/>printf@PLT</text:p>
            <text:p text:style-name="P156"><text:tab/>movq <text:s text:c="3"/>i@GOTPCREL(%rip), %r9</text:p>
            <text:p text:style-name="P156"><text:tab/>movl<text:tab/>0(%r9), %r11d</text:p>
            <text:p text:style-name="P156"><text:tab/>leal<text:tab/>1(%r11d), %edx</text:p>
            <text:p text:style-name="P156"><text:tab/>movl<text:tab/>%edx, 0(%r9)</text:p>
            <text:p text:style-name="P156"><text:tab/>jmp<text:tab/>.L118</text:p>
            <text:p text:style-name="P156">.L119:</text:p>
            <text:p text:style-name="P156"><text:tab/>xorl<text:tab/>%r10d, %r10d</text:p>
            <text:p text:style-name="P156"><text:tab/>movl<text:tab/>%r10d, 0(%rdx)</text:p>
            <text:p text:style-name="P156">.L120:</text:p>
            <text:p text:style-name="P156"><text:tab/>movq <text:s text:c="3"/>i@GOTPCREL(%rip), %rax</text:p>
            <text:p text:style-name="P156"><text:tab/>movl<text:tab/>0(%rax), %edi</text:p>
            <text:p text:style-name="P156"><text:tab/>cmpl<text:tab/>$5, %edi</text:p>
            <text:p text:style-name="P156"><text:tab/>jge<text:tab/>.L121</text:p>
            <text:p text:style-name="P156"><text:tab/>movq <text:s text:c="3"/>i5@GOTPCREL(%rip), %r11</text:p>
            <text:p text:style-name="P156"><text:tab/>movq <text:s text:c="3"/>k5@GOTPCREL(%rip), %r8</text:p>
            <text:p text:style-name="P156"><text:tab/>movl<text:tab/>0(%r8), %esi</text:p>
            <text:p text:style-name="P156"><text:tab/>movq<text:tab/>%rbx, %rax</text:p>
            <text:p text:style-name="P156"><text:tab/>imull<text:tab/>%esi, %eax</text:p>
            <text:p text:style-name="P156"><text:tab/>imull<text:tab/>%edi, %eax</text:p>
            <text:p text:style-name="P156"><text:tab/>movl<text:tab/>%eax, 0(%r11)</text:p>
            <text:p text:style-name="P156"><text:tab/>leaq<text:tab/>__stringlit_1(%rip), %rdi</text:p>
            <text:p text:style-name="P156"><text:tab/>movl<text:tab/>$0, %eax</text:p>
            <text:p text:style-name="P156"><text:tab/>call<text:tab/>printf@PLT</text:p>
            <text:p text:style-name="P156"><text:tab/>movq <text:s text:c="3"/>i@GOTPCREL(%rip), %rsi</text:p>
            <text:p text:style-name="P156"><text:tab/>movl<text:tab/>0(%rsi), %edx</text:p>
            <text:p text:style-name="P156"><text:tab/>leal<text:tab/>1(%edx), %eax</text:p>
            <text:p text:style-name="P156"><text:tab/>movl<text:tab/>%eax, 0(%rsi)</text:p>
            <text:p text:style-name="P156"><text:tab/>jmp<text:tab/>.L120</text:p>
            <text:p text:style-name="P156">.L121:</text:p>
            <text:p text:style-name="P156"><text:tab/>movq<text:tab/>8(%rsp), %rbx</text:p>
            <text:p text:style-name="P156"><text:tab/>addq<text:tab/>$24, %rsp</text:p>
            <text:p text:style-name="P156"><text:tab/>ret</text:p>
            <text:p text:style-name="P156"><text:tab/>.cfi_endproc</text:p>
          </table:table-cell>
        </table:table-row>
      </table:table>
      <text:p text:style-name="P56"><text:span text:style-name="T23"/></text:p>
      <text:p text:style-name="P76"><text:span text:style-name="T23">Оптимизация не смогла объединить циклы, их 2: L118 и L120</text:span></text:p>
      <table:table table:name="Таблица72" table:style-name="Таблица72">
        <table:table-column table:style-name="Таблица72.A" table:number-columns-repeated="2"/>
        <table:table-row>
          <table:table-cell table:style-name="Таблица72.A1" office:value-type="string">
            <text:p text:style-name="P156">loop_unrolling:</text:p>
            <text:p text:style-name="P156"><text:tab/>.cfi_startproc</text:p>
            <text:p text:style-name="P156"><text:tab/>subq<text:tab/>$8, %rsp</text:p>
            <text:p text:style-name="P156"><text:tab/>.cfi_adjust_cfa_offset<text:tab/>8</text:p>
            <text:p text:style-name="P156"><text:tab/>leaq<text:tab/>16(%rsp), %rax</text:p>
            <text:p text:style-name="P156"><text:tab/>movq<text:tab/>%rax, 0(%rsp)</text:p>
            <text:p text:style-name="P156"><text:tab/>movq <text:s text:c="3"/>i@GOTPCREL(%rip), %rdi</text:p>
            <text:p text:style-name="P156"><text:tab/>xorl<text:tab/>%eax, %eax</text:p>
            <text:p text:style-name="P156"><text:tab/>movl<text:tab/>%eax, 0(%rdi)</text:p>
            <text:p text:style-name="P156">.L130:</text:p>
            <text:p text:style-name="P156"><text:tab/>movq <text:s text:c="3"/>i@GOTPCREL(%rip), %rax</text:p>
            <text:p text:style-name="P156"><text:tab/>movl<text:tab/>0(%rax), %eax</text:p>
            <text:p text:style-name="P156"><text:tab/>cmpl<text:tab/>$6, %eax</text:p>
            <text:p text:style-name="P156"><text:tab/>jge<text:tab/>.L131</text:p>
            <text:p text:style-name="P156"><text:tab/>movq <text:s text:c="3"/>ivector4@GOTPCREL(%rip), %r11</text:p>
            <text:p text:style-name="P156"><text:tab/>movq <text:s text:c="3"/>i@GOTPCREL(%rip), %r8</text:p>
            <text:p text:style-name="P156"><text:tab/>movl<text:tab/>0(%r8), %ecx</text:p>
            <text:p text:style-name="P156"><text:tab/>movslq<text:tab/>%ecx, %rdx</text:p>
            <text:p text:style-name="P156"><text:tab/>xorl<text:tab/>%edi, %edi</text:p>
            <text:p text:style-name="P156"><text:tab/>movw<text:tab/>%di, 0(%r11,%rdx,2)</text:p>
            <text:p text:style-name="P156"><text:tab/>leaq<text:tab/>__stringlit_1(%rip), %rdi</text:p>
            <text:p text:style-name="P156"><text:tab/>movq <text:s text:c="3"/>ivector4@GOTPCREL(%rip), %rdx</text:p>
            <text:p text:style-name="P156"><text:tab/>movq <text:s text:c="3"/>i@GOTPCREL(%rip), %r10</text:p>
            <text:p text:style-name="P156"><text:tab/>movl<text:tab/>0(%r10), %ecx</text:p>
            <text:p text:style-name="P156"><text:tab/>movslq<text:tab/>%ecx, %r9</text:p>
            <text:p text:style-name="P156"><text:tab/>movswl<text:tab/>0(%rdx,%r9,2), %esi</text:p>
            <text:p text:style-name="P156"><text:tab/>movl<text:tab/>$0, %eax</text:p>
            <text:p text:style-name="P156"><text:tab/>call<text:tab/>printf@PLT</text:p>
            <text:p text:style-name="P156"><text:tab/>movq <text:s text:c="3"/>i@GOTPCREL(%rip), %rax</text:p>
            <text:p text:style-name="P156"><text:tab/>movq <text:s text:c="3"/>i@GOTPCREL(%rip), %r9</text:p>
            <text:p text:style-name="P156"><text:tab/>movl<text:tab/>0(%r9), %esi</text:p>
            <text:p text:style-name="P156"><text:tab/>leal<text:tab/>1(%esi), %esi</text:p>
            <text:p text:style-name="P156"><text:tab/>movl<text:tab/>%esi, 0(%rax)</text:p>
            <text:p text:style-name="P156"><text:tab/>jmp<text:tab/>.L130</text:p>
            <text:p text:style-name="P156">.L131:</text:p>
            <text:p text:style-name="P156"><text:tab/>addq<text:tab/>$8, %rsp</text:p>
            <text:p text:style-name="P156"><text:tab/>ret</text:p>
            <text:p text:style-name="P156"><text:tab/>.cfi_endproc</text:p>
          </table:table-cell>
          <table:table-cell table:style-name="Таблица72.A1" office:value-type="string">
            <text:p text:style-name="P181">void loop_unrolling(int x)</text:p>
            <text:p text:style-name="P181">{</text:p>
            <text:p text:style-name="P181"><text:tab/>for (i = 0; i &lt; 6; i++) {</text:p>
            <text:p text:style-name="P181"><text:tab/><text:tab/>ivector4[i] = 0;</text:p>
            <text:p text:style-name="P181"><text:tab/><text:tab/>printf("%d", ivector4[i]);</text:p>
            <text:p text:style-name="P181"><text:tab/>}</text:p>
            <text:p text:style-name="P181">} </text:p>
          </table:table-cell>
        </table:table-row>
      </table:table>
      <text:p text:style-name="P56"><text:span text:style-name="T23"/></text:p>
      <text:p text:style-name="P60"><text:span text:style-name="T23">Без оптимизации разворачивания циклов не происходит</text:span></text:p>
      <text:p text:style-name="P60"><text:span text:style-name="T23"/></text:p>
      <table:table table:name="Таблица73" table:style-name="Таблица73">
        <table:table-column table:style-name="Таблица73.A" table:number-columns-repeated="2"/>
        <table:table-row table:style-name="Таблица73.1">
          <table:table-cell table:style-name="Таблица73.A1" office:value-type="string">
            <text:p text:style-name="P156">loop_unrolling:</text:p>
            <text:p text:style-name="P156"><text:tab/>.cfi_startproc</text:p>
            <text:p text:style-name="P156"><text:tab/>subq<text:tab/>$8, %rsp</text:p>
            <text:p text:style-name="P156"><text:tab/>.cfi_adjust_cfa_offset<text:tab/>8</text:p>
            <text:p text:style-name="P156"><text:tab/>leaq<text:tab/>16(%rsp), %rax</text:p>
            <text:p text:style-name="P156"><text:tab/>movq<text:tab/>%rax, 0(%rsp)</text:p>
            <text:p text:style-name="P156"><text:tab/>movq <text:s text:c="3"/>i@GOTPCREL(%rip), %rdi</text:p>
            <text:p text:style-name="P156"><text:tab/>xorl<text:tab/>%eax, %eax</text:p>
            <text:p text:style-name="P156"><text:tab/>movl<text:tab/>%eax, 0(%rdi)</text:p>
            <text:p text:style-name="P156">.L130:</text:p>
            <text:p text:style-name="P156"><text:tab/>movq <text:s text:c="3"/>i@GOTPCREL(%rip), %rax</text:p>
            <text:p text:style-name="P156"><text:tab/>movl<text:tab/>0(%rax), %eax</text:p>
            <text:p text:style-name="P156"><text:tab/>cmpl<text:tab/>$6, %eax</text:p>
            <text:p text:style-name="P156"><text:tab/>jge<text:tab/>.L131</text:p>
            <text:p text:style-name="P156"><text:tab/>movq <text:s text:c="3"/>ivector4@GOTPCREL(%rip), %r11</text:p>
            <text:p text:style-name="P156"><text:tab/>movq <text:s text:c="3"/>i@GOTPCREL(%rip), %r8</text:p>
            <text:p text:style-name="P156"><text:tab/>movl<text:tab/>0(%r8), %ecx</text:p>
            <text:p text:style-name="P156"><text:tab/>movslq<text:tab/>%ecx, %rdx</text:p>
            <text:p text:style-name="P156"><text:tab/>xorl<text:tab/>%edi, %edi</text:p>
            <text:p text:style-name="P156"><text:tab/>movw<text:tab/>%di, 0(%r11,%rdx,2)</text:p>
            <text:p text:style-name="P156"><text:tab/>leaq<text:tab/>__stringlit_1(%rip), %rdi</text:p>
            <text:p text:style-name="P156"><text:tab/>movq <text:s text:c="3"/>ivector4@GOTPCREL(%rip), %rdx</text:p>
            <text:p text:style-name="P156"><text:tab/>movq <text:s text:c="3"/>i@GOTPCREL(%rip), %r10</text:p>
            <text:p text:style-name="P156"><text:tab/>movl<text:tab/>0(%r10), %ecx</text:p>
            <text:p text:style-name="P156"><text:tab/>movslq<text:tab/>%ecx, %r9</text:p>
            <text:p text:style-name="P156"><text:tab/>movswl<text:tab/>0(%rdx,%r9,2), %esi</text:p>
            <text:p text:style-name="P156"><text:tab/>movl<text:tab/>$0, %eax</text:p>
            <text:p text:style-name="P156"><text:tab/>call<text:tab/>printf@PLT</text:p>
            <text:p text:style-name="P156"><text:tab/>movq <text:s text:c="3"/>i@GOTPCREL(%rip), %rax</text:p>
            <text:p text:style-name="P156"><text:tab/>movq <text:s text:c="3"/>i@GOTPCREL(%rip), %r9</text:p>
            <text:p text:style-name="P156"><text:tab/>movl<text:tab/>0(%r9), %esi</text:p>
            <text:p text:style-name="P156"><text:tab/>leal<text:tab/>1(%esi), %esi</text:p>
            <text:p text:style-name="P156"><text:tab/>movl<text:tab/>%esi, 0(%rax)</text:p>
            <text:p text:style-name="P156"><text:tab/>jmp<text:tab/>.L130</text:p>
            <text:p text:style-name="P156">.L131:</text:p>
            <text:p text:style-name="P156"><text:tab/>addq<text:tab/>$8, %rsp</text:p>
            <text:p text:style-name="P156"><text:tab/>ret</text:p>
            <text:p text:style-name="P156"><text:tab/>.cfi_endproc</text:p>
          </table:table-cell>
          <table:table-cell table:style-name="Таблица73.A1" office:value-type="string">
            <text:p text:style-name="P156">loop_unrolling:</text:p>
            <text:p text:style-name="P156"><text:tab/>.cfi_startproc</text:p>
            <text:p text:style-name="P156"><text:tab/>subq<text:tab/>$8, %rsp</text:p>
            <text:p text:style-name="P156"><text:tab/>.cfi_adjust_cfa_offset<text:tab/>8</text:p>
            <text:p text:style-name="P156"><text:tab/>leaq<text:tab/>16(%rsp), %rax</text:p>
            <text:p text:style-name="P156"><text:tab/>movq<text:tab/>%rax, 0(%rsp)</text:p>
            <text:p text:style-name="P156"><text:tab/>movq <text:s text:c="3"/>i@GOTPCREL(%rip), %r8</text:p>
            <text:p text:style-name="P156"><text:tab/>xorl<text:tab/>%r10d, %r10d</text:p>
            <text:p text:style-name="P156"><text:tab/>movl<text:tab/>%r10d, 0(%r8)</text:p>
            <text:p text:style-name="P156">.L122:</text:p>
            <text:p text:style-name="P156"><text:tab/>movq <text:s text:c="3"/>i@GOTPCREL(%rip), %rax</text:p>
            <text:p text:style-name="P156"><text:tab/>movl<text:tab/>0(%rax), %eax</text:p>
            <text:p text:style-name="P156"><text:tab/>cmpl<text:tab/>$6, %eax</text:p>
            <text:p text:style-name="P156"><text:tab/>jge<text:tab/>.L123</text:p>
            <text:p text:style-name="P156"><text:tab/>movq <text:s text:c="3"/>ivector4@GOTPCREL(%rip), %r9</text:p>
            <text:p text:style-name="P156"><text:tab/>movslq<text:tab/>%eax, %rdi</text:p>
            <text:p text:style-name="P156"><text:tab/>xorl<text:tab/>%esi, %esi</text:p>
            <text:p text:style-name="P156"><text:tab/>movw<text:tab/>%si, 0(%r9,%rdi,2)</text:p>
            <text:p text:style-name="P156"><text:tab/>leaq<text:tab/>__stringlit_1(%rip), %rdi</text:p>
            <text:p text:style-name="P156"><text:tab/>movl<text:tab/>$0, %eax</text:p>
            <text:p text:style-name="P156"><text:tab/>call<text:tab/>printf@PLT</text:p>
            <text:p text:style-name="P156"><text:tab/>movq <text:s text:c="3"/>i@GOTPCREL(%rip), %rcx</text:p>
            <text:p text:style-name="P156"><text:tab/>movl<text:tab/>0(%rcx), %edx</text:p>
            <text:p text:style-name="P156"><text:tab/>leal<text:tab/>1(%edx), %esi</text:p>
            <text:p text:style-name="P156"><text:tab/>movl<text:tab/>%esi, 0(%rcx)</text:p>
            <text:p text:style-name="P156"><text:tab/>jmp<text:tab/>.L122</text:p>
            <text:p text:style-name="P156">.L123:</text:p>
            <text:p text:style-name="P156"><text:tab/>addq<text:tab/>$8, %rsp</text:p>
            <text:p text:style-name="P156"><text:tab/>ret</text:p>
            <text:p text:style-name="P156"><text:tab/>.cfi_endproc</text:p>
          </table:table-cell>
        </table:table-row>
      </table:table>
      <text:p text:style-name="P60"><text:span text:style-name="T23"/></text:p>
      <text:p text:style-name="P63"><text:span text:style-name="T23">Даже при оптимизации цикл остался, разворачивание цикла не произошло</text:span></text:p>
      <table:table table:name="Таблица74" table:style-name="Таблица74">
        <table:table-column table:style-name="Таблица74.A" table:number-columns-repeated="2"/>
        <table:table-row>
          <table:table-cell table:style-name="Таблица74.A1" office:value-type="string">
            <text:p text:style-name="P156">jump_compression:</text:p>
            <text:p text:style-name="P156"><text:tab/>.cfi_startproc</text:p>
            <text:p text:style-name="P156"><text:tab/>subq<text:tab/>$56, %rsp</text:p>
            <text:p text:style-name="P156"><text:tab/>.cfi_adjust_cfa_offset<text:tab/>56</text:p>
            <text:p text:style-name="P156"><text:tab/>leaq<text:tab/>64(%rsp), %rax</text:p>
            <text:p text:style-name="P156"><text:tab/>movq<text:tab/>%rax, 0(%rsp)</text:p>
            <text:p text:style-name="P156"><text:tab/>movq<text:tab/>%rbx, 8(%rsp)</text:p>
            <text:p text:style-name="P156"><text:tab/>movq<text:tab/>%rbp, 16(%rsp)</text:p>
            <text:p text:style-name="P156"><text:tab/>movq<text:tab/>%r12, 24(%rsp)</text:p>
            <text:p text:style-name="P156"><text:tab/>movq<text:tab/>%r13, 32(%rsp)</text:p>
            <text:p text:style-name="P156"><text:tab/>movq<text:tab/>%r14, 40(%rsp)</text:p>
            <text:p text:style-name="P156"><text:tab/>movq<text:tab/>%r8, %rbx</text:p>
            <text:p text:style-name="P156"><text:tab/>movq<text:tab/>%rcx, %rbp</text:p>
            <text:p text:style-name="P156"><text:tab/>movq<text:tab/>%rdx, %r12</text:p>
            <text:p text:style-name="P156"><text:tab/>movq<text:tab/>%rsi, %r13</text:p>
            <text:p text:style-name="P156"><text:tab/>movq<text:tab/>%rdi, %r14</text:p>
            <text:p text:style-name="P156">.L132:</text:p>
            <text:p text:style-name="P156"><text:tab/>cmpl<text:tab/>%r13d, %r14d</text:p>
            <text:p text:style-name="P156"><text:tab/>jge<text:tab/>.L133</text:p>
            <text:p text:style-name="P156"><text:tab/>cmpl<text:tab/>%r12d, %r13d</text:p>
            <text:p text:style-name="P156"><text:tab/>jl<text:tab/>.L134</text:p>
            <text:p text:style-name="P156"><text:tab/>leal<text:tab/>0(%r13d,%r12d,1), %r13d</text:p>
            <text:p text:style-name="P156"><text:tab/>leaq<text:tab/>__stringlit_1(%rip), %rdi</text:p>
            <text:p text:style-name="P156"><text:tab/>movq<text:tab/>%r13, %rsi</text:p>
            <text:p text:style-name="P156"><text:tab/>movl<text:tab/>$0, %eax</text:p>
            <text:p text:style-name="P156"><text:tab/>call<text:tab/>printf@PLT</text:p>
            <text:p text:style-name="P156"><text:tab/>jmp<text:tab/>.L132</text:p>
            <text:p text:style-name="P156">.L134:</text:p>
            <text:p text:style-name="P156"><text:tab/>cmpl<text:tab/>%ebp, %r12d</text:p>
            <text:p text:style-name="P156"><text:tab/>jl<text:tab/>.L135</text:p>
            <text:p text:style-name="P156"><text:tab/>leal<text:tab/>0(%r12d,%ebp,1), %r12d</text:p>
            <text:p text:style-name="P156"><text:tab/>jmp<text:tab/>.L136</text:p>
            <text:p text:style-name="P156">.L135:</text:p>
            <text:p text:style-name="P156"><text:tab/>cmpl<text:tab/>%ebx, %ebp</text:p>
            <text:p text:style-name="P156"><text:tab/>jge<text:tab/>.L132</text:p>
            <text:p text:style-name="P156"><text:tab/>leal<text:tab/>0(%ebp,%ebx,1), %ebp</text:p>
            <text:p text:style-name="P156"><text:tab/>jmp<text:tab/>.L136</text:p>
            <text:p text:style-name="P156">.L133:</text:p>
            <text:p text:style-name="P156"><text:tab/>leal<text:tab/>0(%r14d,%r13d,1), %r14d</text:p>
            <text:p text:style-name="P156">.L136:</text:p>
            <text:p text:style-name="P156"><text:tab/>leal<text:tab/>0(%r14d,%r13d,1), %edx</text:p>
            <text:p text:style-name="P156"><text:tab/>leal<text:tab/>0(%edx,%r12d,1), %esi</text:p>
            <text:p text:style-name="P156"><text:tab/>leal<text:tab/>0(%esi,%ebp,1), %edi</text:p>
            <text:p text:style-name="P156"><text:tab/>leal<text:tab/>0(%edi,%ebx,1), %eax</text:p>
            <text:p text:style-name="P156"><text:tab/>movq<text:tab/>8(%rsp), %rbx</text:p>
            <text:p text:style-name="P156"><text:tab/>movq<text:tab/>16(%rsp), %rbp</text:p>
            <text:p text:style-name="P156"><text:tab/>movq<text:tab/>24(%rsp), %r12</text:p>
            <text:p text:style-name="P156"><text:tab/>movq<text:tab/>32(%rsp), %r13</text:p>
            <text:p text:style-name="P156"><text:tab/>movq<text:tab/>40(%rsp), %r14</text:p>
            <text:p text:style-name="P156"><text:tab/>addq<text:tab/>$56, %rsp</text:p>
            <text:p text:style-name="P156"><text:tab/>ret</text:p>
            <text:p text:style-name="P156"><text:tab/>.cfi_endproc</text:p>
          </table:table-cell>
          <table:table-cell table:style-name="Таблица74.A1" office:value-type="string">
            <text:p text:style-name="P181">int jump_compression(int i, int j, int k, int l, int m)</text:p>
            <text:p text:style-name="P181">{</text:p>
            <text:p text:style-name="P181">beg_1:</text:p>
            <text:p text:style-name="P181"><text:tab/>if (i &lt; j)</text:p>
            <text:p text:style-name="P181"><text:tab/><text:tab/>if (j &lt; k)</text:p>
            <text:p text:style-name="P181"><text:tab/><text:tab/><text:tab/>if (k &lt; l)</text:p>
            <text:p text:style-name="P181"><text:tab/><text:tab/><text:tab/><text:tab/>if (l &lt; m)</text:p>
            <text:p text:style-name="P181"><text:tab/><text:tab/><text:tab/><text:tab/><text:tab/>l += m;</text:p>
            <text:p text:style-name="P181"><text:tab/><text:tab/><text:tab/><text:tab/>else</text:p>
            <text:p text:style-name="P181"><text:tab/><text:tab/><text:tab/><text:tab/><text:tab/>goto end_1;</text:p>
            <text:p text:style-name="P181"><text:tab/><text:tab/><text:tab/>else</text:p>
            <text:p text:style-name="P181"><text:tab/><text:tab/><text:tab/><text:tab/>k += l;</text:p>
            <text:p text:style-name="P181"><text:tab/><text:tab/>else {</text:p>
            <text:p text:style-name="P181"><text:tab/><text:tab/><text:tab/>j += k;</text:p>
            <text:p text:style-name="P181"><text:tab/><text:tab/><text:tab/>printf("%d", j);</text:p>
            <text:p text:style-name="P181"><text:tab/><text:tab/>end_1:</text:p>
            <text:p text:style-name="P181"><text:tab/><text:tab/><text:tab/>goto beg_1;</text:p>
            <text:p text:style-name="P181"><text:tab/><text:tab/>}</text:p>
            <text:p text:style-name="P181"><text:tab/>else</text:p>
            <text:p text:style-name="P181"><text:tab/><text:tab/>i += j;</text:p>
            <text:p text:style-name="P181"><text:tab/>return(i + j + k + l + m);</text:p>
            <text:p text:style-name="P181">}<text:tab/>movq <text:s text:c="3"/>i@GOTPCREL(%rip), %rdx</text:p>
            <text:p text:style-name="P181"><text:tab/>xorl<text:tab/>%r9d, %r9d</text:p>
            <text:p text:style-name="P181"><text:tab/>movl<text:tab/>%r9d, 0(%rdx)</text:p>
            <text:p text:style-name="P181">.L108:</text:p>
            <text:p text:style-name="P181"><text:tab/>movq <text:s text:c="3"/>i@GOTPCREL(%rip), %rdx</text:p>
            <text:p text:style-name="P181"><text:tab/>movl<text:tab/>0(%rdx), %r8d</text:p>
            <text:p text:style-name="P181"><text:tab/>cmpl<text:tab/>$100, %r8d</text:p>
            <text:p text:style-name="P181"><text:tab/>jge<text:tab/>.L109</text:p>
            <text:p text:style-name="P181"><text:tab/>movq <text:s text:c="3"/>ivector5@GOTPCREL(%rip), %rsi</text:p>
            <text:p text:style-name="P181"><text:tab/>leal<text:tab/>3(,%r8d,2), %edi</text:p>
            <text:p text:style-name="P181"><text:tab/>movslq<text:tab/>%edi, %rcx</text:p>
            <text:p text:style-name="P181"><text:tab/>movl<text:tab/>$5, %r9d</text:p>
            <text:p text:style-name="P181"><text:tab/>movl<text:tab/>%r9d, 0(%rsi,%rcx,4)</text:p>
            <text:p text:style-name="P181"><text:tab/>leal<text:tab/>1(%r8d), %esi</text:p>
            <text:p text:style-name="P181"><text:tab/>movl<text:tab/>%esi, 0(%rdx)</text:p>
            <text:p text:style-name="P181"><text:tab/>jmp<text:tab/>.L108</text:p>
            <text:p text:style-name="P181">.L109:</text:p>
          </table:table-cell>
        </table:table-row>
      </table:table>
      <text:p text:style-name="P63"><text:span text:style-name="T23"/></text:p>
      <text:p text:style-name="P66"><text:span text:style-name="T23">Без оптимизации компилятор оставляет лишние цепочки переходов, оптимизация позволяет избежать этого</text:span></text:p>
      <text:p text:style-name="P67"><text:span text:style-name="T23"/></text:p>
      <table:table table:name="Таблица75" table:style-name="Таблица75">
        <table:table-column table:style-name="Таблица75.A" table:number-columns-repeated="2"/>
        <table:table-row>
          <table:table-cell table:style-name="Таблица75.A1" office:value-type="string">
            <text:p text:style-name="P160">jump_compression:</text:p>
            <text:p text:style-name="P160"><text:tab/>.cfi_startproc</text:p>
            <text:p text:style-name="P160"><text:tab/>subq<text:tab/>$56, %rsp</text:p>
            <text:p text:style-name="P160"><text:tab/>.cfi_adjust_cfa_offset<text:tab/>56</text:p>
            <text:p text:style-name="P160"><text:tab/>leaq<text:tab/>64(%rsp), %rax</text:p>
            <text:p text:style-name="P160"><text:tab/>movq<text:tab/>%rax, 0(%rsp)</text:p>
            <text:p text:style-name="P160"><text:tab/>movq<text:tab/>%rbx, 8(%rsp)</text:p>
            <text:p text:style-name="P160"><text:tab/>movq<text:tab/>%rbp, 16(%rsp)</text:p>
            <text:p text:style-name="P160"><text:tab/>movq<text:tab/>%r12, 24(%rsp)</text:p>
            <text:p text:style-name="P160"><text:tab/>movq<text:tab/>%r13, 32(%rsp)</text:p>
            <text:p text:style-name="P160"><text:tab/>movq<text:tab/>%r14, 40(%rsp)</text:p>
            <text:p text:style-name="P160"><text:tab/>movq<text:tab/>%r8, %rbx</text:p>
            <text:p text:style-name="P160"><text:tab/>movq<text:tab/>%rcx, %rbp</text:p>
            <text:p text:style-name="P160"><text:tab/>movq<text:tab/>%rdx, %r12</text:p>
            <text:p text:style-name="P160"><text:tab/>movq<text:tab/>%rsi, %r13</text:p>
            <text:p text:style-name="P160"><text:tab/>movq<text:tab/>%rdi, %r14</text:p>
            <text:p text:style-name="P160">.L132:</text:p>
            <text:p text:style-name="P160"><text:tab/>cmpl<text:tab/>%r13d, %r14d</text:p>
            <text:p text:style-name="P160"><text:tab/>jge<text:tab/>.L133</text:p>
            <text:p text:style-name="P160"><text:tab/>cmpl<text:tab/>%r12d, %r13d</text:p>
            <text:p text:style-name="P160"><text:tab/>jl<text:tab/>.L134</text:p>
            <text:p text:style-name="P160"><text:tab/>leal<text:tab/>0(%r13d,%r12d,1), %r13d</text:p>
            <text:p text:style-name="P160"><text:tab/>leaq<text:tab/>__stringlit_1(%rip), %rdi</text:p>
            <text:p text:style-name="P160"><text:tab/>movq<text:tab/>%r13, %rsi</text:p>
            <text:p text:style-name="P160"><text:tab/>movl<text:tab/>$0, %eax</text:p>
            <text:p text:style-name="P160"><text:tab/>call<text:tab/>printf@PLT</text:p>
            <text:p text:style-name="P160"><text:tab/>jmp<text:tab/>.L132</text:p>
            <text:p text:style-name="P160">.L134:</text:p>
            <text:p text:style-name="P160"><text:tab/>cmpl<text:tab/>%ebp, %r12d</text:p>
            <text:p text:style-name="P160"><text:tab/>jl<text:tab/>.L135</text:p>
            <text:p text:style-name="P160"><text:tab/>leal<text:tab/>0(%r12d,%ebp,1), %r12d</text:p>
            <text:p text:style-name="P160"><text:tab/>jmp<text:tab/>.L136</text:p>
            <text:p text:style-name="P160">.L135:</text:p>
            <text:p text:style-name="P160"><text:tab/>cmpl<text:tab/>%ebx, %ebp</text:p>
            <text:p text:style-name="P160"><text:tab/>jge<text:tab/>.L132</text:p>
            <text:p text:style-name="P160"><text:tab/>leal<text:tab/>0(%ebp,%ebx,1), %ebp</text:p>
            <text:p text:style-name="P160"><text:tab/>jmp<text:tab/>.L136</text:p>
            <text:p text:style-name="P160">.L133:</text:p>
            <text:p text:style-name="P160"><text:tab/>leal<text:tab/>0(%r14d,%r13d,1), %r14d</text:p>
            <text:p text:style-name="P160">.L136:</text:p>
            <text:p text:style-name="P160"><text:tab/>leal<text:tab/>0(%r14d,%r13d,1), %edx</text:p>
            <text:p text:style-name="P160"><text:tab/>leal<text:tab/>0(%edx,%r12d,1), %esi</text:p>
            <text:p text:style-name="P160"><text:tab/>leal<text:tab/>0(%esi,%ebp,1), %edi</text:p>
            <text:p text:style-name="P160"><text:tab/>leal<text:tab/>0(%edi,%ebx,1), %eax</text:p>
            <text:p text:style-name="P160"><text:tab/>movq<text:tab/>8(%rsp), %rbx</text:p>
            <text:p text:style-name="P160"><text:tab/>movq<text:tab/>16(%rsp), %rbp</text:p>
            <text:p text:style-name="P160"><text:tab/>movq<text:tab/>24(%rsp), %r12</text:p>
            <text:p text:style-name="P160"><text:tab/>movq<text:tab/>32(%rsp), %r13</text:p>
            <text:p text:style-name="P160"><text:tab/>movq<text:tab/>40(%rsp), %r14</text:p>
            <text:p text:style-name="P160"><text:tab/>addq<text:tab/>$56, %rsp</text:p>
            <text:p text:style-name="P160"><text:tab/>ret</text:p>
            <text:p text:style-name="P160"><text:tab/>.cfi_endproc</text:p>
          </table:table-cell>
          <table:table-cell table:style-name="Таблица75.A1" office:value-type="string">
            <text:p text:style-name="P147">jump_compression:</text:p>
            <text:p text:style-name="P147"><text:tab/>.cfi_startproc</text:p>
            <text:p text:style-name="P147"><text:tab/>subq<text:tab/>$56, %rsp</text:p>
            <text:p text:style-name="P147"><text:tab/>.cfi_adjust_cfa_offset<text:tab/>56</text:p>
            <text:p text:style-name="P147"><text:tab/>leaq<text:tab/>64(%rsp), %rax</text:p>
            <text:p text:style-name="P147"><text:tab/>movq<text:tab/>%rax, 0(%rsp)</text:p>
            <text:p text:style-name="P147"><text:tab/>movq<text:tab/>%rbx, 8(%rsp)</text:p>
            <text:p text:style-name="P147"><text:tab/>movq<text:tab/>%rbp, 16(%rsp)</text:p>
            <text:p text:style-name="P147"><text:tab/>movq<text:tab/>%r12, 24(%rsp)</text:p>
            <text:p text:style-name="P147"><text:tab/>movq<text:tab/>%r13, 32(%rsp)</text:p>
            <text:p text:style-name="P147"><text:tab/>movq<text:tab/>%r14, 40(%rsp)</text:p>
            <text:p text:style-name="P147"><text:tab/>movq<text:tab/>%r8, %rbx</text:p>
            <text:p text:style-name="P147"><text:tab/>movq<text:tab/>%rcx, %rbp</text:p>
            <text:p text:style-name="P147"><text:tab/>movq<text:tab/>%rdx, %r12</text:p>
            <text:p text:style-name="P147"><text:tab/>movq<text:tab/>%rsi, %r13</text:p>
            <text:p text:style-name="P147"><text:tab/>movq<text:tab/>%rdi, %r14</text:p>
            <text:p text:style-name="P147">.L124:</text:p>
            <text:p text:style-name="P147"><text:tab/>cmpl<text:tab/>%r13d, %r14d</text:p>
            <text:p text:style-name="P147"><text:tab/>jge<text:tab/>.L125</text:p>
            <text:p text:style-name="P147"><text:tab/>cmpl<text:tab/>%r12d, %r13d</text:p>
            <text:p text:style-name="P147"><text:tab/>jl<text:tab/>.L126</text:p>
            <text:p text:style-name="P147"><text:tab/>leal<text:tab/>0(%r13d,%r12d,1), %r13d</text:p>
            <text:p text:style-name="P147"><text:tab/>leaq<text:tab/>__stringlit_1(%rip), %rdi</text:p>
            <text:p text:style-name="P147"><text:tab/>movq<text:tab/>%r13, %rsi</text:p>
            <text:p text:style-name="P147"><text:tab/>movl<text:tab/>$0, %eax</text:p>
            <text:p text:style-name="P147"><text:tab/>call<text:tab/>printf@PLT</text:p>
            <text:p text:style-name="P147"><text:tab/>jmp<text:tab/>.L124</text:p>
            <text:p text:style-name="P147">.L126:</text:p>
            <text:p text:style-name="P147"><text:tab/>cmpl<text:tab/>%ebp, %r12d</text:p>
            <text:p text:style-name="P147"><text:tab/>jl<text:tab/>.L127</text:p>
            <text:p text:style-name="P147"><text:tab/>leal<text:tab/>0(%r12d,%ebp,1), %r12d</text:p>
            <text:p text:style-name="P147"><text:tab/>jmp<text:tab/>.L128</text:p>
            <text:p text:style-name="P147">.L127:</text:p>
            <text:p text:style-name="P147"><text:tab/>cmpl<text:tab/>%ebx, %ebp</text:p>
            <text:p text:style-name="P147"><text:tab/>jge<text:tab/>.L124</text:p>
            <text:p text:style-name="P147"><text:tab/>leal<text:tab/>0(%ebp,%ebx,1), %ebp</text:p>
            <text:p text:style-name="P147"><text:tab/>jmp<text:tab/>.L128</text:p>
            <text:p text:style-name="P147">.L125:</text:p>
            <text:p text:style-name="P147"><text:tab/>leal<text:tab/>0(%r14d,%r13d,1), %r14d</text:p>
            <text:p text:style-name="P147">.L128:</text:p>
            <text:p text:style-name="P147"><text:tab/>leal<text:tab/>0(%r14d,%r13d,1), %edx</text:p>
            <text:p text:style-name="P147"><text:tab/>leal<text:tab/>0(%edx,%r12d,1), %esi</text:p>
            <text:p text:style-name="P147"><text:tab/>leal<text:tab/>0(%esi,%ebp,1), %edi</text:p>
            <text:p text:style-name="P147"><text:tab/>leal<text:tab/>0(%edi,%ebx,1), %eax</text:p>
            <text:p text:style-name="P147"><text:tab/>movq<text:tab/>8(%rsp), %rbx</text:p>
            <text:p text:style-name="P147"><text:tab/>movq<text:tab/>16(%rsp), %rbp</text:p>
            <text:p text:style-name="P147"><text:tab/>movq<text:tab/>24(%rsp), %r12</text:p>
            <text:p text:style-name="P147"><text:tab/>movq<text:tab/>32(%rsp), %r13</text:p>
            <text:p text:style-name="P147"><text:tab/>movq<text:tab/>40(%rsp), %r14</text:p>
            <text:p text:style-name="P147"><text:tab/>addq<text:tab/>$56, %rsp</text:p>
            <text:p text:style-name="P147"><text:tab/>ret</text:p>
            <text:p text:style-name="P147"><text:tab/>.cfi_endproc</text:p>
          </table:table-cell>
        </table:table-row>
      </table:table>
      <text:p text:style-name="P66"><text:span text:style-name="T23"/></text:p>
      <text:p text:style-name="P76"><text:span text:style-name="T23">Код без оптимизации и с оптимизацией почти не отличаются. Ccomp убрал лишние цепочки переходов даже без флага оптимизации</text:span></text:p>
      <text:p text:style-name="P36"/>
      <table:table table:name="Таблица29" table:style-name="Таблица29">
        <table:table-column table:style-name="Таблица29.A"/>
        <table:table-column table:style-name="Таблица29.B"/>
        <table:table-column table:style-name="Таблица29.C"/>
        <table:table-column table:style-name="Таблица29.D"/>
        <table:table-row>
          <table:table-cell table:style-name="Таблица29.A1" office:value-type="string">
            <text:p text:style-name="P99"/>
          </table:table-cell>
          <table:table-cell table:style-name="Таблица29.A1" office:value-type="string">
            <text:p text:style-name="P98">clang</text:p>
          </table:table-cell>
          <table:table-cell table:style-name="Таблица29.A1" office:value-type="string">
            <text:p text:style-name="P98">gcc</text:p>
          </table:table-cell>
          <table:table-cell table:style-name="Таблица29.A1" office:value-type="string">
            <text:p text:style-name="P98">ccomp</text:p>
          </table:table-cell>
        </table:table-row>
        <table:table-row>
          <table:table-cell table:style-name="Таблица29.A1" office:value-type="string">
            <text:p text:style-name="P104">Размножение <text:span text:style-name="T7">копий</text:span></text:p>
          </table:table-cell>
          <table:table-cell table:style-name="Таблица29.A1" office:value-type="string">
            <text:p text:style-name="P98">+</text:p>
          </table:table-cell>
          <table:table-cell table:style-name="Таблица29.A1" office:value-type="string">
            <text:p text:style-name="P99">-</text:p>
          </table:table-cell>
          <table:table-cell table:style-name="Таблица29.A1" office:value-type="string">
            <text:p text:style-name="P98">+</text:p>
          </table:table-cell>
        </table:table-row>
        <table:table-row>
          <table:table-cell table:style-name="Таблица29.A1" office:value-type="string">
            <text:p text:style-name="P104">Свертка констант </text:p>
          </table:table-cell>
          <table:table-cell table:style-name="Таблица29.A1" office:value-type="string">
            <text:p text:style-name="P98">+</text:p>
          </table:table-cell>
          <table:table-cell table:style-name="Таблица29.A1" office:value-type="string">
            <text:p text:style-name="P98">+</text:p>
          </table:table-cell>
          <table:table-cell table:style-name="Таблица29.A1" office:value-type="string">
            <text:p text:style-name="P98">+</text:p>
          </table:table-cell>
        </table:table-row>
        <table:table-row>
          <table:table-cell table:style-name="Таблица29.A1" office:value-type="string">
            <text:p text:style-name="P104">Алгебраические упрощения</text:p>
          </table:table-cell>
          <table:table-cell table:style-name="Таблица29.A1" office:value-type="string">
            <text:p text:style-name="P98">+</text:p>
          </table:table-cell>
          <table:table-cell table:style-name="Таблица29.A1" office:value-type="string">
            <text:p text:style-name="P98">+</text:p>
          </table:table-cell>
          <table:table-cell table:style-name="Таблица29.A1" office:value-type="string">
            <text:p text:style-name="P98">+</text:p>
          </table:table-cell>
        </table:table-row>
        <table:table-row>
          <table:table-cell table:style-name="Таблица29.A1" office:value-type="string">
            <text:p text:style-name="P104">Удаление излишних загрузок/сохранений</text:p>
          </table:table-cell>
          <table:table-cell table:style-name="Таблица29.A1" office:value-type="string">
            <text:p text:style-name="P98">+</text:p>
          </table:table-cell>
          <table:table-cell table:style-name="Таблица29.A1" office:value-type="string">
            <text:p text:style-name="P98">+</text:p>
          </table:table-cell>
          <table:table-cell table:style-name="Таблица29.A1" office:value-type="string">
            <text:p text:style-name="P98">+</text:p>
          </table:table-cell>
        </table:table-row>
        <table:table-row>
          <table:table-cell table:style-name="Таблица29.A1" office:value-type="string">
            <text:p text:style-name="P104">Удаление излишних присваиваний</text:p>
          </table:table-cell>
          <table:table-cell table:style-name="Таблица29.A1" office:value-type="string">
            <text:p text:style-name="P98">+</text:p>
          </table:table-cell>
          <table:table-cell table:style-name="Таблица29.A1" office:value-type="string">
            <text:p text:style-name="P98">+</text:p>
          </table:table-cell>
          <table:table-cell table:style-name="Таблица29.A1" office:value-type="string">
            <text:p text:style-name="P98">+</text:p>
          </table:table-cell>
        </table:table-row>
        <table:table-row>
          <table:table-cell table:style-name="Таблица29.A1" office:value-type="string">
            <text:p text:style-name="P104">Снижение мощности</text:p>
          </table:table-cell>
          <table:table-cell table:style-name="Таблица29.A1" office:value-type="string">
            <text:p text:style-name="P98">+</text:p>
          </table:table-cell>
          <table:table-cell table:style-name="Таблица29.A1" office:value-type="string">
            <text:p text:style-name="P98">+</text:p>
          </table:table-cell>
          <table:table-cell table:style-name="Таблица29.A1" office:value-type="string">
            <text:p text:style-name="P98">-</text:p>
          </table:table-cell>
        </table:table-row>
        <table:table-row>
          <table:table-cell table:style-name="Таблица29.A1" office:value-type="string">
            <text:p text:style-name="P104">Удаление циклов</text:p>
          </table:table-cell>
          <table:table-cell table:style-name="Таблица29.A1" office:value-type="string">
            <text:p text:style-name="P98">+</text:p>
          </table:table-cell>
          <table:table-cell table:style-name="Таблица29.A1" office:value-type="string">
            <text:p text:style-name="P98">+</text:p>
          </table:table-cell>
          <table:table-cell table:style-name="Таблица29.A1" office:value-type="string">
            <text:p text:style-name="P98">-</text:p>
          </table:table-cell>
        </table:table-row>
        <table:table-row>
          <table:table-cell table:style-name="Таблица29.A1" office:value-type="string">
            <text:p text:style-name="P104">Удаление переменных индукции циклов</text:p>
          </table:table-cell>
          <table:table-cell table:style-name="Таблица29.A1" office:value-type="string">
            <text:p text:style-name="P98">+</text:p>
          </table:table-cell>
          <table:table-cell table:style-name="Таблица29.A1" office:value-type="string">
            <text:p text:style-name="P98">+</text:p>
          </table:table-cell>
          <table:table-cell table:style-name="Таблица29.A1" office:value-type="string">
            <text:p text:style-name="P98">-</text:p>
          </table:table-cell>
        </table:table-row>
        <table:table-row>
          <table:table-cell table:style-name="Таблица29.A1" office:value-type="string">
            <text:p text:style-name="P104"><text:span text:style-name="T5">Удаление</text:span> общих подвыражений</text:p>
          </table:table-cell>
          <table:table-cell table:style-name="Таблица29.A1" office:value-type="string">
            <text:p text:style-name="P98">+</text:p>
          </table:table-cell>
          <table:table-cell table:style-name="Таблица29.A1" office:value-type="string">
            <text:p text:style-name="P98">+</text:p>
          </table:table-cell>
          <table:table-cell table:style-name="Таблица29.A1" office:value-type="string">
            <text:p text:style-name="P98">-</text:p>
          </table:table-cell>
        </table:table-row>
        <table:table-row>
          <table:table-cell table:style-name="Таблица29.A1" office:value-type="string">
            <text:p text:style-name="P104">Вынесение инвариантного кода</text:p>
          </table:table-cell>
          <table:table-cell table:style-name="Таблица29.A1" office:value-type="string">
            <text:p text:style-name="P98">-</text:p>
          </table:table-cell>
          <table:table-cell table:style-name="Таблица29.A1" office:value-type="string">
            <text:p text:style-name="P99">-</text:p>
          </table:table-cell>
          <table:table-cell table:style-name="Таблица29.A1" office:value-type="string">
            <text:p text:style-name="P98">-</text:p>
          </table:table-cell>
        </table:table-row>
        <table:table-row>
          <table:table-cell table:style-name="Таблица29.A1" office:value-type="string">
            <text:p text:style-name="P104">Удаление недостижимого кода</text:p>
          </table:table-cell>
          <table:table-cell table:style-name="Таблица29.A1" office:value-type="string">
            <text:p text:style-name="P98">+</text:p>
          </table:table-cell>
          <table:table-cell table:style-name="Таблица29.A1" office:value-type="string">
            <text:p text:style-name="P98">+</text:p>
          </table:table-cell>
          <table:table-cell table:style-name="Таблица29.A1" office:value-type="string">
            <text:p text:style-name="P98">+-</text:p>
          </table:table-cell>
        </table:table-row>
        <table:table-row>
          <table:table-cell table:style-name="Таблица29.A1" office:value-type="string">
            <text:p text:style-name="P104">Удаление циклов</text:p>
          </table:table-cell>
          <table:table-cell table:style-name="Таблица29.A1" office:value-type="string">
            <text:p text:style-name="P98">+</text:p>
          </table:table-cell>
          <table:table-cell table:style-name="Таблица29.A1" office:value-type="string">
            <text:p text:style-name="P98">+</text:p>
          </table:table-cell>
          <table:table-cell table:style-name="Таблица29.A1" office:value-type="string">
            <text:p text:style-name="P99">-</text:p>
          </table:table-cell>
        </table:table-row>
        <table:table-row>
          <table:table-cell table:style-name="Таблица29.A1" office:value-type="string">
            <text:p text:style-name="P104">Разворачивание циклов</text:p>
          </table:table-cell>
          <table:table-cell table:style-name="Таблица29.A1" office:value-type="string">
            <text:p text:style-name="P98">-</text:p>
          </table:table-cell>
          <table:table-cell table:style-name="Таблица29.A1" office:value-type="string">
            <text:p text:style-name="P99">-</text:p>
          </table:table-cell>
          <table:table-cell table:style-name="Таблица29.A1" office:value-type="string">
            <text:p text:style-name="P99">-</text:p>
          </table:table-cell>
        </table:table-row>
        <table:table-row>
          <table:table-cell table:style-name="Таблица29.A1" office:value-type="string">
            <text:p text:style-name="P104">Слияние циклов</text:p>
          </table:table-cell>
          <table:table-cell table:style-name="Таблица29.A1" office:value-type="string">
            <text:p text:style-name="P98">-</text:p>
          </table:table-cell>
          <table:table-cell table:style-name="Таблица29.A1" office:value-type="string">
            <text:p text:style-name="P99">-</text:p>
          </table:table-cell>
          <table:table-cell table:style-name="Таблица29.A1" office:value-type="string">
            <text:p text:style-name="P99">-</text:p>
          </table:table-cell>
        </table:table-row>
        <table:table-row>
          <table:table-cell table:style-name="Таблица29.A1" office:value-type="string">
            <text:p text:style-name="P110">Удаление лишних цепочек перехода</text:p>
          </table:table-cell>
          <table:table-cell table:style-name="Таблица29.A1" office:value-type="string">
            <text:p text:style-name="P100">+</text:p>
          </table:table-cell>
          <table:table-cell table:style-name="Таблица29.A1" office:value-type="string">
            <text:p text:style-name="P100">+</text:p>
          </table:table-cell>
          <table:table-cell table:style-name="Таблица29.A1" office:value-type="string">
            <text:p text:style-name="P100">+</text:p>
          </table:table-cell>
        </table:table-row>
      </table:table>
      <text:p text:style-name="P37"/>
      <text:p text:style-name="P37"/>
      <text:p text:style-name="P34"><text:span text:style-name="T13">GCC и Clang поддерживают подавляющее большинство рассмотренных оптимизаци</text:span><text:span text:style-name="T14">й, CompCert заметно отстаёт от них, его применение оправдано в безопасных системах, где критична математическая корректность компиляции, а производительность вторична</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enlo" svg:font-family="Menlo, Monaco, Consolas, 'Cascadia Mono', 'Ubuntu Mono', 'DejaVu Sans Mono', 'Liberation Mono', 'JetBrains Mono', 'Fira Code', Cousine, 'Roboto Mono', 'Courier New', Courier, sans-serif, system-ui"/>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quote-cjk-patch" svg:font-family="quote-cjk-patch, Inter, system-ui, apple-system, BlinkMacSystemFont, 'Segoe UI', Roboto, Oxygen, Ubuntu, Cantarell, 'Open Sans', 'Helvetica Neue',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5-14T10:06:54.983417027</meta:creation-date>
    <dc:date>2026-06-04T10:46:35.187446858</dc:date>
    <meta:editing-duration>PT1H46M7S</meta:editing-duration>
    <meta:editing-cycles>11</meta:editing-cycles>
    <meta:generator>LibreOffice/24.2.7.2$Linux_X86_64 LibreOffice_project/420$Build-2</meta:generator>
    <meta:document-statistic meta:table-count="77" meta:image-count="0" meta:object-count="0" meta:page-count="73" meta:paragraph-count="4248" meta:word-count="11954" meta:character-count="80500" meta:non-whitespace-character-count="67489"/>
  </office:meta>
</office:document-meta>
</file>